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7299in"/>
    </style:style>
    <style:style style:name="co11" style:family="table-column">
      <style:table-column-properties fo:break-before="auto" style:column-width="1.80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ora_simulation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2" table:default-cell-style-name="Default"/>
        <table:table-row table:style-name="ro1">
          <table:table-cell table:style-name="ce1" office:value-type="string" calcext:value-type="string">
            <text:p>Trajectory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Rotor Angle</text:p>
          </table:table-cell>
          <table:table-cell table:style-name="ce1" office:value-type="string" calcext:value-type="string">
            <text:p>Rotor Speed</text:p>
          </table:table-cell>
          <table:table-cell table:style-name="ce1" office:value-type="string" calcext:value-type="string">
            <text:p>Raw Output</text:p>
          </table:table-cell>
          <table:table-cell table:style-name="ce1" office:value-type="string" calcext:value-type="string">
            <text:p>Normalized Output</text:p>
          </table:table-cell>
          <table:table-cell table:style-name="ce1" office:value-type="string" calcext:value-type="string">
            <text:p>next_Position</text:p>
          </table:table-cell>
          <table:table-cell table:style-name="ce1" office:value-type="string" calcext:value-type="string">
            <text:p>next_Velocity</text:p>
          </table:table-cell>
          <table:table-cell table:style-name="ce1" office:value-type="string" calcext:value-type="string">
            <text:p>next_Rotor Angle</text:p>
          </table:table-cell>
          <table:table-cell table:style-name="ce1" office:value-type="string" calcext:value-type="string">
            <text:p>next_Rotor Speed</text:p>
          </table:table-cell>
          <table:table-cell table:style-name="ce1" table:number-columns-repeated="1637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6088" calcext:value-type="float">
            <text:p>0.6088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3478" calcext:value-type="float">
            <text:p>-0.3478</text:p>
          </table:table-cell>
          <table:table-cell office:value-type="float" office:value="0.5285" calcext:value-type="float">
            <text:p>0.5285</text:p>
          </table:table-cell>
          <table:table-cell office:value-type="float" office:value="10.0086" calcext:value-type="float">
            <text:p>10.0086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2544" calcext:value-type="float">
            <text:p>-0.2544</text:p>
          </table:table-cell>
          <table:table-cell office:value-type="float" office:value="-0.9065" calcext:value-type="float">
            <text:p>-0.90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5371" calcext:value-type="float">
            <text:p>0.537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544" calcext:value-type="float">
            <text:p>-0.2544</text:p>
          </table:table-cell>
          <table:table-cell office:value-type="float" office:value="-0.9065" calcext:value-type="float">
            <text:p>-0.90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5371" calcext:value-type="float">
            <text:p>0.5371</text:p>
          </table:table-cell>
          <table:table-cell office:value-type="float" office:value="9.1224" calcext:value-type="float">
            <text:p>9.1224</text:p>
          </table:table-cell>
          <table:table-cell office:value-type="float" office:value="-0.8776" calcext:value-type="float">
            <text:p>-0.8776</text:p>
          </table:table-cell>
          <table:table-cell office:value-type="float" office:value="-0.8887" calcext:value-type="float">
            <text:p>-0.8887</text:p>
          </table:table-cell>
          <table:table-cell office:value-type="float" office:value="-0.2617" calcext:value-type="float">
            <text:p>-0.2617</text:p>
          </table:table-cell>
          <table:table-cell office:value-type="float" office:value="0.2834" calcext:value-type="float">
            <text:p>0.2834</text:p>
          </table:table-cell>
          <table:table-cell office:value-type="float" office:value="-0.3404" calcext:value-type="float">
            <text:p>-0.340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8887" calcext:value-type="float">
            <text:p>-0.8887</text:p>
          </table:table-cell>
          <table:table-cell office:value-type="float" office:value="-0.2617" calcext:value-type="float">
            <text:p>-0.2617</text:p>
          </table:table-cell>
          <table:table-cell office:value-type="float" office:value="0.2834" calcext:value-type="float">
            <text:p>0.2834</text:p>
          </table:table-cell>
          <table:table-cell office:value-type="float" office:value="-0.3404" calcext:value-type="float">
            <text:p>-0.3404</text:p>
          </table:table-cell>
          <table:table-cell office:value-type="float" office:value="9.1022" calcext:value-type="float">
            <text:p>9.1022</text:p>
          </table:table-cell>
          <table:table-cell office:value-type="float" office:value="-0.8978" calcext:value-type="float">
            <text:p>-0.8978</text:p>
          </table:table-cell>
          <table:table-cell office:value-type="float" office:value="-0.6917" calcext:value-type="float">
            <text:p>-0.6917</text:p>
          </table:table-cell>
          <table:table-cell office:value-type="float" office:value="0.6247" calcext:value-type="float">
            <text:p>0.6247</text:p>
          </table:table-cell>
          <table:table-cell office:value-type="float" office:value="-0.5059" calcext:value-type="float">
            <text:p>-0.5059</text:p>
          </table:table-cell>
          <table:table-cell office:value-type="float" office:value="-1.2382" calcext:value-type="float">
            <text:p>-1.238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6917" calcext:value-type="float">
            <text:p>-0.6917</text:p>
          </table:table-cell>
          <table:table-cell office:value-type="float" office:value="0.6247" calcext:value-type="float">
            <text:p>0.6247</text:p>
          </table:table-cell>
          <table:table-cell office:value-type="float" office:value="-0.5059" calcext:value-type="float">
            <text:p>-0.5059</text:p>
          </table:table-cell>
          <table:table-cell office:value-type="float" office:value="-1.2382" calcext:value-type="float">
            <text:p>-1.2382</text:p>
          </table:table-cell>
          <table:table-cell office:value-type="float" office:value="11.3181" calcext:value-type="float">
            <text:p>11.3181</text:p>
          </table:table-cell>
          <table:table-cell office:value-type="float" office:value="1.3181" calcext:value-type="float">
            <text:p>1.3181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8774" calcext:value-type="float">
            <text:p>0.8774</text:p>
          </table:table-cell>
          <table:table-cell office:value-type="float" office:value="-1.0851" calcext:value-type="float">
            <text:p>-1.0851</text:p>
          </table:table-cell>
          <table:table-cell office:value-type="float" office:value="0.0799" calcext:value-type="float">
            <text:p>0.079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8774" calcext:value-type="float">
            <text:p>0.8774</text:p>
          </table:table-cell>
          <table:table-cell office:value-type="float" office:value="-1.0851" calcext:value-type="float">
            <text:p>-1.0851</text:p>
          </table:table-cell>
          <table:table-cell office:value-type="float" office:value="0.0799" calcext:value-type="float">
            <text:p>0.0799</text:p>
          </table:table-cell>
          <table:table-cell office:value-type="float" office:value="11.3979" calcext:value-type="float">
            <text:p>11.3979</text:p>
          </table:table-cell>
          <table:table-cell office:value-type="float" office:value="1.3979" calcext:value-type="float">
            <text:p>1.3979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2878" calcext:value-type="float">
            <text:p>0.2878</text:p>
          </table:table-cell>
          <table:table-cell office:value-type="float" office:value="-0.3062" calcext:value-type="float">
            <text:p>-0.3062</text:p>
          </table:table-cell>
          <table:table-cell office:value-type="float" office:value="1.4779" calcext:value-type="float">
            <text:p>1.477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2878" calcext:value-type="float">
            <text:p>0.2878</text:p>
          </table:table-cell>
          <table:table-cell office:value-type="float" office:value="-0.3062" calcext:value-type="float">
            <text:p>-0.3062</text:p>
          </table:table-cell>
          <table:table-cell office:value-type="float" office:value="1.4779" calcext:value-type="float">
            <text:p>1.4779</text:p>
          </table:table-cell>
          <table:table-cell office:value-type="float" office:value="8.9467" calcext:value-type="float">
            <text:p>8.9467</text:p>
          </table:table-cell>
          <table:table-cell office:value-type="float" office:value="-1.0533" calcext:value-type="float">
            <text:p>-1.0533</text:p>
          </table:table-cell>
          <table:table-cell office:value-type="float" office:value="0.6484" calcext:value-type="float">
            <text:p>0.6484</text:p>
          </table:table-cell>
          <table:table-cell office:value-type="float" office:value="-0.5057" calcext:value-type="float">
            <text:p>-0.505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4246" calcext:value-type="float">
            <text:p>0.424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484" calcext:value-type="float">
            <text:p>0.6484</text:p>
          </table:table-cell>
          <table:table-cell office:value-type="float" office:value="-0.5057" calcext:value-type="float">
            <text:p>-0.505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4246" calcext:value-type="float">
            <text:p>0.4246</text:p>
          </table:table-cell>
          <table:table-cell office:value-type="float" office:value="9.6659" calcext:value-type="float">
            <text:p>9.6659</text:p>
          </table:table-cell>
          <table:table-cell office:value-type="float" office:value="-0.3341" calcext:value-type="float">
            <text:p>-0.3341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7642" calcext:value-type="float">
            <text:p>-0.7642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0905" calcext:value-type="float">
            <text:p>0.090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7642" calcext:value-type="float">
            <text:p>-0.7642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0905" calcext:value-type="float">
            <text:p>0.0905</text:p>
          </table:table-cell>
          <table:table-cell office:value-type="float" office:value="8.8032" calcext:value-type="float">
            <text:p>8.8032</text:p>
          </table:table-cell>
          <table:table-cell office:value-type="float" office:value="-1.1968" calcext:value-type="float">
            <text:p>-1.1968</text:p>
          </table:table-cell>
          <table:table-cell office:value-type="float" office:value="-0.6267" calcext:value-type="float">
            <text:p>-0.6267</text:p>
          </table:table-cell>
          <table:table-cell office:value-type="float" office:value="-0.3057" calcext:value-type="float">
            <text:p>-0.3057</text:p>
          </table:table-cell>
          <table:table-cell office:value-type="float" office:value="0.3947" calcext:value-type="float">
            <text:p>0.3947</text:p>
          </table:table-cell>
          <table:table-cell office:value-type="float" office:value="-1.1063" calcext:value-type="float">
            <text:p>-1.10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6267" calcext:value-type="float">
            <text:p>-0.6267</text:p>
          </table:table-cell>
          <table:table-cell office:value-type="float" office:value="-0.3057" calcext:value-type="float">
            <text:p>-0.3057</text:p>
          </table:table-cell>
          <table:table-cell office:value-type="float" office:value="0.3947" calcext:value-type="float">
            <text:p>0.3947</text:p>
          </table:table-cell>
          <table:table-cell office:value-type="float" office:value="-1.1063" calcext:value-type="float">
            <text:p>-1.1063</text:p>
          </table:table-cell>
          <table:table-cell office:value-type="float" office:value="10.3012" calcext:value-type="float">
            <text:p>10.3012</text:p>
          </table:table-cell>
          <table:table-cell office:value-type="float" office:value="0.3012" calcext:value-type="float">
            <text:p>0.3012</text:p>
          </table:table-cell>
          <table:table-cell office:value-type="float" office:value="-0.5868" calcext:value-type="float">
            <text:p>-0.58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8052" calcext:value-type="float">
            <text:p>-0.805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5868" calcext:value-type="float">
            <text:p>-0.58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8052" calcext:value-type="float">
            <text:p>-0.8052</text:p>
          </table:table-cell>
          <table:table-cell office:value-type="float" office:value="10.8456" calcext:value-type="float">
            <text:p>10.8456</text:p>
          </table:table-cell>
          <table:table-cell office:value-type="float" office:value="0.8456" calcext:value-type="float">
            <text:p>0.8456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6585" calcext:value-type="float">
            <text:p>0.6585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0.0404" calcext:value-type="float">
            <text:p>0.040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6585" calcext:value-type="float">
            <text:p>0.6585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0.0404" calcext:value-type="float">
            <text:p>0.0404</text:p>
          </table:table-cell>
          <table:table-cell office:value-type="float" office:value="11.0239" calcext:value-type="float">
            <text:p>11.0239</text:p>
          </table:table-cell>
          <table:table-cell office:value-type="float" office:value="1.0239" calcext:value-type="float">
            <text:p>1.0239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2965" calcext:value-type="float">
            <text:p>0.296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0643" calcext:value-type="float">
            <text:p>1.064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2965" calcext:value-type="float">
            <text:p>0.296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0643" calcext:value-type="float">
            <text:p>1.0643</text:p>
          </table:table-cell>
          <table:table-cell office:value-type="float" office:value="9.6179" calcext:value-type="float">
            <text:p>9.6179</text:p>
          </table:table-cell>
          <table:table-cell office:value-type="float" office:value="-0.3821" calcext:value-type="float">
            <text:p>-0.3821</text:p>
          </table:table-cell>
          <table:table-cell office:value-type="float" office:value="0.5123" calcext:value-type="float">
            <text:p>0.5123</text:p>
          </table:table-cell>
          <table:table-cell office:value-type="float" office:value="-0.2934" calcext:value-type="float">
            <text:p>-0.2934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6822" calcext:value-type="float">
            <text:p>0.682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5123" calcext:value-type="float">
            <text:p>0.5123</text:p>
          </table:table-cell>
          <table:table-cell office:value-type="float" office:value="-0.2934" calcext:value-type="float">
            <text:p>-0.2934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6822" calcext:value-type="float">
            <text:p>0.6822</text:p>
          </table:table-cell>
          <table:table-cell office:value-type="float" office:value="9.4148" calcext:value-type="float">
            <text:p>9.4148</text:p>
          </table:table-cell>
          <table:table-cell office:value-type="float" office:value="-0.5852" calcext:value-type="float">
            <text:p>-0.5852</text:p>
          </table:table-cell>
          <table:table-cell office:value-type="float" office:value="0.0564" calcext:value-type="float">
            <text:p>0.0564</text:p>
          </table:table-cell>
          <table:table-cell office:value-type="float" office:value="-0.5487" calcext:value-type="float">
            <text:p>-0.548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097" calcext:value-type="float">
            <text:p>0.09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564" calcext:value-type="float">
            <text:p>0.0564</text:p>
          </table:table-cell>
          <table:table-cell office:value-type="float" office:value="-0.5487" calcext:value-type="float">
            <text:p>-0.548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097" calcext:value-type="float">
            <text:p>0.097</text:p>
          </table:table-cell>
          <table:table-cell office:value-type="float" office:value="9.0352" calcext:value-type="float">
            <text:p>9.0352</text:p>
          </table:table-cell>
          <table:table-cell office:value-type="float" office:value="-0.9648" calcext:value-type="float">
            <text:p>-0.9648</text:p>
          </table:table-cell>
          <table:table-cell office:value-type="float" office:value="-0.3925" calcext:value-type="float">
            <text:p>-0.3925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0.4865" calcext:value-type="float">
            <text:p>0.4865</text:p>
          </table:table-cell>
          <table:table-cell office:value-type="float" office:value="-0.8678" calcext:value-type="float">
            <text:p>-0.867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3925" calcext:value-type="float">
            <text:p>-0.3925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0.4865" calcext:value-type="float">
            <text:p>0.4865</text:p>
          </table:table-cell>
          <table:table-cell office:value-type="float" office:value="-0.8678" calcext:value-type="float">
            <text:p>-0.8678</text:p>
          </table:table-cell>
          <table:table-cell office:value-type="float" office:value="10.078" calcext:value-type="float">
            <text:p>10.078</text:p>
          </table:table-cell>
          <table:table-cell office:value-type="float" office:value="0.078" calcext:value-type="float">
            <text:p>0.078</text:p>
          </table:table-cell>
          <table:table-cell office:value-type="float" office:value="-0.4283" calcext:value-type="float">
            <text:p>-0.4283</text:p>
          </table:table-cell>
          <table:table-cell office:value-type="float" office:value="0.2193" calcext:value-type="float">
            <text:p>0.2193</text:p>
          </table:table-cell>
          <table:table-cell office:value-type="float" office:value="-0.3423" calcext:value-type="float">
            <text:p>-0.3423</text:p>
          </table:table-cell>
          <table:table-cell office:value-type="float" office:value="-0.7897" calcext:value-type="float">
            <text:p>-0.789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4283" calcext:value-type="float">
            <text:p>-0.4283</text:p>
          </table:table-cell>
          <table:table-cell office:value-type="float" office:value="0.2193" calcext:value-type="float">
            <text:p>0.2193</text:p>
          </table:table-cell>
          <table:table-cell office:value-type="float" office:value="-0.3423" calcext:value-type="float">
            <text:p>-0.3423</text:p>
          </table:table-cell>
          <table:table-cell office:value-type="float" office:value="-0.7897" calcext:value-type="float">
            <text:p>-0.7897</text:p>
          </table:table-cell>
          <table:table-cell office:value-type="float" office:value="10.7406" calcext:value-type="float">
            <text:p>10.7406</text:p>
          </table:table-cell>
          <table:table-cell office:value-type="float" office:value="0.7406" calcext:value-type="float">
            <text:p>0.7406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4499" calcext:value-type="float">
            <text:p>0.4499</text:p>
          </table:table-cell>
          <table:table-cell office:value-type="float" office:value="-0.7617" calcext:value-type="float">
            <text:p>-0.7617</text:p>
          </table:table-cell>
          <table:table-cell office:value-type="float" office:value="-0.0491" calcext:value-type="float">
            <text:p>-0.049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4499" calcext:value-type="float">
            <text:p>0.4499</text:p>
          </table:table-cell>
          <table:table-cell office:value-type="float" office:value="-0.7617" calcext:value-type="float">
            <text:p>-0.7617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10.758" calcext:value-type="float">
            <text:p>10.758</text:p>
          </table:table-cell>
          <table:table-cell office:value-type="float" office:value="0.758" calcext:value-type="float">
            <text:p>0.75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392" calcext:value-type="float">
            <text:p>0.2392</text:p>
          </table:table-cell>
          <table:table-cell office:value-type="float" office:value="-0.4318" calcext:value-type="float">
            <text:p>-0.4318</text:p>
          </table:table-cell>
          <table:table-cell office:value-type="float" office:value="0.7089" calcext:value-type="float">
            <text:p>0.708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392" calcext:value-type="float">
            <text:p>0.2392</text:p>
          </table:table-cell>
          <table:table-cell office:value-type="float" office:value="-0.4318" calcext:value-type="float">
            <text:p>-0.4318</text:p>
          </table:table-cell>
          <table:table-cell office:value-type="float" office:value="0.7089" calcext:value-type="float">
            <text:p>0.7089</text:p>
          </table:table-cell>
          <table:table-cell office:value-type="float" office:value="10.1084" calcext:value-type="float">
            <text:p>10.1084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3545" calcext:value-type="float">
            <text:p>0.3545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8173" calcext:value-type="float">
            <text:p>0.817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3545" calcext:value-type="float">
            <text:p>0.3545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8173" calcext:value-type="float">
            <text:p>0.8173</text:p>
          </table:table-cell>
          <table:table-cell office:value-type="float" office:value="9.2236" calcext:value-type="float">
            <text:p>9.2236</text:p>
          </table:table-cell>
          <table:table-cell office:value-type="float" office:value="-0.7764" calcext:value-type="float">
            <text:p>-0.7764</text:p>
          </table:table-cell>
          <table:table-cell office:value-type="float" office:value="0.0751" calcext:value-type="float">
            <text:p>0.0751</text:p>
          </table:table-cell>
          <table:table-cell office:value-type="float" office:value="-0.3583" calcext:value-type="float">
            <text:p>-0.3583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0409" calcext:value-type="float">
            <text:p>0.040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751" calcext:value-type="float">
            <text:p>0.0751</text:p>
          </table:table-cell>
          <table:table-cell office:value-type="float" office:value="-0.3583" calcext:value-type="float">
            <text:p>-0.3583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0409" calcext:value-type="float">
            <text:p>0.0409</text:p>
          </table:table-cell>
          <table:table-cell office:value-type="float" office:value="9.3415" calcext:value-type="float">
            <text:p>9.3415</text:p>
          </table:table-cell>
          <table:table-cell office:value-type="float" office:value="-0.6585" calcext:value-type="float">
            <text:p>-0.6585</text:p>
          </table:table-cell>
          <table:table-cell office:value-type="float" office:value="-0.2273" calcext:value-type="float">
            <text:p>-0.2273</text:p>
          </table:table-cell>
          <table:table-cell office:value-type="float" office:value="-0.1956" calcext:value-type="float">
            <text:p>-0.1956</text:p>
          </table:table-cell>
          <table:table-cell office:value-type="float" office:value="0.472" calcext:value-type="float">
            <text:p>0.472</text:p>
          </table:table-cell>
          <table:table-cell office:value-type="float" office:value="-0.6176" calcext:value-type="float">
            <text:p>-0.617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2273" calcext:value-type="float">
            <text:p>-0.2273</text:p>
          </table:table-cell>
          <table:table-cell office:value-type="float" office:value="-0.1956" calcext:value-type="float">
            <text:p>-0.1956</text:p>
          </table:table-cell>
          <table:table-cell office:value-type="float" office:value="0.472" calcext:value-type="float">
            <text:p>0.472</text:p>
          </table:table-cell>
          <table:table-cell office:value-type="float" office:value="-0.6176" calcext:value-type="float">
            <text:p>-0.6176</text:p>
          </table:table-cell>
          <table:table-cell office:value-type="float" office:value="9.9165" calcext:value-type="float">
            <text:p>9.9165</text:p>
          </table:table-cell>
          <table:table-cell office:value-type="float" office:value="-0.0835" calcext:value-type="float">
            <text:p>-0.0835</text:p>
          </table:table-cell>
          <table:table-cell office:value-type="float" office:value="-0.2714" calcext:value-type="float">
            <text:p>-0.2714</text:p>
          </table:table-cell>
          <table:table-cell office:value-type="float" office:value="0.1221" calcext:value-type="float">
            <text:p>0.1221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7011" calcext:value-type="float">
            <text:p>-0.701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0.2714" calcext:value-type="float">
            <text:p>-0.2714</text:p>
          </table:table-cell>
          <table:table-cell office:value-type="float" office:value="0.1221" calcext:value-type="float">
            <text:p>0.1221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7011" calcext:value-type="float">
            <text:p>-0.7011</text:p>
          </table:table-cell>
          <table:table-cell office:value-type="float" office:value="10.6039" calcext:value-type="float">
            <text:p>10.6039</text:p>
          </table:table-cell>
          <table:table-cell office:value-type="float" office:value="0.6039" calcext:value-type="float">
            <text:p>0.6039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0.2782" calcext:value-type="float">
            <text:p>0.2782</text:p>
          </table:table-cell>
          <table:table-cell office:value-type="float" office:value="-0.5865" calcext:value-type="float">
            <text:p>-0.5865</text:p>
          </table:table-cell>
          <table:table-cell office:value-type="float" office:value="-0.0972" calcext:value-type="float">
            <text:p>-0.09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0.2782" calcext:value-type="float">
            <text:p>0.2782</text:p>
          </table:table-cell>
          <table:table-cell office:value-type="float" office:value="-0.5865" calcext:value-type="float">
            <text:p>-0.5865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10.5371" calcext:value-type="float">
            <text:p>10.5371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1512" calcext:value-type="float">
            <text:p>0.1512</text:p>
          </table:table-cell>
          <table:table-cell office:value-type="float" office:value="-0.4151" calcext:value-type="float">
            <text:p>-0.4151</text:p>
          </table:table-cell>
          <table:table-cell office:value-type="float" office:value="0.4399" calcext:value-type="float">
            <text:p>0.439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1512" calcext:value-type="float">
            <text:p>0.1512</text:p>
          </table:table-cell>
          <table:table-cell office:value-type="float" office:value="-0.4151" calcext:value-type="float">
            <text:p>-0.4151</text:p>
          </table:table-cell>
          <table:table-cell office:value-type="float" office:value="0.4399" calcext:value-type="float">
            <text:p>0.4399</text:p>
          </table:table-cell>
          <table:table-cell office:value-type="float" office:value="10.2155" calcext:value-type="float">
            <text:p>10.2155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6554" calcext:value-type="float">
            <text:p>0.655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6554" calcext:value-type="float">
            <text:p>0.6554</text:p>
          </table:table-cell>
          <table:table-cell office:value-type="float" office:value="9.4308" calcext:value-type="float">
            <text:p>9.4308</text:p>
          </table:table-cell>
          <table:table-cell office:value-type="float" office:value="-0.5692" calcext:value-type="float">
            <text:p>-0.5692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2169" calcext:value-type="float">
            <text:p>-0.2169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0862" calcext:value-type="float">
            <text:p>0.086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2169" calcext:value-type="float">
            <text:p>-0.2169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0862" calcext:value-type="float">
            <text:p>0.0862</text:p>
          </table:table-cell>
          <table:table-cell office:value-type="float" office:value="9.5183" calcext:value-type="float">
            <text:p>9.5183</text:p>
          </table:table-cell>
          <table:table-cell office:value-type="float" office:value="-0.4817" calcext:value-type="float">
            <text:p>-0.4817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-0.11" calcext:value-type="float">
            <text:p>-0.11</text:p>
          </table:table-cell>
          <table:table-cell office:value-type="float" office:value="0.3487" calcext:value-type="float">
            <text:p>0.3487</text:p>
          </table:table-cell>
          <table:table-cell office:value-type="float" office:value="-0.3955" calcext:value-type="float">
            <text:p>-0.395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-0.11" calcext:value-type="float">
            <text:p>-0.11</text:p>
          </table:table-cell>
          <table:table-cell office:value-type="float" office:value="0.3487" calcext:value-type="float">
            <text:p>0.3487</text:p>
          </table:table-cell>
          <table:table-cell office:value-type="float" office:value="-0.3955" calcext:value-type="float">
            <text:p>-0.3955</text:p>
          </table:table-cell>
          <table:table-cell office:value-type="float" office:value="9.8486" calcext:value-type="float">
            <text:p>9.8486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0.0839" calcext:value-type="float">
            <text:p>0.0839</text:p>
          </table:table-cell>
          <table:table-cell office:value-type="float" office:value="-0.1225" calcext:value-type="float">
            <text:p>-0.1225</text:p>
          </table:table-cell>
          <table:table-cell office:value-type="float" office:value="-0.5469" calcext:value-type="float">
            <text:p>-0.546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0.0839" calcext:value-type="float">
            <text:p>0.0839</text:p>
          </table:table-cell>
          <table:table-cell office:value-type="float" office:value="-0.1225" calcext:value-type="float">
            <text:p>-0.1225</text:p>
          </table:table-cell>
          <table:table-cell office:value-type="float" office:value="-0.5469" calcext:value-type="float">
            <text:p>-0.5469</text:p>
          </table:table-cell>
          <table:table-cell office:value-type="float" office:value="10.4428" calcext:value-type="float">
            <text:p>10.4428</text:p>
          </table:table-cell>
          <table:table-cell office:value-type="float" office:value="0.4428" calcext:value-type="float">
            <text:p>0.4428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1651" calcext:value-type="float">
            <text:p>0.1651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1041" calcext:value-type="float">
            <text:p>-0.104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1651" calcext:value-type="float">
            <text:p>0.1651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10.4065" calcext:value-type="float">
            <text:p>10.4065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72" calcext:value-type="float">
            <text:p>0.072</text:p>
          </table:table-cell>
          <table:table-cell office:value-type="float" office:value="-0.3489" calcext:value-type="float">
            <text:p>-0.3489</text:p>
          </table:table-cell>
          <table:table-cell office:value-type="float" office:value="0.3024" calcext:value-type="float">
            <text:p>0.302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72" calcext:value-type="float">
            <text:p>0.072</text:p>
          </table:table-cell>
          <table:table-cell office:value-type="float" office:value="-0.3489" calcext:value-type="float">
            <text:p>-0.3489</text:p>
          </table:table-cell>
          <table:table-cell office:value-type="float" office:value="0.3024" calcext:value-type="float">
            <text:p>0.3024</text:p>
          </table:table-cell>
          <table:table-cell office:value-type="float" office:value="10.136" calcext:value-type="float">
            <text:p>10.13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4384" calcext:value-type="float">
            <text:p>0.438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4384" calcext:value-type="float">
            <text:p>0.4384</text:p>
          </table:table-cell>
          <table:table-cell office:value-type="float" office:value="9.6754" calcext:value-type="float">
            <text:p>9.6754</text:p>
          </table:table-cell>
          <table:table-cell office:value-type="float" office:value="-0.3246" calcext:value-type="float">
            <text:p>-0.3246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281" calcext:value-type="float">
            <text:p>-0.1281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138" calcext:value-type="float">
            <text:p>0.113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281" calcext:value-type="float">
            <text:p>-0.1281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138" calcext:value-type="float">
            <text:p>0.1138</text:p>
          </table:table-cell>
          <table:table-cell office:value-type="float" office:value="9.6035" calcext:value-type="float">
            <text:p>9.6035</text:p>
          </table:table-cell>
          <table:table-cell office:value-type="float" office:value="-0.3965" calcext:value-type="float">
            <text:p>-0.3965</text:p>
          </table:table-cell>
          <table:table-cell office:value-type="float" office:value="-0.0965" calcext:value-type="float">
            <text:p>-0.0965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2131" calcext:value-type="float">
            <text:p>0.2131</text:p>
          </table:table-cell>
          <table:table-cell office:value-type="float" office:value="-0.2827" calcext:value-type="float">
            <text:p>-0.282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0.0965" calcext:value-type="float">
            <text:p>-0.0965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2131" calcext:value-type="float">
            <text:p>0.2131</text:p>
          </table:table-cell>
          <table:table-cell office:value-type="float" office:value="-0.2827" calcext:value-type="float">
            <text:p>-0.2827</text:p>
          </table:table-cell>
          <table:table-cell office:value-type="float" office:value="9.8873" calcext:value-type="float">
            <text:p>9.8873</text:p>
          </table:table-cell>
          <table:table-cell office:value-type="float" office:value="-0.1127" calcext:value-type="float">
            <text:p>-0.112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49" calcext:value-type="float">
            <text:p>0.074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3954" calcext:value-type="float">
            <text:p>-0.395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49" calcext:value-type="float">
            <text:p>0.074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3954" calcext:value-type="float">
            <text:p>-0.3954</text:p>
          </table:table-cell>
          <table:table-cell office:value-type="float" office:value="10.3326" calcext:value-type="float">
            <text:p>10.3326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97" calcext:value-type="float">
            <text:p>0.097</text:p>
          </table:table-cell>
          <table:table-cell office:value-type="float" office:value="-0.3551" calcext:value-type="float">
            <text:p>-0.3551</text:p>
          </table:table-cell>
          <table:table-cell office:value-type="float" office:value="-0.0628" calcext:value-type="float">
            <text:p>-0.062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97" calcext:value-type="float">
            <text:p>0.097</text:p>
          </table:table-cell>
          <table:table-cell office:value-type="float" office:value="-0.3551" calcext:value-type="float">
            <text:p>-0.3551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10.3238" calcext:value-type="float">
            <text:p>10.3238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261" calcext:value-type="float">
            <text:p>0.26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261" calcext:value-type="float">
            <text:p>0.261</text:p>
          </table:table-cell>
          <table:table-cell office:value-type="float" office:value="10.0231" calcext:value-type="float">
            <text:p>10.023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413" calcext:value-type="float">
            <text:p>0.0413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2841" calcext:value-type="float">
            <text:p>0.284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413" calcext:value-type="float">
            <text:p>0.0413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2841" calcext:value-type="float">
            <text:p>0.2841</text:p>
          </table:table-cell>
          <table:table-cell office:value-type="float" office:value="9.7143" calcext:value-type="float">
            <text:p>9.7143</text:p>
          </table:table-cell>
          <table:table-cell office:value-type="float" office:value="-0.2857" calcext:value-type="float">
            <text:p>-0.2857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0.1579" calcext:value-type="float">
            <text:p>0.1579</text:p>
          </table:table-cell>
          <table:table-cell office:value-type="float" office:value="-0.0015" calcext:value-type="float">
            <text:p>-0.001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0.1579" calcext:value-type="float">
            <text:p>0.157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9.7532" calcext:value-type="float">
            <text:p>9.7532</text:p>
          </table:table-cell>
          <table:table-cell office:value-type="float" office:value="-0.2468" calcext:value-type="float">
            <text:p>-0.2468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3" calcext:value-type="float">
            <text:p>0.033</text:p>
          </table:table-cell>
          <table:table-cell office:value-type="float" office:value="-0.2483" calcext:value-type="float">
            <text:p>-0.248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3" calcext:value-type="float">
            <text:p>0.033</text:p>
          </table:table-cell>
          <table:table-cell office:value-type="float" office:value="-0.2483" calcext:value-type="float">
            <text:p>-0.2483</text:p>
          </table:table-cell>
          <table:table-cell office:value-type="float" office:value="9.9893" calcext:value-type="float">
            <text:p>9.9893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0658" calcext:value-type="float">
            <text:p>0.0658</text:p>
          </table:table-cell>
          <table:table-cell office:value-type="float" office:value="-0.2207" calcext:value-type="float">
            <text:p>-0.2207</text:p>
          </table:table-cell>
          <table:table-cell office:value-type="float" office:value="-0.259" calcext:value-type="float">
            <text:p>-0.25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0658" calcext:value-type="float">
            <text:p>0.0658</text:p>
          </table:table-cell>
          <table:table-cell office:value-type="float" office:value="-0.2207" calcext:value-type="float">
            <text:p>-0.2207</text:p>
          </table:table-cell>
          <table:table-cell office:value-type="float" office:value="-0.259" calcext:value-type="float">
            <text:p>-0.259</text:p>
          </table:table-cell>
          <table:table-cell office:value-type="float" office:value="10.2729" calcext:value-type="float">
            <text:p>10.2729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488" calcext:value-type="float">
            <text:p>0.0488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0.0139" calcext:value-type="float">
            <text:p>0.013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488" calcext:value-type="float">
            <text:p>0.0488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0.0139" calcext:value-type="float">
            <text:p>0.0139</text:p>
          </table:table-cell>
          <table:table-cell office:value-type="float" office:value="10.2313" calcext:value-type="float">
            <text:p>10.2313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0387" calcext:value-type="float">
            <text:p>0.0387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2136" calcext:value-type="float">
            <text:p>-0.2136</text:p>
          </table:table-cell>
          <table:table-cell office:value-type="float" office:value="0.2453" calcext:value-type="float">
            <text:p>0.245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387" calcext:value-type="float">
            <text:p>0.0387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2136" calcext:value-type="float">
            <text:p>-0.2136</text:p>
          </table:table-cell>
          <table:table-cell office:value-type="float" office:value="0.2453" calcext:value-type="float">
            <text:p>0.2453</text:p>
          </table:table-cell>
          <table:table-cell office:value-type="float" office:value="9.9271" calcext:value-type="float">
            <text:p>9.9271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1724" calcext:value-type="float">
            <text:p>0.172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1724" calcext:value-type="float">
            <text:p>0.1724</text:p>
          </table:table-cell>
          <table:table-cell office:value-type="float" office:value="9.7577" calcext:value-type="float">
            <text:p>9.7577</text:p>
          </table:table-cell>
          <table:table-cell office:value-type="float" office:value="-0.2423" calcext:value-type="float">
            <text:p>-0.2423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65" calcext:value-type="float">
            <text:p>0.0465</text:p>
          </table:table-cell>
          <table:table-cell office:value-type="float" office:value="-0.0699" calcext:value-type="float">
            <text:p>-0.069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65" calcext:value-type="float">
            <text:p>0.0465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9.8544" calcext:value-type="float">
            <text:p>9.8544</text:p>
          </table:table-cell>
          <table:table-cell office:value-type="float" office:value="-0.1456" calcext:value-type="float">
            <text:p>-0.1456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2156" calcext:value-type="float">
            <text:p>-0.215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2156" calcext:value-type="float">
            <text:p>-0.2156</text:p>
          </table:table-cell>
          <table:table-cell office:value-type="float" office:value="10.089" calcext:value-type="float">
            <text:p>10.089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524" calcext:value-type="float">
            <text:p>0.0524</text:p>
          </table:table-cell>
          <table:table-cell office:value-type="float" office:value="-0.2674" calcext:value-type="float">
            <text:p>-0.2674</text:p>
          </table:table-cell>
          <table:table-cell office:value-type="float" office:value="-0.1266" calcext:value-type="float">
            <text:p>-0.126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524" calcext:value-type="float">
            <text:p>0.0524</text:p>
          </table:table-cell>
          <table:table-cell office:value-type="float" office:value="-0.2674" calcext:value-type="float">
            <text:p>-0.2674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2729" calcext:value-type="float">
            <text:p>-0.2729</text:p>
          </table:table-cell>
          <table:table-cell office:value-type="float" office:value="0.1155" calcext:value-type="float">
            <text:p>0.115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2729" calcext:value-type="float">
            <text:p>-0.2729</text:p>
          </table:table-cell>
          <table:table-cell office:value-type="float" office:value="0.1155" calcext:value-type="float">
            <text:p>0.1155</text:p>
          </table:table-cell>
          <table:table-cell office:value-type="float" office:value="10.0807" calcext:value-type="float">
            <text:p>10.0807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1962" calcext:value-type="float">
            <text:p>0.196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1962" calcext:value-type="float">
            <text:p>0.1962</text:p>
          </table:table-cell>
          <table:table-cell office:value-type="float" office:value="9.8599" calcext:value-type="float">
            <text:p>9.8599</text:p>
          </table:table-cell>
          <table:table-cell office:value-type="float" office:value="-0.1401" calcext:value-type="float">
            <text:p>-0.1401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61" calcext:value-type="float">
            <text:p>0.056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61" calcext:value-type="float">
            <text:p>0.0561</text:p>
          </table:table-cell>
          <table:table-cell office:value-type="float" office:value="9.8162" calcext:value-type="float">
            <text:p>9.8162</text:p>
          </table:table-cell>
          <table:table-cell office:value-type="float" office:value="-0.1838" calcext:value-type="float">
            <text:p>-0.183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1277" calcext:value-type="float">
            <text:p>-0.127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1277" calcext:value-type="float">
            <text:p>-0.1277</text:p>
          </table:table-cell>
          <table:table-cell office:value-type="float" office:value="9.9609" calcext:value-type="float">
            <text:p>9.9609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0393" calcext:value-type="float">
            <text:p>0.0393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-0.1668" calcext:value-type="float">
            <text:p>-0.166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0393" calcext:value-type="float">
            <text:p>0.0393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10.1553" calcext:value-type="float">
            <text:p>10.155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306" calcext:value-type="float">
            <text:p>0.0306</text:p>
          </table:table-cell>
          <table:table-cell office:value-type="float" office:value="-0.2631" calcext:value-type="float">
            <text:p>-0.2631</text:p>
          </table:table-cell>
          <table:table-cell office:value-type="float" office:value="-0.0116" calcext:value-type="float">
            <text:p>-0.011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306" calcext:value-type="float">
            <text:p>0.0306</text:p>
          </table:table-cell>
          <table:table-cell office:value-type="float" office:value="-0.2631" calcext:value-type="float">
            <text:p>-0.2631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10.1609" calcext:value-type="float">
            <text:p>10.1609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0187" calcext:value-type="float">
            <text:p>0.018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0.1494" calcext:value-type="float">
            <text:p>0.149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187" calcext:value-type="float">
            <text:p>0.018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0.1494" calcext:value-type="float">
            <text:p>0.1494</text:p>
          </table:table-cell>
          <table:table-cell office:value-type="float" office:value="9.9794" calcext:value-type="float">
            <text:p>9.979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1288" calcext:value-type="float">
            <text:p>0.128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1288" calcext:value-type="float">
            <text:p>0.1288</text:p>
          </table:table-cell>
          <table:table-cell office:value-type="float" office:value="9.8399" calcext:value-type="float">
            <text:p>9.8399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312" calcext:value-type="float">
            <text:p>-0.031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9.8878" calcext:value-type="float">
            <text:p>9.8878</text:p>
          </table:table-cell>
          <table:table-cell office:value-type="float" office:value="-0.1122" calcext:value-type="float">
            <text:p>-0.112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1434" calcext:value-type="float">
            <text:p>-0.143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1434" calcext:value-type="float">
            <text:p>-0.1434</text:p>
          </table:table-cell>
          <table:table-cell office:value-type="float" office:value="10.0472" calcext:value-type="float">
            <text:p>10.0472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339" calcext:value-type="float">
            <text:p>0.0339</text:p>
          </table:table-cell>
          <table:table-cell office:value-type="float" office:value="-0.2135" calcext:value-type="float">
            <text:p>-0.2135</text:p>
          </table:table-cell>
          <table:table-cell office:value-type="float" office:value="-0.0963" calcext:value-type="float">
            <text:p>-0.09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339" calcext:value-type="float">
            <text:p>0.0339</text:p>
          </table:table-cell>
          <table:table-cell office:value-type="float" office:value="-0.2135" calcext:value-type="float">
            <text:p>-0.2135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10.1635" calcext:value-type="float">
            <text:p>10.1635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672" calcext:value-type="float">
            <text:p>0.06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672" calcext:value-type="float">
            <text:p>0.0672</text:p>
          </table:table-cell>
          <table:table-cell office:value-type="float" office:value="10.0658" calcext:value-type="float">
            <text:p>10.0658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-0.1279" calcext:value-type="float">
            <text:p>-0.1279</text:p>
          </table:table-cell>
          <table:table-cell office:value-type="float" office:value="0.133" calcext:value-type="float">
            <text:p>0.13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-0.1279" calcext:value-type="float">
            <text:p>-0.1279</text:p>
          </table:table-cell>
          <table:table-cell office:value-type="float" office:value="0.133" calcext:value-type="float">
            <text:p>0.133</text:p>
          </table:table-cell>
          <table:table-cell office:value-type="float" office:value="9.9136" calcext:value-type="float">
            <text:p>9.913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466" calcext:value-type="float">
            <text:p>0.046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466" calcext:value-type="float">
            <text:p>0.0466</text:p>
          </table:table-cell>
          <table:table-cell office:value-type="float" office:value="9.8643" calcext:value-type="float">
            <text:p>9.8643</text:p>
          </table:table-cell>
          <table:table-cell office:value-type="float" office:value="-0.1357" calcext:value-type="float">
            <text:p>-0.1357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891" calcext:value-type="float">
            <text:p>-0.089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9.9688" calcext:value-type="float">
            <text:p>9.9688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28" calcext:value-type="float">
            <text:p>0.028</text:p>
          </table:table-cell>
          <table:table-cell office:value-type="float" office:value="-0.1641" calcext:value-type="float">
            <text:p>-0.1641</text:p>
          </table:table-cell>
          <table:table-cell office:value-type="float" office:value="-0.1203" calcext:value-type="float">
            <text:p>-0.120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28" calcext:value-type="float">
            <text:p>0.028</text:p>
          </table:table-cell>
          <table:table-cell office:value-type="float" office:value="-0.1641" calcext:value-type="float">
            <text:p>-0.1641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10.1132" calcext:value-type="float">
            <text:p>10.1132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2278" calcext:value-type="float">
            <text:p>-0.2278</text:p>
          </table:table-cell>
          <table:table-cell office:value-type="float" office:value="-0.0071" calcext:value-type="float">
            <text:p>-0.007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2278" calcext:value-type="float">
            <text:p>-0.2278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10.1139" calcext:value-type="float">
            <text:p>10.1139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1068" calcext:value-type="float">
            <text:p>0.106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1068" calcext:value-type="float">
            <text:p>0.1068</text:p>
          </table:table-cell>
          <table:table-cell office:value-type="float" office:value="9.9829" calcext:value-type="float">
            <text:p>9.9829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797" calcext:value-type="float">
            <text:p>-0.0797</text:p>
          </table:table-cell>
          <table:table-cell office:value-type="float" office:value="0.0897" calcext:value-type="float">
            <text:p>0.089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797" calcext:value-type="float">
            <text:p>-0.0797</text:p>
          </table:table-cell>
          <table:table-cell office:value-type="float" office:value="0.0897" calcext:value-type="float">
            <text:p>0.0897</text:p>
          </table:table-cell>
          <table:table-cell office:value-type="float" office:value="9.8864" calcext:value-type="float">
            <text:p>9.8864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39" calcext:value-type="float">
            <text:p>-0.023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9.9167" calcext:value-type="float">
            <text:p>9.9167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1072" calcext:value-type="float">
            <text:p>-0.10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10.0415" calcext:value-type="float">
            <text:p>10.0415</text:p>
          </table:table-cell>
          <table:table-cell office:value-type="float" office:value="0.0415" calcext:value-type="float">
            <text:p>0.0415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1988" calcext:value-type="float">
            <text:p>-0.1988</text:p>
          </table:table-cell>
          <table:table-cell office:value-type="float" office:value="-0.0657" calcext:value-type="float">
            <text:p>-0.065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1988" calcext:value-type="float">
            <text:p>-0.1988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10.1191" calcext:value-type="float">
            <text:p>10.1191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2049" calcext:value-type="float">
            <text:p>-0.2049</text:p>
          </table:table-cell>
          <table:table-cell office:value-type="float" office:value="0.0535" calcext:value-type="float">
            <text:p>0.053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2049" calcext:value-type="float">
            <text:p>-0.2049</text:p>
          </table:table-cell>
          <table:table-cell office:value-type="float" office:value="0.0535" calcext:value-type="float">
            <text:p>0.0535</text:p>
          </table:table-cell>
          <table:table-cell office:value-type="float" office:value="10.0421" calcext:value-type="float">
            <text:p>10.0421</text:p>
          </table:table-cell>
          <table:table-cell office:value-type="float" office:value="0.0421" calcext:value-type="float">
            <text:p>0.042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1304" calcext:value-type="float">
            <text:p>-0.1304</text:p>
          </table:table-cell>
          <table:table-cell office:value-type="float" office:value="0.0956" calcext:value-type="float">
            <text:p>0.095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1304" calcext:value-type="float">
            <text:p>-0.1304</text:p>
          </table:table-cell>
          <table:table-cell office:value-type="float" office:value="0.0956" calcext:value-type="float">
            <text:p>0.0956</text:p>
          </table:table-cell>
          <table:table-cell office:value-type="float" office:value="9.9344" calcext:value-type="float">
            <text:p>9.9344</text:p>
          </table:table-cell>
          <table:table-cell office:value-type="float" office:value="-0.0656" calcext:value-type="float">
            <text:p>-0.065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03" calcext:value-type="float">
            <text:p>0.03</text:p>
          </table:table-cell>
          <table:table-cell office:value-type="float" office:value="9.9028" calcext:value-type="float">
            <text:p>9.9028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-0.0672" calcext:value-type="float">
            <text:p>-0.06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9.9809" calcext:value-type="float">
            <text:p>9.9809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0863" calcext:value-type="float">
            <text:p>-0.08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10.086" calcext:value-type="float">
            <text:p>10.086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2063" calcext:value-type="float">
            <text:p>-0.2063</text:p>
          </table:table-cell>
          <table:table-cell office:value-type="float" office:value="-0.0003" calcext:value-type="float">
            <text:p>-0.000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2063" calcext:value-type="float">
            <text:p>-0.206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10.0798" calcext:value-type="float">
            <text:p>10.0798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1666" calcext:value-type="float">
            <text:p>-0.1666</text:p>
          </table:table-cell>
          <table:table-cell office:value-type="float" office:value="0.0796" calcext:value-type="float">
            <text:p>0.079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1666" calcext:value-type="float">
            <text:p>-0.1666</text:p>
          </table:table-cell>
          <table:table-cell office:value-type="float" office:value="0.0796" calcext:value-type="float">
            <text:p>0.0796</text:p>
          </table:table-cell>
          <table:table-cell office:value-type="float" office:value="9.9832" calcext:value-type="float">
            <text:p>9.9832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0.0627" calcext:value-type="float">
            <text:p>0.062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0.0627" calcext:value-type="float">
            <text:p>0.0627</text:p>
          </table:table-cell>
          <table:table-cell office:value-type="float" office:value="9.9157" calcext:value-type="float">
            <text:p>9.9157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-0.0216" calcext:value-type="float">
            <text:p>-0.021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9.9428" calcext:value-type="float">
            <text:p>9.9428</text:p>
          </table:table-cell>
          <table:table-cell office:value-type="float" office:value="-0.0572" calcext:value-type="float">
            <text:p>-0.0572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4" calcext:value-type="float">
            <text:p>0.012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787" calcext:value-type="float">
            <text:p>-0.078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4" calcext:value-type="float">
            <text:p>0.012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10.0348" calcext:value-type="float">
            <text:p>10.0348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1864" calcext:value-type="float">
            <text:p>-0.1864</text:p>
          </table:table-cell>
          <table:table-cell office:value-type="float" office:value="-0.044" calcext:value-type="float">
            <text:p>-0.04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1864" calcext:value-type="float">
            <text:p>-0.1864</text:p>
          </table:table-cell>
          <table:table-cell office:value-type="float" office:value="-0.044" calcext:value-type="float">
            <text:p>-0.044</text:p>
          </table:table-cell>
          <table:table-cell office:value-type="float" office:value="10.0864" calcext:value-type="float">
            <text:p>10.0864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1872" calcext:value-type="float">
            <text:p>-0.1872</text:p>
          </table:table-cell>
          <table:table-cell office:value-type="float" office:value="0.0424" calcext:value-type="float">
            <text:p>0.042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1872" calcext:value-type="float">
            <text:p>-0.1872</text:p>
          </table:table-cell>
          <table:table-cell office:value-type="float" office:value="0.0424" calcext:value-type="float">
            <text:p>0.0424</text:p>
          </table:table-cell>
          <table:table-cell office:value-type="float" office:value="10.0267" calcext:value-type="float">
            <text:p>10.0267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0.0691" calcext:value-type="float">
            <text:p>0.069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0.0691" calcext:value-type="float">
            <text:p>0.0691</text:p>
          </table:table-cell>
          <table:table-cell office:value-type="float" office:value="9.9493" calcext:value-type="float">
            <text:p>9.9493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184" calcext:value-type="float">
            <text:p>0.018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184" calcext:value-type="float">
            <text:p>0.0184</text:p>
          </table:table-cell>
          <table:table-cell office:value-type="float" office:value="9.93" calcext:value-type="float">
            <text:p>9.9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517" calcext:value-type="float">
            <text:p>-0.051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9.99" calcext:value-type="float">
            <text:p>9.9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616" calcext:value-type="float">
            <text:p>-0.061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10.0649" calcext:value-type="float">
            <text:p>10.0649</text:p>
          </table:table-cell>
          <table:table-cell office:value-type="float" office:value="0.0649" calcext:value-type="float">
            <text:p>0.064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33" calcext:value-type="float">
            <text:p>0.003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33" calcext:value-type="float">
            <text:p>0.0033</text:p>
          </table:table-cell>
          <table:table-cell office:value-type="float" office:value="10.056" calcext:value-type="float">
            <text:p>10.056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0593" calcext:value-type="float">
            <text:p>0.059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0593" calcext:value-type="float">
            <text:p>0.0593</text:p>
          </table:table-cell>
          <table:table-cell office:value-type="float" office:value="9.9848" calcext:value-type="float">
            <text:p>9.9848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0.0441" calcext:value-type="float">
            <text:p>0.044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0.0441" calcext:value-type="float">
            <text:p>0.0441</text:p>
          </table:table-cell>
          <table:table-cell office:value-type="float" office:value="9.9372" calcext:value-type="float">
            <text:p>9.9372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-0.0187" calcext:value-type="float">
            <text:p>-0.018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9.9605" calcext:value-type="float">
            <text:p>9.9605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0582" calcext:value-type="float">
            <text:p>-0.058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0.0284" calcext:value-type="float">
            <text:p>10.0284</text:p>
          </table:table-cell>
          <table:table-cell office:value-type="float" office:value="0.0284" calcext:value-type="float">
            <text:p>0.0284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298" calcext:value-type="float">
            <text:p>-0.029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1752" calcext:value-type="float">
            <text:p>-0.1752</text:p>
          </table:table-cell>
          <table:table-cell office:value-type="float" office:value="0.0333" calcext:value-type="float">
            <text:p>0.033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1752" calcext:value-type="float">
            <text:p>-0.1752</text:p>
          </table:table-cell>
          <table:table-cell office:value-type="float" office:value="0.0333" calcext:value-type="float">
            <text:p>0.0333</text:p>
          </table:table-cell>
          <table:table-cell office:value-type="float" office:value="10.0175" calcext:value-type="float">
            <text:p>10.01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0508" calcext:value-type="float">
            <text:p>0.050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0508" calcext:value-type="float">
            <text:p>0.0508</text:p>
          </table:table-cell>
          <table:table-cell office:value-type="float" office:value="9.9604" calcext:value-type="float">
            <text:p>9.9604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0.0112" calcext:value-type="float">
            <text:p>0.011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0.0112" calcext:value-type="float">
            <text:p>0.0112</text:p>
          </table:table-cell>
          <table:table-cell office:value-type="float" office:value="9.949" calcext:value-type="float">
            <text:p>9.94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-0.0398" calcext:value-type="float">
            <text:p>-0.039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9.9953" calcext:value-type="float">
            <text:p>9.9953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445" calcext:value-type="float">
            <text:p>-0.044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10.0491" calcext:value-type="float">
            <text:p>10.0491</text:p>
          </table:table-cell>
          <table:table-cell office:value-type="float" office:value="0.0491" calcext:value-type="float">
            <text:p>0.0491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46" calcext:value-type="float">
            <text:p>0.004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10.0396" calcext:value-type="float">
            <text:p>10.0396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0.0442" calcext:value-type="float">
            <text:p>0.044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0.0442" calcext:value-type="float">
            <text:p>0.0442</text:p>
          </table:table-cell>
          <table:table-cell office:value-type="float" office:value="9.9871" calcext:value-type="float">
            <text:p>9.987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0.0313" calcext:value-type="float">
            <text:p>0.031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0.0313" calcext:value-type="float">
            <text:p>0.0313</text:p>
          </table:table-cell>
          <table:table-cell office:value-type="float" office:value="9.953" calcext:value-type="float">
            <text:p>9.95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-0.0157" calcext:value-type="float">
            <text:p>-0.015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9.9724" calcext:value-type="float">
            <text:p>9.9724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0433" calcext:value-type="float">
            <text:p>-0.043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10.0228" calcext:value-type="float">
            <text:p>10.0228</text:p>
          </table:table-cell>
          <table:table-cell office:value-type="float" office:value="0.0228" calcext:value-type="float">
            <text:p>0.0228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699" calcext:value-type="float">
            <text:p>-0.1699</text:p>
          </table:table-cell>
          <table:table-cell office:value-type="float" office:value="-0.0205" calcext:value-type="float">
            <text:p>-0.020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6" calcext:value-type="float">
            <text:p>0.6586</text:p>
          </table:table-cell>
          <table:table-cell office:value-type="float" office:value="-0.6674" calcext:value-type="float">
            <text:p>-0.6674</text:p>
          </table:table-cell>
          <table:table-cell office:value-type="float" office:value="-0.3626" calcext:value-type="float">
            <text:p>-0.3626</text:p>
          </table:table-cell>
          <table:table-cell office:value-type="float" office:value="0.5927" calcext:value-type="float">
            <text:p>0.5927</text:p>
          </table:table-cell>
          <table:table-cell office:value-type="float" office:value="9.9413" calcext:value-type="float">
            <text:p>9.9413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-0.2173" calcext:value-type="float">
            <text:p>-0.2173</text:p>
          </table:table-cell>
          <table:table-cell office:value-type="float" office:value="-0.9429" calcext:value-type="float">
            <text:p>-0.9429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5339" calcext:value-type="float">
            <text:p>0.5339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0.2173" calcext:value-type="float">
            <text:p>-0.2173</text:p>
          </table:table-cell>
          <table:table-cell office:value-type="float" office:value="-0.9429" calcext:value-type="float">
            <text:p>-0.9429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9.1228" calcext:value-type="float">
            <text:p>9.1228</text:p>
          </table:table-cell>
          <table:table-cell office:value-type="float" office:value="-0.8772" calcext:value-type="float">
            <text:p>-0.8772</text:p>
          </table:table-cell>
          <table:table-cell office:value-type="float" office:value="-0.8986" calcext:value-type="float">
            <text:p>-0.8986</text:p>
          </table:table-cell>
          <table:table-cell office:value-type="float" office:value="-0.3113" calcext:value-type="float">
            <text:p>-0.3113</text:p>
          </table:table-cell>
          <table:table-cell office:value-type="float" office:value="0.2961" calcext:value-type="float">
            <text:p>0.2961</text:p>
          </table:table-cell>
          <table:table-cell office:value-type="float" office:value="-0.3432" calcext:value-type="float">
            <text:p>-0.34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8986" calcext:value-type="float">
            <text:p>-0.8986</text:p>
          </table:table-cell>
          <table:table-cell office:value-type="float" office:value="-0.3113" calcext:value-type="float">
            <text:p>-0.3113</text:p>
          </table:table-cell>
          <table:table-cell office:value-type="float" office:value="0.2961" calcext:value-type="float">
            <text:p>0.2961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9.1165" calcext:value-type="float">
            <text:p>9.1165</text:p>
          </table:table-cell>
          <table:table-cell office:value-type="float" office:value="-0.8835" calcext:value-type="float">
            <text:p>-0.8835</text:p>
          </table:table-cell>
          <table:table-cell office:value-type="float" office:value="-0.7382" calcext:value-type="float">
            <text:p>-0.7382</text:p>
          </table:table-cell>
          <table:table-cell office:value-type="float" office:value="0.6074" calcext:value-type="float">
            <text:p>0.6074</text:p>
          </table:table-cell>
          <table:table-cell office:value-type="float" office:value="-0.4889" calcext:value-type="float">
            <text:p>-0.4889</text:p>
          </table:table-cell>
          <table:table-cell office:value-type="float" office:value="-1.2267" calcext:value-type="float">
            <text:p>-1.226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7382" calcext:value-type="float">
            <text:p>-0.7382</text:p>
          </table:table-cell>
          <table:table-cell office:value-type="float" office:value="0.6074" calcext:value-type="float">
            <text:p>0.6074</text:p>
          </table:table-cell>
          <table:table-cell office:value-type="float" office:value="-0.4889" calcext:value-type="float">
            <text:p>-0.4889</text:p>
          </table:table-cell>
          <table:table-cell office:value-type="float" office:value="-1.2267" calcext:value-type="float">
            <text:p>-1.2267</text:p>
          </table:table-cell>
          <table:table-cell office:value-type="float" office:value="11.262" calcext:value-type="float">
            <text:p>11.262</text:p>
          </table:table-cell>
          <table:table-cell office:value-type="float" office:value="1.262" calcext:value-type="float">
            <text:p>1.262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9084" calcext:value-type="float">
            <text:p>0.9084</text:p>
          </table:table-cell>
          <table:table-cell office:value-type="float" office:value="-1.0847" calcext:value-type="float">
            <text:p>-1.0847</text:p>
          </table:table-cell>
          <table:table-cell office:value-type="float" office:value="0.0353" calcext:value-type="float">
            <text:p>0.035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9084" calcext:value-type="float">
            <text:p>0.9084</text:p>
          </table:table-cell>
          <table:table-cell office:value-type="float" office:value="-1.0847" calcext:value-type="float">
            <text:p>-1.08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1.4027" calcext:value-type="float">
            <text:p>1.4027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3372" calcext:value-type="float">
            <text:p>0.3372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438" calcext:value-type="float">
            <text:p>1.43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3372" calcext:value-type="float">
            <text:p>0.3372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438" calcext:value-type="float">
            <text:p>1.438</text:p>
          </table:table-cell>
          <table:table-cell office:value-type="float" office:value="9.0347" calcext:value-type="float">
            <text:p>9.0347</text:p>
          </table:table-cell>
          <table:table-cell office:value-type="float" office:value="-0.9653" calcext:value-type="float">
            <text:p>-0.9653</text:p>
          </table:table-cell>
          <table:table-cell office:value-type="float" office:value="0.6904" calcext:value-type="float">
            <text:p>0.6904</text:p>
          </table:table-cell>
          <table:table-cell office:value-type="float" office:value="-0.4862" calcext:value-type="float">
            <text:p>-0.4862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4726" calcext:value-type="float">
            <text:p>0.472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904" calcext:value-type="float">
            <text:p>0.6904</text:p>
          </table:table-cell>
          <table:table-cell office:value-type="float" office:value="-0.4862" calcext:value-type="float">
            <text:p>-0.4862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4726" calcext:value-type="float">
            <text:p>0.4726</text:p>
          </table:table-cell>
          <table:table-cell office:value-type="float" office:value="9.6877" calcext:value-type="float">
            <text:p>9.6877</text:p>
          </table:table-cell>
          <table:table-cell office:value-type="float" office:value="-0.3123" calcext:value-type="float">
            <text:p>-0.312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1604" calcext:value-type="float">
            <text:p>0.160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1604" calcext:value-type="float">
            <text:p>0.1604</text:p>
          </table:table-cell>
          <table:table-cell office:value-type="float" office:value="8.728" calcext:value-type="float">
            <text:p>8.728</text:p>
          </table:table-cell>
          <table:table-cell office:value-type="float" office:value="-1.272" calcext:value-type="float">
            <text:p>-1.272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3507" calcext:value-type="float">
            <text:p>-0.3507</text:p>
          </table:table-cell>
          <table:table-cell office:value-type="float" office:value="0.4482" calcext:value-type="float">
            <text:p>0.4482</text:p>
          </table:table-cell>
          <table:table-cell office:value-type="float" office:value="-1.1116" calcext:value-type="float">
            <text:p>-1.111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3507" calcext:value-type="float">
            <text:p>-0.3507</text:p>
          </table:table-cell>
          <table:table-cell office:value-type="float" office:value="0.4482" calcext:value-type="float">
            <text:p>0.4482</text:p>
          </table:table-cell>
          <table:table-cell office:value-type="float" office:value="-1.1116" calcext:value-type="float">
            <text:p>-1.1116</text:p>
          </table:table-cell>
          <table:table-cell office:value-type="float" office:value="10.2552" calcext:value-type="float">
            <text:p>10.2552</text:p>
          </table:table-cell>
          <table:table-cell office:value-type="float" office:value="0.2552" calcext:value-type="float">
            <text:p>0.2552</text:p>
          </table:table-cell>
          <table:table-cell office:value-type="float" office:value="-0.6232" calcext:value-type="float">
            <text:p>-0.6232</text:p>
          </table:table-cell>
          <table:table-cell office:value-type="float" office:value="0.3729" calcext:value-type="float">
            <text:p>0.3729</text:p>
          </table:table-cell>
          <table:table-cell office:value-type="float" office:value="-0.5358" calcext:value-type="float">
            <text:p>-0.5358</text:p>
          </table:table-cell>
          <table:table-cell office:value-type="float" office:value="-0.8564" calcext:value-type="float">
            <text:p>-0.856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0.6232" calcext:value-type="float">
            <text:p>-0.6232</text:p>
          </table:table-cell>
          <table:table-cell office:value-type="float" office:value="0.3729" calcext:value-type="float">
            <text:p>0.3729</text:p>
          </table:table-cell>
          <table:table-cell office:value-type="float" office:value="-0.5358" calcext:value-type="float">
            <text:p>-0.5358</text:p>
          </table:table-cell>
          <table:table-cell office:value-type="float" office:value="-0.8564" calcext:value-type="float">
            <text:p>-0.8564</text:p>
          </table:table-cell>
          <table:table-cell office:value-type="float" office:value="10.8678" calcext:value-type="float">
            <text:p>10.8678</text:p>
          </table:table-cell>
          <table:table-cell office:value-type="float" office:value="0.8678" calcext:value-type="float">
            <text:p>0.8678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6809" calcext:value-type="float">
            <text:p>0.6809</text:p>
          </table:table-cell>
          <table:table-cell office:value-type="float" office:value="-0.9584" calcext:value-type="float">
            <text:p>-0.9584</text:p>
          </table:table-cell>
          <table:table-cell office:value-type="float" office:value="0.0114" calcext:value-type="float">
            <text:p>0.011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6809" calcext:value-type="float">
            <text:p>0.6809</text:p>
          </table:table-cell>
          <table:table-cell office:value-type="float" office:value="-0.9584" calcext:value-type="float">
            <text:p>-0.9584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0177" calcext:value-type="float">
            <text:p>11.0177</text:p>
          </table:table-cell>
          <table:table-cell office:value-type="float" office:value="1.0177" calcext:value-type="float">
            <text:p>1.0177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3365" calcext:value-type="float">
            <text:p>0.3365</text:p>
          </table:table-cell>
          <table:table-cell office:value-type="float" office:value="-0.4381" calcext:value-type="float">
            <text:p>-0.4381</text:p>
          </table:table-cell>
          <table:table-cell office:value-type="float" office:value="1.0291" calcext:value-type="float">
            <text:p>1.029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3365" calcext:value-type="float">
            <text:p>0.3365</text:p>
          </table:table-cell>
          <table:table-cell office:value-type="float" office:value="-0.4381" calcext:value-type="float">
            <text:p>-0.4381</text:p>
          </table:table-cell>
          <table:table-cell office:value-type="float" office:value="1.0291" calcext:value-type="float">
            <text:p>1.0291</text:p>
          </table:table-cell>
          <table:table-cell office:value-type="float" office:value="9.6956" calcext:value-type="float">
            <text:p>9.6956</text:p>
          </table:table-cell>
          <table:table-cell office:value-type="float" office:value="-0.3044" calcext:value-type="float">
            <text:p>-0.3044</text:p>
          </table:table-cell>
          <table:table-cell office:value-type="float" office:value="0.5432" calcext:value-type="float">
            <text:p>0.5432</text:p>
          </table:table-cell>
          <table:table-cell office:value-type="float" office:value="-0.2749" calcext:value-type="float">
            <text:p>-0.2749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7246" calcext:value-type="float">
            <text:p>0.724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5432" calcext:value-type="float">
            <text:p>0.5432</text:p>
          </table:table-cell>
          <table:table-cell office:value-type="float" office:value="-0.2749" calcext:value-type="float">
            <text:p>-0.2749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7246" calcext:value-type="float">
            <text:p>0.7246</text:p>
          </table:table-cell>
          <table:table-cell office:value-type="float" office:value="9.4311" calcext:value-type="float">
            <text:p>9.4311</text:p>
          </table:table-cell>
          <table:table-cell office:value-type="float" office:value="-0.5689" calcext:value-type="float">
            <text:p>-0.5689</text:p>
          </table:table-cell>
          <table:table-cell office:value-type="float" office:value="0.0871" calcext:value-type="float">
            <text:p>0.0871</text:p>
          </table:table-cell>
          <table:table-cell office:value-type="float" office:value="-0.568" calcext:value-type="float">
            <text:p>-0.56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1557" calcext:value-type="float">
            <text:p>0.155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871" calcext:value-type="float">
            <text:p>0.0871</text:p>
          </table:table-cell>
          <table:table-cell office:value-type="float" office:value="-0.568" calcext:value-type="float">
            <text:p>-0.56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1557" calcext:value-type="float">
            <text:p>0.1557</text:p>
          </table:table-cell>
          <table:table-cell office:value-type="float" office:value="9.0196" calcext:value-type="float">
            <text:p>9.0196</text:p>
          </table:table-cell>
          <table:table-cell office:value-type="float" office:value="-0.9804" calcext:value-type="float">
            <text:p>-0.9804</text:p>
          </table:table-cell>
          <table:table-cell office:value-type="float" office:value="-0.3915" calcext:value-type="float">
            <text:p>-0.3915</text:p>
          </table:table-cell>
          <table:table-cell office:value-type="float" office:value="-0.31" calcext:value-type="float">
            <text:p>-0.31</text:p>
          </table:table-cell>
          <table:table-cell office:value-type="float" office:value="0.5444" calcext:value-type="float">
            <text:p>0.5444</text:p>
          </table:table-cell>
          <table:table-cell office:value-type="float" office:value="-0.8247" calcext:value-type="float">
            <text:p>-0.824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0.3915" calcext:value-type="float">
            <text:p>-0.3915</text:p>
          </table:table-cell>
          <table:table-cell office:value-type="float" office:value="-0.31" calcext:value-type="float">
            <text:p>-0.31</text:p>
          </table:table-cell>
          <table:table-cell office:value-type="float" office:value="0.5444" calcext:value-type="float">
            <text:p>0.5444</text:p>
          </table:table-cell>
          <table:table-cell office:value-type="float" office:value="-0.8247" calcext:value-type="float">
            <text:p>-0.8247</text:p>
          </table:table-cell>
          <table:table-cell office:value-type="float" office:value="9.9698" calcext:value-type="float">
            <text:p>9.9698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-0.4548" calcext:value-type="float">
            <text:p>-0.4548</text:p>
          </table:table-cell>
          <table:table-cell office:value-type="float" office:value="0.2039" calcext:value-type="float">
            <text:p>0.2039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8548" calcext:value-type="float">
            <text:p>-0.854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0.4548" calcext:value-type="float">
            <text:p>-0.4548</text:p>
          </table:table-cell>
          <table:table-cell office:value-type="float" office:value="0.2039" calcext:value-type="float">
            <text:p>0.2039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8548" calcext:value-type="float">
            <text:p>-0.8548</text:p>
          </table:table-cell>
          <table:table-cell office:value-type="float" office:value="10.7704" calcext:value-type="float">
            <text:p>10.7704</text:p>
          </table:table-cell>
          <table:table-cell office:value-type="float" office:value="0.7704" calcext:value-type="float">
            <text:p>0.7704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0.4676" calcext:value-type="float">
            <text:p>0.4676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0844" calcext:value-type="float">
            <text:p>-0.084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0.4676" calcext:value-type="float">
            <text:p>0.4676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10.7592" calcext:value-type="float">
            <text:p>10.7592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27" calcext:value-type="float">
            <text:p>0.27</text:p>
          </table:table-cell>
          <table:table-cell office:value-type="float" office:value="-0.4698" calcext:value-type="float">
            <text:p>-0.4698</text:p>
          </table:table-cell>
          <table:table-cell office:value-type="float" office:value="0.6747" calcext:value-type="float">
            <text:p>0.674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27" calcext:value-type="float">
            <text:p>0.27</text:p>
          </table:table-cell>
          <table:table-cell office:value-type="float" office:value="-0.4698" calcext:value-type="float">
            <text:p>-0.4698</text:p>
          </table:table-cell>
          <table:table-cell office:value-type="float" office:value="0.6747" calcext:value-type="float">
            <text:p>0.6747</text:p>
          </table:table-cell>
          <table:table-cell office:value-type="float" office:value="10.2022" calcext:value-type="float">
            <text:p>10.2022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3789" calcext:value-type="float">
            <text:p>0.3789</text:p>
          </table:table-cell>
          <table:table-cell office:value-type="float" office:value="-0.1496" calcext:value-type="float">
            <text:p>-0.14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8769" calcext:value-type="float">
            <text:p>0.876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3789" calcext:value-type="float">
            <text:p>0.3789</text:p>
          </table:table-cell>
          <table:table-cell office:value-type="float" office:value="-0.1496" calcext:value-type="float">
            <text:p>-0.14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8769" calcext:value-type="float">
            <text:p>0.8769</text:p>
          </table:table-cell>
          <table:table-cell office:value-type="float" office:value="9.2058" calcext:value-type="float">
            <text:p>9.2058</text:p>
          </table:table-cell>
          <table:table-cell office:value-type="float" office:value="-0.7942" calcext:value-type="float">
            <text:p>-0.7942</text:p>
          </table:table-cell>
          <table:table-cell office:value-type="float" office:value="0.0987" calcext:value-type="float">
            <text:p>0.0987</text:p>
          </table:table-cell>
          <table:table-cell office:value-type="float" office:value="-0.3736" calcext:value-type="float">
            <text:p>-0.3736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0827" calcext:value-type="float">
            <text:p>0.082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987" calcext:value-type="float">
            <text:p>0.0987</text:p>
          </table:table-cell>
          <table:table-cell office:value-type="float" office:value="-0.3736" calcext:value-type="float">
            <text:p>-0.3736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0827" calcext:value-type="float">
            <text:p>0.0827</text:p>
          </table:table-cell>
          <table:table-cell office:value-type="float" office:value="9.3187" calcext:value-type="float">
            <text:p>9.3187</text:p>
          </table:table-cell>
          <table:table-cell office:value-type="float" office:value="-0.6813" calcext:value-type="float">
            <text:p>-0.681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-0.2215" calcext:value-type="float">
            <text:p>-0.2215</text:p>
          </table:table-cell>
          <table:table-cell office:value-type="float" office:value="0.5279" calcext:value-type="float">
            <text:p>0.5279</text:p>
          </table:table-cell>
          <table:table-cell office:value-type="float" office:value="-0.5985" calcext:value-type="float">
            <text:p>-0.598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-0.2215" calcext:value-type="float">
            <text:p>-0.2215</text:p>
          </table:table-cell>
          <table:table-cell office:value-type="float" office:value="0.5279" calcext:value-type="float">
            <text:p>0.5279</text:p>
          </table:table-cell>
          <table:table-cell office:value-type="float" office:value="-0.5985" calcext:value-type="float">
            <text:p>-0.5985</text:p>
          </table:table-cell>
          <table:table-cell office:value-type="float" office:value="9.8453" calcext:value-type="float">
            <text:p>9.8453</text:p>
          </table:table-cell>
          <table:table-cell office:value-type="float" office:value="-0.1547" calcext:value-type="float">
            <text:p>-0.1547</text:p>
          </table:table-cell>
          <table:table-cell office:value-type="float" office:value="-0.2899" calcext:value-type="float">
            <text:p>-0.2899</text:p>
          </table:table-cell>
          <table:table-cell office:value-type="float" office:value="0.1114" calcext:value-type="float">
            <text:p>0.1114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7533" calcext:value-type="float">
            <text:p>-0.753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0.2899" calcext:value-type="float">
            <text:p>-0.2899</text:p>
          </table:table-cell>
          <table:table-cell office:value-type="float" office:value="0.1114" calcext:value-type="float">
            <text:p>0.1114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7533" calcext:value-type="float">
            <text:p>-0.7533</text:p>
          </table:table-cell>
          <table:table-cell office:value-type="float" office:value="10.6295" calcext:value-type="float">
            <text:p>10.6295</text:p>
          </table:table-cell>
          <table:table-cell office:value-type="float" office:value="0.6295" calcext:value-type="float">
            <text:p>0.6295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2912" calcext:value-type="float">
            <text:p>0.2912</text:p>
          </table:table-cell>
          <table:table-cell office:value-type="float" office:value="-0.5865" calcext:value-type="float">
            <text:p>-0.5865</text:p>
          </table:table-cell>
          <table:table-cell office:value-type="float" office:value="-0.1237" calcext:value-type="float">
            <text:p>-0.123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2912" calcext:value-type="float">
            <text:p>0.2912</text:p>
          </table:table-cell>
          <table:table-cell office:value-type="float" office:value="-0.5865" calcext:value-type="float">
            <text:p>-0.5865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10.5429" calcext:value-type="float">
            <text:p>10.5429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729" calcext:value-type="float">
            <text:p>0.1729</text:p>
          </table:table-cell>
          <table:table-cell office:value-type="float" office:value="-0.4387" calcext:value-type="float">
            <text:p>-0.4387</text:p>
          </table:table-cell>
          <table:table-cell office:value-type="float" office:value="0.4192" calcext:value-type="float">
            <text:p>0.419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729" calcext:value-type="float">
            <text:p>0.1729</text:p>
          </table:table-cell>
          <table:table-cell office:value-type="float" office:value="-0.4387" calcext:value-type="float">
            <text:p>-0.4387</text:p>
          </table:table-cell>
          <table:table-cell office:value-type="float" office:value="0.4192" calcext:value-type="float">
            <text:p>0.4192</text:p>
          </table:table-cell>
          <table:table-cell office:value-type="float" office:value="10.2714" calcext:value-type="float">
            <text:p>10.2714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257" calcext:value-type="float">
            <text:p>0.2257</text:p>
          </table:table-cell>
          <table:table-cell office:value-type="float" office:value="-0.0901" calcext:value-type="float">
            <text:p>-0.090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6906" calcext:value-type="float">
            <text:p>0.690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257" calcext:value-type="float">
            <text:p>0.2257</text:p>
          </table:table-cell>
          <table:table-cell office:value-type="float" office:value="-0.0901" calcext:value-type="float">
            <text:p>-0.090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6906" calcext:value-type="float">
            <text:p>0.6906</text:p>
          </table:table-cell>
          <table:table-cell office:value-type="float" office:value="9.4263" calcext:value-type="float">
            <text:p>9.4263</text:p>
          </table:table-cell>
          <table:table-cell office:value-type="float" office:value="-0.5737" calcext:value-type="float">
            <text:p>-0.5737</text:p>
          </table:table-cell>
          <table:table-cell office:value-type="float" office:value="0.0563" calcext:value-type="float">
            <text:p>0.0563</text:p>
          </table:table-cell>
          <table:table-cell office:value-type="float" office:value="-0.2283" calcext:value-type="float">
            <text:p>-0.228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1168" calcext:value-type="float">
            <text:p>0.116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563" calcext:value-type="float">
            <text:p>0.0563</text:p>
          </table:table-cell>
          <table:table-cell office:value-type="float" office:value="-0.2283" calcext:value-type="float">
            <text:p>-0.228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1168" calcext:value-type="float">
            <text:p>0.1168</text:p>
          </table:table-cell>
          <table:table-cell office:value-type="float" office:value="9.4953" calcext:value-type="float">
            <text:p>9.4953</text:p>
          </table:table-cell>
          <table:table-cell office:value-type="float" office:value="-0.5047" calcext:value-type="float">
            <text:p>-0.5047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0.3843" calcext:value-type="float">
            <text:p>0.3843</text:p>
          </table:table-cell>
          <table:table-cell office:value-type="float" office:value="-0.3879" calcext:value-type="float">
            <text:p>-0.387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0.3843" calcext:value-type="float">
            <text:p>0.3843</text:p>
          </table:table-cell>
          <table:table-cell office:value-type="float" office:value="-0.3879" calcext:value-type="float">
            <text:p>-0.3879</text:p>
          </table:table-cell>
          <table:table-cell office:value-type="float" office:value="9.8063" calcext:value-type="float">
            <text:p>9.806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-0.1691" calcext:value-type="float">
            <text:p>-0.1691</text:p>
          </table:table-cell>
          <table:table-cell office:value-type="float" office:value="0.0763" calcext:value-type="float">
            <text:p>0.0763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-0.5816" calcext:value-type="float">
            <text:p>-0.581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0.1691" calcext:value-type="float">
            <text:p>-0.1691</text:p>
          </table:table-cell>
          <table:table-cell office:value-type="float" office:value="0.0763" calcext:value-type="float">
            <text:p>0.0763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-0.5816" calcext:value-type="float">
            <text:p>-0.5816</text:p>
          </table:table-cell>
          <table:table-cell office:value-type="float" office:value="10.4593" calcext:value-type="float">
            <text:p>10.4593</text:p>
          </table:table-cell>
          <table:table-cell office:value-type="float" office:value="0.4593" calcext:value-type="float">
            <text:p>0.4593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1746" calcext:value-type="float">
            <text:p>0.1746</text:p>
          </table:table-cell>
          <table:table-cell office:value-type="float" office:value="-0.4523" calcext:value-type="float">
            <text:p>-0.4523</text:p>
          </table:table-cell>
          <table:table-cell office:value-type="float" office:value="-0.1223" calcext:value-type="float">
            <text:p>-0.122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1746" calcext:value-type="float">
            <text:p>0.1746</text:p>
          </table:table-cell>
          <table:table-cell office:value-type="float" office:value="-0.4523" calcext:value-type="float">
            <text:p>-0.452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0.4074" calcext:value-type="float">
            <text:p>10.4074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878" calcext:value-type="float">
            <text:p>0.0878</text:p>
          </table:table-cell>
          <table:table-cell office:value-type="float" office:value="-0.3709" calcext:value-type="float">
            <text:p>-0.3709</text:p>
          </table:table-cell>
          <table:table-cell office:value-type="float" office:value="0.2851" calcext:value-type="float">
            <text:p>0.285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878" calcext:value-type="float">
            <text:p>0.0878</text:p>
          </table:table-cell>
          <table:table-cell office:value-type="float" office:value="-0.3709" calcext:value-type="float">
            <text:p>-0.3709</text:p>
          </table:table-cell>
          <table:table-cell office:value-type="float" office:value="0.2851" calcext:value-type="float">
            <text:p>0.2851</text:p>
          </table:table-cell>
          <table:table-cell office:value-type="float" office:value="10.179" calcext:value-type="float">
            <text:p>10.17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174" calcext:value-type="float">
            <text:p>0.1174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464" calcext:value-type="float">
            <text:p>0.46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1174" calcext:value-type="float">
            <text:p>0.1174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464" calcext:value-type="float">
            <text:p>0.464</text:p>
          </table:table-cell>
          <table:table-cell office:value-type="float" office:value="9.6875" calcext:value-type="float">
            <text:p>9.687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516" calcext:value-type="float">
            <text:p>0.151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516" calcext:value-type="float">
            <text:p>0.1516</text:p>
          </table:table-cell>
          <table:table-cell office:value-type="float" office:value="9.576" calcext:value-type="float">
            <text:p>9.576</text:p>
          </table:table-cell>
          <table:table-cell office:value-type="float" office:value="-0.424" calcext:value-type="float">
            <text:p>-0.424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251" calcext:value-type="float">
            <text:p>0.251</text:p>
          </table:table-cell>
          <table:table-cell office:value-type="float" office:value="-0.2724" calcext:value-type="float">
            <text:p>-0.272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251" calcext:value-type="float">
            <text:p>0.251</text:p>
          </table:table-cell>
          <table:table-cell office:value-type="float" office:value="-0.2724" calcext:value-type="float">
            <text:p>-0.2724</text:p>
          </table:table-cell>
          <table:table-cell office:value-type="float" office:value="9.847" calcext:value-type="float">
            <text:p>9.847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0.0709" calcext:value-type="float">
            <text:p>0.0709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4254" calcext:value-type="float">
            <text:p>-0.425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0.0709" calcext:value-type="float">
            <text:p>0.0709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4254" calcext:value-type="float">
            <text:p>-0.4254</text:p>
          </table:table-cell>
          <table:table-cell office:value-type="float" office:value="10.3425" calcext:value-type="float">
            <text:p>10.3425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47" calcext:value-type="float">
            <text:p>0.1047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0828" calcext:value-type="float">
            <text:p>-0.082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47" calcext:value-type="float">
            <text:p>0.1047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0828" calcext:value-type="float">
            <text:p>-0.0828</text:p>
          </table:table-cell>
          <table:table-cell office:value-type="float" office:value="10.3307" calcext:value-type="float">
            <text:p>10.3307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2694" calcext:value-type="float">
            <text:p>-0.2694</text:p>
          </table:table-cell>
          <table:table-cell office:value-type="float" office:value="0.2479" calcext:value-type="float">
            <text:p>0.247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2694" calcext:value-type="float">
            <text:p>-0.2694</text:p>
          </table:table-cell>
          <table:table-cell office:value-type="float" office:value="0.2479" calcext:value-type="float">
            <text:p>0.2479</text:p>
          </table:table-cell>
          <table:table-cell office:value-type="float" office:value="10.056" calcext:value-type="float">
            <text:p>10.05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0.0704" calcext:value-type="float">
            <text:p>-0.0704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3039" calcext:value-type="float">
            <text:p>0.303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0.0704" calcext:value-type="float">
            <text:p>-0.0704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3039" calcext:value-type="float">
            <text:p>0.3039</text:p>
          </table:table-cell>
          <table:table-cell office:value-type="float" office:value="9.7217" calcext:value-type="float">
            <text:p>9.7217</text:p>
          </table:table-cell>
          <table:table-cell office:value-type="float" office:value="-0.2783" calcext:value-type="float">
            <text:p>-0.2783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257" calcext:value-type="float">
            <text:p>0.025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257" calcext:value-type="float">
            <text:p>0.0257</text:p>
          </table:table-cell>
          <table:table-cell office:value-type="float" office:value="9.7352" calcext:value-type="float">
            <text:p>9.7352</text:p>
          </table:table-cell>
          <table:table-cell office:value-type="float" office:value="-0.2648" calcext:value-type="float">
            <text:p>-0.2648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2391" calcext:value-type="float">
            <text:p>-0.239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2391" calcext:value-type="float">
            <text:p>-0.2391</text:p>
          </table:table-cell>
          <table:table-cell office:value-type="float" office:value="9.9523" calcext:value-type="float">
            <text:p>9.9523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0.065" calcext:value-type="float">
            <text:p>0.065</text:p>
          </table:table-cell>
          <table:table-cell office:value-type="float" office:value="-0.1985" calcext:value-type="float">
            <text:p>-0.1985</text:p>
          </table:table-cell>
          <table:table-cell office:value-type="float" office:value="-0.2869" calcext:value-type="float">
            <text:p>-0.286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0.065" calcext:value-type="float">
            <text:p>0.065</text:p>
          </table:table-cell>
          <table:table-cell office:value-type="float" office:value="-0.1985" calcext:value-type="float">
            <text:p>-0.1985</text:p>
          </table:table-cell>
          <table:table-cell office:value-type="float" office:value="-0.2869" calcext:value-type="float">
            <text:p>-0.2869</text:p>
          </table:table-cell>
          <table:table-cell office:value-type="float" office:value="10.283" calcext:value-type="float">
            <text:p>10.28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56" calcext:value-type="float">
            <text:p>0.056</text:p>
          </table:table-cell>
          <table:table-cell office:value-type="float" office:value="-0.3439" calcext:value-type="float">
            <text:p>-0.3439</text:p>
          </table:table-cell>
          <table:table-cell office:value-type="float" office:value="-0.0039" calcext:value-type="float">
            <text:p>-0.003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56" calcext:value-type="float">
            <text:p>0.056</text:p>
          </table:table-cell>
          <table:table-cell office:value-type="float" office:value="-0.3439" calcext:value-type="float">
            <text:p>-0.343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10.2468" calcext:value-type="float">
            <text:p>10.2468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0426" calcext:value-type="float">
            <text:p>0.042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2429" calcext:value-type="float">
            <text:p>0.242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426" calcext:value-type="float">
            <text:p>0.042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2429" calcext:value-type="float">
            <text:p>0.2429</text:p>
          </table:table-cell>
          <table:table-cell office:value-type="float" office:value="9.9478" calcext:value-type="float">
            <text:p>9.9478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1907" calcext:value-type="float">
            <text:p>0.190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1907" calcext:value-type="float">
            <text:p>0.1907</text:p>
          </table:table-cell>
          <table:table-cell office:value-type="float" office:value="9.7561" calcext:value-type="float">
            <text:p>9.7561</text:p>
          </table:table-cell>
          <table:table-cell office:value-type="float" office:value="-0.2439" calcext:value-type="float">
            <text:p>-0.2439</text:p>
          </table:table-cell>
          <table:table-cell office:value-type="float" office:value="-0.0492" calcext:value-type="float">
            <text:p>-0.0492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0612" calcext:value-type="float">
            <text:p>0.0612</text:p>
          </table:table-cell>
          <table:table-cell office:value-type="float" office:value="-0.0532" calcext:value-type="float">
            <text:p>-0.05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0.0492" calcext:value-type="float">
            <text:p>-0.0492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0612" calcext:value-type="float">
            <text:p>0.0612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9.8374" calcext:value-type="float">
            <text:p>9.8374</text:p>
          </table:table-cell>
          <table:table-cell office:value-type="float" office:value="-0.1626" calcext:value-type="float">
            <text:p>-0.1626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0259" calcext:value-type="float">
            <text:p>0.0259</text:p>
          </table:table-cell>
          <table:table-cell office:value-type="float" office:value="-0.0733" calcext:value-type="float">
            <text:p>-0.0733</text:p>
          </table:table-cell>
          <table:table-cell office:value-type="float" office:value="-0.2158" calcext:value-type="float">
            <text:p>-0.215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0259" calcext:value-type="float">
            <text:p>0.0259</text:p>
          </table:table-cell>
          <table:table-cell office:value-type="float" office:value="-0.0733" calcext:value-type="float">
            <text:p>-0.0733</text:p>
          </table:table-cell>
          <table:table-cell office:value-type="float" office:value="-0.2158" calcext:value-type="float">
            <text:p>-0.2158</text:p>
          </table:table-cell>
          <table:table-cell office:value-type="float" office:value="10.0664" calcext:value-type="float">
            <text:p>10.0664</text:p>
          </table:table-cell>
          <table:table-cell office:value-type="float" office:value="0.0664" calcext:value-type="float">
            <text:p>0.0664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2559" calcext:value-type="float">
            <text:p>-0.2559</text:p>
          </table:table-cell>
          <table:table-cell office:value-type="float" office:value="-0.1493" calcext:value-type="float">
            <text:p>-0.149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2559" calcext:value-type="float">
            <text:p>-0.2559</text:p>
          </table:table-cell>
          <table:table-cell office:value-type="float" office:value="-0.1493" calcext:value-type="float">
            <text:p>-0.1493</text:p>
          </table:table-cell>
          <table:table-cell office:value-type="float" office:value="10.2426" calcext:value-type="float">
            <text:p>10.2426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2839" calcext:value-type="float">
            <text:p>-0.2839</text:p>
          </table:table-cell>
          <table:table-cell office:value-type="float" office:value="0.0933" calcext:value-type="float">
            <text:p>0.093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2839" calcext:value-type="float">
            <text:p>-0.2839</text:p>
          </table:table-cell>
          <table:table-cell office:value-type="float" office:value="0.0933" calcext:value-type="float">
            <text:p>0.0933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0.2014" calcext:value-type="float">
            <text:p>0.201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0.2014" calcext:value-type="float">
            <text:p>0.2014</text:p>
          </table:table-cell>
          <table:table-cell office:value-type="float" office:value="9.8765" calcext:value-type="float">
            <text:p>9.8765</text:p>
          </table:table-cell>
          <table:table-cell office:value-type="float" office:value="-0.1235" calcext:value-type="float">
            <text:p>-0.1235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778" calcext:value-type="float">
            <text:p>0.077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778" calcext:value-type="float">
            <text:p>0.0778</text:p>
          </table:table-cell>
          <table:table-cell office:value-type="float" office:value="9.808" calcext:value-type="float">
            <text:p>9.80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1142" calcext:value-type="float">
            <text:p>-0.114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9.941" calcext:value-type="float">
            <text:p>9.941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0377" calcext:value-type="float">
            <text:p>0.0377</text:p>
          </table:table-cell>
          <table:table-cell office:value-type="float" office:value="-0.1588" calcext:value-type="float">
            <text:p>-0.1588</text:p>
          </table:table-cell>
          <table:table-cell office:value-type="float" office:value="-0.1732" calcext:value-type="float">
            <text:p>-0.17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0377" calcext:value-type="float">
            <text:p>0.0377</text:p>
          </table:table-cell>
          <table:table-cell office:value-type="float" office:value="-0.1588" calcext:value-type="float">
            <text:p>-0.1588</text:p>
          </table:table-cell>
          <table:table-cell office:value-type="float" office:value="-0.1732" calcext:value-type="float">
            <text:p>-0.1732</text:p>
          </table:table-cell>
          <table:table-cell office:value-type="float" office:value="10.1404" calcext:value-type="float">
            <text:p>10.140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2618" calcext:value-type="float">
            <text:p>-0.2618</text:p>
          </table:table-cell>
          <table:table-cell office:value-type="float" office:value="-0.0328" calcext:value-type="float">
            <text:p>-0.032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2618" calcext:value-type="float">
            <text:p>-0.2618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10.1746" calcext:value-type="float">
            <text:p>10.1746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2072" calcext:value-type="float">
            <text:p>-0.2072</text:p>
          </table:table-cell>
          <table:table-cell office:value-type="float" office:value="0.1418" calcext:value-type="float">
            <text:p>0.141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2072" calcext:value-type="float">
            <text:p>-0.2072</text:p>
          </table:table-cell>
          <table:table-cell office:value-type="float" office:value="0.1418" calcext:value-type="float">
            <text:p>0.1418</text:p>
          </table:table-cell>
          <table:table-cell office:value-type="float" office:value="9.9988" calcext:value-type="float">
            <text:p>9.998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661" calcext:value-type="float">
            <text:p>-0.0661</text:p>
          </table:table-cell>
          <table:table-cell office:value-type="float" office:value="0.1406" calcext:value-type="float">
            <text:p>0.140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661" calcext:value-type="float">
            <text:p>-0.0661</text:p>
          </table:table-cell>
          <table:table-cell office:value-type="float" office:value="0.1406" calcext:value-type="float">
            <text:p>0.1406</text:p>
          </table:table-cell>
          <table:table-cell office:value-type="float" office:value="9.8441" calcext:value-type="float">
            <text:p>9.8441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153" calcext:value-type="float">
            <text:p>-0.015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9.875" calcext:value-type="float">
            <text:p>9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812" calcext:value-type="float">
            <text:p>-0.0812</text:p>
          </table:table-cell>
          <table:table-cell office:value-type="float" office:value="-0.1403" calcext:value-type="float">
            <text:p>-0.140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812" calcext:value-type="float">
            <text:p>-0.0812</text:p>
          </table:table-cell>
          <table:table-cell office:value-type="float" office:value="-0.1403" calcext:value-type="float">
            <text:p>-0.1403</text:p>
          </table:table-cell>
          <table:table-cell office:value-type="float" office:value="10.0306" calcext:value-type="float">
            <text:p>10.0306</text:p>
          </table:table-cell>
          <table:table-cell office:value-type="float" office:value="0.0306" calcext:value-type="float">
            <text:p>0.0306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2062" calcext:value-type="float">
            <text:p>-0.2062</text:p>
          </table:table-cell>
          <table:table-cell office:value-type="float" office:value="-0.1097" calcext:value-type="float">
            <text:p>-0.109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2062" calcext:value-type="float">
            <text:p>-0.2062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2345" calcext:value-type="float">
            <text:p>-0.2345</text:p>
          </table:table-cell>
          <table:table-cell office:value-type="float" office:value="0.053" calcext:value-type="float">
            <text:p>0.05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2345" calcext:value-type="float">
            <text:p>-0.2345</text:p>
          </table:table-cell>
          <table:table-cell office:value-type="float" office:value="0.053" calcext:value-type="float">
            <text:p>0.053</text:p>
          </table:table-cell>
          <table:table-cell office:value-type="float" office:value="10.0831" calcext:value-type="float">
            <text:p>10.0831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0.1362" calcext:value-type="float">
            <text:p>0.136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67" calcext:value-type="float">
            <text:p>0.006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0.1362" calcext:value-type="float">
            <text:p>0.1362</text:p>
          </table:table-cell>
          <table:table-cell office:value-type="float" office:value="9.925" calcext:value-type="float">
            <text:p>9.92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0611" calcext:value-type="float">
            <text:p>0.061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0611" calcext:value-type="float">
            <text:p>0.0611</text:p>
          </table:table-cell>
          <table:table-cell office:value-type="float" office:value="9.8604" calcext:value-type="float">
            <text:p>9.8604</text:p>
          </table:table-cell>
          <table:table-cell office:value-type="float" office:value="-0.1396" calcext:value-type="float">
            <text:p>-0.1396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85" calcext:value-type="float">
            <text:p>-0.078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9.9542" calcext:value-type="float">
            <text:p>9.9542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-0.1243" calcext:value-type="float">
            <text:p>-0.124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10.1015" calcext:value-type="float">
            <text:p>10.1015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0.0228" calcext:value-type="float">
            <text:p>-0.022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0.1228" calcext:value-type="float">
            <text:p>10.1228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0.1" calcext:value-type="float">
            <text:p>0.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0.1" calcext:value-type="float">
            <text:p>0.1</text:p>
          </table:table-cell>
          <table:table-cell office:value-type="float" office:value="9.9969" calcext:value-type="float">
            <text:p>9.9969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969" calcext:value-type="float">
            <text:p>0.096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969" calcext:value-type="float">
            <text:p>0.0969</text:p>
          </table:table-cell>
          <table:table-cell office:value-type="float" office:value="9.8914" calcext:value-type="float">
            <text:p>9.8914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-0.0307" calcext:value-type="float">
            <text:p>-0.0307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-0.0117" calcext:value-type="float">
            <text:p>-0.011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-0.0307" calcext:value-type="float">
            <text:p>-0.0307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9.9074" calcext:value-type="float">
            <text:p>9.9074</text:p>
          </table:table-cell>
          <table:table-cell office:value-type="float" office:value="-0.0926" calcext:value-type="float">
            <text:p>-0.0926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133" calcext:value-type="float">
            <text:p>0.0133</text:p>
          </table:table-cell>
          <table:table-cell office:value-type="float" office:value="-0.1033" calcext:value-type="float">
            <text:p>-0.1033</text:p>
          </table:table-cell>
          <table:table-cell office:value-type="float" office:value="-0.1043" calcext:value-type="float">
            <text:p>-0.104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133" calcext:value-type="float">
            <text:p>0.0133</text:p>
          </table:table-cell>
          <table:table-cell office:value-type="float" office:value="-0.1033" calcext:value-type="float">
            <text:p>-0.1033</text:p>
          </table:table-cell>
          <table:table-cell office:value-type="float" office:value="-0.1043" calcext:value-type="float">
            <text:p>-0.1043</text:p>
          </table:table-cell>
          <table:table-cell office:value-type="float" office:value="10.0276" calcext:value-type="float">
            <text:p>10.0276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0.1938" calcext:value-type="float">
            <text:p>-0.1938</text:p>
          </table:table-cell>
          <table:table-cell office:value-type="float" office:value="-0.0767" calcext:value-type="float">
            <text:p>-0.076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0.1938" calcext:value-type="float">
            <text:p>-0.1938</text:p>
          </table:table-cell>
          <table:table-cell office:value-type="float" office:value="-0.0767" calcext:value-type="float">
            <text:p>-0.0767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2106" calcext:value-type="float">
            <text:p>-0.2106</text:p>
          </table:table-cell>
          <table:table-cell office:value-type="float" office:value="0.0432" calcext:value-type="float">
            <text:p>0.04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2106" calcext:value-type="float">
            <text:p>-0.2106</text:p>
          </table:table-cell>
          <table:table-cell office:value-type="float" office:value="0.0432" calcext:value-type="float">
            <text:p>0.0432</text:p>
          </table:table-cell>
          <table:table-cell office:value-type="float" office:value="10.0555" calcext:value-type="float">
            <text:p>10.0555</text:p>
          </table:table-cell>
          <table:table-cell office:value-type="float" office:value="0.0555" calcext:value-type="float">
            <text:p>0.055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-0.1396" calcext:value-type="float">
            <text:p>-0.1396</text:p>
          </table:table-cell>
          <table:table-cell office:value-type="float" office:value="0.0987" calcext:value-type="float">
            <text:p>0.098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-0.1396" calcext:value-type="float">
            <text:p>-0.1396</text:p>
          </table:table-cell>
          <table:table-cell office:value-type="float" office:value="0.0987" calcext:value-type="float">
            <text:p>0.0987</text:p>
          </table:table-cell>
          <table:table-cell office:value-type="float" office:value="9.9423" calcext:value-type="float">
            <text:p>9.9423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0.041" calcext:value-type="float">
            <text:p>0.04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0.041" calcext:value-type="float">
            <text:p>0.041</text:p>
          </table:table-cell>
          <table:table-cell office:value-type="float" office:value="9.8991" calcext:value-type="float">
            <text:p>9.8991</text:p>
          </table:table-cell>
          <table:table-cell office:value-type="float" office:value="-0.1009" calcext:value-type="float">
            <text:p>-0.1009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-0.0599" calcext:value-type="float">
            <text:p>-0.059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9.9696" calcext:value-type="float">
            <text:p>9.969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02" calcext:value-type="float">
            <text:p>0.02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-0.0903" calcext:value-type="float">
            <text:p>-0.090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02" calcext:value-type="float">
            <text:p>0.02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10.0788" calcext:value-type="float">
            <text:p>10.0788</text:p>
          </table:table-cell>
          <table:table-cell office:value-type="float" office:value="0.0788" calcext:value-type="float">
            <text:p>0.078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2051" calcext:value-type="float">
            <text:p>-0.2051</text:p>
          </table:table-cell>
          <table:table-cell office:value-type="float" office:value="-0.0115" calcext:value-type="float">
            <text:p>-0.011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2051" calcext:value-type="float">
            <text:p>-0.2051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10.0871" calcext:value-type="float">
            <text:p>10.0871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731" calcext:value-type="float">
            <text:p>-0.1731</text:p>
          </table:table-cell>
          <table:table-cell office:value-type="float" office:value="0.0756" calcext:value-type="float">
            <text:p>0.075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731" calcext:value-type="float">
            <text:p>-0.1731</text:p>
          </table:table-cell>
          <table:table-cell office:value-type="float" office:value="0.0756" calcext:value-type="float">
            <text:p>0.0756</text:p>
          </table:table-cell>
          <table:table-cell office:value-type="float" office:value="9.993" calcext:value-type="float">
            <text:p>9.99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686" calcext:value-type="float">
            <text:p>0.068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686" calcext:value-type="float">
            <text:p>0.0686</text:p>
          </table:table-cell>
          <table:table-cell office:value-type="float" office:value="9.9184" calcext:value-type="float">
            <text:p>9.9184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0.0129" calcext:value-type="float">
            <text:p>-0.012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9.9355" calcext:value-type="float">
            <text:p>9.9355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1183" calcext:value-type="float">
            <text:p>-0.1183</text:p>
          </table:table-cell>
          <table:table-cell office:value-type="float" office:value="-0.0774" calcext:value-type="float">
            <text:p>-0.077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1183" calcext:value-type="float">
            <text:p>-0.1183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10.0251" calcext:value-type="float">
            <text:p>10.0251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831" calcext:value-type="float">
            <text:p>-0.1831</text:p>
          </table:table-cell>
          <table:table-cell office:value-type="float" office:value="-0.0523" calcext:value-type="float">
            <text:p>-0.052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831" calcext:value-type="float">
            <text:p>-0.18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0.0878" calcext:value-type="float">
            <text:p>10.0878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1915" calcext:value-type="float">
            <text:p>-0.1915</text:p>
          </table:table-cell>
          <table:table-cell office:value-type="float" office:value="0.0355" calcext:value-type="float">
            <text:p>0.035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1915" calcext:value-type="float">
            <text:p>-0.1915</text:p>
          </table:table-cell>
          <table:table-cell office:value-type="float" office:value="0.0355" calcext:value-type="float">
            <text:p>0.0355</text:p>
          </table:table-cell>
          <table:table-cell office:value-type="float" office:value="10.0359" calcext:value-type="float">
            <text:p>10.0359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1381" calcext:value-type="float">
            <text:p>-0.1381</text:p>
          </table:table-cell>
          <table:table-cell office:value-type="float" office:value="0.0714" calcext:value-type="float">
            <text:p>0.071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1381" calcext:value-type="float">
            <text:p>-0.1381</text:p>
          </table:table-cell>
          <table:table-cell office:value-type="float" office:value="0.0714" calcext:value-type="float">
            <text:p>0.0714</text:p>
          </table:table-cell>
          <table:table-cell office:value-type="float" office:value="9.9549" calcext:value-type="float">
            <text:p>9.9549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0.0263" calcext:value-type="float">
            <text:p>0.026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.927" calcext:value-type="float">
            <text:p>9.927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995" calcext:value-type="float">
            <text:p>-0.0995</text:p>
          </table:table-cell>
          <table:table-cell office:value-type="float" office:value="-0.0467" calcext:value-type="float">
            <text:p>-0.046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995" calcext:value-type="float">
            <text:p>-0.0995</text:p>
          </table:table-cell>
          <table:table-cell office:value-type="float" office:value="-0.0467" calcext:value-type="float">
            <text:p>-0.0467</text:p>
          </table:table-cell>
          <table:table-cell office:value-type="float" office:value="9.9818" calcext:value-type="float">
            <text:p>9.9818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553" calcext:value-type="float">
            <text:p>-0.1553</text:p>
          </table:table-cell>
          <table:table-cell office:value-type="float" office:value="-0.0649" calcext:value-type="float">
            <text:p>-0.064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553" calcext:value-type="float">
            <text:p>-0.1553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10.0603" calcext:value-type="float">
            <text:p>10.0603</text:p>
          </table:table-cell>
          <table:table-cell office:value-type="float" office:value="0.0603" calcext:value-type="float">
            <text:p>0.060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01" calcext:value-type="float">
            <text:p>-0.1901</text:p>
          </table:table-cell>
          <table:table-cell office:value-type="float" office:value="-0.0046" calcext:value-type="float">
            <text:p>-0.004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01" calcext:value-type="float">
            <text:p>-0.1901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0.0617" calcext:value-type="float">
            <text:p>10.0617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571" calcext:value-type="float">
            <text:p>0.057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571" calcext:value-type="float">
            <text:p>0.0571</text:p>
          </table:table-cell>
          <table:table-cell office:value-type="float" office:value="9.9918" calcext:value-type="float">
            <text:p>9.991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0.0489" calcext:value-type="float">
            <text:p>0.048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0.0489" calcext:value-type="float">
            <text:p>0.0489</text:p>
          </table:table-cell>
          <table:table-cell office:value-type="float" office:value="9.9386" calcext:value-type="float">
            <text:p>9.9386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0125" calcext:value-type="float">
            <text:p>-0.012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9.9548" calcext:value-type="float">
            <text:p>9.9548</text:p>
          </table:table-cell>
          <table:table-cell office:value-type="float" office:value="-0.0452" calcext:value-type="float">
            <text:p>-0.0452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-0.0577" calcext:value-type="float">
            <text:p>-0.057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10.0215" calcext:value-type="float">
            <text:p>10.0215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1747" calcext:value-type="float">
            <text:p>-0.1747</text:p>
          </table:table-cell>
          <table:table-cell office:value-type="float" office:value="-0.0362" calcext:value-type="float">
            <text:p>-0.036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1747" calcext:value-type="float">
            <text:p>-0.1747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10.0646" calcext:value-type="float">
            <text:p>10.0646</text:p>
          </table:table-cell>
          <table:table-cell office:value-type="float" office:value="0.0646" calcext:value-type="float">
            <text:p>0.064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284" calcext:value-type="float">
            <text:p>0.028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284" calcext:value-type="float">
            <text:p>0.0284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0.0238" calcext:value-type="float">
            <text:p>0.0238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0.0522" calcext:value-type="float">
            <text:p>0.052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0.0522" calcext:value-type="float">
            <text:p>0.0522</text:p>
          </table:table-cell>
          <table:table-cell office:value-type="float" office:value="9.9649" calcext:value-type="float">
            <text:p>9.9649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0.0171" calcext:value-type="float">
            <text:p>0.017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0.0171" calcext:value-type="float">
            <text:p>0.0171</text:p>
          </table:table-cell>
          <table:table-cell office:value-type="float" office:value="9.9467" calcext:value-type="float">
            <text:p>9.9467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-0.0362" calcext:value-type="float">
            <text:p>-0.036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9.9892" calcext:value-type="float">
            <text:p>9.98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-0.047" calcext:value-type="float">
            <text:p>-0.04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-0.047" calcext:value-type="float">
            <text:p>-0.047</text:p>
          </table:table-cell>
          <table:table-cell office:value-type="float" office:value="10.046" calcext:value-type="float">
            <text:p>10.046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-0.001" calcext:value-type="float">
            <text:p>-0.00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-0.001" calcext:value-type="float">
            <text:p>-0.001</text:p>
          </table:table-cell>
          <table:table-cell office:value-type="float" office:value="10.044" calcext:value-type="float">
            <text:p>10.044</text:p>
          </table:table-cell>
          <table:table-cell office:value-type="float" office:value="0.044" calcext:value-type="float">
            <text:p>0.044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579" calcext:value-type="float">
            <text:p>-0.1579</text:p>
          </table:table-cell>
          <table:table-cell office:value-type="float" office:value="0.043" calcext:value-type="float">
            <text:p>0.04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579" calcext:value-type="float">
            <text:p>-0.1579</text:p>
          </table:table-cell>
          <table:table-cell office:value-type="float" office:value="0.043" calcext:value-type="float">
            <text:p>0.043</text:p>
          </table:table-cell>
          <table:table-cell office:value-type="float" office:value="9.9922" calcext:value-type="float">
            <text:p>9.992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0352" calcext:value-type="float">
            <text:p>0.035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0352" calcext:value-type="float">
            <text:p>0.0352</text:p>
          </table:table-cell>
          <table:table-cell office:value-type="float" office:value="9.9537" calcext:value-type="float">
            <text:p>9.9537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1068" calcext:value-type="float">
            <text:p>-0.1068</text:p>
          </table:table-cell>
          <table:table-cell office:value-type="float" office:value="-0.0111" calcext:value-type="float">
            <text:p>-0.011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1068" calcext:value-type="float">
            <text:p>-0.1068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9.9679" calcext:value-type="float">
            <text:p>9.9679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67" calcext:value-type="float">
            <text:p>0.0067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-0.0432" calcext:value-type="float">
            <text:p>-0.04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67" calcext:value-type="float">
            <text:p>0.0067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10.0177" calcext:value-type="float">
            <text:p>10.0177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682" calcext:value-type="float">
            <text:p>-0.1682</text:p>
          </table:table-cell>
          <table:table-cell office:value-type="float" office:value="-0.0255" calcext:value-type="float">
            <text:p>-0.025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84" calcext:value-type="float">
            <text:p>0.6584</text:p>
          </table:table-cell>
          <table:table-cell office:value-type="float" office:value="-0.6639" calcext:value-type="float">
            <text:p>-0.6639</text:p>
          </table:table-cell>
          <table:table-cell office:value-type="float" office:value="-0.3012" calcext:value-type="float">
            <text:p>-0.3012</text:p>
          </table:table-cell>
          <table:table-cell office:value-type="float" office:value="0.5092" calcext:value-type="float">
            <text:p>0.5092</text:p>
          </table:table-cell>
          <table:table-cell office:value-type="float" office:value="10.0772" calcext:value-type="float">
            <text:p>10.0772</text:p>
          </table:table-cell>
          <table:table-cell office:value-type="float" office:value="0.0772" calcext:value-type="float">
            <text:p>0.0772</text:p>
          </table:table-cell>
          <table:table-cell office:value-type="float" office:value="-0.2121" calcext:value-type="float">
            <text:p>-0.2121</text:p>
          </table:table-cell>
          <table:table-cell office:value-type="float" office:value="-0.9354" calcext:value-type="float">
            <text:p>-0.9354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5863" calcext:value-type="float">
            <text:p>0.586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2121" calcext:value-type="float">
            <text:p>-0.2121</text:p>
          </table:table-cell>
          <table:table-cell office:value-type="float" office:value="-0.9354" calcext:value-type="float">
            <text:p>-0.9354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5863" calcext:value-type="float">
            <text:p>0.5863</text:p>
          </table:table-cell>
          <table:table-cell office:value-type="float" office:value="8.9627" calcext:value-type="float">
            <text:p>8.9627</text:p>
          </table:table-cell>
          <table:table-cell office:value-type="float" office:value="-1.0373" calcext:value-type="float">
            <text:p>-1.0373</text:p>
          </table:table-cell>
          <table:table-cell office:value-type="float" office:value="-0.8873" calcext:value-type="float">
            <text:p>-0.8873</text:p>
          </table:table-cell>
          <table:table-cell office:value-type="float" office:value="-0.3082" calcext:value-type="float">
            <text:p>-0.3082</text:p>
          </table:table-cell>
          <table:table-cell office:value-type="float" office:value="0.3142" calcext:value-type="float">
            <text:p>0.3142</text:p>
          </table:table-cell>
          <table:table-cell office:value-type="float" office:value="-0.451" calcext:value-type="float">
            <text:p>-0.451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-0.8873" calcext:value-type="float">
            <text:p>-0.8873</text:p>
          </table:table-cell>
          <table:table-cell office:value-type="float" office:value="-0.3082" calcext:value-type="float">
            <text:p>-0.3082</text:p>
          </table:table-cell>
          <table:table-cell office:value-type="float" office:value="0.3142" calcext:value-type="float">
            <text:p>0.3142</text:p>
          </table:table-cell>
          <table:table-cell office:value-type="float" office:value="-0.451" calcext:value-type="float">
            <text:p>-0.451</text:p>
          </table:table-cell>
          <table:table-cell office:value-type="float" office:value="9.296" calcext:value-type="float">
            <text:p>9.296</text:p>
          </table:table-cell>
          <table:table-cell office:value-type="float" office:value="-0.704" calcext:value-type="float">
            <text:p>-0.704</text:p>
          </table:table-cell>
          <table:table-cell office:value-type="float" office:value="-0.7293" calcext:value-type="float">
            <text:p>-0.7293</text:p>
          </table:table-cell>
          <table:table-cell office:value-type="float" office:value="0.6013" calcext:value-type="float">
            <text:p>0.6013</text:p>
          </table:table-cell>
          <table:table-cell office:value-type="float" office:value="-0.4889" calcext:value-type="float">
            <text:p>-0.4889</text:p>
          </table:table-cell>
          <table:table-cell office:value-type="float" office:value="-1.1551" calcext:value-type="float">
            <text:p>-1.155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7293" calcext:value-type="float">
            <text:p>-0.7293</text:p>
          </table:table-cell>
          <table:table-cell office:value-type="float" office:value="0.6013" calcext:value-type="float">
            <text:p>0.6013</text:p>
          </table:table-cell>
          <table:table-cell office:value-type="float" office:value="-0.4889" calcext:value-type="float">
            <text:p>-0.4889</text:p>
          </table:table-cell>
          <table:table-cell office:value-type="float" office:value="-1.1551" calcext:value-type="float">
            <text:p>-1.1551</text:p>
          </table:table-cell>
          <table:table-cell office:value-type="float" office:value="11.1956" calcext:value-type="float">
            <text:p>11.1956</text:p>
          </table:table-cell>
          <table:table-cell office:value-type="float" office:value="1.1956" calcext:value-type="float">
            <text:p>1.19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8977" calcext:value-type="float">
            <text:p>0.8977</text:p>
          </table:table-cell>
          <table:table-cell office:value-type="float" office:value="-1.0462" calcext:value-type="float">
            <text:p>-1.0462</text:p>
          </table:table-cell>
          <table:table-cell office:value-type="float" office:value="0.0405" calcext:value-type="float">
            <text:p>0.040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2" calcext:value-type="float">
            <text:p>0.082</text:p>
          </table:table-cell>
          <table:table-cell office:value-type="float" office:value="0.8977" calcext:value-type="float">
            <text:p>0.8977</text:p>
          </table:table-cell>
          <table:table-cell office:value-type="float" office:value="-1.0462" calcext:value-type="float">
            <text:p>-1.0462</text:p>
          </table:table-cell>
          <table:table-cell office:value-type="float" office:value="0.0405" calcext:value-type="float">
            <text:p>0.0405</text:p>
          </table:table-cell>
          <table:table-cell office:value-type="float" office:value="11.361" calcext:value-type="float">
            <text:p>11.361</text:p>
          </table:table-cell>
          <table:table-cell office:value-type="float" office:value="1.361" calcext:value-type="float">
            <text:p>1.361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3343" calcext:value-type="float">
            <text:p>0.3343</text:p>
          </table:table-cell>
          <table:table-cell office:value-type="float" office:value="-0.3251" calcext:value-type="float">
            <text:p>-0.3251</text:p>
          </table:table-cell>
          <table:table-cell office:value-type="float" office:value="1.4015" calcext:value-type="float">
            <text:p>1.401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3343" calcext:value-type="float">
            <text:p>0.3343</text:p>
          </table:table-cell>
          <table:table-cell office:value-type="float" office:value="-0.3251" calcext:value-type="float">
            <text:p>-0.3251</text:p>
          </table:table-cell>
          <table:table-cell office:value-type="float" office:value="1.4015" calcext:value-type="float">
            <text:p>1.4015</text:p>
          </table:table-cell>
          <table:table-cell office:value-type="float" office:value="9.0728" calcext:value-type="float">
            <text:p>9.0728</text:p>
          </table:table-cell>
          <table:table-cell office:value-type="float" office:value="-0.9272" calcext:value-type="float">
            <text:p>-0.9272</text:p>
          </table:table-cell>
          <table:table-cell office:value-type="float" office:value="0.6849" calcext:value-type="float">
            <text:p>0.6849</text:p>
          </table:table-cell>
          <table:table-cell office:value-type="float" office:value="-0.4798" calcext:value-type="float">
            <text:p>-0.479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4743" calcext:value-type="float">
            <text:p>0.474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849" calcext:value-type="float">
            <text:p>0.6849</text:p>
          </table:table-cell>
          <table:table-cell office:value-type="float" office:value="-0.4798" calcext:value-type="float">
            <text:p>-0.479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4743" calcext:value-type="float">
            <text:p>0.4743</text:p>
          </table:table-cell>
          <table:table-cell office:value-type="float" office:value="9.6821" calcext:value-type="float">
            <text:p>9.6821</text:p>
          </table:table-cell>
          <table:table-cell office:value-type="float" office:value="-0.3179" calcext:value-type="float">
            <text:p>-0.31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7834" calcext:value-type="float">
            <text:p>-0.7834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1564" calcext:value-type="float">
            <text:p>0.156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7834" calcext:value-type="float">
            <text:p>-0.7834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1564" calcext:value-type="float">
            <text:p>0.1564</text:p>
          </table:table-cell>
          <table:table-cell office:value-type="float" office:value="8.74" calcext:value-type="float">
            <text:p>8.74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193" calcext:value-type="float">
            <text:p>-0.6193</text:p>
          </table:table-cell>
          <table:table-cell office:value-type="float" office:value="-0.3479" calcext:value-type="float">
            <text:p>-0.3479</text:p>
          </table:table-cell>
          <table:table-cell office:value-type="float" office:value="0.4546" calcext:value-type="float">
            <text:p>0.4546</text:p>
          </table:table-cell>
          <table:table-cell office:value-type="float" office:value="-1.1036" calcext:value-type="float">
            <text:p>-1.103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0.6193" calcext:value-type="float">
            <text:p>-0.6193</text:p>
          </table:table-cell>
          <table:table-cell office:value-type="float" office:value="-0.3479" calcext:value-type="float">
            <text:p>-0.3479</text:p>
          </table:table-cell>
          <table:table-cell office:value-type="float" office:value="0.4546" calcext:value-type="float">
            <text:p>0.4546</text:p>
          </table:table-cell>
          <table:table-cell office:value-type="float" office:value="-1.1036" calcext:value-type="float">
            <text:p>-1.1036</text:p>
          </table:table-cell>
          <table:table-cell office:value-type="float" office:value="10.247" calcext:value-type="float">
            <text:p>10.247</text:p>
          </table:table-cell>
          <table:table-cell office:value-type="float" office:value="0.247" calcext:value-type="float">
            <text:p>0.247</text:p>
          </table:table-cell>
          <table:table-cell office:value-type="float" office:value="-0.6158" calcext:value-type="float">
            <text:p>-0.6158</text:p>
          </table:table-cell>
          <table:table-cell office:value-type="float" office:value="0.3676" calcext:value-type="float">
            <text:p>0.3676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-0.8565" calcext:value-type="float">
            <text:p>-0.856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0.6158" calcext:value-type="float">
            <text:p>-0.6158</text:p>
          </table:table-cell>
          <table:table-cell office:value-type="float" office:value="0.3676" calcext:value-type="float">
            <text:p>0.3676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-0.8565" calcext:value-type="float">
            <text:p>-0.8565</text:p>
          </table:table-cell>
          <table:table-cell office:value-type="float" office:value="10.8644" calcext:value-type="float">
            <text:p>10.8644</text:p>
          </table:table-cell>
          <table:table-cell office:value-type="float" office:value="0.8644" calcext:value-type="float">
            <text:p>0.8644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6726" calcext:value-type="float">
            <text:p>0.6726</text:p>
          </table:table-cell>
          <table:table-cell office:value-type="float" office:value="-0.9498" calcext:value-type="float">
            <text:p>-0.9498</text:p>
          </table:table-cell>
          <table:table-cell office:value-type="float" office:value="0.0079" calcext:value-type="float">
            <text:p>0.007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6726" calcext:value-type="float">
            <text:p>0.6726</text:p>
          </table:table-cell>
          <table:table-cell office:value-type="float" office:value="-0.9498" calcext:value-type="float">
            <text:p>-0.9498</text:p>
          </table:table-cell>
          <table:table-cell office:value-type="float" office:value="0.0079" calcext:value-type="float">
            <text:p>0.0079</text:p>
          </table:table-cell>
          <table:table-cell office:value-type="float" office:value="11.0106" calcext:value-type="float">
            <text:p>11.0106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3327" calcext:value-type="float">
            <text:p>0.3327</text:p>
          </table:table-cell>
          <table:table-cell office:value-type="float" office:value="-0.4366" calcext:value-type="float">
            <text:p>-0.4366</text:p>
          </table:table-cell>
          <table:table-cell office:value-type="float" office:value="1.0185" calcext:value-type="float">
            <text:p>1.018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3327" calcext:value-type="float">
            <text:p>0.3327</text:p>
          </table:table-cell>
          <table:table-cell office:value-type="float" office:value="-0.4366" calcext:value-type="float">
            <text:p>-0.4366</text:p>
          </table:table-cell>
          <table:table-cell office:value-type="float" office:value="1.0185" calcext:value-type="float">
            <text:p>1.0185</text:p>
          </table:table-cell>
          <table:table-cell office:value-type="float" office:value="9.7083" calcext:value-type="float">
            <text:p>9.7083</text:p>
          </table:table-cell>
          <table:table-cell office:value-type="float" office:value="-0.2917" calcext:value-type="float">
            <text:p>-0.2917</text:p>
          </table:table-cell>
          <table:table-cell office:value-type="float" office:value="0.5364" calcext:value-type="float">
            <text:p>0.5364</text:p>
          </table:table-cell>
          <table:table-cell office:value-type="float" office:value="-0.2712" calcext:value-type="float">
            <text:p>-0.2712</text:p>
          </table:table-cell>
          <table:table-cell office:value-type="float" office:value="0.436" calcext:value-type="float">
            <text:p>0.436</text:p>
          </table:table-cell>
          <table:table-cell office:value-type="float" office:value="0.7268" calcext:value-type="float">
            <text:p>0.726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5364" calcext:value-type="float">
            <text:p>0.5364</text:p>
          </table:table-cell>
          <table:table-cell office:value-type="float" office:value="-0.2712" calcext:value-type="float">
            <text:p>-0.2712</text:p>
          </table:table-cell>
          <table:table-cell office:value-type="float" office:value="0.436" calcext:value-type="float">
            <text:p>0.436</text:p>
          </table:table-cell>
          <table:table-cell office:value-type="float" office:value="0.7268" calcext:value-type="float">
            <text:p>0.7268</text:p>
          </table:table-cell>
          <table:table-cell office:value-type="float" office:value="9.4249" calcext:value-type="float">
            <text:p>9.4249</text:p>
          </table:table-cell>
          <table:table-cell office:value-type="float" office:value="-0.5751" calcext:value-type="float">
            <text:p>-0.5751</text:p>
          </table:table-cell>
          <table:table-cell office:value-type="float" office:value="0.0864" calcext:value-type="float">
            <text:p>0.0864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1517" calcext:value-type="float">
            <text:p>0.151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864" calcext:value-type="float">
            <text:p>0.0864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1517" calcext:value-type="float">
            <text:p>0.1517</text:p>
          </table:table-cell>
          <table:table-cell office:value-type="float" office:value="9.0303" calcext:value-type="float">
            <text:p>9.0303</text:p>
          </table:table-cell>
          <table:table-cell office:value-type="float" office:value="-0.9697" calcext:value-type="float">
            <text:p>-0.9697</text:p>
          </table:table-cell>
          <table:table-cell office:value-type="float" office:value="-0.3857" calcext:value-type="float">
            <text:p>-0.3857</text:p>
          </table:table-cell>
          <table:table-cell office:value-type="float" office:value="-0.3057" calcext:value-type="float">
            <text:p>-0.3057</text:p>
          </table:table-cell>
          <table:table-cell office:value-type="float" office:value="0.5421" calcext:value-type="float">
            <text:p>0.5421</text:p>
          </table:table-cell>
          <table:table-cell office:value-type="float" office:value="-0.818" calcext:value-type="float">
            <text:p>-0.81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0.3857" calcext:value-type="float">
            <text:p>-0.3857</text:p>
          </table:table-cell>
          <table:table-cell office:value-type="float" office:value="-0.3057" calcext:value-type="float">
            <text:p>-0.3057</text:p>
          </table:table-cell>
          <table:table-cell office:value-type="float" office:value="0.5421" calcext:value-type="float">
            <text:p>0.5421</text:p>
          </table:table-cell>
          <table:table-cell office:value-type="float" office:value="-0.818" calcext:value-type="float">
            <text:p>-0.818</text:p>
          </table:table-cell>
          <table:table-cell office:value-type="float" office:value="9.9672" calcext:value-type="float">
            <text:p>9.9672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4481" calcext:value-type="float">
            <text:p>-0.4481</text:p>
          </table:table-cell>
          <table:table-cell office:value-type="float" office:value="0.2012" calcext:value-type="float">
            <text:p>0.2012</text:p>
          </table:table-cell>
          <table:table-cell office:value-type="float" office:value="-0.2923" calcext:value-type="float">
            <text:p>-0.2923</text:p>
          </table:table-cell>
          <table:table-cell office:value-type="float" office:value="-0.8508" calcext:value-type="float">
            <text:p>-0.850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0.4481" calcext:value-type="float">
            <text:p>-0.4481</text:p>
          </table:table-cell>
          <table:table-cell office:value-type="float" office:value="0.2012" calcext:value-type="float">
            <text:p>0.2012</text:p>
          </table:table-cell>
          <table:table-cell office:value-type="float" office:value="-0.2923" calcext:value-type="float">
            <text:p>-0.2923</text:p>
          </table:table-cell>
          <table:table-cell office:value-type="float" office:value="-0.8508" calcext:value-type="float">
            <text:p>-0.8508</text:p>
          </table:table-cell>
          <table:table-cell office:value-type="float" office:value="10.768" calcext:value-type="float">
            <text:p>10.768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919" calcext:value-type="float">
            <text:p>-0.0919</text:p>
          </table:table-cell>
          <table:table-cell office:value-type="float" office:value="0.4608" calcext:value-type="float">
            <text:p>0.4608</text:p>
          </table:table-cell>
          <table:table-cell office:value-type="float" office:value="-0.7591" calcext:value-type="float">
            <text:p>-0.7591</text:p>
          </table:table-cell>
          <table:table-cell office:value-type="float" office:value="-0.0827" calcext:value-type="float">
            <text:p>-0.082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0.0919" calcext:value-type="float">
            <text:p>-0.0919</text:p>
          </table:table-cell>
          <table:table-cell office:value-type="float" office:value="0.4608" calcext:value-type="float">
            <text:p>0.4608</text:p>
          </table:table-cell>
          <table:table-cell office:value-type="float" office:value="-0.7591" calcext:value-type="float">
            <text:p>-0.7591</text:p>
          </table:table-cell>
          <table:table-cell office:value-type="float" office:value="-0.0827" calcext:value-type="float">
            <text:p>-0.0827</text:p>
          </table:table-cell>
          <table:table-cell office:value-type="float" office:value="10.7508" calcext:value-type="float">
            <text:p>10.7508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2655" calcext:value-type="float">
            <text:p>0.2655</text:p>
          </table:table-cell>
          <table:table-cell office:value-type="float" office:value="-0.4664" calcext:value-type="float">
            <text:p>-0.4664</text:p>
          </table:table-cell>
          <table:table-cell office:value-type="float" office:value="0.6681" calcext:value-type="float">
            <text:p>0.668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2655" calcext:value-type="float">
            <text:p>0.2655</text:p>
          </table:table-cell>
          <table:table-cell office:value-type="float" office:value="-0.4664" calcext:value-type="float">
            <text:p>-0.4664</text:p>
          </table:table-cell>
          <table:table-cell office:value-type="float" office:value="0.6681" calcext:value-type="float">
            <text:p>0.6681</text:p>
          </table:table-cell>
          <table:table-cell office:value-type="float" office:value="10.2014" calcext:value-type="float">
            <text:p>10.2014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3727" calcext:value-type="float">
            <text:p>0.3727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8695" calcext:value-type="float">
            <text:p>0.869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3727" calcext:value-type="float">
            <text:p>0.3727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8695" calcext:value-type="float">
            <text:p>0.8695</text:p>
          </table:table-cell>
          <table:table-cell office:value-type="float" office:value="9.2105" calcext:value-type="float">
            <text:p>9.2105</text:p>
          </table:table-cell>
          <table:table-cell office:value-type="float" office:value="-0.7895" calcext:value-type="float">
            <text:p>-0.7895</text:p>
          </table:table-cell>
          <table:table-cell office:value-type="float" office:value="0.0966" calcext:value-type="float">
            <text:p>0.0966</text:p>
          </table:table-cell>
          <table:table-cell office:value-type="float" office:value="-0.3677" calcext:value-type="float">
            <text:p>-0.3677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966" calcext:value-type="float">
            <text:p>0.0966</text:p>
          </table:table-cell>
          <table:table-cell office:value-type="float" office:value="-0.3677" calcext:value-type="float">
            <text:p>-0.3677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08" calcext:value-type="float">
            <text:p>0.08</text:p>
          </table:table-cell>
          <table:table-cell office:value-type="float" office:value="9.3264" calcext:value-type="float">
            <text:p>9.3264</text:p>
          </table:table-cell>
          <table:table-cell office:value-type="float" office:value="-0.6736" calcext:value-type="float">
            <text:p>-0.6736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-0.2173" calcext:value-type="float">
            <text:p>-0.2173</text:p>
          </table:table-cell>
          <table:table-cell office:value-type="float" office:value="0.5203" calcext:value-type="float">
            <text:p>0.5203</text:p>
          </table:table-cell>
          <table:table-cell office:value-type="float" office:value="-0.5936" calcext:value-type="float">
            <text:p>-0.593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-0.2173" calcext:value-type="float">
            <text:p>-0.2173</text:p>
          </table:table-cell>
          <table:table-cell office:value-type="float" office:value="0.5203" calcext:value-type="float">
            <text:p>0.5203</text:p>
          </table:table-cell>
          <table:table-cell office:value-type="float" office:value="-0.5936" calcext:value-type="float">
            <text:p>-0.5936</text:p>
          </table:table-cell>
          <table:table-cell office:value-type="float" office:value="9.8485" calcext:value-type="float">
            <text:p>9.8485</text:p>
          </table:table-cell>
          <table:table-cell office:value-type="float" office:value="-0.1515" calcext:value-type="float">
            <text:p>-0.1515</text:p>
          </table:table-cell>
          <table:table-cell office:value-type="float" office:value="-0.2848" calcext:value-type="float">
            <text:p>-0.2848</text:p>
          </table:table-cell>
          <table:table-cell office:value-type="float" office:value="0.1103" calcext:value-type="float">
            <text:p>0.1103</text:p>
          </table:table-cell>
          <table:table-cell office:value-type="float" office:value="-0.1491" calcext:value-type="float">
            <text:p>-0.1491</text:p>
          </table:table-cell>
          <table:table-cell office:value-type="float" office:value="-0.7452" calcext:value-type="float">
            <text:p>-0.745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0.2848" calcext:value-type="float">
            <text:p>-0.2848</text:p>
          </table:table-cell>
          <table:table-cell office:value-type="float" office:value="0.1103" calcext:value-type="float">
            <text:p>0.1103</text:p>
          </table:table-cell>
          <table:table-cell office:value-type="float" office:value="-0.1491" calcext:value-type="float">
            <text:p>-0.1491</text:p>
          </table:table-cell>
          <table:table-cell office:value-type="float" office:value="-0.7452" calcext:value-type="float">
            <text:p>-0.7452</text:p>
          </table:table-cell>
          <table:table-cell office:value-type="float" office:value="10.6227" calcext:value-type="float">
            <text:p>10.6227</text:p>
          </table:table-cell>
          <table:table-cell office:value-type="float" office:value="0.6227" calcext:value-type="float">
            <text:p>0.6227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0.2862" calcext:value-type="float">
            <text:p>0.2862</text:p>
          </table:table-cell>
          <table:table-cell office:value-type="float" office:value="-0.5829" calcext:value-type="float">
            <text:p>-0.5829</text:p>
          </table:table-cell>
          <table:table-cell office:value-type="float" office:value="-0.1225" calcext:value-type="float">
            <text:p>-0.12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0.2862" calcext:value-type="float">
            <text:p>0.2862</text:p>
          </table:table-cell>
          <table:table-cell office:value-type="float" office:value="-0.5829" calcext:value-type="float">
            <text:p>-0.5829</text:p>
          </table:table-cell>
          <table:table-cell office:value-type="float" office:value="-0.1225" calcext:value-type="float">
            <text:p>-0.1225</text:p>
          </table:table-cell>
          <table:table-cell office:value-type="float" office:value="10.5371" calcext:value-type="float">
            <text:p>10.5371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69" calcext:value-type="float">
            <text:p>0.169</text:p>
          </table:table-cell>
          <table:table-cell office:value-type="float" office:value="-0.4368" calcext:value-type="float">
            <text:p>-0.4368</text:p>
          </table:table-cell>
          <table:table-cell office:value-type="float" office:value="0.4147" calcext:value-type="float">
            <text:p>0.414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69" calcext:value-type="float">
            <text:p>0.169</text:p>
          </table:table-cell>
          <table:table-cell office:value-type="float" office:value="-0.4368" calcext:value-type="float">
            <text:p>-0.4368</text:p>
          </table:table-cell>
          <table:table-cell office:value-type="float" office:value="0.4147" calcext:value-type="float">
            <text:p>0.4147</text:p>
          </table:table-cell>
          <table:table-cell office:value-type="float" office:value="10.2664" calcext:value-type="float">
            <text:p>10.2664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208" calcext:value-type="float">
            <text:p>0.2208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6811" calcext:value-type="float">
            <text:p>0.681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2208" calcext:value-type="float">
            <text:p>0.2208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6811" calcext:value-type="float">
            <text:p>0.6811</text:p>
          </table:table-cell>
          <table:table-cell office:value-type="float" office:value="9.437" calcext:value-type="float">
            <text:p>9.437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0539" calcext:value-type="float">
            <text:p>0.0539</text:p>
          </table:table-cell>
          <table:table-cell office:value-type="float" office:value="-0.2243" calcext:value-type="float">
            <text:p>-0.2243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118" calcext:value-type="float">
            <text:p>0.11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539" calcext:value-type="float">
            <text:p>0.0539</text:p>
          </table:table-cell>
          <table:table-cell office:value-type="float" office:value="-0.2243" calcext:value-type="float">
            <text:p>-0.2243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118" calcext:value-type="float">
            <text:p>0.118</text:p>
          </table:table-cell>
          <table:table-cell office:value-type="float" office:value="9.4991" calcext:value-type="float">
            <text:p>9.4991</text:p>
          </table:table-cell>
          <table:table-cell office:value-type="float" office:value="-0.5009" calcext:value-type="float">
            <text:p>-0.500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1253" calcext:value-type="float">
            <text:p>-0.1253</text:p>
          </table:table-cell>
          <table:table-cell office:value-type="float" office:value="0.3782" calcext:value-type="float">
            <text:p>0.3782</text:p>
          </table:table-cell>
          <table:table-cell office:value-type="float" office:value="-0.3828" calcext:value-type="float">
            <text:p>-0.382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1253" calcext:value-type="float">
            <text:p>-0.1253</text:p>
          </table:table-cell>
          <table:table-cell office:value-type="float" office:value="0.3782" calcext:value-type="float">
            <text:p>0.3782</text:p>
          </table:table-cell>
          <table:table-cell office:value-type="float" office:value="-0.3828" calcext:value-type="float">
            <text:p>-0.3828</text:p>
          </table:table-cell>
          <table:table-cell office:value-type="float" office:value="9.8088" calcext:value-type="float">
            <text:p>9.8088</text:p>
          </table:table-cell>
          <table:table-cell office:value-type="float" office:value="-0.1912" calcext:value-type="float">
            <text:p>-0.1912</text:p>
          </table:table-cell>
          <table:table-cell office:value-type="float" office:value="-0.1656" calcext:value-type="float">
            <text:p>-0.1656</text:p>
          </table:table-cell>
          <table:table-cell office:value-type="float" office:value="0.0763" calcext:value-type="float">
            <text:p>0.0763</text:p>
          </table:table-cell>
          <table:table-cell office:value-type="float" office:value="-0.1002" calcext:value-type="float">
            <text:p>-0.1002</text:p>
          </table:table-cell>
          <table:table-cell office:value-type="float" office:value="-0.574" calcext:value-type="float">
            <text:p>-0.57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0.1656" calcext:value-type="float">
            <text:p>-0.1656</text:p>
          </table:table-cell>
          <table:table-cell office:value-type="float" office:value="0.0763" calcext:value-type="float">
            <text:p>0.0763</text:p>
          </table:table-cell>
          <table:table-cell office:value-type="float" office:value="-0.1002" calcext:value-type="float">
            <text:p>-0.1002</text:p>
          </table:table-cell>
          <table:table-cell office:value-type="float" office:value="-0.574" calcext:value-type="float">
            <text:p>-0.574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0.4528" calcext:value-type="float">
            <text:p>0.4528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1716" calcext:value-type="float">
            <text:p>0.1716</text:p>
          </table:table-cell>
          <table:table-cell office:value-type="float" office:value="-0.4478" calcext:value-type="float">
            <text:p>-0.4478</text:p>
          </table:table-cell>
          <table:table-cell office:value-type="float" office:value="-0.1212" calcext:value-type="float">
            <text:p>-0.121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1716" calcext:value-type="float">
            <text:p>0.1716</text:p>
          </table:table-cell>
          <table:table-cell office:value-type="float" office:value="-0.4478" calcext:value-type="float">
            <text:p>-0.4478</text:p>
          </table:table-cell>
          <table:table-cell office:value-type="float" office:value="-0.1212" calcext:value-type="float">
            <text:p>-0.1212</text:p>
          </table:table-cell>
          <table:table-cell office:value-type="float" office:value="10.4052" calcext:value-type="float">
            <text:p>10.4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848" calcext:value-type="float">
            <text:p>0.0848</text:p>
          </table:table-cell>
          <table:table-cell office:value-type="float" office:value="-0.3664" calcext:value-type="float">
            <text:p>-0.3664</text:p>
          </table:table-cell>
          <table:table-cell office:value-type="float" office:value="0.284" calcext:value-type="float">
            <text:p>0.28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848" calcext:value-type="float">
            <text:p>0.0848</text:p>
          </table:table-cell>
          <table:table-cell office:value-type="float" office:value="-0.3664" calcext:value-type="float">
            <text:p>-0.3664</text:p>
          </table:table-cell>
          <table:table-cell office:value-type="float" office:value="0.284" calcext:value-type="float">
            <text:p>0.284</text:p>
          </table:table-cell>
          <table:table-cell office:value-type="float" office:value="10.1729" calcext:value-type="float">
            <text:p>10.1729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145" calcext:value-type="float">
            <text:p>0.114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4569" calcext:value-type="float">
            <text:p>0.456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145" calcext:value-type="float">
            <text:p>0.114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4569" calcext:value-type="float">
            <text:p>0.4569</text:p>
          </table:table-cell>
          <table:table-cell office:value-type="float" office:value="9.6886" calcext:value-type="float">
            <text:p>9.6886</text:p>
          </table:table-cell>
          <table:table-cell office:value-type="float" office:value="-0.3114" calcext:value-type="float">
            <text:p>-0.3114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1455" calcext:value-type="float">
            <text:p>0.145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1455" calcext:value-type="float">
            <text:p>0.1455</text:p>
          </table:table-cell>
          <table:table-cell office:value-type="float" office:value="9.5835" calcext:value-type="float">
            <text:p>9.5835</text:p>
          </table:table-cell>
          <table:table-cell office:value-type="float" office:value="-0.4165" calcext:value-type="float">
            <text:p>-0.4165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0.2424" calcext:value-type="float">
            <text:p>0.2424</text:p>
          </table:table-cell>
          <table:table-cell office:value-type="float" office:value="-0.271" calcext:value-type="float">
            <text:p>-0.27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0.2424" calcext:value-type="float">
            <text:p>0.2424</text:p>
          </table:table-cell>
          <table:table-cell office:value-type="float" office:value="-0.271" calcext:value-type="float">
            <text:p>-0.271</text:p>
          </table:table-cell>
          <table:table-cell office:value-type="float" office:value="9.8517" calcext:value-type="float">
            <text:p>9.8517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0708" calcext:value-type="float">
            <text:p>0.0708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-0.4193" calcext:value-type="float">
            <text:p>-0.419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0708" calcext:value-type="float">
            <text:p>0.0708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-0.4193" calcext:value-type="float">
            <text:p>-0.4193</text:p>
          </table:table-cell>
          <table:table-cell office:value-type="float" office:value="10.3393" calcext:value-type="float">
            <text:p>10.3393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027" calcext:value-type="float">
            <text:p>0.1027</text:p>
          </table:table-cell>
          <table:table-cell office:value-type="float" office:value="-0.3524" calcext:value-type="float">
            <text:p>-0.3524</text:p>
          </table:table-cell>
          <table:table-cell office:value-type="float" office:value="-0.08" calcext:value-type="float">
            <text:p>-0.0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027" calcext:value-type="float">
            <text:p>0.1027</text:p>
          </table:table-cell>
          <table:table-cell office:value-type="float" office:value="-0.3524" calcext:value-type="float">
            <text:p>-0.3524</text:p>
          </table:table-cell>
          <table:table-cell office:value-type="float" office:value="-0.08" calcext:value-type="float">
            <text:p>-0.08</text:p>
          </table:table-cell>
          <table:table-cell office:value-type="float" office:value="10.3285" calcext:value-type="float">
            <text:p>10.3285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2681" calcext:value-type="float">
            <text:p>-0.2681</text:p>
          </table:table-cell>
          <table:table-cell office:value-type="float" office:value="0.2486" calcext:value-type="float">
            <text:p>0.248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2681" calcext:value-type="float">
            <text:p>-0.2681</text:p>
          </table:table-cell>
          <table:table-cell office:value-type="float" office:value="0.2486" calcext:value-type="float">
            <text:p>0.2486</text:p>
          </table:table-cell>
          <table:table-cell office:value-type="float" office:value="10.0509" calcext:value-type="float">
            <text:p>10.0509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88" calcext:value-type="float">
            <text:p>0.0488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2995" calcext:value-type="float">
            <text:p>0.299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0488" calcext:value-type="float">
            <text:p>0.0488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2995" calcext:value-type="float">
            <text:p>0.2995</text:p>
          </table:table-cell>
          <table:table-cell office:value-type="float" office:value="9.7224" calcext:value-type="float">
            <text:p>9.7224</text:p>
          </table:table-cell>
          <table:table-cell office:value-type="float" office:value="-0.2776" calcext:value-type="float">
            <text:p>-0.277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784" calcext:value-type="float">
            <text:p>-0.0784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0219" calcext:value-type="float">
            <text:p>0.021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784" calcext:value-type="float">
            <text:p>-0.0784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0219" calcext:value-type="float">
            <text:p>0.0219</text:p>
          </table:table-cell>
          <table:table-cell office:value-type="float" office:value="9.7393" calcext:value-type="float">
            <text:p>9.7393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582" calcext:value-type="float">
            <text:p>0.0582</text:p>
          </table:table-cell>
          <table:table-cell office:value-type="float" office:value="-0.2388" calcext:value-type="float">
            <text:p>-0.238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582" calcext:value-type="float">
            <text:p>0.0582</text:p>
          </table:table-cell>
          <table:table-cell office:value-type="float" office:value="-0.2388" calcext:value-type="float">
            <text:p>-0.2388</text:p>
          </table:table-cell>
          <table:table-cell office:value-type="float" office:value="9.9569" calcext:value-type="float">
            <text:p>9.9569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2021" calcext:value-type="float">
            <text:p>-0.2021</text:p>
          </table:table-cell>
          <table:table-cell office:value-type="float" office:value="-0.2818" calcext:value-type="float">
            <text:p>-0.281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2021" calcext:value-type="float">
            <text:p>-0.2021</text:p>
          </table:table-cell>
          <table:table-cell office:value-type="float" office:value="-0.2818" calcext:value-type="float">
            <text:p>-0.2818</text:p>
          </table:table-cell>
          <table:table-cell office:value-type="float" office:value="10.2809" calcext:value-type="float">
            <text:p>10.2809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43" calcext:value-type="float">
            <text:p>0.0543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-0.001" calcext:value-type="float">
            <text:p>-0.00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43" calcext:value-type="float">
            <text:p>0.0543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414" calcext:value-type="float">
            <text:p>0.041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2228" calcext:value-type="float">
            <text:p>-0.2228</text:p>
          </table:table-cell>
          <table:table-cell office:value-type="float" office:value="0.2423" calcext:value-type="float">
            <text:p>0.242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414" calcext:value-type="float">
            <text:p>0.041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2228" calcext:value-type="float">
            <text:p>-0.2228</text:p>
          </table:table-cell>
          <table:table-cell office:value-type="float" office:value="0.2423" calcext:value-type="float">
            <text:p>0.2423</text:p>
          </table:table-cell>
          <table:table-cell office:value-type="float" office:value="9.9445" calcext:value-type="float">
            <text:p>9.9445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1869" calcext:value-type="float">
            <text:p>0.186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1869" calcext:value-type="float">
            <text:p>0.1869</text:p>
          </table:table-cell>
          <table:table-cell office:value-type="float" office:value="9.7575" calcext:value-type="float">
            <text:p>9.7575</text:p>
          </table:table-cell>
          <table:table-cell office:value-type="float" office:value="-0.2425" calcext:value-type="float">
            <text:p>-0.2425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56" calcext:value-type="float">
            <text:p>-0.055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56" calcext:value-type="float">
            <text:p>-0.0556</text:p>
          </table:table-cell>
          <table:table-cell office:value-type="float" office:value="9.841" calcext:value-type="float">
            <text:p>9.841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777" calcext:value-type="float">
            <text:p>-0.0777</text:p>
          </table:table-cell>
          <table:table-cell office:value-type="float" office:value="-0.2146" calcext:value-type="float">
            <text:p>-0.214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777" calcext:value-type="float">
            <text:p>-0.0777</text:p>
          </table:table-cell>
          <table:table-cell office:value-type="float" office:value="-0.2146" calcext:value-type="float">
            <text:p>-0.2146</text:p>
          </table:table-cell>
          <table:table-cell office:value-type="float" office:value="10.0702" calcext:value-type="float">
            <text:p>10.0702</text:p>
          </table:table-cell>
          <table:table-cell office:value-type="float" office:value="0.0702" calcext:value-type="float">
            <text:p>0.0702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-0.2572" calcext:value-type="float">
            <text:p>-0.2572</text:p>
          </table:table-cell>
          <table:table-cell office:value-type="float" office:value="-0.1444" calcext:value-type="float">
            <text:p>-0.144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-0.2572" calcext:value-type="float">
            <text:p>-0.2572</text:p>
          </table:table-cell>
          <table:table-cell office:value-type="float" office:value="-0.1444" calcext:value-type="float">
            <text:p>-0.1444</text:p>
          </table:table-cell>
          <table:table-cell office:value-type="float" office:value="10.2414" calcext:value-type="float">
            <text:p>10.2414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097" calcext:value-type="float">
            <text:p>0.09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097" calcext:value-type="float">
            <text:p>0.097</text:p>
          </table:table-cell>
          <table:table-cell office:value-type="float" office:value="10.1025" calcext:value-type="float">
            <text:p>10.102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1327" calcext:value-type="float">
            <text:p>-0.1327</text:p>
          </table:table-cell>
          <table:table-cell office:value-type="float" office:value="0.1995" calcext:value-type="float">
            <text:p>0.199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1327" calcext:value-type="float">
            <text:p>-0.1327</text:p>
          </table:table-cell>
          <table:table-cell office:value-type="float" office:value="0.1995" calcext:value-type="float">
            <text:p>0.1995</text:p>
          </table:table-cell>
          <table:table-cell office:value-type="float" office:value="9.8741" calcext:value-type="float">
            <text:p>9.8741</text:p>
          </table:table-cell>
          <table:table-cell office:value-type="float" office:value="-0.1259" calcext:value-type="float">
            <text:p>-0.1259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736" calcext:value-type="float">
            <text:p>0.073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736" calcext:value-type="float">
            <text:p>0.0736</text:p>
          </table:table-cell>
          <table:table-cell office:value-type="float" office:value="9.81" calcext:value-type="float">
            <text:p>9.8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1164" calcext:value-type="float">
            <text:p>-0.116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9.945" calcext:value-type="float">
            <text:p>9.94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1615" calcext:value-type="float">
            <text:p>-0.1615</text:p>
          </table:table-cell>
          <table:table-cell office:value-type="float" office:value="-0.1714" calcext:value-type="float">
            <text:p>-0.171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1615" calcext:value-type="float">
            <text:p>-0.1615</text:p>
          </table:table-cell>
          <table:table-cell office:value-type="float" office:value="-0.1714" calcext:value-type="float">
            <text:p>-0.1714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2615" calcext:value-type="float">
            <text:p>-0.2615</text:p>
          </table:table-cell>
          <table:table-cell office:value-type="float" office:value="-0.0286" calcext:value-type="float">
            <text:p>-0.028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2615" calcext:value-type="float">
            <text:p>-0.2615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10.1714" calcext:value-type="float">
            <text:p>10.171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0.1428" calcext:value-type="float">
            <text:p>0.142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0.1428" calcext:value-type="float">
            <text:p>0.1428</text:p>
          </table:table-cell>
          <table:table-cell office:value-type="float" office:value="9.9952" calcext:value-type="float">
            <text:p>9.995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38" calcext:value-type="float">
            <text:p>0.13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38" calcext:value-type="float">
            <text:p>0.138</text:p>
          </table:table-cell>
          <table:table-cell office:value-type="float" office:value="9.8437" calcext:value-type="float">
            <text:p>9.8437</text:p>
          </table:table-cell>
          <table:table-cell office:value-type="float" office:value="-0.1563" calcext:value-type="float">
            <text:p>-0.1563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184" calcext:value-type="float">
            <text:p>-0.018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9.8778" calcext:value-type="float">
            <text:p>9.8778</text:p>
          </table:table-cell>
          <table:table-cell office:value-type="float" office:value="-0.1222" calcext:value-type="float">
            <text:p>-0.1222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-0.1406" calcext:value-type="float">
            <text:p>-0.140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-0.1406" calcext:value-type="float">
            <text:p>-0.1406</text:p>
          </table:table-cell>
          <table:table-cell office:value-type="float" office:value="10.0338" calcext:value-type="float">
            <text:p>10.0338</text:p>
          </table:table-cell>
          <table:table-cell office:value-type="float" office:value="0.0338" calcext:value-type="float">
            <text:p>0.0338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2074" calcext:value-type="float">
            <text:p>-0.2074</text:p>
          </table:table-cell>
          <table:table-cell office:value-type="float" office:value="-0.1068" calcext:value-type="float">
            <text:p>-0.106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2074" calcext:value-type="float">
            <text:p>-0.2074</text:p>
          </table:table-cell>
          <table:table-cell office:value-type="float" office:value="-0.1068" calcext:value-type="float">
            <text:p>-0.1068</text:p>
          </table:table-cell>
          <table:table-cell office:value-type="float" office:value="10.1624" calcext:value-type="float">
            <text:p>10.1624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557" calcext:value-type="float">
            <text:p>0.055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0.0795" calcext:value-type="float">
            <text:p>10.0795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0.1351" calcext:value-type="float">
            <text:p>0.135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0.1351" calcext:value-type="float">
            <text:p>0.1351</text:p>
          </table:table-cell>
          <table:table-cell office:value-type="float" office:value="9.923" calcext:value-type="float">
            <text:p>9.92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0581" calcext:value-type="float">
            <text:p>0.058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0581" calcext:value-type="float">
            <text:p>0.0581</text:p>
          </table:table-cell>
          <table:table-cell office:value-type="float" office:value="9.8615" calcext:value-type="float">
            <text:p>9.8615</text:p>
          </table:table-cell>
          <table:table-cell office:value-type="float" office:value="-0.1385" calcext:value-type="float">
            <text:p>-0.1385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804" calcext:value-type="float">
            <text:p>-0.080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9.9572" calcext:value-type="float">
            <text:p>9.9572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027" calcext:value-type="float">
            <text:p>0.027</text:p>
          </table:table-cell>
          <table:table-cell office:value-type="float" office:value="-0.1539" calcext:value-type="float">
            <text:p>-0.1539</text:p>
          </table:table-cell>
          <table:table-cell office:value-type="float" office:value="-0.1232" calcext:value-type="float">
            <text:p>-0.123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027" calcext:value-type="float">
            <text:p>0.027</text:p>
          </table:table-cell>
          <table:table-cell office:value-type="float" office:value="-0.1539" calcext:value-type="float">
            <text:p>-0.1539</text:p>
          </table:table-cell>
          <table:table-cell office:value-type="float" office:value="-0.1232" calcext:value-type="float">
            <text:p>-0.1232</text:p>
          </table:table-cell>
          <table:table-cell office:value-type="float" office:value="10.1036" calcext:value-type="float">
            <text:p>10.1036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24" calcext:value-type="float">
            <text:p>0.0224</text:p>
          </table:table-cell>
          <table:table-cell office:value-type="float" office:value="-0.2253" calcext:value-type="float">
            <text:p>-0.2253</text:p>
          </table:table-cell>
          <table:table-cell office:value-type="float" office:value="-0.0196" calcext:value-type="float">
            <text:p>-0.019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24" calcext:value-type="float">
            <text:p>0.0224</text:p>
          </table:table-cell>
          <table:table-cell office:value-type="float" office:value="-0.2253" calcext:value-type="float">
            <text:p>-0.2253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10.1207" calcext:value-type="float">
            <text:p>10.1207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1846" calcext:value-type="float">
            <text:p>-0.1846</text:p>
          </table:table-cell>
          <table:table-cell office:value-type="float" office:value="0.1011" calcext:value-type="float">
            <text:p>0.101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1846" calcext:value-type="float">
            <text:p>-0.1846</text:p>
          </table:table-cell>
          <table:table-cell office:value-type="float" office:value="0.1011" calcext:value-type="float">
            <text:p>0.1011</text:p>
          </table:table-cell>
          <table:table-cell office:value-type="float" office:value="9.9941" calcext:value-type="float">
            <text:p>9.994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0952" calcext:value-type="float">
            <text:p>0.095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0952" calcext:value-type="float">
            <text:p>0.0952</text:p>
          </table:table-cell>
          <table:table-cell office:value-type="float" office:value="9.8906" calcext:value-type="float">
            <text:p>9.8906</text:p>
          </table:table-cell>
          <table:table-cell office:value-type="float" office:value="-0.1094" calcext:value-type="float">
            <text:p>-0.1094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0141" calcext:value-type="float">
            <text:p>-0.014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9.9095" calcext:value-type="float">
            <text:p>9.9095</text:p>
          </table:table-cell>
          <table:table-cell office:value-type="float" office:value="-0.0905" calcext:value-type="float">
            <text:p>-0.0905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-0.1047" calcext:value-type="float">
            <text:p>-0.104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10.0303" calcext:value-type="float">
            <text:p>10.0303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0.0743" calcext:value-type="float">
            <text:p>-0.074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0.0743" calcext:value-type="float">
            <text:p>-0.0743</text:p>
          </table:table-cell>
          <table:table-cell office:value-type="float" office:value="10.1196" calcext:value-type="float">
            <text:p>10.1196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2093" calcext:value-type="float">
            <text:p>-0.2093</text:p>
          </table:table-cell>
          <table:table-cell office:value-type="float" office:value="0.0452" calcext:value-type="float">
            <text:p>0.045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2093" calcext:value-type="float">
            <text:p>-0.2093</text:p>
          </table:table-cell>
          <table:table-cell office:value-type="float" office:value="0.0452" calcext:value-type="float">
            <text:p>0.0452</text:p>
          </table:table-cell>
          <table:table-cell office:value-type="float" office:value="10.0527" calcext:value-type="float">
            <text:p>10.0527</text:p>
          </table:table-cell>
          <table:table-cell office:value-type="float" office:value="0.0527" calcext:value-type="float">
            <text:p>0.0527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1377" calcext:value-type="float">
            <text:p>-0.1377</text:p>
          </table:table-cell>
          <table:table-cell office:value-type="float" office:value="0.0979" calcext:value-type="float">
            <text:p>0.097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1377" calcext:value-type="float">
            <text:p>-0.1377</text:p>
          </table:table-cell>
          <table:table-cell office:value-type="float" office:value="0.0979" calcext:value-type="float">
            <text:p>0.0979</text:p>
          </table:table-cell>
          <table:table-cell office:value-type="float" office:value="9.9408" calcext:value-type="float">
            <text:p>9.9408</text:p>
          </table:table-cell>
          <table:table-cell office:value-type="float" office:value="-0.0592" calcext:value-type="float">
            <text:p>-0.0592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0387" calcext:value-type="float">
            <text:p>0.038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0387" calcext:value-type="float">
            <text:p>0.0387</text:p>
          </table:table-cell>
          <table:table-cell office:value-type="float" office:value="9.9001" calcext:value-type="float">
            <text:p>9.9001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612" calcext:value-type="float">
            <text:p>-0.061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612" calcext:value-type="float">
            <text:p>-0.0612</text:p>
          </table:table-cell>
          <table:table-cell office:value-type="float" office:value="9.9719" calcext:value-type="float">
            <text:p>9.9719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893" calcext:value-type="float">
            <text:p>-0.089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10.0801" calcext:value-type="float">
            <text:p>10.0801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-0.0092" calcext:value-type="float">
            <text:p>-0.009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10.0855" calcext:value-type="float">
            <text:p>10.0855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1717" calcext:value-type="float">
            <text:p>-0.1717</text:p>
          </table:table-cell>
          <table:table-cell office:value-type="float" office:value="0.0763" calcext:value-type="float">
            <text:p>0.076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1717" calcext:value-type="float">
            <text:p>-0.1717</text:p>
          </table:table-cell>
          <table:table-cell office:value-type="float" office:value="0.0763" calcext:value-type="float">
            <text:p>0.0763</text:p>
          </table:table-cell>
          <table:table-cell office:value-type="float" office:value="9.991" calcext:value-type="float">
            <text:p>9.99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0.0673" calcext:value-type="float">
            <text:p>0.067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0.0673" calcext:value-type="float">
            <text:p>0.0673</text:p>
          </table:table-cell>
          <table:table-cell office:value-type="float" office:value="9.918" calcext:value-type="float">
            <text:p>9.918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0.0147" calcext:value-type="float">
            <text:p>-0.014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9.9372" calcext:value-type="float">
            <text:p>9.9372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0775" calcext:value-type="float">
            <text:p>-0.077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10.027" calcext:value-type="float">
            <text:p>10.027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-0.0505" calcext:value-type="float">
            <text:p>-0.050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10.0873" calcext:value-type="float">
            <text:p>10.0873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-0.1906" calcext:value-type="float">
            <text:p>-0.1906</text:p>
          </table:table-cell>
          <table:table-cell office:value-type="float" office:value="0.0368" calcext:value-type="float">
            <text:p>0.036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-0.1906" calcext:value-type="float">
            <text:p>-0.1906</text:p>
          </table:table-cell>
          <table:table-cell office:value-type="float" office:value="0.0368" calcext:value-type="float">
            <text:p>0.0368</text:p>
          </table:table-cell>
          <table:table-cell office:value-type="float" office:value="10.0338" calcext:value-type="float">
            <text:p>10.0338</text:p>
          </table:table-cell>
          <table:table-cell office:value-type="float" office:value="0.0338" calcext:value-type="float">
            <text:p>0.0338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1368" calcext:value-type="float">
            <text:p>-0.1368</text:p>
          </table:table-cell>
          <table:table-cell office:value-type="float" office:value="0.0706" calcext:value-type="float">
            <text:p>0.070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1368" calcext:value-type="float">
            <text:p>-0.1368</text:p>
          </table:table-cell>
          <table:table-cell office:value-type="float" office:value="0.0706" calcext:value-type="float">
            <text:p>0.0706</text:p>
          </table:table-cell>
          <table:table-cell office:value-type="float" office:value="9.954" calcext:value-type="float">
            <text:p>9.95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0.0246" calcext:value-type="float">
            <text:p>0.024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0.0246" calcext:value-type="float">
            <text:p>0.0246</text:p>
          </table:table-cell>
          <table:table-cell office:value-type="float" office:value="9.9278" calcext:value-type="float">
            <text:p>9.9278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007" calcext:value-type="float">
            <text:p>-0.1007</text:p>
          </table:table-cell>
          <table:table-cell office:value-type="float" office:value="-0.0476" calcext:value-type="float">
            <text:p>-0.047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007" calcext:value-type="float">
            <text:p>-0.1007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9.9835" calcext:value-type="float">
            <text:p>9.9835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565" calcext:value-type="float">
            <text:p>-0.1565</text:p>
          </table:table-cell>
          <table:table-cell office:value-type="float" office:value="-0.0641" calcext:value-type="float">
            <text:p>-0.064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565" calcext:value-type="float">
            <text:p>-0.1565</text:p>
          </table:table-cell>
          <table:table-cell office:value-type="float" office:value="-0.0641" calcext:value-type="float">
            <text:p>-0.0641</text:p>
          </table:table-cell>
          <table:table-cell office:value-type="float" office:value="10.0611" calcext:value-type="float">
            <text:p>10.0611</text:p>
          </table:table-cell>
          <table:table-cell office:value-type="float" office:value="0.0611" calcext:value-type="float">
            <text:p>0.0611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03" calcext:value-type="float">
            <text:p>-0.00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03" calcext:value-type="float">
            <text:p>-0.003</text:p>
          </table:table-cell>
          <table:table-cell office:value-type="float" office:value="10.0604" calcext:value-type="float">
            <text:p>10.0604</text:p>
          </table:table-cell>
          <table:table-cell office:value-type="float" office:value="0.0604" calcext:value-type="float">
            <text:p>0.060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574" calcext:value-type="float">
            <text:p>0.057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574" calcext:value-type="float">
            <text:p>0.0574</text:p>
          </table:table-cell>
          <table:table-cell office:value-type="float" office:value="9.9904" calcext:value-type="float">
            <text:p>9.9904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102" calcext:value-type="float">
            <text:p>-0.1102</text:p>
          </table:table-cell>
          <table:table-cell office:value-type="float" office:value="0.0478" calcext:value-type="float">
            <text:p>0.047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102" calcext:value-type="float">
            <text:p>-0.1102</text:p>
          </table:table-cell>
          <table:table-cell office:value-type="float" office:value="0.0478" calcext:value-type="float">
            <text:p>0.0478</text:p>
          </table:table-cell>
          <table:table-cell office:value-type="float" office:value="9.9385" calcext:value-type="float">
            <text:p>9.9385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-0.0137" calcext:value-type="float">
            <text:p>-0.013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9.956" calcext:value-type="float">
            <text:p>9.95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-0.0577" calcext:value-type="float">
            <text:p>-0.057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10.0228" calcext:value-type="float">
            <text:p>10.0228</text:p>
          </table:table-cell>
          <table:table-cell office:value-type="float" office:value="0.0228" calcext:value-type="float">
            <text:p>0.0228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349" calcext:value-type="float">
            <text:p>-0.034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10.0641" calcext:value-type="float">
            <text:p>10.0641</text:p>
          </table:table-cell>
          <table:table-cell office:value-type="float" office:value="0.0641" calcext:value-type="float">
            <text:p>0.064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1778" calcext:value-type="float">
            <text:p>-0.1778</text:p>
          </table:table-cell>
          <table:table-cell office:value-type="float" office:value="0.0293" calcext:value-type="float">
            <text:p>0.029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1778" calcext:value-type="float">
            <text:p>-0.1778</text:p>
          </table:table-cell>
          <table:table-cell office:value-type="float" office:value="0.0293" calcext:value-type="float">
            <text:p>0.0293</text:p>
          </table:table-cell>
          <table:table-cell office:value-type="float" office:value="10.0225" calcext:value-type="float">
            <text:p>10.022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373" calcext:value-type="float">
            <text:p>-0.1373</text:p>
          </table:table-cell>
          <table:table-cell office:value-type="float" office:value="0.0518" calcext:value-type="float">
            <text:p>0.051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373" calcext:value-type="float">
            <text:p>-0.1373</text:p>
          </table:table-cell>
          <table:table-cell office:value-type="float" office:value="0.0518" calcext:value-type="float">
            <text:p>0.0518</text:p>
          </table:table-cell>
          <table:table-cell office:value-type="float" office:value="9.9641" calcext:value-type="float">
            <text:p>9.9641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0.0159" calcext:value-type="float">
            <text:p>0.015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0.0159" calcext:value-type="float">
            <text:p>0.0159</text:p>
          </table:table-cell>
          <table:table-cell office:value-type="float" office:value="9.9473" calcext:value-type="float">
            <text:p>9.9473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-0.0368" calcext:value-type="float">
            <text:p>-0.036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9.9904" calcext:value-type="float">
            <text:p>9.9904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56" calcext:value-type="float">
            <text:p>-0.1556</text:p>
          </table:table-cell>
          <table:table-cell office:value-type="float" office:value="-0.0464" calcext:value-type="float">
            <text:p>-0.046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56" calcext:value-type="float">
            <text:p>-0.1556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10.0465" calcext:value-type="float">
            <text:p>10.0465</text:p>
          </table:table-cell>
          <table:table-cell office:value-type="float" office:value="0.0465" calcext:value-type="float">
            <text:p>0.0465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0.0001" calcext:value-type="float">
            <text:p>0.000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.043" calcext:value-type="float">
            <text:p>10.043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1571" calcext:value-type="float">
            <text:p>-0.1571</text:p>
          </table:table-cell>
          <table:table-cell office:value-type="float" office:value="0.0431" calcext:value-type="float">
            <text:p>0.043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1571" calcext:value-type="float">
            <text:p>-0.1571</text:p>
          </table:table-cell>
          <table:table-cell office:value-type="float" office:value="0.0431" calcext:value-type="float">
            <text:p>0.0431</text:p>
          </table:table-cell>
          <table:table-cell office:value-type="float" office:value="9.9912" calcext:value-type="float">
            <text:p>9.99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0344" calcext:value-type="float">
            <text:p>0.034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0344" calcext:value-type="float">
            <text:p>0.0344</text:p>
          </table:table-cell>
          <table:table-cell office:value-type="float" office:value="9.9537" calcext:value-type="float">
            <text:p>9.9537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-0.012" calcext:value-type="float">
            <text:p>-0.01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-0.012" calcext:value-type="float">
            <text:p>-0.012</text:p>
          </table:table-cell>
          <table:table-cell office:value-type="float" office:value="9.9689" calcext:value-type="float">
            <text:p>9.9689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-0.0431" calcext:value-type="float">
            <text:p>-0.043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10.0187" calcext:value-type="float">
            <text:p>10.0187</text:p>
          </table:table-cell>
          <table:table-cell office:value-type="float" office:value="0.0187" calcext:value-type="float">
            <text:p>0.0187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685" calcext:value-type="float">
            <text:p>-0.1685</text:p>
          </table:table-cell>
          <table:table-cell office:value-type="float" office:value="-0.0244" calcext:value-type="float">
            <text:p>-0.024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644" calcext:value-type="float">
            <text:p>0.6644</text:p>
          </table:table-cell>
          <table:table-cell office:value-type="float" office:value="-0.6278" calcext:value-type="float">
            <text:p>-0.6278</text:p>
          </table:table-cell>
          <table:table-cell office:value-type="float" office:value="-0.3664" calcext:value-type="float">
            <text:p>-0.3664</text:p>
          </table:table-cell>
          <table:table-cell office:value-type="float" office:value="0.5386" calcext:value-type="float">
            <text:p>0.5386</text:p>
          </table:table-cell>
          <table:table-cell office:value-type="float" office:value="10.0841" calcext:value-type="float">
            <text:p>10.0841</text:p>
          </table:table-cell>
          <table:table-cell office:value-type="float" office:value="0.0841" calcext:value-type="float">
            <text:p>0.0841</text:p>
          </table:table-cell>
          <table:table-cell office:value-type="float" office:value="-0.1812" calcext:value-type="float">
            <text:p>-0.1812</text:p>
          </table:table-cell>
          <table:table-cell office:value-type="float" office:value="-0.9263" calcext:value-type="float">
            <text:p>-0.9263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6227" calcext:value-type="float">
            <text:p>0.622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1812" calcext:value-type="float">
            <text:p>-0.1812</text:p>
          </table:table-cell>
          <table:table-cell office:value-type="float" office:value="-0.9263" calcext:value-type="float">
            <text:p>-0.9263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6227" calcext:value-type="float">
            <text:p>0.6227</text:p>
          </table:table-cell>
          <table:table-cell office:value-type="float" office:value="8.9008" calcext:value-type="float">
            <text:p>8.9008</text:p>
          </table:table-cell>
          <table:table-cell office:value-type="float" office:value="-1.0992" calcext:value-type="float">
            <text:p>-1.0992</text:p>
          </table:table-cell>
          <table:table-cell office:value-type="float" office:value="-0.8641" calcext:value-type="float">
            <text:p>-0.8641</text:p>
          </table:table-cell>
          <table:table-cell office:value-type="float" office:value="-0.3321" calcext:value-type="float">
            <text:p>-0.3321</text:p>
          </table:table-cell>
          <table:table-cell office:value-type="float" office:value="0.2874" calcext:value-type="float">
            <text:p>0.2874</text:p>
          </table:table-cell>
          <table:table-cell office:value-type="float" office:value="-0.4764" calcext:value-type="float">
            <text:p>-0.476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8641" calcext:value-type="float">
            <text:p>-0.8641</text:p>
          </table:table-cell>
          <table:table-cell office:value-type="float" office:value="-0.3321" calcext:value-type="float">
            <text:p>-0.3321</text:p>
          </table:table-cell>
          <table:table-cell office:value-type="float" office:value="0.2874" calcext:value-type="float">
            <text:p>0.2874</text:p>
          </table:table-cell>
          <table:table-cell office:value-type="float" office:value="-0.4764" calcext:value-type="float">
            <text:p>-0.4764</text:p>
          </table:table-cell>
          <table:table-cell office:value-type="float" office:value="9.367" calcext:value-type="float">
            <text:p>9.367</text:p>
          </table:table-cell>
          <table:table-cell office:value-type="float" office:value="-0.633" calcext:value-type="float">
            <text:p>-0.633</text:p>
          </table:table-cell>
          <table:table-cell office:value-type="float" office:value="-0.7383" calcext:value-type="float">
            <text:p>-0.7383</text:p>
          </table:table-cell>
          <table:table-cell office:value-type="float" office:value="0.5669" calcext:value-type="float">
            <text:p>0.5669</text:p>
          </table:table-cell>
          <table:table-cell office:value-type="float" office:value="-0.5056" calcext:value-type="float">
            <text:p>-0.5056</text:p>
          </table:table-cell>
          <table:table-cell office:value-type="float" office:value="-1.1094" calcext:value-type="float">
            <text:p>-1.1094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-0.7383" calcext:value-type="float">
            <text:p>-0.7383</text:p>
          </table:table-cell>
          <table:table-cell office:value-type="float" office:value="0.5669" calcext:value-type="float">
            <text:p>0.5669</text:p>
          </table:table-cell>
          <table:table-cell office:value-type="float" office:value="-0.5056" calcext:value-type="float">
            <text:p>-0.5056</text:p>
          </table:table-cell>
          <table:table-cell office:value-type="float" office:value="-1.1094" calcext:value-type="float">
            <text:p>-1.1094</text:p>
          </table:table-cell>
          <table:table-cell office:value-type="float" office:value="11.1424" calcext:value-type="float">
            <text:p>11.1424</text:p>
          </table:table-cell>
          <table:table-cell office:value-type="float" office:value="1.1424" calcext:value-type="float">
            <text:p>1.1424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8852" calcext:value-type="float">
            <text:p>0.8852</text:p>
          </table:table-cell>
          <table:table-cell office:value-type="float" office:value="-1.0438" calcext:value-type="float">
            <text:p>-1.0438</text:p>
          </table:table-cell>
          <table:table-cell office:value-type="float" office:value="0.033" calcext:value-type="float">
            <text:p>0.0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8852" calcext:value-type="float">
            <text:p>0.8852</text:p>
          </table:table-cell>
          <table:table-cell office:value-type="float" office:value="-1.0438" calcext:value-type="float">
            <text:p>-1.0438</text:p>
          </table:table-cell>
          <table:table-cell office:value-type="float" office:value="0.033" calcext:value-type="float">
            <text:p>0.033</text:p>
          </table:table-cell>
          <table:table-cell office:value-type="float" office:value="11.3159" calcext:value-type="float">
            <text:p>11.3159</text:p>
          </table:table-cell>
          <table:table-cell office:value-type="float" office:value="1.3159" calcext:value-type="float">
            <text:p>1.3159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3563" calcext:value-type="float">
            <text:p>0.3563</text:p>
          </table:table-cell>
          <table:table-cell office:value-type="float" office:value="-0.3528" calcext:value-type="float">
            <text:p>-0.3528</text:p>
          </table:table-cell>
          <table:table-cell office:value-type="float" office:value="1.3489" calcext:value-type="float">
            <text:p>1.348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3563" calcext:value-type="float">
            <text:p>0.3563</text:p>
          </table:table-cell>
          <table:table-cell office:value-type="float" office:value="-0.3528" calcext:value-type="float">
            <text:p>-0.3528</text:p>
          </table:table-cell>
          <table:table-cell office:value-type="float" office:value="1.3489" calcext:value-type="float">
            <text:p>1.3489</text:p>
          </table:table-cell>
          <table:table-cell office:value-type="float" office:value="9.1599" calcext:value-type="float">
            <text:p>9.1599</text:p>
          </table:table-cell>
          <table:table-cell office:value-type="float" office:value="-0.8401" calcext:value-type="float">
            <text:p>-0.8401</text:p>
          </table:table-cell>
          <table:table-cell office:value-type="float" office:value="0.6862" calcext:value-type="float">
            <text:p>0.6862</text:p>
          </table:table-cell>
          <table:table-cell office:value-type="float" office:value="-0.4457" calcext:value-type="float">
            <text:p>-0.445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8" calcext:value-type="float">
            <text:p>0.508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862" calcext:value-type="float">
            <text:p>0.6862</text:p>
          </table:table-cell>
          <table:table-cell office:value-type="float" office:value="-0.4457" calcext:value-type="float">
            <text:p>-0.445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8" calcext:value-type="float">
            <text:p>0.5088</text:p>
          </table:table-cell>
          <table:table-cell office:value-type="float" office:value="9.6815" calcext:value-type="float">
            <text:p>9.6815</text:p>
          </table:table-cell>
          <table:table-cell office:value-type="float" office:value="-0.3185" calcext:value-type="float">
            <text:p>-0.3185</text:p>
          </table:table-cell>
          <table:table-cell office:value-type="float" office:value="0.0254" calcext:value-type="float">
            <text:p>0.0254</text:p>
          </table:table-cell>
          <table:table-cell office:value-type="float" office:value="-0.7689" calcext:value-type="float">
            <text:p>-0.7689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1903" calcext:value-type="float">
            <text:p>0.190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254" calcext:value-type="float">
            <text:p>0.0254</text:p>
          </table:table-cell>
          <table:table-cell office:value-type="float" office:value="-0.7689" calcext:value-type="float">
            <text:p>-0.7689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1903" calcext:value-type="float">
            <text:p>0.1903</text:p>
          </table:table-cell>
          <table:table-cell office:value-type="float" office:value="8.7462" calcext:value-type="float">
            <text:p>8.7462</text:p>
          </table:table-cell>
          <table:table-cell office:value-type="float" office:value="-1.2538" calcext:value-type="float">
            <text:p>-1.2538</text:p>
          </table:table-cell>
          <table:table-cell office:value-type="float" office:value="-0.5919" calcext:value-type="float">
            <text:p>-0.5919</text:p>
          </table:table-cell>
          <table:table-cell office:value-type="float" office:value="-0.3638" calcext:value-type="float">
            <text:p>-0.3638</text:p>
          </table:table-cell>
          <table:table-cell office:value-type="float" office:value="0.4889" calcext:value-type="float">
            <text:p>0.4889</text:p>
          </table:table-cell>
          <table:table-cell office:value-type="float" office:value="-1.0635" calcext:value-type="float">
            <text:p>-1.06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0.5919" calcext:value-type="float">
            <text:p>-0.5919</text:p>
          </table:table-cell>
          <table:table-cell office:value-type="float" office:value="-0.3638" calcext:value-type="float">
            <text:p>-0.3638</text:p>
          </table:table-cell>
          <table:table-cell office:value-type="float" office:value="0.4889" calcext:value-type="float">
            <text:p>0.4889</text:p>
          </table:table-cell>
          <table:table-cell office:value-type="float" office:value="-1.0635" calcext:value-type="float">
            <text:p>-1.0635</text:p>
          </table:table-cell>
          <table:table-cell office:value-type="float" office:value="10.1854" calcext:value-type="float">
            <text:p>10.1854</text:p>
          </table:table-cell>
          <table:table-cell office:value-type="float" office:value="0.1854" calcext:value-type="float">
            <text:p>0.1854</text:p>
          </table:table-cell>
          <table:table-cell office:value-type="float" office:value="-0.6125" calcext:value-type="float">
            <text:p>-0.6125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482" calcext:value-type="float">
            <text:p>-0.482</text:p>
          </table:table-cell>
          <table:table-cell office:value-type="float" office:value="-0.8781" calcext:value-type="float">
            <text:p>-0.878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0.6125" calcext:value-type="float">
            <text:p>-0.6125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482" calcext:value-type="float">
            <text:p>-0.482</text:p>
          </table:table-cell>
          <table:table-cell office:value-type="float" office:value="-0.8781" calcext:value-type="float">
            <text:p>-0.8781</text:p>
          </table:table-cell>
          <table:table-cell office:value-type="float" office:value="10.8514" calcext:value-type="float">
            <text:p>10.8514</text:p>
          </table:table-cell>
          <table:table-cell office:value-type="float" office:value="0.8514" calcext:value-type="float">
            <text:p>0.8514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6577" calcext:value-type="float">
            <text:p>0.6577</text:p>
          </table:table-cell>
          <table:table-cell office:value-type="float" office:value="-0.9344" calcext:value-type="float">
            <text:p>-0.9344</text:p>
          </table:table-cell>
          <table:table-cell office:value-type="float" office:value="-0.0267" calcext:value-type="float">
            <text:p>-0.026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6577" calcext:value-type="float">
            <text:p>0.6577</text:p>
          </table:table-cell>
          <table:table-cell office:value-type="float" office:value="-0.9344" calcext:value-type="float">
            <text:p>-0.9344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10.994" calcext:value-type="float">
            <text:p>10.994</text:p>
          </table:table-cell>
          <table:table-cell office:value-type="float" office:value="0.994" calcext:value-type="float">
            <text:p>0.994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3432" calcext:value-type="float">
            <text:p>0.343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9673" calcext:value-type="float">
            <text:p>0.967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3432" calcext:value-type="float">
            <text:p>0.343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9673" calcext:value-type="float">
            <text:p>0.9673</text:p>
          </table:table-cell>
          <table:table-cell office:value-type="float" office:value="9.7944" calcext:value-type="float">
            <text:p>9.7944</text:p>
          </table:table-cell>
          <table:table-cell office:value-type="float" office:value="-0.2056" calcext:value-type="float">
            <text:p>-0.2056</text:p>
          </table:table-cell>
          <table:table-cell office:value-type="float" office:value="0.5311" calcext:value-type="float">
            <text:p>0.5311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7618" calcext:value-type="float">
            <text:p>0.761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5311" calcext:value-type="float">
            <text:p>0.5311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7618" calcext:value-type="float">
            <text:p>0.7618</text:p>
          </table:table-cell>
          <table:table-cell office:value-type="float" office:value="9.407" calcext:value-type="float">
            <text:p>9.407</text:p>
          </table:table-cell>
          <table:table-cell office:value-type="float" office:value="-0.593" calcext:value-type="float">
            <text:p>-0.593</text:p>
          </table:table-cell>
          <table:table-cell office:value-type="float" office:value="0.1017" calcext:value-type="float">
            <text:p>0.1017</text:p>
          </table:table-cell>
          <table:table-cell office:value-type="float" office:value="-0.5465" calcext:value-type="float">
            <text:p>-0.546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1687" calcext:value-type="float">
            <text:p>0.168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1017" calcext:value-type="float">
            <text:p>0.1017</text:p>
          </table:table-cell>
          <table:table-cell office:value-type="float" office:value="-0.5465" calcext:value-type="float">
            <text:p>-0.546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1687" calcext:value-type="float">
            <text:p>0.1687</text:p>
          </table:table-cell>
          <table:table-cell office:value-type="float" office:value="9.0624" calcext:value-type="float">
            <text:p>9.0624</text:p>
          </table:table-cell>
          <table:table-cell office:value-type="float" office:value="-0.9376" calcext:value-type="float">
            <text:p>-0.9376</text:p>
          </table:table-cell>
          <table:table-cell office:value-type="float" office:value="-0.3658" calcext:value-type="float">
            <text:p>-0.3658</text:p>
          </table:table-cell>
          <table:table-cell office:value-type="float" office:value="-0.3115" calcext:value-type="float">
            <text:p>-0.3115</text:p>
          </table:table-cell>
          <table:table-cell office:value-type="float" office:value="0.5657" calcext:value-type="float">
            <text:p>0.5657</text:p>
          </table:table-cell>
          <table:table-cell office:value-type="float" office:value="-0.7689" calcext:value-type="float">
            <text:p>-0.768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0.3658" calcext:value-type="float">
            <text:p>-0.3658</text:p>
          </table:table-cell>
          <table:table-cell office:value-type="float" office:value="-0.3115" calcext:value-type="float">
            <text:p>-0.3115</text:p>
          </table:table-cell>
          <table:table-cell office:value-type="float" office:value="0.5657" calcext:value-type="float">
            <text:p>0.5657</text:p>
          </table:table-cell>
          <table:table-cell office:value-type="float" office:value="-0.7689" calcext:value-type="float">
            <text:p>-0.7689</text:p>
          </table:table-cell>
          <table:table-cell office:value-type="float" office:value="9.8946" calcext:value-type="float">
            <text:p>9.8946</text:p>
          </table:table-cell>
          <table:table-cell office:value-type="float" office:value="-0.1054" calcext:value-type="float">
            <text:p>-0.1054</text:p>
          </table:table-cell>
          <table:table-cell office:value-type="float" office:value="-0.4409" calcext:value-type="float">
            <text:p>-0.4409</text:p>
          </table:table-cell>
          <table:table-cell office:value-type="float" office:value="0.1832" calcext:value-type="float">
            <text:p>0.1832</text:p>
          </table:table-cell>
          <table:table-cell office:value-type="float" office:value="-0.2559" calcext:value-type="float">
            <text:p>-0.2559</text:p>
          </table:table-cell>
          <table:table-cell office:value-type="float" office:value="-0.8743" calcext:value-type="float">
            <text:p>-0.874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0.4409" calcext:value-type="float">
            <text:p>-0.4409</text:p>
          </table:table-cell>
          <table:table-cell office:value-type="float" office:value="0.1832" calcext:value-type="float">
            <text:p>0.1832</text:p>
          </table:table-cell>
          <table:table-cell office:value-type="float" office:value="-0.2559" calcext:value-type="float">
            <text:p>-0.2559</text:p>
          </table:table-cell>
          <table:table-cell office:value-type="float" office:value="-0.8743" calcext:value-type="float">
            <text:p>-0.8743</text:p>
          </table:table-cell>
          <table:table-cell office:value-type="float" office:value="10.7771" calcext:value-type="float">
            <text:p>10.7771</text:p>
          </table:table-cell>
          <table:table-cell office:value-type="float" office:value="0.7771" calcext:value-type="float">
            <text:p>0.7771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448" calcext:value-type="float">
            <text:p>0.448</text:p>
          </table:table-cell>
          <table:table-cell office:value-type="float" office:value="-0.7416" calcext:value-type="float">
            <text:p>-0.7416</text:p>
          </table:table-cell>
          <table:table-cell office:value-type="float" office:value="-0.0972" calcext:value-type="float">
            <text:p>-0.097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448" calcext:value-type="float">
            <text:p>0.448</text:p>
          </table:table-cell>
          <table:table-cell office:value-type="float" office:value="-0.7416" calcext:value-type="float">
            <text:p>-0.7416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10.7219" calcext:value-type="float">
            <text:p>10.721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2681" calcext:value-type="float">
            <text:p>0.2681</text:p>
          </table:table-cell>
          <table:table-cell office:value-type="float" office:value="-0.4779" calcext:value-type="float">
            <text:p>-0.4779</text:p>
          </table:table-cell>
          <table:table-cell office:value-type="float" office:value="0.6247" calcext:value-type="float">
            <text:p>0.624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2681" calcext:value-type="float">
            <text:p>0.2681</text:p>
          </table:table-cell>
          <table:table-cell office:value-type="float" office:value="-0.4779" calcext:value-type="float">
            <text:p>-0.4779</text:p>
          </table:table-cell>
          <table:table-cell office:value-type="float" office:value="0.6247" calcext:value-type="float">
            <text:p>0.6247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1345" calcext:value-type="float">
            <text:p>-0.134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868" calcext:value-type="float">
            <text:p>0.86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1345" calcext:value-type="float">
            <text:p>-0.134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868" calcext:value-type="float">
            <text:p>0.868</text:p>
          </table:table-cell>
          <table:table-cell office:value-type="float" office:value="9.2334" calcext:value-type="float">
            <text:p>9.2334</text:p>
          </table:table-cell>
          <table:table-cell office:value-type="float" office:value="-0.7666" calcext:value-type="float">
            <text:p>-0.7666</text:p>
          </table:table-cell>
          <table:table-cell office:value-type="float" office:value="0.1026" calcext:value-type="float">
            <text:p>0.1026</text:p>
          </table:table-cell>
          <table:table-cell office:value-type="float" office:value="-0.3574" calcext:value-type="float">
            <text:p>-0.3574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1014" calcext:value-type="float">
            <text:p>0.101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1026" calcext:value-type="float">
            <text:p>0.1026</text:p>
          </table:table-cell>
          <table:table-cell office:value-type="float" office:value="-0.3574" calcext:value-type="float">
            <text:p>-0.3574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1014" calcext:value-type="float">
            <text:p>0.1014</text:p>
          </table:table-cell>
          <table:table-cell office:value-type="float" office:value="9.3379" calcext:value-type="float">
            <text:p>9.3379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2115" calcext:value-type="float">
            <text:p>-0.2115</text:p>
          </table:table-cell>
          <table:table-cell office:value-type="float" office:value="-0.2186" calcext:value-type="float">
            <text:p>-0.2186</text:p>
          </table:table-cell>
          <table:table-cell office:value-type="float" office:value="0.5236" calcext:value-type="float">
            <text:p>0.5236</text:p>
          </table:table-cell>
          <table:table-cell office:value-type="float" office:value="-0.5607" calcext:value-type="float">
            <text:p>-0.560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0.2115" calcext:value-type="float">
            <text:p>-0.2115</text:p>
          </table:table-cell>
          <table:table-cell office:value-type="float" office:value="-0.2186" calcext:value-type="float">
            <text:p>-0.2186</text:p>
          </table:table-cell>
          <table:table-cell office:value-type="float" office:value="0.5236" calcext:value-type="float">
            <text:p>0.5236</text:p>
          </table:table-cell>
          <table:table-cell office:value-type="float" office:value="-0.5607" calcext:value-type="float">
            <text:p>-0.5607</text:p>
          </table:table-cell>
          <table:table-cell office:value-type="float" office:value="9.8094" calcext:value-type="float">
            <text:p>9.8094</text:p>
          </table:table-cell>
          <table:table-cell office:value-type="float" office:value="-0.1906" calcext:value-type="float">
            <text:p>-0.1906</text:p>
          </table:table-cell>
          <table:table-cell office:value-type="float" office:value="-0.2796" calcext:value-type="float">
            <text:p>-0.2796</text:p>
          </table:table-cell>
          <table:table-cell office:value-type="float" office:value="0.1005" calcext:value-type="float">
            <text:p>0.1005</text:p>
          </table:table-cell>
          <table:table-cell office:value-type="float" office:value="-0.1323" calcext:value-type="float">
            <text:p>-0.1323</text:p>
          </table:table-cell>
          <table:table-cell office:value-type="float" office:value="-0.7513" calcext:value-type="float">
            <text:p>-0.751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0.2796" calcext:value-type="float">
            <text:p>-0.2796</text:p>
          </table:table-cell>
          <table:table-cell office:value-type="float" office:value="0.1005" calcext:value-type="float">
            <text:p>0.1005</text:p>
          </table:table-cell>
          <table:table-cell office:value-type="float" office:value="-0.1323" calcext:value-type="float">
            <text:p>-0.1323</text:p>
          </table:table-cell>
          <table:table-cell office:value-type="float" office:value="-0.7513" calcext:value-type="float">
            <text:p>-0.7513</text:p>
          </table:table-cell>
          <table:table-cell office:value-type="float" office:value="10.6195" calcext:value-type="float">
            <text:p>10.6195</text:p>
          </table:table-cell>
          <table:table-cell office:value-type="float" office:value="0.6195" calcext:value-type="float">
            <text:p>0.6195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0.2778" calcext:value-type="float">
            <text:p>0.2778</text:p>
          </table:table-cell>
          <table:table-cell office:value-type="float" office:value="-0.5738" calcext:value-type="float">
            <text:p>-0.5738</text:p>
          </table:table-cell>
          <table:table-cell office:value-type="float" office:value="-0.1317" calcext:value-type="float">
            <text:p>-0.131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0.2778" calcext:value-type="float">
            <text:p>0.2778</text:p>
          </table:table-cell>
          <table:table-cell office:value-type="float" office:value="-0.5738" calcext:value-type="float">
            <text:p>-0.5738</text:p>
          </table:table-cell>
          <table:table-cell office:value-type="float" office:value="-0.1317" calcext:value-type="float">
            <text:p>-0.1317</text:p>
          </table:table-cell>
          <table:table-cell office:value-type="float" office:value="10.5212" calcext:value-type="float">
            <text:p>10.5212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691" calcext:value-type="float">
            <text:p>0.1691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3894" calcext:value-type="float">
            <text:p>0.389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691" calcext:value-type="float">
            <text:p>0.1691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3894" calcext:value-type="float">
            <text:p>0.3894</text:p>
          </table:table-cell>
          <table:table-cell office:value-type="float" office:value="10.2816" calcext:value-type="float">
            <text:p>10.2816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2154" calcext:value-type="float">
            <text:p>0.2154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671" calcext:value-type="float">
            <text:p>0.67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2154" calcext:value-type="float">
            <text:p>0.2154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671" calcext:value-type="float">
            <text:p>0.671</text:p>
          </table:table-cell>
          <table:table-cell office:value-type="float" office:value="9.4691" calcext:value-type="float">
            <text:p>9.4691</text:p>
          </table:table-cell>
          <table:table-cell office:value-type="float" office:value="-0.5309" calcext:value-type="float">
            <text:p>-0.5309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2179" calcext:value-type="float">
            <text:p>-0.2179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1401" calcext:value-type="float">
            <text:p>0.140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2179" calcext:value-type="float">
            <text:p>-0.2179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1401" calcext:value-type="float">
            <text:p>0.1401</text:p>
          </table:table-cell>
          <table:table-cell office:value-type="float" office:value="9.4983" calcext:value-type="float">
            <text:p>9.4983</text:p>
          </table:table-cell>
          <table:table-cell office:value-type="float" office:value="-0.5017" calcext:value-type="float">
            <text:p>-0.5017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8" calcext:value-type="float">
            <text:p>0.38</text:p>
          </table:table-cell>
          <table:table-cell office:value-type="float" office:value="-0.3616" calcext:value-type="float">
            <text:p>-0.361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8" calcext:value-type="float">
            <text:p>0.38</text:p>
          </table:table-cell>
          <table:table-cell office:value-type="float" office:value="-0.3616" calcext:value-type="float">
            <text:p>-0.3616</text:p>
          </table:table-cell>
          <table:table-cell office:value-type="float" office:value="9.7908" calcext:value-type="float">
            <text:p>9.7908</text:p>
          </table:table-cell>
          <table:table-cell office:value-type="float" office:value="-0.2092" calcext:value-type="float">
            <text:p>-0.2092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719" calcext:value-type="float">
            <text:p>0.071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-0.5708" calcext:value-type="float">
            <text:p>-0.570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719" calcext:value-type="float">
            <text:p>0.071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-0.5708" calcext:value-type="float">
            <text:p>-0.5708</text:p>
          </table:table-cell>
          <table:table-cell office:value-type="float" office:value="10.4428" calcext:value-type="float">
            <text:p>10.4428</text:p>
          </table:table-cell>
          <table:table-cell office:value-type="float" office:value="0.4428" calcext:value-type="float">
            <text:p>0.442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673" calcext:value-type="float">
            <text:p>0.1673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-0.128" calcext:value-type="float">
            <text:p>-0.12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673" calcext:value-type="float">
            <text:p>0.1673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-0.128" calcext:value-type="float">
            <text:p>-0.128</text:p>
          </table:table-cell>
          <table:table-cell office:value-type="float" office:value="10.3983" calcext:value-type="float">
            <text:p>10.3983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845" calcext:value-type="float">
            <text:p>0.0845</text:p>
          </table:table-cell>
          <table:table-cell office:value-type="float" office:value="-0.3644" calcext:value-type="float">
            <text:p>-0.3644</text:p>
          </table:table-cell>
          <table:table-cell office:value-type="float" office:value="0.2703" calcext:value-type="float">
            <text:p>0.270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845" calcext:value-type="float">
            <text:p>0.0845</text:p>
          </table:table-cell>
          <table:table-cell office:value-type="float" office:value="-0.3644" calcext:value-type="float">
            <text:p>-0.3644</text:p>
          </table:table-cell>
          <table:table-cell office:value-type="float" office:value="0.2703" calcext:value-type="float">
            <text:p>0.2703</text:p>
          </table:table-cell>
          <table:table-cell office:value-type="float" office:value="10.1786" calcext:value-type="float">
            <text:p>10.1786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1122" calcext:value-type="float">
            <text:p>0.1122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.4489" calcext:value-type="float">
            <text:p>0.448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122" calcext:value-type="float">
            <text:p>0.1122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.4489" calcext:value-type="float">
            <text:p>0.4489</text:p>
          </table:table-cell>
          <table:table-cell office:value-type="float" office:value="9.6986" calcext:value-type="float">
            <text:p>9.6986</text:p>
          </table:table-cell>
          <table:table-cell office:value-type="float" office:value="-0.3014" calcext:value-type="float">
            <text:p>-0.301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1476" calcext:value-type="float">
            <text:p>0.147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1476" calcext:value-type="float">
            <text:p>0.1476</text:p>
          </table:table-cell>
          <table:table-cell office:value-type="float" office:value="9.5913" calcext:value-type="float">
            <text:p>9.5913</text:p>
          </table:table-cell>
          <table:table-cell office:value-type="float" office:value="-0.4087" calcext:value-type="float">
            <text:p>-0.408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0.0524" calcext:value-type="float">
            <text:p>-0.0524</text:p>
          </table:table-cell>
          <table:table-cell office:value-type="float" office:value="0.2368" calcext:value-type="float">
            <text:p>0.2368</text:p>
          </table:table-cell>
          <table:table-cell office:value-type="float" office:value="-0.2611" calcext:value-type="float">
            <text:p>-0.261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0.0524" calcext:value-type="float">
            <text:p>-0.0524</text:p>
          </table:table-cell>
          <table:table-cell office:value-type="float" office:value="0.2368" calcext:value-type="float">
            <text:p>0.2368</text:p>
          </table:table-cell>
          <table:table-cell office:value-type="float" office:value="-0.2611" calcext:value-type="float">
            <text:p>-0.2611</text:p>
          </table:table-cell>
          <table:table-cell office:value-type="float" office:value="9.8439" calcext:value-type="float">
            <text:p>9.8439</text:p>
          </table:table-cell>
          <table:table-cell office:value-type="float" office:value="-0.1561" calcext:value-type="float">
            <text:p>-0.1561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0.0683" calcext:value-type="float">
            <text:p>0.0683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-0.4171" calcext:value-type="float">
            <text:p>-0.417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0.0683" calcext:value-type="float">
            <text:p>0.0683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-0.4171" calcext:value-type="float">
            <text:p>-0.4171</text:p>
          </table:table-cell>
          <table:table-cell office:value-type="float" office:value="10.3358" calcext:value-type="float">
            <text:p>10.3358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005" calcext:value-type="float">
            <text:p>0.1005</text:p>
          </table:table-cell>
          <table:table-cell office:value-type="float" office:value="-0.3515" calcext:value-type="float">
            <text:p>-0.3515</text:p>
          </table:table-cell>
          <table:table-cell office:value-type="float" office:value="-0.0813" calcext:value-type="float">
            <text:p>-0.081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005" calcext:value-type="float">
            <text:p>0.1005</text:p>
          </table:table-cell>
          <table:table-cell office:value-type="float" office:value="-0.3515" calcext:value-type="float">
            <text:p>-0.3515</text:p>
          </table:table-cell>
          <table:table-cell office:value-type="float" office:value="-0.0813" calcext:value-type="float">
            <text:p>-0.0813</text:p>
          </table:table-cell>
          <table:table-cell office:value-type="float" office:value="10.3243" calcext:value-type="float">
            <text:p>10.3243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2707" calcext:value-type="float">
            <text:p>-0.2707</text:p>
          </table:table-cell>
          <table:table-cell office:value-type="float" office:value="0.243" calcext:value-type="float">
            <text:p>0.24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2707" calcext:value-type="float">
            <text:p>-0.2707</text:p>
          </table:table-cell>
          <table:table-cell office:value-type="float" office:value="0.243" calcext:value-type="float">
            <text:p>0.243</text:p>
          </table:table-cell>
          <table:table-cell office:value-type="float" office:value="10.053" calcext:value-type="float">
            <text:p>10.0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3" calcext:value-type="float">
            <text:p>0.0473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296" calcext:value-type="float">
            <text:p>0.29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0473" calcext:value-type="float">
            <text:p>0.0473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296" calcext:value-type="float">
            <text:p>0.296</text:p>
          </table:table-cell>
          <table:table-cell office:value-type="float" office:value="9.7293" calcext:value-type="float">
            <text:p>9.7293</text:p>
          </table:table-cell>
          <table:table-cell office:value-type="float" office:value="-0.2707" calcext:value-type="float">
            <text:p>-0.2707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253" calcext:value-type="float">
            <text:p>0.025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253" calcext:value-type="float">
            <text:p>0.0253</text:p>
          </table:table-cell>
          <table:table-cell office:value-type="float" office:value="9.7427" calcext:value-type="float">
            <text:p>9.7427</text:p>
          </table:table-cell>
          <table:table-cell office:value-type="float" office:value="-0.2573" calcext:value-type="float">
            <text:p>-0.2573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232" calcext:value-type="float">
            <text:p>-0.23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232" calcext:value-type="float">
            <text:p>-0.232</text:p>
          </table:table-cell>
          <table:table-cell office:value-type="float" office:value="9.952" calcext:value-type="float">
            <text:p>9.95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1998" calcext:value-type="float">
            <text:p>-0.1998</text:p>
          </table:table-cell>
          <table:table-cell office:value-type="float" office:value="-0.2799" calcext:value-type="float">
            <text:p>-0.279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1998" calcext:value-type="float">
            <text:p>-0.1998</text:p>
          </table:table-cell>
          <table:table-cell office:value-type="float" office:value="-0.2799" calcext:value-type="float">
            <text:p>-0.2799</text:p>
          </table:table-cell>
          <table:table-cell office:value-type="float" office:value="10.2766" calcext:value-type="float">
            <text:p>10.2766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531" calcext:value-type="float">
            <text:p>0.0531</text:p>
          </table:table-cell>
          <table:table-cell office:value-type="float" office:value="-0.3415" calcext:value-type="float">
            <text:p>-0.3415</text:p>
          </table:table-cell>
          <table:table-cell office:value-type="float" office:value="-0.0033" calcext:value-type="float">
            <text:p>-0.00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531" calcext:value-type="float">
            <text:p>0.0531</text:p>
          </table:table-cell>
          <table:table-cell office:value-type="float" office:value="-0.3415" calcext:value-type="float">
            <text:p>-0.341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382" calcext:value-type="float">
            <text:p>0.238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382" calcext:value-type="float">
            <text:p>0.2382</text:p>
          </table:table-cell>
          <table:table-cell office:value-type="float" office:value="9.9469" calcext:value-type="float">
            <text:p>9.9469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1851" calcext:value-type="float">
            <text:p>0.185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1851" calcext:value-type="float">
            <text:p>0.1851</text:p>
          </table:table-cell>
          <table:table-cell office:value-type="float" office:value="9.7614" calcext:value-type="float">
            <text:p>9.7614</text:p>
          </table:table-cell>
          <table:table-cell office:value-type="float" office:value="-0.2386" calcext:value-type="float">
            <text:p>-0.2386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0535" calcext:value-type="float">
            <text:p>-0.05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9.8428" calcext:value-type="float">
            <text:p>9.8428</text:p>
          </table:table-cell>
          <table:table-cell office:value-type="float" office:value="-0.1572" calcext:value-type="float">
            <text:p>-0.1572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-0.2107" calcext:value-type="float">
            <text:p>-0.210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-0.2107" calcext:value-type="float">
            <text:p>-0.2107</text:p>
          </table:table-cell>
          <table:table-cell office:value-type="float" office:value="10.0688" calcext:value-type="float">
            <text:p>10.0688</text:p>
          </table:table-cell>
          <table:table-cell office:value-type="float" office:value="0.0688" calcext:value-type="float">
            <text:p>0.0688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2549" calcext:value-type="float">
            <text:p>-0.2549</text:p>
          </table:table-cell>
          <table:table-cell office:value-type="float" office:value="-0.1419" calcext:value-type="float">
            <text:p>-0.141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2549" calcext:value-type="float">
            <text:p>-0.2549</text:p>
          </table:table-cell>
          <table:table-cell office:value-type="float" office:value="-0.1419" calcext:value-type="float">
            <text:p>-0.1419</text:p>
          </table:table-cell>
          <table:table-cell office:value-type="float" office:value="10.2374" calcext:value-type="float">
            <text:p>10.237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72" calcext:value-type="float">
            <text:p>0.0172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955" calcext:value-type="float">
            <text:p>0.095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72" calcext:value-type="float">
            <text:p>0.0172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955" calcext:value-type="float">
            <text:p>0.0955</text:p>
          </table:table-cell>
          <table:table-cell office:value-type="float" office:value="10.1009" calcext:value-type="float">
            <text:p>10.100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166" calcext:value-type="float">
            <text:p>0.0166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0.1964" calcext:value-type="float">
            <text:p>0.196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0166" calcext:value-type="float">
            <text:p>0.0166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0.1964" calcext:value-type="float">
            <text:p>0.1964</text:p>
          </table:table-cell>
          <table:table-cell office:value-type="float" office:value="9.876" calcext:value-type="float">
            <text:p>9.87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724" calcext:value-type="float">
            <text:p>0.072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724" calcext:value-type="float">
            <text:p>0.0724</text:p>
          </table:table-cell>
          <table:table-cell office:value-type="float" office:value="9.8122" calcext:value-type="float">
            <text:p>9.8122</text:p>
          </table:table-cell>
          <table:table-cell office:value-type="float" office:value="-0.1878" calcext:value-type="float">
            <text:p>-0.1878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1154" calcext:value-type="float">
            <text:p>-0.115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1154" calcext:value-type="float">
            <text:p>-0.1154</text:p>
          </table:table-cell>
          <table:table-cell office:value-type="float" office:value="9.9462" calcext:value-type="float">
            <text:p>9.9462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1616" calcext:value-type="float">
            <text:p>-0.1616</text:p>
          </table:table-cell>
          <table:table-cell office:value-type="float" office:value="-0.1692" calcext:value-type="float">
            <text:p>-0.169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1616" calcext:value-type="float">
            <text:p>-0.1616</text:p>
          </table:table-cell>
          <table:table-cell office:value-type="float" office:value="-0.1692" calcext:value-type="float">
            <text:p>-0.1692</text:p>
          </table:table-cell>
          <table:table-cell office:value-type="float" office:value="10.1417" calcext:value-type="float">
            <text:p>10.1417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275" calcext:value-type="float">
            <text:p>-0.027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10.1688" calcext:value-type="float">
            <text:p>10.168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2031" calcext:value-type="float">
            <text:p>-0.2031</text:p>
          </table:table-cell>
          <table:table-cell office:value-type="float" office:value="0.1413" calcext:value-type="float">
            <text:p>0.141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2031" calcext:value-type="float">
            <text:p>-0.2031</text:p>
          </table:table-cell>
          <table:table-cell office:value-type="float" office:value="0.1413" calcext:value-type="float">
            <text:p>0.1413</text:p>
          </table:table-cell>
          <table:table-cell office:value-type="float" office:value="9.9945" calcext:value-type="float">
            <text:p>9.994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0.1358" calcext:value-type="float">
            <text:p>0.135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0.1358" calcext:value-type="float">
            <text:p>0.1358</text:p>
          </table:table-cell>
          <table:table-cell office:value-type="float" office:value="9.8456" calcext:value-type="float">
            <text:p>9.8456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86" calcext:value-type="float">
            <text:p>-0.018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9.8794" calcext:value-type="float">
            <text:p>9.8794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-0.1391" calcext:value-type="float">
            <text:p>-0.139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-0.1391" calcext:value-type="float">
            <text:p>-0.1391</text:p>
          </table:table-cell>
          <table:table-cell office:value-type="float" office:value="10.0339" calcext:value-type="float">
            <text:p>10.0339</text:p>
          </table:table-cell>
          <table:table-cell office:value-type="float" office:value="0.0339" calcext:value-type="float">
            <text:p>0.0339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052" calcext:value-type="float">
            <text:p>-0.105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10.1608" calcext:value-type="float">
            <text:p>10.1608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2317" calcext:value-type="float">
            <text:p>-0.2317</text:p>
          </table:table-cell>
          <table:table-cell office:value-type="float" office:value="0.0556" calcext:value-type="float">
            <text:p>0.055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2317" calcext:value-type="float">
            <text:p>-0.2317</text:p>
          </table:table-cell>
          <table:table-cell office:value-type="float" office:value="0.0556" calcext:value-type="float">
            <text:p>0.0556</text:p>
          </table:table-cell>
          <table:table-cell office:value-type="float" office:value="10.0778" calcext:value-type="float">
            <text:p>10.0778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1372" calcext:value-type="float">
            <text:p>-0.1372</text:p>
          </table:table-cell>
          <table:table-cell office:value-type="float" office:value="0.1335" calcext:value-type="float">
            <text:p>0.13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1372" calcext:value-type="float">
            <text:p>-0.1372</text:p>
          </table:table-cell>
          <table:table-cell office:value-type="float" office:value="0.1335" calcext:value-type="float">
            <text:p>0.1335</text:p>
          </table:table-cell>
          <table:table-cell office:value-type="float" office:value="9.9236" calcext:value-type="float">
            <text:p>9.9236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57" calcext:value-type="float">
            <text:p>0.05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57" calcext:value-type="float">
            <text:p>0.057</text:p>
          </table:table-cell>
          <table:table-cell office:value-type="float" office:value="9.863" calcext:value-type="float">
            <text:p>9.863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-0.08" calcext:value-type="float">
            <text:p>-0.0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-0.08" calcext:value-type="float">
            <text:p>-0.08</text:p>
          </table:table-cell>
          <table:table-cell office:value-type="float" office:value="9.9581" calcext:value-type="float">
            <text:p>9.9581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-0.1219" calcext:value-type="float">
            <text:p>-0.121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-0.1219" calcext:value-type="float">
            <text:p>-0.1219</text:p>
          </table:table-cell>
          <table:table-cell office:value-type="float" office:value="10.1033" calcext:value-type="float">
            <text:p>10.1033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2247" calcext:value-type="float">
            <text:p>-0.2247</text:p>
          </table:table-cell>
          <table:table-cell office:value-type="float" office:value="-0.0186" calcext:value-type="float">
            <text:p>-0.018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2247" calcext:value-type="float">
            <text:p>-0.2247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10.1191" calcext:value-type="float">
            <text:p>10.1191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0.1005" calcext:value-type="float">
            <text:p>0.100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0.1005" calcext:value-type="float">
            <text:p>0.1005</text:p>
          </table:table-cell>
          <table:table-cell office:value-type="float" office:value="9.9934" calcext:value-type="float">
            <text:p>9.9934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0939" calcext:value-type="float">
            <text:p>0.093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0939" calcext:value-type="float">
            <text:p>0.0939</text:p>
          </table:table-cell>
          <table:table-cell office:value-type="float" office:value="9.8914" calcext:value-type="float">
            <text:p>9.8914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147" calcext:value-type="float">
            <text:p>-0.014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9.9109" calcext:value-type="float">
            <text:p>9.9109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-0.1038" calcext:value-type="float">
            <text:p>-0.103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10.0308" calcext:value-type="float">
            <text:p>10.0308</text:p>
          </table:table-cell>
          <table:table-cell office:value-type="float" office:value="0.0308" calcext:value-type="float">
            <text:p>0.030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1946" calcext:value-type="float">
            <text:p>-0.1946</text:p>
          </table:table-cell>
          <table:table-cell office:value-type="float" office:value="-0.073" calcext:value-type="float">
            <text:p>-0.07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1946" calcext:value-type="float">
            <text:p>-0.1946</text:p>
          </table:table-cell>
          <table:table-cell office:value-type="float" office:value="-0.073" calcext:value-type="float">
            <text:p>-0.073</text:p>
          </table:table-cell>
          <table:table-cell office:value-type="float" office:value="10.1184" calcext:value-type="float">
            <text:p>10.11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2084" calcext:value-type="float">
            <text:p>-0.2084</text:p>
          </table:table-cell>
          <table:table-cell office:value-type="float" office:value="0.0454" calcext:value-type="float">
            <text:p>0.045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2084" calcext:value-type="float">
            <text:p>-0.2084</text:p>
          </table:table-cell>
          <table:table-cell office:value-type="float" office:value="0.0454" calcext:value-type="float">
            <text:p>0.0454</text:p>
          </table:table-cell>
          <table:table-cell office:value-type="float" office:value="10.0514" calcext:value-type="float">
            <text:p>10.0514</text:p>
          </table:table-cell>
          <table:table-cell office:value-type="float" office:value="0.0514" calcext:value-type="float">
            <text:p>0.051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1373" calcext:value-type="float">
            <text:p>-0.1373</text:p>
          </table:table-cell>
          <table:table-cell office:value-type="float" office:value="0.0968" calcext:value-type="float">
            <text:p>0.096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1373" calcext:value-type="float">
            <text:p>-0.1373</text:p>
          </table:table-cell>
          <table:table-cell office:value-type="float" office:value="0.0968" calcext:value-type="float">
            <text:p>0.0968</text:p>
          </table:table-cell>
          <table:table-cell office:value-type="float" office:value="9.9409" calcext:value-type="float">
            <text:p>9.9409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77" calcext:value-type="float">
            <text:p>0.037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77" calcext:value-type="float">
            <text:p>0.0377</text:p>
          </table:table-cell>
          <table:table-cell office:value-type="float" office:value="9.9012" calcext:value-type="float">
            <text:p>9.9012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-0.0611" calcext:value-type="float">
            <text:p>-0.061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9.9728" calcext:value-type="float">
            <text:p>9.9728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-0.0882" calcext:value-type="float">
            <text:p>-0.088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-0.0882" calcext:value-type="float">
            <text:p>-0.0882</text:p>
          </table:table-cell>
          <table:table-cell office:value-type="float" office:value="10.0797" calcext:value-type="float">
            <text:p>10.0797</text:p>
          </table:table-cell>
          <table:table-cell office:value-type="float" office:value="0.0797" calcext:value-type="float">
            <text:p>0.079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2047" calcext:value-type="float">
            <text:p>-0.2047</text:p>
          </table:table-cell>
          <table:table-cell office:value-type="float" office:value="-0.0085" calcext:value-type="float">
            <text:p>-0.008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2047" calcext:value-type="float">
            <text:p>-0.2047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0.0843" calcext:value-type="float">
            <text:p>10.0843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1711" calcext:value-type="float">
            <text:p>-0.1711</text:p>
          </table:table-cell>
          <table:table-cell office:value-type="float" office:value="0.0757" calcext:value-type="float">
            <text:p>0.075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1711" calcext:value-type="float">
            <text:p>-0.1711</text:p>
          </table:table-cell>
          <table:table-cell office:value-type="float" office:value="0.0757" calcext:value-type="float">
            <text:p>0.0757</text:p>
          </table:table-cell>
          <table:table-cell office:value-type="float" office:value="9.9906" calcext:value-type="float">
            <text:p>9.9906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1001" calcext:value-type="float">
            <text:p>-0.1001</text:p>
          </table:table-cell>
          <table:table-cell office:value-type="float" office:value="0.0663" calcext:value-type="float">
            <text:p>0.066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1001" calcext:value-type="float">
            <text:p>-0.1001</text:p>
          </table:table-cell>
          <table:table-cell office:value-type="float" office:value="0.0663" calcext:value-type="float">
            <text:p>0.0663</text:p>
          </table:table-cell>
          <table:table-cell office:value-type="float" office:value="9.9186" calcext:value-type="float">
            <text:p>9.9186</text:p>
          </table:table-cell>
          <table:table-cell office:value-type="float" office:value="-0.0814" calcext:value-type="float">
            <text:p>-0.0814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15" calcext:value-type="float">
            <text:p>-0.01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15" calcext:value-type="float">
            <text:p>-0.015</text:p>
          </table:table-cell>
          <table:table-cell office:value-type="float" office:value="9.9381" calcext:value-type="float">
            <text:p>9.9381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-0.0769" calcext:value-type="float">
            <text:p>-0.076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10.0273" calcext:value-type="float">
            <text:p>10.0273</text:p>
          </table:table-cell>
          <table:table-cell office:value-type="float" office:value="0.0273" calcext:value-type="float">
            <text:p>0.0273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0496" calcext:value-type="float">
            <text:p>-0.049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10.0864" calcext:value-type="float">
            <text:p>10.0864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0.0368" calcext:value-type="float">
            <text:p>0.036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0.0368" calcext:value-type="float">
            <text:p>0.0368</text:p>
          </table:table-cell>
          <table:table-cell office:value-type="float" office:value="10.033" calcext:value-type="float">
            <text:p>10.03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1366" calcext:value-type="float">
            <text:p>-0.1366</text:p>
          </table:table-cell>
          <table:table-cell office:value-type="float" office:value="0.0698" calcext:value-type="float">
            <text:p>0.069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1366" calcext:value-type="float">
            <text:p>-0.1366</text:p>
          </table:table-cell>
          <table:table-cell office:value-type="float" office:value="0.0698" calcext:value-type="float">
            <text:p>0.0698</text:p>
          </table:table-cell>
          <table:table-cell office:value-type="float" office:value="9.9542" calcext:value-type="float">
            <text:p>9.9542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24" calcext:value-type="float">
            <text:p>0.02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24" calcext:value-type="float">
            <text:p>0.024</text:p>
          </table:table-cell>
          <table:table-cell office:value-type="float" office:value="9.9286" calcext:value-type="float">
            <text:p>9.9286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474" calcext:value-type="float">
            <text:p>-0.047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9.9841" calcext:value-type="float">
            <text:p>9.9841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1567" calcext:value-type="float">
            <text:p>-0.1567</text:p>
          </table:table-cell>
          <table:table-cell office:value-type="float" office:value="-0.0633" calcext:value-type="float">
            <text:p>-0.06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1567" calcext:value-type="float">
            <text:p>-0.1567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10.0608" calcext:value-type="float">
            <text:p>10.0608</text:p>
          </table:table-cell>
          <table:table-cell office:value-type="float" office:value="0.0608" calcext:value-type="float">
            <text:p>0.0608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1897" calcext:value-type="float">
            <text:p>-0.1897</text:p>
          </table:table-cell>
          <table:table-cell office:value-type="float" office:value="-0.0025" calcext:value-type="float">
            <text:p>-0.002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1897" calcext:value-type="float">
            <text:p>-0.189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0.0595" calcext:value-type="float">
            <text:p>0.059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1624" calcext:value-type="float">
            <text:p>-0.1624</text:p>
          </table:table-cell>
          <table:table-cell office:value-type="float" office:value="0.057" calcext:value-type="float">
            <text:p>0.05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1624" calcext:value-type="float">
            <text:p>-0.1624</text:p>
          </table:table-cell>
          <table:table-cell office:value-type="float" office:value="0.057" calcext:value-type="float">
            <text:p>0.057</text:p>
          </table:table-cell>
          <table:table-cell office:value-type="float" office:value="9.9902" calcext:value-type="float">
            <text:p>9.9902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0.0472" calcext:value-type="float">
            <text:p>0.047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0.0472" calcext:value-type="float">
            <text:p>0.0472</text:p>
          </table:table-cell>
          <table:table-cell office:value-type="float" office:value="9.939" calcext:value-type="float">
            <text:p>9.93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0139" calcext:value-type="float">
            <text:p>-0.013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9.9567" calcext:value-type="float">
            <text:p>9.9567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1292" calcext:value-type="float">
            <text:p>-0.1292</text:p>
          </table:table-cell>
          <table:table-cell office:value-type="float" office:value="-0.0572" calcext:value-type="float">
            <text:p>-0.057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1292" calcext:value-type="float">
            <text:p>-0.1292</text:p>
          </table:table-cell>
          <table:table-cell office:value-type="float" office:value="-0.0572" calcext:value-type="float">
            <text:p>-0.0572</text:p>
          </table:table-cell>
          <table:table-cell office:value-type="float" office:value="10.0229" calcext:value-type="float">
            <text:p>10.0229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749" calcext:value-type="float">
            <text:p>-0.1749</text:p>
          </table:table-cell>
          <table:table-cell office:value-type="float" office:value="-0.0342" calcext:value-type="float">
            <text:p>-0.034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749" calcext:value-type="float">
            <text:p>-0.1749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10.0635" calcext:value-type="float">
            <text:p>10.0635</text:p>
          </table:table-cell>
          <table:table-cell office:value-type="float" office:value="0.0635" calcext:value-type="float">
            <text:p>0.063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1774" calcext:value-type="float">
            <text:p>-0.1774</text:p>
          </table:table-cell>
          <table:table-cell office:value-type="float" office:value="0.0293" calcext:value-type="float">
            <text:p>0.029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1774" calcext:value-type="float">
            <text:p>-0.1774</text:p>
          </table:table-cell>
          <table:table-cell office:value-type="float" office:value="0.0293" calcext:value-type="float">
            <text:p>0.0293</text:p>
          </table:table-cell>
          <table:table-cell office:value-type="float" office:value="10.022" calcext:value-type="float">
            <text:p>10.022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371" calcext:value-type="float">
            <text:p>-0.1371</text:p>
          </table:table-cell>
          <table:table-cell office:value-type="float" office:value="0.0513" calcext:value-type="float">
            <text:p>0.051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1371" calcext:value-type="float">
            <text:p>-0.1371</text:p>
          </table:table-cell>
          <table:table-cell office:value-type="float" office:value="0.0513" calcext:value-type="float">
            <text:p>0.0513</text:p>
          </table:table-cell>
          <table:table-cell office:value-type="float" office:value="9.9642" calcext:value-type="float">
            <text:p>9.9642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0.0154" calcext:value-type="float">
            <text:p>0.015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0.0154" calcext:value-type="float">
            <text:p>0.0154</text:p>
          </table:table-cell>
          <table:table-cell office:value-type="float" office:value="9.9479" calcext:value-type="float">
            <text:p>9.9479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-0.0367" calcext:value-type="float">
            <text:p>-0.036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9.9908" calcext:value-type="float">
            <text:p>9.9908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1557" calcext:value-type="float">
            <text:p>-0.1557</text:p>
          </table:table-cell>
          <table:table-cell office:value-type="float" office:value="-0.0459" calcext:value-type="float">
            <text:p>-0.045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1557" calcext:value-type="float">
            <text:p>-0.1557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10.0462" calcext:value-type="float">
            <text:p>10.0462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784" calcext:value-type="float">
            <text:p>-0.1784</text:p>
          </table:table-cell>
          <table:table-cell office:value-type="float" office:value="0.0004" calcext:value-type="float">
            <text:p>0.000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784" calcext:value-type="float">
            <text:p>-0.178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.0424" calcext:value-type="float">
            <text:p>10.0424</text:p>
          </table:table-cell>
          <table:table-cell office:value-type="float" office:value="0.0424" calcext:value-type="float">
            <text:p>0.0424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0.0428" calcext:value-type="float">
            <text:p>0.042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0.0428" calcext:value-type="float">
            <text:p>0.0428</text:p>
          </table:table-cell>
          <table:table-cell office:value-type="float" office:value="9.9911" calcext:value-type="float">
            <text:p>9.9911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0.0339" calcext:value-type="float">
            <text:p>0.033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0.0339" calcext:value-type="float">
            <text:p>0.0339</text:p>
          </table:table-cell>
          <table:table-cell office:value-type="float" office:value="9.954" calcext:value-type="float">
            <text:p>9.95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1076" calcext:value-type="float">
            <text:p>-0.1076</text:p>
          </table:table-cell>
          <table:table-cell office:value-type="float" office:value="-0.0121" calcext:value-type="float">
            <text:p>-0.012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1076" calcext:value-type="float">
            <text:p>-0.1076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9.9694" calcext:value-type="float">
            <text:p>9.9694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1351" calcext:value-type="float">
            <text:p>-0.1351</text:p>
          </table:table-cell>
          <table:table-cell office:value-type="float" office:value="-0.0427" calcext:value-type="float">
            <text:p>-0.042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1351" calcext:value-type="float">
            <text:p>-0.1351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10.0188" calcext:value-type="float">
            <text:p>10.0188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684" calcext:value-type="float">
            <text:p>-0.1684</text:p>
          </table:table-cell>
          <table:table-cell office:value-type="float" office:value="-0.024" calcext:value-type="float">
            <text:p>-0.02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438" calcext:value-type="float">
            <text:p>0.6438</text:p>
          </table:table-cell>
          <table:table-cell office:value-type="float" office:value="-0.6195" calcext:value-type="float">
            <text:p>-0.6195</text:p>
          </table:table-cell>
          <table:table-cell office:value-type="float" office:value="-0.3548" calcext:value-type="float">
            <text:p>-0.3548</text:p>
          </table:table-cell>
          <table:table-cell office:value-type="float" office:value="0.5489" calcext:value-type="float">
            <text:p>0.5489</text:p>
          </table:table-cell>
          <table:table-cell office:value-type="float" office:value="10.0389" calcext:value-type="float">
            <text:p>10.0389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848" calcext:value-type="float">
            <text:p>-0.1848</text:p>
          </table:table-cell>
          <table:table-cell office:value-type="float" office:value="-0.9036" calcext:value-type="float">
            <text:p>-0.903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5878" calcext:value-type="float">
            <text:p>0.587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1848" calcext:value-type="float">
            <text:p>-0.1848</text:p>
          </table:table-cell>
          <table:table-cell office:value-type="float" office:value="-0.9036" calcext:value-type="float">
            <text:p>-0.903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5878" calcext:value-type="float">
            <text:p>0.5878</text:p>
          </table:table-cell>
          <table:table-cell office:value-type="float" office:value="8.9357" calcext:value-type="float">
            <text:p>8.9357</text:p>
          </table:table-cell>
          <table:table-cell office:value-type="float" office:value="-1.0643" calcext:value-type="float">
            <text:p>-1.0643</text:p>
          </table:table-cell>
          <table:table-cell office:value-type="float" office:value="-0.8473" calcext:value-type="float">
            <text:p>-0.8473</text:p>
          </table:table-cell>
          <table:table-cell office:value-type="float" office:value="-0.3169" calcext:value-type="float">
            <text:p>-0.3169</text:p>
          </table:table-cell>
          <table:table-cell office:value-type="float" office:value="0.2692" calcext:value-type="float">
            <text:p>0.2692</text:p>
          </table:table-cell>
          <table:table-cell office:value-type="float" office:value="-0.4765" calcext:value-type="float">
            <text:p>-0.476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8473" calcext:value-type="float">
            <text:p>-0.8473</text:p>
          </table:table-cell>
          <table:table-cell office:value-type="float" office:value="-0.3169" calcext:value-type="float">
            <text:p>-0.3169</text:p>
          </table:table-cell>
          <table:table-cell office:value-type="float" office:value="0.2692" calcext:value-type="float">
            <text:p>0.2692</text:p>
          </table:table-cell>
          <table:table-cell office:value-type="float" office:value="-0.4765" calcext:value-type="float">
            <text:p>-0.4765</text:p>
          </table:table-cell>
          <table:table-cell office:value-type="float" office:value="9.3764" calcext:value-type="float">
            <text:p>9.3764</text:p>
          </table:table-cell>
          <table:table-cell office:value-type="float" office:value="-0.6236" calcext:value-type="float">
            <text:p>-0.6236</text:p>
          </table:table-cell>
          <table:table-cell office:value-type="float" office:value="-0.7172" calcext:value-type="float">
            <text:p>-0.7172</text:p>
          </table:table-cell>
          <table:table-cell office:value-type="float" office:value="0.5595" calcext:value-type="float">
            <text:p>0.5595</text:p>
          </table:table-cell>
          <table:table-cell office:value-type="float" office:value="-0.519" calcext:value-type="float">
            <text:p>-0.519</text:p>
          </table:table-cell>
          <table:table-cell office:value-type="float" office:value="-1.1001" calcext:value-type="float">
            <text:p>-1.100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0.7172" calcext:value-type="float">
            <text:p>-0.7172</text:p>
          </table:table-cell>
          <table:table-cell office:value-type="float" office:value="0.5595" calcext:value-type="float">
            <text:p>0.5595</text:p>
          </table:table-cell>
          <table:table-cell office:value-type="float" office:value="-0.519" calcext:value-type="float">
            <text:p>-0.519</text:p>
          </table:table-cell>
          <table:table-cell office:value-type="float" office:value="-1.1001" calcext:value-type="float">
            <text:p>-1.1001</text:p>
          </table:table-cell>
          <table:table-cell office:value-type="float" office:value="11.1516" calcext:value-type="float">
            <text:p>11.1516</text:p>
          </table:table-cell>
          <table:table-cell office:value-type="float" office:value="1.1516" calcext:value-type="float">
            <text:p>1.1516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8623" calcext:value-type="float">
            <text:p>0.8623</text:p>
          </table:table-cell>
          <table:table-cell office:value-type="float" office:value="-1.0433" calcext:value-type="float">
            <text:p>-1.0433</text:p>
          </table:table-cell>
          <table:table-cell office:value-type="float" office:value="0.0515" calcext:value-type="float">
            <text:p>0.0515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8623" calcext:value-type="float">
            <text:p>0.8623</text:p>
          </table:table-cell>
          <table:table-cell office:value-type="float" office:value="-1.0433" calcext:value-type="float">
            <text:p>-1.0433</text:p>
          </table:table-cell>
          <table:table-cell office:value-type="float" office:value="0.0515" calcext:value-type="float">
            <text:p>0.0515</text:p>
          </table:table-cell>
          <table:table-cell office:value-type="float" office:value="11.2967" calcext:value-type="float">
            <text:p>11.2967</text:p>
          </table:table-cell>
          <table:table-cell office:value-type="float" office:value="1.2967" calcext:value-type="float">
            <text:p>1.2967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401" calcext:value-type="float">
            <text:p>0.3401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1.3481" calcext:value-type="float">
            <text:p>1.348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401" calcext:value-type="float">
            <text:p>0.3401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1.3481" calcext:value-type="float">
            <text:p>1.3481</text:p>
          </table:table-cell>
          <table:table-cell office:value-type="float" office:value="9.1513" calcext:value-type="float">
            <text:p>9.1513</text:p>
          </table:table-cell>
          <table:table-cell office:value-type="float" office:value="-0.8487" calcext:value-type="float">
            <text:p>-0.8487</text:p>
          </table:table-cell>
          <table:table-cell office:value-type="float" office:value="0.664" calcext:value-type="float">
            <text:p>0.664</text:p>
          </table:table-cell>
          <table:table-cell office:value-type="float" office:value="-0.4397" calcext:value-type="float">
            <text:p>-0.4397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4994" calcext:value-type="float">
            <text:p>0.499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64" calcext:value-type="float">
            <text:p>0.664</text:p>
          </table:table-cell>
          <table:table-cell office:value-type="float" office:value="-0.4397" calcext:value-type="float">
            <text:p>-0.4397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9.6722" calcext:value-type="float">
            <text:p>9.6722</text:p>
          </table:table-cell>
          <table:table-cell office:value-type="float" office:value="-0.3278" calcext:value-type="float">
            <text:p>-0.3278</text:p>
          </table:table-cell>
          <table:table-cell office:value-type="float" office:value="0.0185" calcext:value-type="float">
            <text:p>0.0185</text:p>
          </table:table-cell>
          <table:table-cell office:value-type="float" office:value="-0.7468" calcext:value-type="float">
            <text:p>-0.7468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1716" calcext:value-type="float">
            <text:p>0.171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185" calcext:value-type="float">
            <text:p>0.0185</text:p>
          </table:table-cell>
          <table:table-cell office:value-type="float" office:value="-0.7468" calcext:value-type="float">
            <text:p>-0.7468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1716" calcext:value-type="float">
            <text:p>0.1716</text:p>
          </table:table-cell>
          <table:table-cell office:value-type="float" office:value="8.7819" calcext:value-type="float">
            <text:p>8.7819</text:p>
          </table:table-cell>
          <table:table-cell office:value-type="float" office:value="-1.2181" calcext:value-type="float">
            <text:p>-1.2181</text:p>
          </table:table-cell>
          <table:table-cell office:value-type="float" office:value="-0.5775" calcext:value-type="float">
            <text:p>-0.5775</text:p>
          </table:table-cell>
          <table:table-cell office:value-type="float" office:value="-0.3467" calcext:value-type="float">
            <text:p>-0.3467</text:p>
          </table:table-cell>
          <table:table-cell office:value-type="float" office:value="0.4783" calcext:value-type="float">
            <text:p>0.4783</text:p>
          </table:table-cell>
          <table:table-cell office:value-type="float" office:value="-1.0466" calcext:value-type="float">
            <text:p>-1.046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5775" calcext:value-type="float">
            <text:p>-0.5775</text:p>
          </table:table-cell>
          <table:table-cell office:value-type="float" office:value="-0.3467" calcext:value-type="float">
            <text:p>-0.3467</text:p>
          </table:table-cell>
          <table:table-cell office:value-type="float" office:value="0.4783" calcext:value-type="float">
            <text:p>0.4783</text:p>
          </table:table-cell>
          <table:table-cell office:value-type="float" office:value="-1.0466" calcext:value-type="float">
            <text:p>-1.0466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0.1858" calcext:value-type="float">
            <text:p>0.1858</text:p>
          </table:table-cell>
          <table:table-cell office:value-type="float" office:value="-0.5907" calcext:value-type="float">
            <text:p>-0.5907</text:p>
          </table:table-cell>
          <table:table-cell office:value-type="float" office:value="0.3349" calcext:value-type="float">
            <text:p>0.3349</text:p>
          </table:table-cell>
          <table:table-cell office:value-type="float" office:value="-0.4753" calcext:value-type="float">
            <text:p>-0.4753</text:p>
          </table:table-cell>
          <table:table-cell office:value-type="float" office:value="-0.8607" calcext:value-type="float">
            <text:p>-0.860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0.5907" calcext:value-type="float">
            <text:p>-0.5907</text:p>
          </table:table-cell>
          <table:table-cell office:value-type="float" office:value="0.3349" calcext:value-type="float">
            <text:p>0.3349</text:p>
          </table:table-cell>
          <table:table-cell office:value-type="float" office:value="-0.4753" calcext:value-type="float">
            <text:p>-0.4753</text:p>
          </table:table-cell>
          <table:table-cell office:value-type="float" office:value="-0.8607" calcext:value-type="float">
            <text:p>-0.8607</text:p>
          </table:table-cell>
          <table:table-cell office:value-type="float" office:value="10.8409" calcext:value-type="float">
            <text:p>10.8409</text:p>
          </table:table-cell>
          <table:table-cell office:value-type="float" office:value="0.8409" calcext:value-type="float">
            <text:p>0.8409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638" calcext:value-type="float">
            <text:p>0.638</text:p>
          </table:table-cell>
          <table:table-cell office:value-type="float" office:value="-0.9156" calcext:value-type="float">
            <text:p>-0.9156</text:p>
          </table:table-cell>
          <table:table-cell office:value-type="float" office:value="-0.0198" calcext:value-type="float">
            <text:p>-0.019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638" calcext:value-type="float">
            <text:p>0.638</text:p>
          </table:table-cell>
          <table:table-cell office:value-type="float" office:value="-0.9156" calcext:value-type="float">
            <text:p>-0.9156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10.977" calcext:value-type="float">
            <text:p>10.977</text:p>
          </table:table-cell>
          <table:table-cell office:value-type="float" office:value="0.977" calcext:value-type="float">
            <text:p>0.977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264" calcext:value-type="float">
            <text:p>0.3264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0.9572" calcext:value-type="float">
            <text:p>0.957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264" calcext:value-type="float">
            <text:p>0.3264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0.9572" calcext:value-type="float">
            <text:p>0.9572</text:p>
          </table:table-cell>
          <table:table-cell office:value-type="float" office:value="9.7941" calcext:value-type="float">
            <text:p>9.7941</text:p>
          </table:table-cell>
          <table:table-cell office:value-type="float" office:value="-0.2059" calcext:value-type="float">
            <text:p>-0.2059</text:p>
          </table:table-cell>
          <table:table-cell office:value-type="float" office:value="0.5118" calcext:value-type="float">
            <text:p>0.5118</text:p>
          </table:table-cell>
          <table:table-cell office:value-type="float" office:value="-0.2465" calcext:value-type="float">
            <text:p>-0.246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7513" calcext:value-type="float">
            <text:p>0.751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118" calcext:value-type="float">
            <text:p>0.5118</text:p>
          </table:table-cell>
          <table:table-cell office:value-type="float" office:value="-0.2465" calcext:value-type="float">
            <text:p>-0.246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7513" calcext:value-type="float">
            <text:p>0.7513</text:p>
          </table:table-cell>
          <table:table-cell office:value-type="float" office:value="9.3976" calcext:value-type="float">
            <text:p>9.3976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1489" calcext:value-type="float">
            <text:p>0.148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1489" calcext:value-type="float">
            <text:p>0.1489</text:p>
          </table:table-cell>
          <table:table-cell office:value-type="float" office:value="9.083" calcext:value-type="float">
            <text:p>9.083</text:p>
          </table:table-cell>
          <table:table-cell office:value-type="float" office:value="-0.917" calcext:value-type="float">
            <text:p>-0.917</text:p>
          </table:table-cell>
          <table:table-cell office:value-type="float" office:value="-0.3564" calcext:value-type="float">
            <text:p>-0.3564</text:p>
          </table:table-cell>
          <table:table-cell office:value-type="float" office:value="-0.2952" calcext:value-type="float">
            <text:p>-0.2952</text:p>
          </table:table-cell>
          <table:table-cell office:value-type="float" office:value="0.5479" calcext:value-type="float">
            <text:p>0.5479</text:p>
          </table:table-cell>
          <table:table-cell office:value-type="float" office:value="-0.7681" calcext:value-type="float">
            <text:p>-0.768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0.3564" calcext:value-type="float">
            <text:p>-0.3564</text:p>
          </table:table-cell>
          <table:table-cell office:value-type="float" office:value="-0.2952" calcext:value-type="float">
            <text:p>-0.2952</text:p>
          </table:table-cell>
          <table:table-cell office:value-type="float" office:value="0.5479" calcext:value-type="float">
            <text:p>0.5479</text:p>
          </table:table-cell>
          <table:table-cell office:value-type="float" office:value="-0.7681" calcext:value-type="float">
            <text:p>-0.7681</text:p>
          </table:table-cell>
          <table:table-cell office:value-type="float" office:value="9.9164" calcext:value-type="float">
            <text:p>9.9164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4228" calcext:value-type="float">
            <text:p>-0.4228</text:p>
          </table:table-cell>
          <table:table-cell office:value-type="float" office:value="0.1827" calcext:value-type="float">
            <text:p>0.1827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-0.8516" calcext:value-type="float">
            <text:p>-0.851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4228" calcext:value-type="float">
            <text:p>-0.4228</text:p>
          </table:table-cell>
          <table:table-cell office:value-type="float" office:value="0.1827" calcext:value-type="float">
            <text:p>0.1827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-0.8516" calcext:value-type="float">
            <text:p>-0.8516</text:p>
          </table:table-cell>
          <table:table-cell office:value-type="float" office:value="10.766" calcext:value-type="float">
            <text:p>10.766</text:p>
          </table:table-cell>
          <table:table-cell office:value-type="float" office:value="0.766" calcext:value-type="float">
            <text:p>0.766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0.4321" calcext:value-type="float">
            <text:p>0.4321</text:p>
          </table:table-cell>
          <table:table-cell office:value-type="float" office:value="-0.7305" calcext:value-type="float">
            <text:p>-0.7305</text:p>
          </table:table-cell>
          <table:table-cell office:value-type="float" office:value="-0.0856" calcext:value-type="float">
            <text:p>-0.085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0.4321" calcext:value-type="float">
            <text:p>0.4321</text:p>
          </table:table-cell>
          <table:table-cell office:value-type="float" office:value="-0.7305" calcext:value-type="float">
            <text:p>-0.7305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10.7084" calcext:value-type="float">
            <text:p>10.7084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2527" calcext:value-type="float">
            <text:p>0.2527</text:p>
          </table:table-cell>
          <table:table-cell office:value-type="float" office:value="-0.4619" calcext:value-type="float">
            <text:p>-0.4619</text:p>
          </table:table-cell>
          <table:table-cell office:value-type="float" office:value="0.6228" calcext:value-type="float">
            <text:p>0.622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2527" calcext:value-type="float">
            <text:p>0.2527</text:p>
          </table:table-cell>
          <table:table-cell office:value-type="float" office:value="-0.4619" calcext:value-type="float">
            <text:p>-0.4619</text:p>
          </table:table-cell>
          <table:table-cell office:value-type="float" office:value="0.6228" calcext:value-type="float">
            <text:p>0.6228</text:p>
          </table:table-cell>
          <table:table-cell office:value-type="float" office:value="10.2224" calcext:value-type="float">
            <text:p>10.222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492" calcext:value-type="float">
            <text:p>0.3492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8451" calcext:value-type="float">
            <text:p>0.845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3492" calcext:value-type="float">
            <text:p>0.3492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8451" calcext:value-type="float">
            <text:p>0.8451</text:p>
          </table:table-cell>
          <table:table-cell office:value-type="float" office:value="9.2406" calcext:value-type="float">
            <text:p>9.2406</text:p>
          </table:table-cell>
          <table:table-cell office:value-type="float" office:value="-0.7594" calcext:value-type="float">
            <text:p>-0.7594</text:p>
          </table:table-cell>
          <table:table-cell office:value-type="float" office:value="0.0932" calcext:value-type="float">
            <text:p>0.0932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0857" calcext:value-type="float">
            <text:p>0.085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932" calcext:value-type="float">
            <text:p>0.0932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0857" calcext:value-type="float">
            <text:p>0.0857</text:p>
          </table:table-cell>
          <table:table-cell office:value-type="float" office:value="9.3559" calcext:value-type="float">
            <text:p>9.3559</text:p>
          </table:table-cell>
          <table:table-cell office:value-type="float" office:value="-0.6441" calcext:value-type="float">
            <text:p>-0.6441</text:p>
          </table:table-cell>
          <table:table-cell office:value-type="float" office:value="-0.2057" calcext:value-type="float">
            <text:p>-0.2057</text:p>
          </table:table-cell>
          <table:table-cell office:value-type="float" office:value="-0.2046" calcext:value-type="float">
            <text:p>-0.2046</text:p>
          </table:table-cell>
          <table:table-cell office:value-type="float" office:value="0.5011" calcext:value-type="float">
            <text:p>0.5011</text:p>
          </table:table-cell>
          <table:table-cell office:value-type="float" office:value="-0.5584" calcext:value-type="float">
            <text:p>-0.558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0.2057" calcext:value-type="float">
            <text:p>-0.2057</text:p>
          </table:table-cell>
          <table:table-cell office:value-type="float" office:value="-0.2046" calcext:value-type="float">
            <text:p>-0.2046</text:p>
          </table:table-cell>
          <table:table-cell office:value-type="float" office:value="0.5011" calcext:value-type="float">
            <text:p>0.5011</text:p>
          </table:table-cell>
          <table:table-cell office:value-type="float" office:value="-0.5584" calcext:value-type="float">
            <text:p>-0.5584</text:p>
          </table:table-cell>
          <table:table-cell office:value-type="float" office:value="9.8335" calcext:value-type="float">
            <text:p>9.8335</text:p>
          </table:table-cell>
          <table:table-cell office:value-type="float" office:value="-0.1665" calcext:value-type="float">
            <text:p>-0.1665</text:p>
          </table:table-cell>
          <table:table-cell office:value-type="float" office:value="-0.2656" calcext:value-type="float">
            <text:p>-0.2656</text:p>
          </table:table-cell>
          <table:table-cell office:value-type="float" office:value="0.1015" calcext:value-type="float">
            <text:p>0.1015</text:p>
          </table:table-cell>
          <table:table-cell office:value-type="float" office:value="-0.1405" calcext:value-type="float">
            <text:p>-0.1405</text:p>
          </table:table-cell>
          <table:table-cell office:value-type="float" office:value="-0.7249" calcext:value-type="float">
            <text:p>-0.724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0.2656" calcext:value-type="float">
            <text:p>-0.2656</text:p>
          </table:table-cell>
          <table:table-cell office:value-type="float" office:value="0.1015" calcext:value-type="float">
            <text:p>0.1015</text:p>
          </table:table-cell>
          <table:table-cell office:value-type="float" office:value="-0.1405" calcext:value-type="float">
            <text:p>-0.1405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10.6011" calcext:value-type="float">
            <text:p>10.6011</text:p>
          </table:table-cell>
          <table:table-cell office:value-type="float" office:value="0.6011" calcext:value-type="float">
            <text:p>0.6011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266" calcext:value-type="float">
            <text:p>0.266</text:p>
          </table:table-cell>
          <table:table-cell office:value-type="float" office:value="-0.5649" calcext:value-type="float">
            <text:p>-0.5649</text:p>
          </table:table-cell>
          <table:table-cell office:value-type="float" office:value="-0.1238" calcext:value-type="float">
            <text:p>-0.123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266" calcext:value-type="float">
            <text:p>0.266</text:p>
          </table:table-cell>
          <table:table-cell office:value-type="float" office:value="-0.5649" calcext:value-type="float">
            <text:p>-0.5649</text:p>
          </table:table-cell>
          <table:table-cell office:value-type="float" office:value="-0.1238" calcext:value-type="float">
            <text:p>-0.1238</text:p>
          </table:table-cell>
          <table:table-cell office:value-type="float" office:value="10.51" calcext:value-type="float">
            <text:p>10.51</text:p>
          </table:table-cell>
          <table:table-cell office:value-type="float" office:value="0.51" calcext:value-type="float">
            <text:p>0.51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1565" calcext:value-type="float">
            <text:p>0.1565</text:p>
          </table:table-cell>
          <table:table-cell office:value-type="float" office:value="-0.4337" calcext:value-type="float">
            <text:p>-0.4337</text:p>
          </table:table-cell>
          <table:table-cell office:value-type="float" office:value="0.3862" calcext:value-type="float">
            <text:p>0.386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1565" calcext:value-type="float">
            <text:p>0.1565</text:p>
          </table:table-cell>
          <table:table-cell office:value-type="float" office:value="-0.4337" calcext:value-type="float">
            <text:p>-0.4337</text:p>
          </table:table-cell>
          <table:table-cell office:value-type="float" office:value="0.3862" calcext:value-type="float">
            <text:p>0.3862</text:p>
          </table:table-cell>
          <table:table-cell office:value-type="float" office:value="10.2591" calcext:value-type="float">
            <text:p>10.259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2024" calcext:value-type="float">
            <text:p>0.2024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6453" calcext:value-type="float">
            <text:p>0.645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2024" calcext:value-type="float">
            <text:p>0.2024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6453" calcext:value-type="float">
            <text:p>0.6453</text:p>
          </table:table-cell>
          <table:table-cell office:value-type="float" office:value="9.4899" calcext:value-type="float">
            <text:p>9.4899</text:p>
          </table:table-cell>
          <table:table-cell office:value-type="float" office:value="-0.5101" calcext:value-type="float">
            <text:p>-0.5101</text:p>
          </table:table-cell>
          <table:table-cell office:value-type="float" office:value="0.047" calcext:value-type="float">
            <text:p>0.047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1352" calcext:value-type="float">
            <text:p>0.135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047" calcext:value-type="float">
            <text:p>0.047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1352" calcext:value-type="float">
            <text:p>0.1352</text:p>
          </table:table-cell>
          <table:table-cell office:value-type="float" office:value="9.5078" calcext:value-type="float">
            <text:p>9.5078</text:p>
          </table:table-cell>
          <table:table-cell office:value-type="float" office:value="-0.4922" calcext:value-type="float">
            <text:p>-0.4922</text:p>
          </table:table-cell>
          <table:table-cell office:value-type="float" office:value="-0.1282" calcext:value-type="float">
            <text:p>-0.128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3613" calcext:value-type="float">
            <text:p>0.3613</text:p>
          </table:table-cell>
          <table:table-cell office:value-type="float" office:value="-0.357" calcext:value-type="float">
            <text:p>-0.35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0.1282" calcext:value-type="float">
            <text:p>-0.128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3613" calcext:value-type="float">
            <text:p>0.3613</text:p>
          </table:table-cell>
          <table:table-cell office:value-type="float" office:value="-0.357" calcext:value-type="float">
            <text:p>-0.357</text:p>
          </table:table-cell>
          <table:table-cell office:value-type="float" office:value="9.8079" calcext:value-type="float">
            <text:p>9.8079</text:p>
          </table:table-cell>
          <table:table-cell office:value-type="float" office:value="-0.1921" calcext:value-type="float">
            <text:p>-0.1921</text:p>
          </table:table-cell>
          <table:table-cell office:value-type="float" office:value="-0.1521" calcext:value-type="float">
            <text:p>-0.1521</text:p>
          </table:table-cell>
          <table:table-cell office:value-type="float" office:value="0.0742" calcext:value-type="float">
            <text:p>0.0742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-0.5491" calcext:value-type="float">
            <text:p>-0.549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0.1521" calcext:value-type="float">
            <text:p>-0.1521</text:p>
          </table:table-cell>
          <table:table-cell office:value-type="float" office:value="0.0742" calcext:value-type="float">
            <text:p>0.0742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-0.5491" calcext:value-type="float">
            <text:p>-0.5491</text:p>
          </table:table-cell>
          <table:table-cell office:value-type="float" office:value="10.4282" calcext:value-type="float">
            <text:p>10.4282</text:p>
          </table:table-cell>
          <table:table-cell office:value-type="float" office:value="0.4282" calcext:value-type="float">
            <text:p>0.4282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1598" calcext:value-type="float">
            <text:p>0.1598</text:p>
          </table:table-cell>
          <table:table-cell office:value-type="float" office:value="-0.4267" calcext:value-type="float">
            <text:p>-0.4267</text:p>
          </table:table-cell>
          <table:table-cell office:value-type="float" office:value="-0.1209" calcext:value-type="float">
            <text:p>-0.120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1598" calcext:value-type="float">
            <text:p>0.1598</text:p>
          </table:table-cell>
          <table:table-cell office:value-type="float" office:value="-0.4267" calcext:value-type="float">
            <text:p>-0.426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0.3946" calcext:value-type="float">
            <text:p>10.394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751" calcext:value-type="float">
            <text:p>0.0751</text:p>
          </table:table-cell>
          <table:table-cell office:value-type="float" office:value="-0.3503" calcext:value-type="float">
            <text:p>-0.3503</text:p>
          </table:table-cell>
          <table:table-cell office:value-type="float" office:value="0.2737" calcext:value-type="float">
            <text:p>0.273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751" calcext:value-type="float">
            <text:p>0.0751</text:p>
          </table:table-cell>
          <table:table-cell office:value-type="float" office:value="-0.3503" calcext:value-type="float">
            <text:p>-0.3503</text:p>
          </table:table-cell>
          <table:table-cell office:value-type="float" office:value="0.2737" calcext:value-type="float">
            <text:p>0.2737</text:p>
          </table:table-cell>
          <table:table-cell office:value-type="float" office:value="10.157" calcext:value-type="float">
            <text:p>10.15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039" calcext:value-type="float">
            <text:p>0.1039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4307" calcext:value-type="float">
            <text:p>0.430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1039" calcext:value-type="float">
            <text:p>0.1039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4307" calcext:value-type="float">
            <text:p>0.4307</text:p>
          </table:table-cell>
          <table:table-cell office:value-type="float" office:value="9.6957" calcext:value-type="float">
            <text:p>9.6957</text:p>
          </table:table-cell>
          <table:table-cell office:value-type="float" office:value="-0.3043" calcext:value-type="float">
            <text:p>-0.304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1265" calcext:value-type="float">
            <text:p>0.126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1265" calcext:value-type="float">
            <text:p>0.1265</text:p>
          </table:table-cell>
          <table:table-cell office:value-type="float" office:value="9.6109" calcext:value-type="float">
            <text:p>9.6109</text:p>
          </table:table-cell>
          <table:table-cell office:value-type="float" office:value="-0.3891" calcext:value-type="float">
            <text:p>-0.3891</text:p>
          </table:table-cell>
          <table:table-cell office:value-type="float" office:value="-0.0922" calcext:value-type="float">
            <text:p>-0.092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2125" calcext:value-type="float">
            <text:p>0.2125</text:p>
          </table:table-cell>
          <table:table-cell office:value-type="float" office:value="-0.2626" calcext:value-type="float">
            <text:p>-0.262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-0.0922" calcext:value-type="float">
            <text:p>-0.092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2125" calcext:value-type="float">
            <text:p>0.2125</text:p>
          </table:table-cell>
          <table:table-cell office:value-type="float" office:value="-0.2626" calcext:value-type="float">
            <text:p>-0.2626</text:p>
          </table:table-cell>
          <table:table-cell office:value-type="float" office:value="9.8642" calcext:value-type="float">
            <text:p>9.8642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0695" calcext:value-type="float">
            <text:p>0.0695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3984" calcext:value-type="float">
            <text:p>-0.398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0695" calcext:value-type="float">
            <text:p>0.0695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3984" calcext:value-type="float">
            <text:p>-0.3984</text:p>
          </table:table-cell>
          <table:table-cell office:value-type="float" office:value="10.3278" calcext:value-type="float">
            <text:p>10.3278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949" calcext:value-type="float">
            <text:p>0.0949</text:p>
          </table:table-cell>
          <table:table-cell office:value-type="float" office:value="-0.3524" calcext:value-type="float">
            <text:p>-0.3524</text:p>
          </table:table-cell>
          <table:table-cell office:value-type="float" office:value="-0.0705" calcext:value-type="float">
            <text:p>-0.070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949" calcext:value-type="float">
            <text:p>0.0949</text:p>
          </table:table-cell>
          <table:table-cell office:value-type="float" office:value="-0.3524" calcext:value-type="float">
            <text:p>-0.352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2638" calcext:value-type="float">
            <text:p>-0.2638</text:p>
          </table:table-cell>
          <table:table-cell office:value-type="float" office:value="0.2477" calcext:value-type="float">
            <text:p>0.247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2638" calcext:value-type="float">
            <text:p>-0.2638</text:p>
          </table:table-cell>
          <table:table-cell office:value-type="float" office:value="0.2477" calcext:value-type="float">
            <text:p>0.2477</text:p>
          </table:table-cell>
          <table:table-cell office:value-type="float" office:value="10.0353" calcext:value-type="float">
            <text:p>10.0353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411" calcext:value-type="float">
            <text:p>0.0411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283" calcext:value-type="float">
            <text:p>0.28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0411" calcext:value-type="float">
            <text:p>0.0411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283" calcext:value-type="float">
            <text:p>0.283</text:p>
          </table:table-cell>
          <table:table-cell office:value-type="float" office:value="9.728" calcext:value-type="float">
            <text:p>9.728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011" calcext:value-type="float">
            <text:p>0.01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011" calcext:value-type="float">
            <text:p>0.011</text:p>
          </table:table-cell>
          <table:table-cell office:value-type="float" office:value="9.7547" calcext:value-type="float">
            <text:p>9.7547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2343" calcext:value-type="float">
            <text:p>-0.234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2343" calcext:value-type="float">
            <text:p>-0.2343</text:p>
          </table:table-cell>
          <table:table-cell office:value-type="float" office:value="9.9695" calcext:value-type="float">
            <text:p>9.969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629" calcext:value-type="float">
            <text:p>0.0629</text:p>
          </table:table-cell>
          <table:table-cell office:value-type="float" office:value="-0.2126" calcext:value-type="float">
            <text:p>-0.2126</text:p>
          </table:table-cell>
          <table:table-cell office:value-type="float" office:value="-0.2648" calcext:value-type="float">
            <text:p>-0.264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629" calcext:value-type="float">
            <text:p>0.0629</text:p>
          </table:table-cell>
          <table:table-cell office:value-type="float" office:value="-0.2126" calcext:value-type="float">
            <text:p>-0.2126</text:p>
          </table:table-cell>
          <table:table-cell office:value-type="float" office:value="-0.2648" calcext:value-type="float">
            <text:p>-0.2648</text:p>
          </table:table-cell>
          <table:table-cell office:value-type="float" office:value="10.2723" calcext:value-type="float">
            <text:p>10.2723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483" calcext:value-type="float">
            <text:p>0.0483</text:p>
          </table:table-cell>
          <table:table-cell office:value-type="float" office:value="-0.3413" calcext:value-type="float">
            <text:p>-0.3413</text:p>
          </table:table-cell>
          <table:table-cell office:value-type="float" office:value="0.0075" calcext:value-type="float">
            <text:p>0.007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483" calcext:value-type="float">
            <text:p>0.0483</text:p>
          </table:table-cell>
          <table:table-cell office:value-type="float" office:value="-0.3413" calcext:value-type="float">
            <text:p>-0.3413</text:p>
          </table:table-cell>
          <table:table-cell office:value-type="float" office:value="0.0075" calcext:value-type="float">
            <text:p>0.0075</text:p>
          </table:table-cell>
          <table:table-cell office:value-type="float" office:value="10.231" calcext:value-type="float">
            <text:p>10.23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2183" calcext:value-type="float">
            <text:p>-0.2183</text:p>
          </table:table-cell>
          <table:table-cell office:value-type="float" office:value="0.2385" calcext:value-type="float">
            <text:p>0.238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2183" calcext:value-type="float">
            <text:p>-0.2183</text:p>
          </table:table-cell>
          <table:table-cell office:value-type="float" office:value="0.2385" calcext:value-type="float">
            <text:p>0.2385</text:p>
          </table:table-cell>
          <table:table-cell office:value-type="float" office:value="9.9349" calcext:value-type="float">
            <text:p>9.9349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1734" calcext:value-type="float">
            <text:p>0.173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1734" calcext:value-type="float">
            <text:p>0.1734</text:p>
          </table:table-cell>
          <table:table-cell office:value-type="float" office:value="9.7641" calcext:value-type="float">
            <text:p>9.7641</text:p>
          </table:table-cell>
          <table:table-cell office:value-type="float" office:value="-0.2359" calcext:value-type="float">
            <text:p>-0.2359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625" calcext:value-type="float">
            <text:p>-0.06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9.8537" calcext:value-type="float">
            <text:p>9.8537</text:p>
          </table:table-cell>
          <table:table-cell office:value-type="float" office:value="-0.1463" calcext:value-type="float">
            <text:p>-0.1463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0297" calcext:value-type="float">
            <text:p>0.0297</text:p>
          </table:table-cell>
          <table:table-cell office:value-type="float" office:value="-0.0926" calcext:value-type="float">
            <text:p>-0.0926</text:p>
          </table:table-cell>
          <table:table-cell office:value-type="float" office:value="-0.2088" calcext:value-type="float">
            <text:p>-0.208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0297" calcext:value-type="float">
            <text:p>0.0297</text:p>
          </table:table-cell>
          <table:table-cell office:value-type="float" office:value="-0.0926" calcext:value-type="float">
            <text:p>-0.0926</text:p>
          </table:table-cell>
          <table:table-cell office:value-type="float" office:value="-0.2088" calcext:value-type="float">
            <text:p>-0.2088</text:p>
          </table:table-cell>
          <table:table-cell office:value-type="float" office:value="10.0817" calcext:value-type="float">
            <text:p>10.0817</text:p>
          </table:table-cell>
          <table:table-cell office:value-type="float" office:value="0.0817" calcext:value-type="float">
            <text:p>0.0817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0.0511" calcext:value-type="float">
            <text:p>0.0511</text:p>
          </table:table-cell>
          <table:table-cell office:value-type="float" office:value="-0.2605" calcext:value-type="float">
            <text:p>-0.2605</text:p>
          </table:table-cell>
          <table:table-cell office:value-type="float" office:value="-0.1271" calcext:value-type="float">
            <text:p>-0.127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0.0511" calcext:value-type="float">
            <text:p>0.0511</text:p>
          </table:table-cell>
          <table:table-cell office:value-type="float" office:value="-0.2605" calcext:value-type="float">
            <text:p>-0.2605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10.235" calcext:value-type="float">
            <text:p>10.2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27" calcext:value-type="float">
            <text:p>-0.27</text:p>
          </table:table-cell>
          <table:table-cell office:value-type="float" office:value="0.108" calcext:value-type="float">
            <text:p>0.10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27" calcext:value-type="float">
            <text:p>-0.27</text:p>
          </table:table-cell>
          <table:table-cell office:value-type="float" office:value="0.108" calcext:value-type="float">
            <text:p>0.108</text:p>
          </table:table-cell>
          <table:table-cell office:value-type="float" office:value="10.0837" calcext:value-type="float">
            <text:p>10.083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1202" calcext:value-type="float">
            <text:p>-0.1202</text:p>
          </table:table-cell>
          <table:table-cell office:value-type="float" office:value="0.1917" calcext:value-type="float">
            <text:p>0.191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1202" calcext:value-type="float">
            <text:p>-0.1202</text:p>
          </table:table-cell>
          <table:table-cell office:value-type="float" office:value="0.1917" calcext:value-type="float">
            <text:p>0.1917</text:p>
          </table:table-cell>
          <table:table-cell office:value-type="float" office:value="9.8667" calcext:value-type="float">
            <text:p>9.8667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84" calcext:value-type="float">
            <text:p>0.058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84" calcext:value-type="float">
            <text:p>0.0584</text:p>
          </table:table-cell>
          <table:table-cell office:value-type="float" office:value="9.8184" calcext:value-type="float">
            <text:p>9.8184</text:p>
          </table:table-cell>
          <table:table-cell office:value-type="float" office:value="-0.1816" calcext:value-type="float">
            <text:p>-0.181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1232" calcext:value-type="float">
            <text:p>-0.123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1232" calcext:value-type="float">
            <text:p>-0.1232</text:p>
          </table:table-cell>
          <table:table-cell office:value-type="float" office:value="9.9589" calcext:value-type="float">
            <text:p>9.9589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0382" calcext:value-type="float">
            <text:p>0.0382</text:p>
          </table:table-cell>
          <table:table-cell office:value-type="float" office:value="-0.1712" calcext:value-type="float">
            <text:p>-0.1712</text:p>
          </table:table-cell>
          <table:table-cell office:value-type="float" office:value="-0.1642" calcext:value-type="float">
            <text:p>-0.164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0382" calcext:value-type="float">
            <text:p>0.0382</text:p>
          </table:table-cell>
          <table:table-cell office:value-type="float" office:value="-0.1712" calcext:value-type="float">
            <text:p>-0.1712</text:p>
          </table:table-cell>
          <table:table-cell office:value-type="float" office:value="-0.1642" calcext:value-type="float">
            <text:p>-0.1642</text:p>
          </table:table-cell>
          <table:table-cell office:value-type="float" office:value="10.1502" calcext:value-type="float">
            <text:p>10.1502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2603" calcext:value-type="float">
            <text:p>-0.2603</text:p>
          </table:table-cell>
          <table:table-cell office:value-type="float" office:value="-0.0141" calcext:value-type="float">
            <text:p>-0.014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2603" calcext:value-type="float">
            <text:p>-0.2603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10.1593" calcext:value-type="float">
            <text:p>10.1593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0.1453" calcext:value-type="float">
            <text:p>0.145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0.1453" calcext:value-type="float">
            <text:p>0.1453</text:p>
          </table:table-cell>
          <table:table-cell office:value-type="float" office:value="9.9828" calcext:value-type="float">
            <text:p>9.9828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1281" calcext:value-type="float">
            <text:p>0.128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1281" calcext:value-type="float">
            <text:p>0.1281</text:p>
          </table:table-cell>
          <table:table-cell office:value-type="float" office:value="9.8436" calcext:value-type="float">
            <text:p>9.8436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283" calcext:value-type="float">
            <text:p>-0.028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9.8879" calcext:value-type="float">
            <text:p>9.8879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-0.1404" calcext:value-type="float">
            <text:p>-0.140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-0.1404" calcext:value-type="float">
            <text:p>-0.1404</text:p>
          </table:table-cell>
          <table:table-cell office:value-type="float" office:value="10.044" calcext:value-type="float">
            <text:p>10.044</text:p>
          </table:table-cell>
          <table:table-cell office:value-type="float" office:value="0.044" calcext:value-type="float">
            <text:p>0.044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2108" calcext:value-type="float">
            <text:p>-0.2108</text:p>
          </table:table-cell>
          <table:table-cell office:value-type="float" office:value="-0.0964" calcext:value-type="float">
            <text:p>-0.096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2108" calcext:value-type="float">
            <text:p>-0.2108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10.1605" calcext:value-type="float">
            <text:p>10.1605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641" calcext:value-type="float">
            <text:p>0.064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641" calcext:value-type="float">
            <text:p>0.0641</text:p>
          </table:table-cell>
          <table:table-cell office:value-type="float" office:value="10.0666" calcext:value-type="float">
            <text:p>10.0666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1297" calcext:value-type="float">
            <text:p>-0.1297</text:p>
          </table:table-cell>
          <table:table-cell office:value-type="float" office:value="0.1306" calcext:value-type="float">
            <text:p>0.130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1297" calcext:value-type="float">
            <text:p>-0.1297</text:p>
          </table:table-cell>
          <table:table-cell office:value-type="float" office:value="0.1306" calcext:value-type="float">
            <text:p>0.1306</text:p>
          </table:table-cell>
          <table:table-cell office:value-type="float" office:value="9.917" calcext:value-type="float">
            <text:p>9.917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0476" calcext:value-type="float">
            <text:p>0.047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0476" calcext:value-type="float">
            <text:p>0.0476</text:p>
          </table:table-cell>
          <table:table-cell office:value-type="float" office:value="9.8661" calcext:value-type="float">
            <text:p>9.8661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-0.0863" calcext:value-type="float">
            <text:p>-0.086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9.9675" calcext:value-type="float">
            <text:p>9.967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274" calcext:value-type="float">
            <text:p>0.0274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-0.1188" calcext:value-type="float">
            <text:p>-0.118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274" calcext:value-type="float">
            <text:p>0.0274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10.1103" calcext:value-type="float">
            <text:p>10.110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2262" calcext:value-type="float">
            <text:p>-0.2262</text:p>
          </table:table-cell>
          <table:table-cell office:value-type="float" office:value="-0.0085" calcext:value-type="float">
            <text:p>-0.008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2262" calcext:value-type="float">
            <text:p>-0.2262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0.113" calcext:value-type="float">
            <text:p>10.11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1783" calcext:value-type="float">
            <text:p>-0.1783</text:p>
          </table:table-cell>
          <table:table-cell office:value-type="float" office:value="0.1044" calcext:value-type="float">
            <text:p>0.104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1783" calcext:value-type="float">
            <text:p>-0.1783</text:p>
          </table:table-cell>
          <table:table-cell office:value-type="float" office:value="0.1044" calcext:value-type="float">
            <text:p>0.1044</text:p>
          </table:table-cell>
          <table:table-cell office:value-type="float" office:value="9.9845" calcext:value-type="float">
            <text:p>9.9845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889" calcext:value-type="float">
            <text:p>0.088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889" calcext:value-type="float">
            <text:p>0.0889</text:p>
          </table:table-cell>
          <table:table-cell office:value-type="float" office:value="9.8887" calcext:value-type="float">
            <text:p>9.8887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224" calcext:value-type="float">
            <text:p>-0.022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9.9172" calcext:value-type="float">
            <text:p>9.9172</text:p>
          </table:table-cell>
          <table:table-cell office:value-type="float" office:value="-0.0828" calcext:value-type="float">
            <text:p>-0.082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-0.1052" calcext:value-type="float">
            <text:p>-0.105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10.0396" calcext:value-type="float">
            <text:p>10.0396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238" calcext:value-type="float">
            <text:p>0.0238</text:p>
          </table:table-cell>
          <table:table-cell office:value-type="float" office:value="-0.1976" calcext:value-type="float">
            <text:p>-0.1976</text:p>
          </table:table-cell>
          <table:table-cell office:value-type="float" office:value="-0.0656" calcext:value-type="float">
            <text:p>-0.065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238" calcext:value-type="float">
            <text:p>0.0238</text:p>
          </table:table-cell>
          <table:table-cell office:value-type="float" office:value="-0.1976" calcext:value-type="float">
            <text:p>-0.1976</text:p>
          </table:table-cell>
          <table:table-cell office:value-type="float" office:value="-0.0656" calcext:value-type="float">
            <text:p>-0.0656</text:p>
          </table:table-cell>
          <table:table-cell office:value-type="float" office:value="10.1173" calcext:value-type="float">
            <text:p>10.1173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2045" calcext:value-type="float">
            <text:p>-0.2045</text:p>
          </table:table-cell>
          <table:table-cell office:value-type="float" office:value="0.0517" calcext:value-type="float">
            <text:p>0.051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2045" calcext:value-type="float">
            <text:p>-0.2045</text:p>
          </table:table-cell>
          <table:table-cell office:value-type="float" office:value="0.0517" calcext:value-type="float">
            <text:p>0.0517</text:p>
          </table:table-cell>
          <table:table-cell office:value-type="float" office:value="10.0427" calcext:value-type="float">
            <text:p>10.0427</text:p>
          </table:table-cell>
          <table:table-cell office:value-type="float" office:value="0.0427" calcext:value-type="float">
            <text:p>0.042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0.0944" calcext:value-type="float">
            <text:p>0.094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0.0944" calcext:value-type="float">
            <text:p>0.0944</text:p>
          </table:table-cell>
          <table:table-cell office:value-type="float" office:value="9.9362" calcext:value-type="float">
            <text:p>9.9362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0305" calcext:value-type="float">
            <text:p>0.030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0305" calcext:value-type="float">
            <text:p>0.0305</text:p>
          </table:table-cell>
          <table:table-cell office:value-type="float" office:value="9.904" calcext:value-type="float">
            <text:p>9.904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0655" calcext:value-type="float">
            <text:p>-0.065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0655" calcext:value-type="float">
            <text:p>-0.0655</text:p>
          </table:table-cell>
          <table:table-cell office:value-type="float" office:value="9.9802" calcext:value-type="float">
            <text:p>9.980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1619" calcext:value-type="float">
            <text:p>-0.1619</text:p>
          </table:table-cell>
          <table:table-cell office:value-type="float" office:value="-0.0853" calcext:value-type="float">
            <text:p>-0.085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1619" calcext:value-type="float">
            <text:p>-0.1619</text:p>
          </table:table-cell>
          <table:table-cell office:value-type="float" office:value="-0.0853" calcext:value-type="float">
            <text:p>-0.0853</text:p>
          </table:table-cell>
          <table:table-cell office:value-type="float" office:value="10.084" calcext:value-type="float">
            <text:p>10.084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-0.0013" calcext:value-type="float">
            <text:p>-0.001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0.0793" calcext:value-type="float">
            <text:p>10.0793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1669" calcext:value-type="float">
            <text:p>-0.1669</text:p>
          </table:table-cell>
          <table:table-cell office:value-type="float" office:value="0.0779" calcext:value-type="float">
            <text:p>0.077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1669" calcext:value-type="float">
            <text:p>-0.1669</text:p>
          </table:table-cell>
          <table:table-cell office:value-type="float" office:value="0.0779" calcext:value-type="float">
            <text:p>0.0779</text:p>
          </table:table-cell>
          <table:table-cell office:value-type="float" office:value="9.9844" calcext:value-type="float">
            <text:p>9.9844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0.0623" calcext:value-type="float">
            <text:p>0.062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0.0623" calcext:value-type="float">
            <text:p>0.0623</text:p>
          </table:table-cell>
          <table:table-cell office:value-type="float" office:value="9.9173" calcext:value-type="float">
            <text:p>9.9173</text:p>
          </table:table-cell>
          <table:table-cell office:value-type="float" office:value="-0.0827" calcext:value-type="float">
            <text:p>-0.0827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-0.0204" calcext:value-type="float">
            <text:p>-0.020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9.943" calcext:value-type="float">
            <text:p>9.943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247" calcext:value-type="float">
            <text:p>-0.1247</text:p>
          </table:table-cell>
          <table:table-cell office:value-type="float" office:value="-0.0774" calcext:value-type="float">
            <text:p>-0.077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247" calcext:value-type="float">
            <text:p>-0.1247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10.0333" calcext:value-type="float">
            <text:p>10.03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-0.0441" calcext:value-type="float">
            <text:p>-0.044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10.0852" calcext:value-type="float">
            <text:p>10.0852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0411" calcext:value-type="float">
            <text:p>0.041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0411" calcext:value-type="float">
            <text:p>0.0411</text:p>
          </table:table-cell>
          <table:table-cell office:value-type="float" office:value="10.0271" calcext:value-type="float">
            <text:p>10.0271</text:p>
          </table:table-cell>
          <table:table-cell office:value-type="float" office:value="0.0271" calcext:value-type="float">
            <text:p>0.0271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324" calcext:value-type="float">
            <text:p>-0.1324</text:p>
          </table:table-cell>
          <table:table-cell office:value-type="float" office:value="0.0682" calcext:value-type="float">
            <text:p>0.068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324" calcext:value-type="float">
            <text:p>-0.1324</text:p>
          </table:table-cell>
          <table:table-cell office:value-type="float" office:value="0.0682" calcext:value-type="float">
            <text:p>0.0682</text:p>
          </table:table-cell>
          <table:table-cell office:value-type="float" office:value="9.9507" calcext:value-type="float">
            <text:p>9.9507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188" calcext:value-type="float">
            <text:p>0.018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188" calcext:value-type="float">
            <text:p>0.0188</text:p>
          </table:table-cell>
          <table:table-cell office:value-type="float" office:value="9.9308" calcext:value-type="float">
            <text:p>9.9308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0.0504" calcext:value-type="float">
            <text:p>-0.050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9.9894" calcext:value-type="float">
            <text:p>9.9894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603" calcext:value-type="float">
            <text:p>-0.1603</text:p>
          </table:table-cell>
          <table:table-cell office:value-type="float" office:value="-0.061" calcext:value-type="float">
            <text:p>-0.06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603" calcext:value-type="float">
            <text:p>-0.1603</text:p>
          </table:table-cell>
          <table:table-cell office:value-type="float" office:value="-0.061" calcext:value-type="float">
            <text:p>-0.061</text:p>
          </table:table-cell>
          <table:table-cell office:value-type="float" office:value="10.0635" calcext:value-type="float">
            <text:p>10.0635</text:p>
          </table:table-cell>
          <table:table-cell office:value-type="float" office:value="0.0635" calcext:value-type="float">
            <text:p>0.063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896" calcext:value-type="float">
            <text:p>-0.1896</text:p>
          </table:table-cell>
          <table:table-cell office:value-type="float" office:value="0.0025" calcext:value-type="float">
            <text:p>0.00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896" calcext:value-type="float">
            <text:p>-0.1896</text:p>
          </table:table-cell>
          <table:table-cell office:value-type="float" office:value="0.0025" calcext:value-type="float">
            <text:p>0.0025</text:p>
          </table:table-cell>
          <table:table-cell office:value-type="float" office:value="10.0557" calcext:value-type="float">
            <text:p>10.0557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1592" calcext:value-type="float">
            <text:p>-0.1592</text:p>
          </table:table-cell>
          <table:table-cell office:value-type="float" office:value="0.0582" calcext:value-type="float">
            <text:p>0.058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1592" calcext:value-type="float">
            <text:p>-0.1592</text:p>
          </table:table-cell>
          <table:table-cell office:value-type="float" office:value="0.0582" calcext:value-type="float">
            <text:p>0.0582</text:p>
          </table:table-cell>
          <table:table-cell office:value-type="float" office:value="9.9858" calcext:value-type="float">
            <text:p>9.9858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1082" calcext:value-type="float">
            <text:p>-0.1082</text:p>
          </table:table-cell>
          <table:table-cell office:value-type="float" office:value="0.0439" calcext:value-type="float">
            <text:p>0.043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1082" calcext:value-type="float">
            <text:p>-0.1082</text:p>
          </table:table-cell>
          <table:table-cell office:value-type="float" office:value="0.0439" calcext:value-type="float">
            <text:p>0.0439</text:p>
          </table:table-cell>
          <table:table-cell office:value-type="float" office:value="9.9383" calcext:value-type="float">
            <text:p>9.9383</text:p>
          </table:table-cell>
          <table:table-cell office:value-type="float" office:value="-0.0617" calcext:value-type="float">
            <text:p>-0.061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-0.0178" calcext:value-type="float">
            <text:p>-0.017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9.9605" calcext:value-type="float">
            <text:p>9.9605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-0.0573" calcext:value-type="float">
            <text:p>-0.057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10.0273" calcext:value-type="float">
            <text:p>10.0273</text:p>
          </table:table-cell>
          <table:table-cell office:value-type="float" office:value="0.0273" calcext:value-type="float">
            <text:p>0.0273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1763" calcext:value-type="float">
            <text:p>-0.1763</text:p>
          </table:table-cell>
          <table:table-cell office:value-type="float" office:value="-0.03" calcext:value-type="float">
            <text:p>-0.0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1763" calcext:value-type="float">
            <text:p>-0.1763</text:p>
          </table:table-cell>
          <table:table-cell office:value-type="float" office:value="-0.03" calcext:value-type="float">
            <text:p>-0.03</text:p>
          </table:table-cell>
          <table:table-cell office:value-type="float" office:value="10.0623" calcext:value-type="float">
            <text:p>10.0623</text:p>
          </table:table-cell>
          <table:table-cell office:value-type="float" office:value="0.0623" calcext:value-type="float">
            <text:p>0.062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1751" calcext:value-type="float">
            <text:p>-0.1751</text:p>
          </table:table-cell>
          <table:table-cell office:value-type="float" office:value="0.0323" calcext:value-type="float">
            <text:p>0.032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1751" calcext:value-type="float">
            <text:p>-0.1751</text:p>
          </table:table-cell>
          <table:table-cell office:value-type="float" office:value="0.0323" calcext:value-type="float">
            <text:p>0.0323</text:p>
          </table:table-cell>
          <table:table-cell office:value-type="float" office:value="10.0179" calcext:value-type="float">
            <text:p>10.0179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0.0502" calcext:value-type="float">
            <text:p>0.050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0.0502" calcext:value-type="float">
            <text:p>0.0502</text:p>
          </table:table-cell>
          <table:table-cell office:value-type="float" office:value="9.9615" calcext:value-type="float">
            <text:p>9.9615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116" calcext:value-type="float">
            <text:p>0.011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116" calcext:value-type="float">
            <text:p>0.0116</text:p>
          </table:table-cell>
          <table:table-cell office:value-type="float" office:value="9.9495" calcext:value-type="float">
            <text:p>9.9495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-0.0388" calcext:value-type="float">
            <text:p>-0.038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9.9948" calcext:value-type="float">
            <text:p>9.9948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81" calcext:value-type="float">
            <text:p>-0.1581</text:p>
          </table:table-cell>
          <table:table-cell office:value-type="float" office:value="-0.044" calcext:value-type="float">
            <text:p>-0.04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81" calcext:value-type="float">
            <text:p>-0.1581</text:p>
          </table:table-cell>
          <table:table-cell office:value-type="float" office:value="-0.044" calcext:value-type="float">
            <text:p>-0.044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1781" calcext:value-type="float">
            <text:p>-0.1781</text:p>
          </table:table-cell>
          <table:table-cell office:value-type="float" office:value="0.004" calcext:value-type="float">
            <text:p>0.00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1781" calcext:value-type="float">
            <text:p>-0.1781</text:p>
          </table:table-cell>
          <table:table-cell office:value-type="float" office:value="0.004" calcext:value-type="float">
            <text:p>0.004</text:p>
          </table:table-cell>
          <table:table-cell office:value-type="float" office:value="10.0394" calcext:value-type="float">
            <text:p>10.0394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0.0434" calcext:value-type="float">
            <text:p>0.043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0.0434" calcext:value-type="float">
            <text:p>0.0434</text:p>
          </table:table-cell>
          <table:table-cell office:value-type="float" office:value="9.9879" calcext:value-type="float">
            <text:p>9.9879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171" calcext:value-type="float">
            <text:p>-0.1171</text:p>
          </table:table-cell>
          <table:table-cell office:value-type="float" office:value="0.0313" calcext:value-type="float">
            <text:p>0.031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171" calcext:value-type="float">
            <text:p>-0.1171</text:p>
          </table:table-cell>
          <table:table-cell office:value-type="float" office:value="0.0313" calcext:value-type="float">
            <text:p>0.0313</text:p>
          </table:table-cell>
          <table:table-cell office:value-type="float" office:value="9.9537" calcext:value-type="float">
            <text:p>9.9537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-0.015" calcext:value-type="float">
            <text:p>-0.01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-0.015" calcext:value-type="float">
            <text:p>-0.015</text:p>
          </table:table-cell>
          <table:table-cell office:value-type="float" office:value="9.9723" calcext:value-type="float">
            <text:p>9.9723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377" calcext:value-type="float">
            <text:p>-0.1377</text:p>
          </table:table-cell>
          <table:table-cell office:value-type="float" office:value="-0.0427" calcext:value-type="float">
            <text:p>-0.042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377" calcext:value-type="float">
            <text:p>-0.1377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10.022" calcext:value-type="float">
            <text:p>10.022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694" calcext:value-type="float">
            <text:p>-0.1694</text:p>
          </table:table-cell>
          <table:table-cell office:value-type="float" office:value="-0.0207" calcext:value-type="float">
            <text:p>-0.020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-0.6083" calcext:value-type="float">
            <text:p>-0.6083</text:p>
          </table:table-cell>
          <table:table-cell office:value-type="float" office:value="-0.3221" calcext:value-type="float">
            <text:p>-0.3221</text:p>
          </table:table-cell>
          <table:table-cell office:value-type="float" office:value="0.5926" calcext:value-type="float">
            <text:p>0.5926</text:p>
          </table:table-cell>
          <table:table-cell office:value-type="float" office:value="9.8874" calcext:value-type="float">
            <text:p>9.8874</text:p>
          </table:table-cell>
          <table:table-cell office:value-type="float" office:value="-0.1126" calcext:value-type="float">
            <text:p>-0.1126</text:p>
          </table:table-cell>
          <table:table-cell office:value-type="float" office:value="-0.1963" calcext:value-type="float">
            <text:p>-0.1963</text:p>
          </table:table-cell>
          <table:table-cell office:value-type="float" office:value="-0.8602" calcext:value-type="float">
            <text:p>-0.860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4801" calcext:value-type="float">
            <text:p>0.480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1963" calcext:value-type="float">
            <text:p>-0.1963</text:p>
          </table:table-cell>
          <table:table-cell office:value-type="float" office:value="-0.8602" calcext:value-type="float">
            <text:p>-0.860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4801" calcext:value-type="float">
            <text:p>0.4801</text:p>
          </table:table-cell>
          <table:table-cell office:value-type="float" office:value="9.0897" calcext:value-type="float">
            <text:p>9.0897</text:p>
          </table:table-cell>
          <table:table-cell office:value-type="float" office:value="-0.9103" calcext:value-type="float">
            <text:p>-0.9103</text:p>
          </table:table-cell>
          <table:table-cell office:value-type="float" office:value="-0.8176" calcext:value-type="float">
            <text:p>-0.8176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0.2391" calcext:value-type="float">
            <text:p>0.2391</text:p>
          </table:table-cell>
          <table:table-cell office:value-type="float" office:value="-0.4303" calcext:value-type="float">
            <text:p>-0.430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8176" calcext:value-type="float">
            <text:p>-0.8176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0.2391" calcext:value-type="float">
            <text:p>0.2391</text:p>
          </table:table-cell>
          <table:table-cell office:value-type="float" office:value="-0.4303" calcext:value-type="float">
            <text:p>-0.4303</text:p>
          </table:table-cell>
          <table:table-cell office:value-type="float" office:value="9.3029" calcext:value-type="float">
            <text:p>9.3029</text:p>
          </table:table-cell>
          <table:table-cell office:value-type="float" office:value="-0.6971" calcext:value-type="float">
            <text:p>-0.6971</text:p>
          </table:table-cell>
          <table:table-cell office:value-type="float" office:value="-0.6741" calcext:value-type="float">
            <text:p>-0.6741</text:p>
          </table:table-cell>
          <table:table-cell office:value-type="float" office:value="0.5498" calcext:value-type="float">
            <text:p>0.5498</text:p>
          </table:table-cell>
          <table:table-cell office:value-type="float" office:value="-0.5396" calcext:value-type="float">
            <text:p>-0.5396</text:p>
          </table:table-cell>
          <table:table-cell office:value-type="float" office:value="-1.1273" calcext:value-type="float">
            <text:p>-1.127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0.6741" calcext:value-type="float">
            <text:p>-0.6741</text:p>
          </table:table-cell>
          <table:table-cell office:value-type="float" office:value="0.5498" calcext:value-type="float">
            <text:p>0.5498</text:p>
          </table:table-cell>
          <table:table-cell office:value-type="float" office:value="-0.5396" calcext:value-type="float">
            <text:p>-0.5396</text:p>
          </table:table-cell>
          <table:table-cell office:value-type="float" office:value="-1.1273" calcext:value-type="float">
            <text:p>-1.1273</text:p>
          </table:table-cell>
          <table:table-cell office:value-type="float" office:value="11.2142" calcext:value-type="float">
            <text:p>11.2142</text:p>
          </table:table-cell>
          <table:table-cell office:value-type="float" office:value="1.2142" calcext:value-type="float">
            <text:p>1.2142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8193" calcext:value-type="float">
            <text:p>0.8193</text:p>
          </table:table-cell>
          <table:table-cell office:value-type="float" office:value="-1.0599" calcext:value-type="float">
            <text:p>-1.0599</text:p>
          </table:table-cell>
          <table:table-cell office:value-type="float" office:value="0.0869" calcext:value-type="float">
            <text:p>0.086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8193" calcext:value-type="float">
            <text:p>0.8193</text:p>
          </table:table-cell>
          <table:table-cell office:value-type="float" office:value="-1.0599" calcext:value-type="float">
            <text:p>-1.0599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2785" calcext:value-type="float">
            <text:p>11.2785</text:p>
          </table:table-cell>
          <table:table-cell office:value-type="float" office:value="1.2785" calcext:value-type="float">
            <text:p>1.2785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3037" calcext:value-type="float">
            <text:p>0.3037</text:p>
          </table:table-cell>
          <table:table-cell office:value-type="float" office:value="-0.3337" calcext:value-type="float">
            <text:p>-0.3337</text:p>
          </table:table-cell>
          <table:table-cell office:value-type="float" office:value="1.3654" calcext:value-type="float">
            <text:p>1.3654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3037" calcext:value-type="float">
            <text:p>0.3037</text:p>
          </table:table-cell>
          <table:table-cell office:value-type="float" office:value="-0.3337" calcext:value-type="float">
            <text:p>-0.3337</text:p>
          </table:table-cell>
          <table:table-cell office:value-type="float" office:value="1.3654" calcext:value-type="float">
            <text:p>1.3654</text:p>
          </table:table-cell>
          <table:table-cell office:value-type="float" office:value="9.1097" calcext:value-type="float">
            <text:p>9.1097</text:p>
          </table:table-cell>
          <table:table-cell office:value-type="float" office:value="-0.8903" calcext:value-type="float">
            <text:p>-0.8903</text:p>
          </table:table-cell>
          <table:table-cell office:value-type="float" office:value="0.6182" calcext:value-type="float">
            <text:p>0.6182</text:p>
          </table:table-cell>
          <table:table-cell office:value-type="float" office:value="-0.4343" calcext:value-type="float">
            <text:p>-0.4343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475" calcext:value-type="float">
            <text:p>0.47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82" calcext:value-type="float">
            <text:p>0.6182</text:p>
          </table:table-cell>
          <table:table-cell office:value-type="float" office:value="-0.4343" calcext:value-type="float">
            <text:p>-0.4343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475" calcext:value-type="float">
            <text:p>0.475</text:p>
          </table:table-cell>
          <table:table-cell office:value-type="float" office:value="9.653" calcext:value-type="float">
            <text:p>9.653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7049" calcext:value-type="float">
            <text:p>-0.7049</text:p>
          </table:table-cell>
          <table:table-cell office:value-type="float" office:value="0.888" calcext:value-type="float">
            <text:p>0.888</text:p>
          </table:table-cell>
          <table:table-cell office:value-type="float" office:value="0.128" calcext:value-type="float">
            <text:p>0.12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7049" calcext:value-type="float">
            <text:p>-0.7049</text:p>
          </table:table-cell>
          <table:table-cell office:value-type="float" office:value="0.888" calcext:value-type="float">
            <text:p>0.888</text:p>
          </table:table-cell>
          <table:table-cell office:value-type="float" office:value="0.128" calcext:value-type="float">
            <text:p>0.128</text:p>
          </table:table-cell>
          <table:table-cell office:value-type="float" office:value="8.8562" calcext:value-type="float">
            <text:p>8.8562</text:p>
          </table:table-cell>
          <table:table-cell office:value-type="float" office:value="-1.1438" calcext:value-type="float">
            <text:p>-1.1438</text:p>
          </table:table-cell>
          <table:table-cell office:value-type="float" office:value="-0.5546" calcext:value-type="float">
            <text:p>-0.5546</text:p>
          </table:table-cell>
          <table:table-cell office:value-type="float" office:value="-0.3094" calcext:value-type="float">
            <text:p>-0.3094</text:p>
          </table:table-cell>
          <table:table-cell office:value-type="float" office:value="0.444" calcext:value-type="float">
            <text:p>0.444</text:p>
          </table:table-cell>
          <table:table-cell office:value-type="float" office:value="-1.0158" calcext:value-type="float">
            <text:p>-1.015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0.5546" calcext:value-type="float">
            <text:p>-0.5546</text:p>
          </table:table-cell>
          <table:table-cell office:value-type="float" office:value="-0.3094" calcext:value-type="float">
            <text:p>-0.3094</text:p>
          </table:table-cell>
          <table:table-cell office:value-type="float" office:value="0.444" calcext:value-type="float">
            <text:p>0.444</text:p>
          </table:table-cell>
          <table:table-cell office:value-type="float" office:value="-1.0158" calcext:value-type="float">
            <text:p>-1.0158</text:p>
          </table:table-cell>
          <table:table-cell office:value-type="float" office:value="10.1962" calcext:value-type="float">
            <text:p>10.1962</text:p>
          </table:table-cell>
          <table:table-cell office:value-type="float" office:value="0.1962" calcext:value-type="float">
            <text:p>0.1962</text:p>
          </table:table-cell>
          <table:table-cell office:value-type="float" office:value="-0.5482" calcext:value-type="float">
            <text:p>-0.5482</text:p>
          </table:table-cell>
          <table:table-cell office:value-type="float" office:value="0.3332" calcext:value-type="float">
            <text:p>0.3332</text:p>
          </table:table-cell>
          <table:table-cell office:value-type="float" office:value="-0.4737" calcext:value-type="float">
            <text:p>-0.4737</text:p>
          </table:table-cell>
          <table:table-cell office:value-type="float" office:value="-0.8196" calcext:value-type="float">
            <text:p>-0.819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0.5482" calcext:value-type="float">
            <text:p>-0.5482</text:p>
          </table:table-cell>
          <table:table-cell office:value-type="float" office:value="0.3332" calcext:value-type="float">
            <text:p>0.3332</text:p>
          </table:table-cell>
          <table:table-cell office:value-type="float" office:value="-0.4737" calcext:value-type="float">
            <text:p>-0.4737</text:p>
          </table:table-cell>
          <table:table-cell office:value-type="float" office:value="-0.8196" calcext:value-type="float">
            <text:p>-0.8196</text:p>
          </table:table-cell>
          <table:table-cell office:value-type="float" office:value="10.8211" calcext:value-type="float">
            <text:p>10.8211</text:p>
          </table:table-cell>
          <table:table-cell office:value-type="float" office:value="0.8211" calcext:value-type="float">
            <text:p>0.8211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0.6015" calcext:value-type="float">
            <text:p>0.6015</text:p>
          </table:table-cell>
          <table:table-cell office:value-type="float" office:value="-0.8828" calcext:value-type="float">
            <text:p>-0.8828</text:p>
          </table:table-cell>
          <table:table-cell office:value-type="float" office:value="0.0014" calcext:value-type="float">
            <text:p>0.001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0.6015" calcext:value-type="float">
            <text:p>0.6015</text:p>
          </table:table-cell>
          <table:table-cell office:value-type="float" office:value="-0.8828" calcext:value-type="float">
            <text:p>-0.8828</text:p>
          </table:table-cell>
          <table:table-cell office:value-type="float" office:value="0.0014" calcext:value-type="float">
            <text:p>0.0014</text:p>
          </table:table-cell>
          <table:table-cell office:value-type="float" office:value="10.9476" calcext:value-type="float">
            <text:p>10.9476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291" calcext:value-type="float">
            <text:p>0.291</text:p>
          </table:table-cell>
          <table:table-cell office:value-type="float" office:value="-0.4075" calcext:value-type="float">
            <text:p>-0.4075</text:p>
          </table:table-cell>
          <table:table-cell office:value-type="float" office:value="0.949" calcext:value-type="float">
            <text:p>0.94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291" calcext:value-type="float">
            <text:p>0.291</text:p>
          </table:table-cell>
          <table:table-cell office:value-type="float" office:value="-0.4075" calcext:value-type="float">
            <text:p>-0.4075</text:p>
          </table:table-cell>
          <table:table-cell office:value-type="float" office:value="0.949" calcext:value-type="float">
            <text:p>0.949</text:p>
          </table:table-cell>
          <table:table-cell office:value-type="float" office:value="9.7735" calcext:value-type="float">
            <text:p>9.7735</text:p>
          </table:table-cell>
          <table:table-cell office:value-type="float" office:value="-0.2265" calcext:value-type="float">
            <text:p>-0.2265</text:p>
          </table:table-cell>
          <table:table-cell office:value-type="float" office:value="0.4744" calcext:value-type="float">
            <text:p>0.4744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7225" calcext:value-type="float">
            <text:p>0.722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744" calcext:value-type="float">
            <text:p>0.4744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7225" calcext:value-type="float">
            <text:p>0.7225</text:p>
          </table:table-cell>
          <table:table-cell office:value-type="float" office:value="9.3809" calcext:value-type="float">
            <text:p>9.3809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0.072" calcext:value-type="float">
            <text:p>0.072</text:p>
          </table:table-cell>
          <table:table-cell office:value-type="float" office:value="-0.4967" calcext:value-type="float">
            <text:p>-0.4967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1034" calcext:value-type="float">
            <text:p>0.103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72" calcext:value-type="float">
            <text:p>0.072</text:p>
          </table:table-cell>
          <table:table-cell office:value-type="float" office:value="-0.4967" calcext:value-type="float">
            <text:p>-0.4967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1034" calcext:value-type="float">
            <text:p>0.1034</text:p>
          </table:table-cell>
          <table:table-cell office:value-type="float" office:value="9.1208" calcext:value-type="float">
            <text:p>9.1208</text:p>
          </table:table-cell>
          <table:table-cell office:value-type="float" office:value="-0.8792" calcext:value-type="float">
            <text:p>-0.8792</text:p>
          </table:table-cell>
          <table:table-cell office:value-type="float" office:value="-0.3416" calcext:value-type="float">
            <text:p>-0.3416</text:p>
          </table:table-cell>
          <table:table-cell office:value-type="float" office:value="-0.2617" calcext:value-type="float">
            <text:p>-0.2617</text:p>
          </table:table-cell>
          <table:table-cell office:value-type="float" office:value="0.5051" calcext:value-type="float">
            <text:p>0.5051</text:p>
          </table:table-cell>
          <table:table-cell office:value-type="float" office:value="-0.7758" calcext:value-type="float">
            <text:p>-0.775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0.3416" calcext:value-type="float">
            <text:p>-0.3416</text:p>
          </table:table-cell>
          <table:table-cell office:value-type="float" office:value="-0.2617" calcext:value-type="float">
            <text:p>-0.2617</text:p>
          </table:table-cell>
          <table:table-cell office:value-type="float" office:value="0.5051" calcext:value-type="float">
            <text:p>0.5051</text:p>
          </table:table-cell>
          <table:table-cell office:value-type="float" office:value="-0.7758" calcext:value-type="float">
            <text:p>-0.7758</text:p>
          </table:table-cell>
          <table:table-cell office:value-type="float" office:value="9.9774" calcext:value-type="float">
            <text:p>9.9774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3885" calcext:value-type="float">
            <text:p>-0.3885</text:p>
          </table:table-cell>
          <table:table-cell office:value-type="float" office:value="0.1849" calcext:value-type="float">
            <text:p>0.1849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7984" calcext:value-type="float">
            <text:p>-0.798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0.3885" calcext:value-type="float">
            <text:p>-0.3885</text:p>
          </table:table-cell>
          <table:table-cell office:value-type="float" office:value="0.1849" calcext:value-type="float">
            <text:p>0.1849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7984" calcext:value-type="float">
            <text:p>-0.7984</text:p>
          </table:table-cell>
          <table:table-cell office:value-type="float" office:value="10.7354" calcext:value-type="float">
            <text:p>10.7354</text:p>
          </table:table-cell>
          <table:table-cell office:value-type="float" office:value="0.7354" calcext:value-type="float">
            <text:p>0.7354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4028" calcext:value-type="float">
            <text:p>0.4028</text:p>
          </table:table-cell>
          <table:table-cell office:value-type="float" office:value="-0.7127" calcext:value-type="float">
            <text:p>-0.7127</text:p>
          </table:table-cell>
          <table:table-cell office:value-type="float" office:value="-0.063" calcext:value-type="float">
            <text:p>-0.06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4028" calcext:value-type="float">
            <text:p>0.4028</text:p>
          </table:table-cell>
          <table:table-cell office:value-type="float" office:value="-0.7127" calcext:value-type="float">
            <text:p>-0.71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10.6897" calcext:value-type="float">
            <text:p>10.6897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2216" calcext:value-type="float">
            <text:p>0.2216</text:p>
          </table:table-cell>
          <table:table-cell office:value-type="float" office:value="-0.4309" calcext:value-type="float">
            <text:p>-0.4309</text:p>
          </table:table-cell>
          <table:table-cell office:value-type="float" office:value="0.6267" calcext:value-type="float">
            <text:p>0.626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2216" calcext:value-type="float">
            <text:p>0.2216</text:p>
          </table:table-cell>
          <table:table-cell office:value-type="float" office:value="-0.4309" calcext:value-type="float">
            <text:p>-0.4309</text:p>
          </table:table-cell>
          <table:table-cell office:value-type="float" office:value="0.6267" calcext:value-type="float">
            <text:p>0.6267</text:p>
          </table:table-cell>
          <table:table-cell office:value-type="float" office:value="10.1753" calcext:value-type="float">
            <text:p>10.1753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3174" calcext:value-type="float">
            <text:p>0.3174</text:p>
          </table:table-cell>
          <table:table-cell office:value-type="float" office:value="-0.1385" calcext:value-type="float">
            <text:p>-0.138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802" calcext:value-type="float">
            <text:p>0.80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3174" calcext:value-type="float">
            <text:p>0.3174</text:p>
          </table:table-cell>
          <table:table-cell office:value-type="float" office:value="-0.1385" calcext:value-type="float">
            <text:p>-0.138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802" calcext:value-type="float">
            <text:p>0.802</text:p>
          </table:table-cell>
          <table:table-cell office:value-type="float" office:value="9.2449" calcext:value-type="float">
            <text:p>9.2449</text:p>
          </table:table-cell>
          <table:table-cell office:value-type="float" office:value="-0.7551" calcext:value-type="float">
            <text:p>-0.7551</text:p>
          </table:table-cell>
          <table:table-cell office:value-type="float" office:value="0.0733" calcext:value-type="float">
            <text:p>0.0733</text:p>
          </table:table-cell>
          <table:table-cell office:value-type="float" office:value="-0.3179" calcext:value-type="float">
            <text:p>-0.3179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0469" calcext:value-type="float">
            <text:p>0.046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733" calcext:value-type="float">
            <text:p>0.0733</text:p>
          </table:table-cell>
          <table:table-cell office:value-type="float" office:value="-0.3179" calcext:value-type="float">
            <text:p>-0.3179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0469" calcext:value-type="float">
            <text:p>0.0469</text:p>
          </table:table-cell>
          <table:table-cell office:value-type="float" office:value="9.3984" calcext:value-type="float">
            <text:p>9.3984</text:p>
          </table:table-cell>
          <table:table-cell office:value-type="float" office:value="-0.6016" calcext:value-type="float">
            <text:p>-0.6016</text:p>
          </table:table-cell>
          <table:table-cell office:value-type="float" office:value="-0.1965" calcext:value-type="float">
            <text:p>-0.1965</text:p>
          </table:table-cell>
          <table:table-cell office:value-type="float" office:value="-0.1764" calcext:value-type="float">
            <text:p>-0.1764</text:p>
          </table:table-cell>
          <table:table-cell office:value-type="float" office:value="0.4539" calcext:value-type="float">
            <text:p>0.4539</text:p>
          </table:table-cell>
          <table:table-cell office:value-type="float" office:value="-0.5547" calcext:value-type="float">
            <text:p>-0.554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0.1965" calcext:value-type="float">
            <text:p>-0.1965</text:p>
          </table:table-cell>
          <table:table-cell office:value-type="float" office:value="-0.1764" calcext:value-type="float">
            <text:p>-0.1764</text:p>
          </table:table-cell>
          <table:table-cell office:value-type="float" office:value="0.4539" calcext:value-type="float">
            <text:p>0.4539</text:p>
          </table:table-cell>
          <table:table-cell office:value-type="float" office:value="-0.5547" calcext:value-type="float">
            <text:p>-0.5547</text:p>
          </table:table-cell>
          <table:table-cell office:value-type="float" office:value="9.8838" calcext:value-type="float">
            <text:p>9.8838</text:p>
          </table:table-cell>
          <table:table-cell office:value-type="float" office:value="-0.1162" calcext:value-type="float">
            <text:p>-0.1162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-0.6709" calcext:value-type="float">
            <text:p>-0.670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-0.6709" calcext:value-type="float">
            <text:p>-0.6709</text:p>
          </table:table-cell>
          <table:table-cell office:value-type="float" office:value="10.5653" calcext:value-type="float">
            <text:p>10.5653</text:p>
          </table:table-cell>
          <table:table-cell office:value-type="float" office:value="0.5653" calcext:value-type="float">
            <text:p>0.565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2441" calcext:value-type="float">
            <text:p>0.2441</text:p>
          </table:table-cell>
          <table:table-cell office:value-type="float" office:value="-0.5471" calcext:value-type="float">
            <text:p>-0.5471</text:p>
          </table:table-cell>
          <table:table-cell office:value-type="float" office:value="-0.1056" calcext:value-type="float">
            <text:p>-0.105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2441" calcext:value-type="float">
            <text:p>0.2441</text:p>
          </table:table-cell>
          <table:table-cell office:value-type="float" office:value="-0.5471" calcext:value-type="float">
            <text:p>-0.5471</text:p>
          </table:table-cell>
          <table:table-cell office:value-type="float" office:value="-0.1056" calcext:value-type="float">
            <text:p>-0.1056</text:p>
          </table:table-cell>
          <table:table-cell office:value-type="float" office:value="10.4884" calcext:value-type="float">
            <text:p>10.4884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318" calcext:value-type="float">
            <text:p>0.1318</text:p>
          </table:table-cell>
          <table:table-cell office:value-type="float" office:value="-0.4085" calcext:value-type="float">
            <text:p>-0.4085</text:p>
          </table:table-cell>
          <table:table-cell office:value-type="float" office:value="0.3828" calcext:value-type="float">
            <text:p>0.382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318" calcext:value-type="float">
            <text:p>0.1318</text:p>
          </table:table-cell>
          <table:table-cell office:value-type="float" office:value="-0.4085" calcext:value-type="float">
            <text:p>-0.4085</text:p>
          </table:table-cell>
          <table:table-cell office:value-type="float" office:value="0.3828" calcext:value-type="float">
            <text:p>0.3828</text:p>
          </table:table-cell>
          <table:table-cell office:value-type="float" office:value="10.2133" calcext:value-type="float">
            <text:p>10.2133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1782" calcext:value-type="float">
            <text:p>0.1782</text:p>
          </table:table-cell>
          <table:table-cell office:value-type="float" office:value="-0.0886" calcext:value-type="float">
            <text:p>-0.0886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5961" calcext:value-type="float">
            <text:p>0.596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-0.0886" calcext:value-type="float">
            <text:p>-0.0886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5961" calcext:value-type="float">
            <text:p>0.5961</text:p>
          </table:table-cell>
          <table:table-cell office:value-type="float" office:value="9.5272" calcext:value-type="float">
            <text:p>9.5272</text:p>
          </table:table-cell>
          <table:table-cell office:value-type="float" office:value="-0.4728" calcext:value-type="float">
            <text:p>-0.4728</text:p>
          </table:table-cell>
          <table:table-cell office:value-type="float" office:value="0.0297" calcext:value-type="float">
            <text:p>0.0297</text:p>
          </table:table-cell>
          <table:table-cell office:value-type="float" office:value="-0.1905" calcext:value-type="float">
            <text:p>-0.1905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1233" calcext:value-type="float">
            <text:p>0.123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-0.1905" calcext:value-type="float">
            <text:p>-0.1905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9.5244" calcext:value-type="float">
            <text:p>9.5244</text:p>
          </table:table-cell>
          <table:table-cell office:value-type="float" office:value="-0.4756" calcext:value-type="float">
            <text:p>-0.475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0.3261" calcext:value-type="float">
            <text:p>0.3261</text:p>
          </table:table-cell>
          <table:table-cell office:value-type="float" office:value="-0.3523" calcext:value-type="float">
            <text:p>-0.352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0.3261" calcext:value-type="float">
            <text:p>0.3261</text:p>
          </table:table-cell>
          <table:table-cell office:value-type="float" office:value="-0.3523" calcext:value-type="float">
            <text:p>-0.3523</text:p>
          </table:table-cell>
          <table:table-cell office:value-type="float" office:value="9.845" calcext:value-type="float">
            <text:p>9.84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0.0796" calcext:value-type="float">
            <text:p>0.0796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-0.5073" calcext:value-type="float">
            <text:p>-0.507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0.0796" calcext:value-type="float">
            <text:p>0.0796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-0.5073" calcext:value-type="float">
            <text:p>-0.5073</text:p>
          </table:table-cell>
          <table:table-cell office:value-type="float" office:value="10.399" calcext:value-type="float">
            <text:p>10.399</text:p>
          </table:table-cell>
          <table:table-cell office:value-type="float" office:value="0.399" calcext:value-type="float">
            <text:p>0.399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146" calcext:value-type="float">
            <text:p>0.146</text:p>
          </table:table-cell>
          <table:table-cell office:value-type="float" office:value="-0.4114" calcext:value-type="float">
            <text:p>-0.4114</text:p>
          </table:table-cell>
          <table:table-cell office:value-type="float" office:value="-0.1082" calcext:value-type="float">
            <text:p>-0.108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146" calcext:value-type="float">
            <text:p>0.146</text:p>
          </table:table-cell>
          <table:table-cell office:value-type="float" office:value="-0.4114" calcext:value-type="float">
            <text:p>-0.4114</text:p>
          </table:table-cell>
          <table:table-cell office:value-type="float" office:value="-0.1082" calcext:value-type="float">
            <text:p>-0.1082</text:p>
          </table:table-cell>
          <table:table-cell office:value-type="float" office:value="10.3911" calcext:value-type="float">
            <text:p>10.3911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568" calcext:value-type="float">
            <text:p>0.0568</text:p>
          </table:table-cell>
          <table:table-cell office:value-type="float" office:value="-0.3241" calcext:value-type="float">
            <text:p>-0.3241</text:p>
          </table:table-cell>
          <table:table-cell office:value-type="float" office:value="0.2828" calcext:value-type="float">
            <text:p>0.282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568" calcext:value-type="float">
            <text:p>0.0568</text:p>
          </table:table-cell>
          <table:table-cell office:value-type="float" office:value="-0.3241" calcext:value-type="float">
            <text:p>-0.3241</text:p>
          </table:table-cell>
          <table:table-cell office:value-type="float" office:value="0.2828" calcext:value-type="float">
            <text:p>0.2828</text:p>
          </table:table-cell>
          <table:table-cell office:value-type="float" office:value="10.1144" calcext:value-type="float">
            <text:p>10.114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3972" calcext:value-type="float">
            <text:p>0.397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3972" calcext:value-type="float">
            <text:p>0.3972</text:p>
          </table:table-cell>
          <table:table-cell office:value-type="float" office:value="9.6867" calcext:value-type="float">
            <text:p>9.6867</text:p>
          </table:table-cell>
          <table:table-cell office:value-type="float" office:value="-0.3133" calcext:value-type="float">
            <text:p>-0.313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135" calcext:value-type="float">
            <text:p>-0.113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838" calcext:value-type="float">
            <text:p>0.083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135" calcext:value-type="float">
            <text:p>-0.113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838" calcext:value-type="float">
            <text:p>0.0838</text:p>
          </table:table-cell>
          <table:table-cell office:value-type="float" office:value="9.6469" calcext:value-type="float">
            <text:p>9.6469</text:p>
          </table:table-cell>
          <table:table-cell office:value-type="float" office:value="-0.3531" calcext:value-type="float">
            <text:p>-0.3531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1637" calcext:value-type="float">
            <text:p>0.1637</text:p>
          </table:table-cell>
          <table:table-cell office:value-type="float" office:value="-0.2692" calcext:value-type="float">
            <text:p>-0.269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1637" calcext:value-type="float">
            <text:p>0.1637</text:p>
          </table:table-cell>
          <table:table-cell office:value-type="float" office:value="-0.2692" calcext:value-type="float">
            <text:p>-0.2692</text:p>
          </table:table-cell>
          <table:table-cell office:value-type="float" office:value="9.9083" calcext:value-type="float">
            <text:p>9.9083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723" calcext:value-type="float">
            <text:p>0.0723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-0.3609" calcext:value-type="float">
            <text:p>-0.360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723" calcext:value-type="float">
            <text:p>0.0723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845" calcext:value-type="float">
            <text:p>0.0845</text:p>
          </table:table-cell>
          <table:table-cell office:value-type="float" office:value="-0.3532" calcext:value-type="float">
            <text:p>-0.3532</text:p>
          </table:table-cell>
          <table:table-cell office:value-type="float" office:value="-0.0427" calcext:value-type="float">
            <text:p>-0.042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845" calcext:value-type="float">
            <text:p>0.0845</text:p>
          </table:table-cell>
          <table:table-cell office:value-type="float" office:value="-0.3532" calcext:value-type="float">
            <text:p>-0.3532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10.3002" calcext:value-type="float">
            <text:p>10.3002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2458" calcext:value-type="float">
            <text:p>-0.2458</text:p>
          </table:table-cell>
          <table:table-cell office:value-type="float" office:value="0.2574" calcext:value-type="float">
            <text:p>0.257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2458" calcext:value-type="float">
            <text:p>-0.2458</text:p>
          </table:table-cell>
          <table:table-cell office:value-type="float" office:value="0.2574" calcext:value-type="float">
            <text:p>0.2574</text:p>
          </table:table-cell>
          <table:table-cell office:value-type="float" office:value="9.9982" calcext:value-type="float">
            <text:p>9.998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2556" calcext:value-type="float">
            <text:p>0.255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2556" calcext:value-type="float">
            <text:p>0.2556</text:p>
          </table:table-cell>
          <table:table-cell office:value-type="float" office:value="9.7263" calcext:value-type="float">
            <text:p>9.7263</text:p>
          </table:table-cell>
          <table:table-cell office:value-type="float" office:value="-0.2737" calcext:value-type="float">
            <text:p>-0.2737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0.1294" calcext:value-type="float">
            <text:p>0.1294</text:p>
          </table:table-cell>
          <table:table-cell office:value-type="float" office:value="-0.0181" calcext:value-type="float">
            <text:p>-0.018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0.1294" calcext:value-type="float">
            <text:p>0.1294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9.7789" calcext:value-type="float">
            <text:p>9.7789</text:p>
          </table:table-cell>
          <table:table-cell office:value-type="float" office:value="-0.2211" calcext:value-type="float">
            <text:p>-0.2211</text:p>
          </table:table-cell>
          <table:table-cell office:value-type="float" office:value="-0.0683" calcext:value-type="float">
            <text:p>-0.068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2391" calcext:value-type="float">
            <text:p>-0.239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-0.0683" calcext:value-type="float">
            <text:p>-0.068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2391" calcext:value-type="float">
            <text:p>-0.2391</text:p>
          </table:table-cell>
          <table:table-cell office:value-type="float" office:value="10.0088" calcext:value-type="float">
            <text:p>10.0088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0.0622" calcext:value-type="float">
            <text:p>0.0622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2304" calcext:value-type="float">
            <text:p>-0.230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0.0622" calcext:value-type="float">
            <text:p>0.0622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2304" calcext:value-type="float">
            <text:p>-0.2304</text:p>
          </table:table-cell>
          <table:table-cell office:value-type="float" office:value="10.2646" calcext:value-type="float">
            <text:p>10.2646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93" calcext:value-type="float">
            <text:p>0.0393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0343" calcext:value-type="float">
            <text:p>0.03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93" calcext:value-type="float">
            <text:p>0.0393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0343" calcext:value-type="float">
            <text:p>0.0343</text:p>
          </table:table-cell>
          <table:table-cell office:value-type="float" office:value="10.2004" calcext:value-type="float">
            <text:p>10.2004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1975" calcext:value-type="float">
            <text:p>-0.1975</text:p>
          </table:table-cell>
          <table:table-cell office:value-type="float" office:value="0.2347" calcext:value-type="float">
            <text:p>0.234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1975" calcext:value-type="float">
            <text:p>-0.19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9.9119" calcext:value-type="float">
            <text:p>9.9119</text:p>
          </table:table-cell>
          <table:table-cell office:value-type="float" office:value="-0.0881" calcext:value-type="float">
            <text:p>-0.088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1466" calcext:value-type="float">
            <text:p>0.146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1466" calcext:value-type="float">
            <text:p>0.1466</text:p>
          </table:table-cell>
          <table:table-cell office:value-type="float" office:value="9.7707" calcext:value-type="float">
            <text:p>9.7707</text:p>
          </table:table-cell>
          <table:table-cell office:value-type="float" office:value="-0.2293" calcext:value-type="float">
            <text:p>-0.2293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827" calcext:value-type="float">
            <text:p>-0.082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827" calcext:value-type="float">
            <text:p>-0.0827</text:p>
          </table:table-cell>
          <table:table-cell office:value-type="float" office:value="9.879" calcext:value-type="float">
            <text:p>9.879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0.0344" calcext:value-type="float">
            <text:p>0.0344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-0.2037" calcext:value-type="float">
            <text:p>-0.203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0.0344" calcext:value-type="float">
            <text:p>0.0344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-0.2037" calcext:value-type="float">
            <text:p>-0.2037</text:p>
          </table:table-cell>
          <table:table-cell office:value-type="float" office:value="10.1048" calcext:value-type="float">
            <text:p>10.1048</text:p>
          </table:table-cell>
          <table:table-cell office:value-type="float" office:value="0.1048" calcext:value-type="float">
            <text:p>0.1048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476" calcext:value-type="float">
            <text:p>0.0476</text:p>
          </table:table-cell>
          <table:table-cell office:value-type="float" office:value="-0.2695" calcext:value-type="float">
            <text:p>-0.2695</text:p>
          </table:table-cell>
          <table:table-cell office:value-type="float" office:value="-0.0989" calcext:value-type="float">
            <text:p>-0.098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476" calcext:value-type="float">
            <text:p>0.0476</text:p>
          </table:table-cell>
          <table:table-cell office:value-type="float" office:value="-0.2695" calcext:value-type="float">
            <text:p>-0.2695</text:p>
          </table:table-cell>
          <table:table-cell office:value-type="float" office:value="-0.0989" calcext:value-type="float">
            <text:p>-0.0989</text:p>
          </table:table-cell>
          <table:table-cell office:value-type="float" office:value="10.2264" calcext:value-type="float">
            <text:p>10.226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2552" calcext:value-type="float">
            <text:p>-0.2552</text:p>
          </table:table-cell>
          <table:table-cell office:value-type="float" office:value="0.1275" calcext:value-type="float">
            <text:p>0.127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2552" calcext:value-type="float">
            <text:p>-0.2552</text:p>
          </table:table-cell>
          <table:table-cell office:value-type="float" office:value="0.1275" calcext:value-type="float">
            <text:p>0.1275</text:p>
          </table:table-cell>
          <table:table-cell office:value-type="float" office:value="10.0547" calcext:value-type="float">
            <text:p>10.054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1003" calcext:value-type="float">
            <text:p>-0.1003</text:p>
          </table:table-cell>
          <table:table-cell office:value-type="float" office:value="0.1822" calcext:value-type="float">
            <text:p>0.182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1003" calcext:value-type="float">
            <text:p>-0.1003</text:p>
          </table:table-cell>
          <table:table-cell office:value-type="float" office:value="0.1822" calcext:value-type="float">
            <text:p>0.1822</text:p>
          </table:table-cell>
          <table:table-cell office:value-type="float" office:value="9.8513" calcext:value-type="float">
            <text:p>9.8513</text:p>
          </table:table-cell>
          <table:table-cell office:value-type="float" office:value="-0.1487" calcext:value-type="float">
            <text:p>-0.1487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335" calcext:value-type="float">
            <text:p>0.033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335" calcext:value-type="float">
            <text:p>0.0335</text:p>
          </table:table-cell>
          <table:table-cell office:value-type="float" office:value="9.8316" calcext:value-type="float">
            <text:p>9.8316</text:p>
          </table:table-cell>
          <table:table-cell office:value-type="float" office:value="-0.1684" calcext:value-type="float">
            <text:p>-0.1684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1349" calcext:value-type="float">
            <text:p>-0.134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1349" calcext:value-type="float">
            <text:p>-0.1349</text:p>
          </table:table-cell>
          <table:table-cell office:value-type="float" office:value="9.9828" calcext:value-type="float">
            <text:p>9.9828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866" calcext:value-type="float">
            <text:p>-0.1866</text:p>
          </table:table-cell>
          <table:table-cell office:value-type="float" office:value="-0.1521" calcext:value-type="float">
            <text:p>-0.152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866" calcext:value-type="float">
            <text:p>-0.1866</text:p>
          </table:table-cell>
          <table:table-cell office:value-type="float" office:value="-0.1521" calcext:value-type="float">
            <text:p>-0.1521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2573" calcext:value-type="float">
            <text:p>-0.2573</text:p>
          </table:table-cell>
          <table:table-cell office:value-type="float" office:value="0.0106" calcext:value-type="float">
            <text:p>0.010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2573" calcext:value-type="float">
            <text:p>-0.2573</text:p>
          </table:table-cell>
          <table:table-cell office:value-type="float" office:value="0.0106" calcext:value-type="float">
            <text:p>0.0106</text:p>
          </table:table-cell>
          <table:table-cell office:value-type="float" office:value="10.139" calcext:value-type="float">
            <text:p>10.13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0.1495" calcext:value-type="float">
            <text:p>0.149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0.1495" calcext:value-type="float">
            <text:p>0.1495</text:p>
          </table:table-cell>
          <table:table-cell office:value-type="float" office:value="9.9599" calcext:value-type="float">
            <text:p>9.9599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0.1094" calcext:value-type="float">
            <text:p>0.109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0.1094" calcext:value-type="float">
            <text:p>0.1094</text:p>
          </table:table-cell>
          <table:table-cell office:value-type="float" office:value="9.8446" calcext:value-type="float">
            <text:p>9.8446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459" calcext:value-type="float">
            <text:p>-0.045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9.9056" calcext:value-type="float">
            <text:p>9.9056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0233" calcext:value-type="float">
            <text:p>0.0233</text:p>
          </table:table-cell>
          <table:table-cell office:value-type="float" office:value="-0.1092" calcext:value-type="float">
            <text:p>-0.1092</text:p>
          </table:table-cell>
          <table:table-cell office:value-type="float" office:value="-0.1403" calcext:value-type="float">
            <text:p>-0.140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0233" calcext:value-type="float">
            <text:p>0.0233</text:p>
          </table:table-cell>
          <table:table-cell office:value-type="float" office:value="-0.1092" calcext:value-type="float">
            <text:p>-0.1092</text:p>
          </table:table-cell>
          <table:table-cell office:value-type="float" office:value="-0.1403" calcext:value-type="float">
            <text:p>-0.1403</text:p>
          </table:table-cell>
          <table:table-cell office:value-type="float" office:value="10.0647" calcext:value-type="float">
            <text:p>10.0647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314" calcext:value-type="float">
            <text:p>0.0314</text:p>
          </table:table-cell>
          <table:table-cell office:value-type="float" office:value="-0.2171" calcext:value-type="float">
            <text:p>-0.2171</text:p>
          </table:table-cell>
          <table:table-cell office:value-type="float" office:value="-0.0756" calcext:value-type="float">
            <text:p>-0.075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314" calcext:value-type="float">
            <text:p>0.0314</text:p>
          </table:table-cell>
          <table:table-cell office:value-type="float" office:value="-0.2171" calcext:value-type="float">
            <text:p>-0.2171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10.1547" calcext:value-type="float">
            <text:p>10.154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2154" calcext:value-type="float">
            <text:p>-0.2154</text:p>
          </table:table-cell>
          <table:table-cell office:value-type="float" office:value="0.0791" calcext:value-type="float">
            <text:p>0.079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2154" calcext:value-type="float">
            <text:p>-0.2154</text:p>
          </table:table-cell>
          <table:table-cell office:value-type="float" office:value="0.0791" calcext:value-type="float">
            <text:p>0.0791</text:p>
          </table:table-cell>
          <table:table-cell office:value-type="float" office:value="10.0438" calcext:value-type="float">
            <text:p>10.0438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0.1229" calcext:value-type="float">
            <text:p>0.122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0.1229" calcext:value-type="float">
            <text:p>0.1229</text:p>
          </table:table-cell>
          <table:table-cell office:value-type="float" office:value="9.9057" calcext:value-type="float">
            <text:p>9.9057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286" calcext:value-type="float">
            <text:p>0.028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286" calcext:value-type="float">
            <text:p>0.0286</text:p>
          </table:table-cell>
          <table:table-cell office:value-type="float" office:value="9.8748" calcext:value-type="float">
            <text:p>9.8748</text:p>
          </table:table-cell>
          <table:table-cell office:value-type="float" office:value="-0.1252" calcext:value-type="float">
            <text:p>-0.1252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-0.0966" calcext:value-type="float">
            <text:p>-0.096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9.9855" calcext:value-type="float">
            <text:p>9.9855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1764" calcext:value-type="float">
            <text:p>-0.1764</text:p>
          </table:table-cell>
          <table:table-cell office:value-type="float" office:value="-0.1111" calcext:value-type="float">
            <text:p>-0.111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1764" calcext:value-type="float">
            <text:p>-0.1764</text:p>
          </table:table-cell>
          <table:table-cell office:value-type="float" office:value="-0.1111" calcext:value-type="float">
            <text:p>-0.111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271" calcext:value-type="float">
            <text:p>-0.2271</text:p>
          </table:table-cell>
          <table:table-cell office:value-type="float" office:value="0.0097" calcext:value-type="float">
            <text:p>0.009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271" calcext:value-type="float">
            <text:p>-0.2271</text:p>
          </table:table-cell>
          <table:table-cell office:value-type="float" office:value="0.0097" calcext:value-type="float">
            <text:p>0.0097</text:p>
          </table:table-cell>
          <table:table-cell office:value-type="float" office:value="10.0992" calcext:value-type="float">
            <text:p>10.0992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678" calcext:value-type="float">
            <text:p>-0.1678</text:p>
          </table:table-cell>
          <table:table-cell office:value-type="float" office:value="0.109" calcext:value-type="float">
            <text:p>0.10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678" calcext:value-type="float">
            <text:p>-0.1678</text:p>
          </table:table-cell>
          <table:table-cell office:value-type="float" office:value="0.109" calcext:value-type="float">
            <text:p>0.109</text:p>
          </table:table-cell>
          <table:table-cell office:value-type="float" office:value="9.9686" calcext:value-type="float">
            <text:p>9.968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0.0776" calcext:value-type="float">
            <text:p>0.077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0.0776" calcext:value-type="float">
            <text:p>0.0776</text:p>
          </table:table-cell>
          <table:table-cell office:value-type="float" office:value="9.8864" calcext:value-type="float">
            <text:p>9.8864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-0.0361" calcext:value-type="float">
            <text:p>-0.036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9.931" calcext:value-type="float">
            <text:p>9.931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-0.1051" calcext:value-type="float">
            <text:p>-0.105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-0.1051" calcext:value-type="float">
            <text:p>-0.1051</text:p>
          </table:table-cell>
          <table:table-cell office:value-type="float" office:value="10.0549" calcext:value-type="float">
            <text:p>10.0549</text:p>
          </table:table-cell>
          <table:table-cell office:value-type="float" office:value="0.0549" calcext:value-type="float">
            <text:p>0.0549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-0.2019" calcext:value-type="float">
            <text:p>-0.2019</text:p>
          </table:table-cell>
          <table:table-cell office:value-type="float" office:value="-0.0502" calcext:value-type="float">
            <text:p>-0.050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-0.2019" calcext:value-type="float">
            <text:p>-0.2019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10.1125" calcext:value-type="float">
            <text:p>10.11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959" calcext:value-type="float">
            <text:p>-0.1959</text:p>
          </table:table-cell>
          <table:table-cell office:value-type="float" office:value="0.0623" calcext:value-type="float">
            <text:p>0.062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959" calcext:value-type="float">
            <text:p>-0.1959</text:p>
          </table:table-cell>
          <table:table-cell office:value-type="float" office:value="0.0623" calcext:value-type="float">
            <text:p>0.0623</text:p>
          </table:table-cell>
          <table:table-cell office:value-type="float" office:value="10.0268" calcext:value-type="float">
            <text:p>10.0268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1202" calcext:value-type="float">
            <text:p>-0.1202</text:p>
          </table:table-cell>
          <table:table-cell office:value-type="float" office:value="0.0891" calcext:value-type="float">
            <text:p>0.089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1202" calcext:value-type="float">
            <text:p>-0.1202</text:p>
          </table:table-cell>
          <table:table-cell office:value-type="float" office:value="0.0891" calcext:value-type="float">
            <text:p>0.0891</text:p>
          </table:table-cell>
          <table:table-cell office:value-type="float" office:value="9.9275" calcext:value-type="float">
            <text:p>9.9275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0.0166" calcext:value-type="float">
            <text:p>0.016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0.0166" calcext:value-type="float">
            <text:p>0.0166</text:p>
          </table:table-cell>
          <table:table-cell office:value-type="float" office:value="9.9107" calcext:value-type="float">
            <text:p>9.9107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-0.0727" calcext:value-type="float">
            <text:p>-0.072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9.9945" calcext:value-type="float">
            <text:p>9.994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783" calcext:value-type="float">
            <text:p>-0.078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10.0902" calcext:value-type="float">
            <text:p>10.0902</text:p>
          </table:table-cell>
          <table:table-cell office:value-type="float" office:value="0.0902" calcext:value-type="float">
            <text:p>0.090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2042" calcext:value-type="float">
            <text:p>-0.2042</text:p>
          </table:table-cell>
          <table:table-cell office:value-type="float" office:value="0.0119" calcext:value-type="float">
            <text:p>0.011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2042" calcext:value-type="float">
            <text:p>-0.2042</text:p>
          </table:table-cell>
          <table:table-cell office:value-type="float" office:value="0.0119" calcext:value-type="float">
            <text:p>0.0119</text:p>
          </table:table-cell>
          <table:table-cell office:value-type="float" office:value="10.0682" calcext:value-type="float">
            <text:p>10.0682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0.08" calcext:value-type="float">
            <text:p>0.08</text:p>
          </table:table-cell>
          <table:table-cell office:value-type="float" office:value="9.973" calcext:value-type="float">
            <text:p>9.97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0.0531" calcext:value-type="float">
            <text:p>0.053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0.0531" calcext:value-type="float">
            <text:p>0.0531</text:p>
          </table:table-cell>
          <table:table-cell office:value-type="float" office:value="9.9164" calcext:value-type="float">
            <text:p>9.9164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805" calcext:value-type="float">
            <text:p>-0.0805</text:p>
          </table:table-cell>
          <table:table-cell office:value-type="float" office:value="-0.0305" calcext:value-type="float">
            <text:p>-0.030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805" calcext:value-type="float">
            <text:p>-0.080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9.9537" calcext:value-type="float">
            <text:p>9.9537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-0.0768" calcext:value-type="float">
            <text:p>-0.076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10.0444" calcext:value-type="float">
            <text:p>10.0444</text:p>
          </table:table-cell>
          <table:table-cell office:value-type="float" office:value="0.0444" calcext:value-type="float">
            <text:p>0.0444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1888" calcext:value-type="float">
            <text:p>-0.1888</text:p>
          </table:table-cell>
          <table:table-cell office:value-type="float" office:value="-0.0324" calcext:value-type="float">
            <text:p>-0.032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1888" calcext:value-type="float">
            <text:p>-0.1888</text:p>
          </table:table-cell>
          <table:table-cell office:value-type="float" office:value="-0.0324" calcext:value-type="float">
            <text:p>-0.0324</text:p>
          </table:table-cell>
          <table:table-cell office:value-type="float" office:value="10.0811" calcext:value-type="float">
            <text:p>10.0811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1806" calcext:value-type="float">
            <text:p>-0.1806</text:p>
          </table:table-cell>
          <table:table-cell office:value-type="float" office:value="0.0486" calcext:value-type="float">
            <text:p>0.048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1806" calcext:value-type="float">
            <text:p>-0.1806</text:p>
          </table:table-cell>
          <table:table-cell office:value-type="float" office:value="0.0486" calcext:value-type="float">
            <text:p>0.0486</text:p>
          </table:table-cell>
          <table:table-cell office:value-type="float" office:value="10.0159" calcext:value-type="float">
            <text:p>10.0159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646" calcext:value-type="float">
            <text:p>0.064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646" calcext:value-type="float">
            <text:p>0.0646</text:p>
          </table:table-cell>
          <table:table-cell office:value-type="float" office:value="9.9441" calcext:value-type="float">
            <text:p>9.9441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0.0086" calcext:value-type="float">
            <text:p>0.008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0.0086" calcext:value-type="float">
            <text:p>0.0086</text:p>
          </table:table-cell>
          <table:table-cell office:value-type="float" office:value="9.9359" calcext:value-type="float">
            <text:p>9.9359</text:p>
          </table:table-cell>
          <table:table-cell office:value-type="float" office:value="-0.0641" calcext:value-type="float">
            <text:p>-0.0641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-0.0555" calcext:value-type="float">
            <text:p>-0.055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9.9999" calcext:value-type="float">
            <text:p>9.9999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664" calcext:value-type="float">
            <text:p>-0.1664</text:p>
          </table:table-cell>
          <table:table-cell office:value-type="float" office:value="-0.0556" calcext:value-type="float">
            <text:p>-0.055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664" calcext:value-type="float">
            <text:p>-0.1664</text:p>
          </table:table-cell>
          <table:table-cell office:value-type="float" office:value="-0.0556" calcext:value-type="float">
            <text:p>-0.0556</text:p>
          </table:table-cell>
          <table:table-cell office:value-type="float" office:value="10.0675" calcext:value-type="float">
            <text:p>10.06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1882" calcext:value-type="float">
            <text:p>-0.1882</text:p>
          </table:table-cell>
          <table:table-cell office:value-type="float" office:value="0.0119" calcext:value-type="float">
            <text:p>0.011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1882" calcext:value-type="float">
            <text:p>-0.1882</text:p>
          </table:table-cell>
          <table:table-cell office:value-type="float" office:value="0.0119" calcext:value-type="float">
            <text:p>0.0119</text:p>
          </table:table-cell>
          <table:table-cell office:value-type="float" office:value="10.0472" calcext:value-type="float">
            <text:p>10.0472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1527" calcext:value-type="float">
            <text:p>-0.1527</text:p>
          </table:table-cell>
          <table:table-cell office:value-type="float" office:value="0.0591" calcext:value-type="float">
            <text:p>0.059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1527" calcext:value-type="float">
            <text:p>-0.1527</text:p>
          </table:table-cell>
          <table:table-cell office:value-type="float" office:value="0.0591" calcext:value-type="float">
            <text:p>0.0591</text:p>
          </table:table-cell>
          <table:table-cell office:value-type="float" office:value="9.9776" calcext:value-type="float">
            <text:p>9.9776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1048" calcext:value-type="float">
            <text:p>-0.1048</text:p>
          </table:table-cell>
          <table:table-cell office:value-type="float" office:value="0.0367" calcext:value-type="float">
            <text:p>0.036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1048" calcext:value-type="float">
            <text:p>-0.1048</text:p>
          </table:table-cell>
          <table:table-cell office:value-type="float" office:value="0.0367" calcext:value-type="float">
            <text:p>0.0367</text:p>
          </table:table-cell>
          <table:table-cell office:value-type="float" office:value="9.9381" calcext:value-type="float">
            <text:p>9.9381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991" calcext:value-type="float">
            <text:p>-0.0991</text:p>
          </table:table-cell>
          <table:table-cell office:value-type="float" office:value="-0.0252" calcext:value-type="float">
            <text:p>-0.025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991" calcext:value-type="float">
            <text:p>-0.0991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9.9687" calcext:value-type="float">
            <text:p>9.9687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-0.0565" calcext:value-type="float">
            <text:p>-0.056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-0.0211" calcext:value-type="float">
            <text:p>-0.021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10.0589" calcext:value-type="float">
            <text:p>10.0589</text:p>
          </table:table-cell>
          <table:table-cell office:value-type="float" office:value="0.0589" calcext:value-type="float">
            <text:p>0.0589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1703" calcext:value-type="float">
            <text:p>-0.1703</text:p>
          </table:table-cell>
          <table:table-cell office:value-type="float" office:value="0.0378" calcext:value-type="float">
            <text:p>0.037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1703" calcext:value-type="float">
            <text:p>-0.17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0472" calcext:value-type="float">
            <text:p>0.047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0472" calcext:value-type="float">
            <text:p>0.0472</text:p>
          </table:table-cell>
          <table:table-cell office:value-type="float" office:value="9.9567" calcext:value-type="float">
            <text:p>9.9567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0.004" calcext:value-type="float">
            <text:p>0.00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0.004" calcext:value-type="float">
            <text:p>0.004</text:p>
          </table:table-cell>
          <table:table-cell office:value-type="float" office:value="9.9536" calcext:value-type="float">
            <text:p>9.9536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-0.0424" calcext:value-type="float">
            <text:p>-0.042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10.0026" calcext:value-type="float">
            <text:p>10.0026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-0.0398" calcext:value-type="float">
            <text:p>-0.039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10.0507" calcext:value-type="float">
            <text:p>10.050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1769" calcext:value-type="float">
            <text:p>-0.1769</text:p>
          </table:table-cell>
          <table:table-cell office:value-type="float" office:value="0.0109" calcext:value-type="float">
            <text:p>0.010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1769" calcext:value-type="float">
            <text:p>-0.1769</text:p>
          </table:table-cell>
          <table:table-cell office:value-type="float" office:value="0.0109" calcext:value-type="float">
            <text:p>0.0109</text:p>
          </table:table-cell>
          <table:table-cell office:value-type="float" office:value="10.033" calcext:value-type="float">
            <text:p>10.03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1495" calcext:value-type="float">
            <text:p>-0.1495</text:p>
          </table:table-cell>
          <table:table-cell office:value-type="float" office:value="0.0439" calcext:value-type="float">
            <text:p>0.043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1495" calcext:value-type="float">
            <text:p>-0.1495</text:p>
          </table:table-cell>
          <table:table-cell office:value-type="float" office:value="0.0439" calcext:value-type="float">
            <text:p>0.0439</text:p>
          </table:table-cell>
          <table:table-cell office:value-type="float" office:value="9.9818" calcext:value-type="float">
            <text:p>9.9818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1148" calcext:value-type="float">
            <text:p>-0.1148</text:p>
          </table:table-cell>
          <table:table-cell office:value-type="float" office:value="0.0257" calcext:value-type="float">
            <text:p>0.025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1148" calcext:value-type="float">
            <text:p>-0.1148</text:p>
          </table:table-cell>
          <table:table-cell office:value-type="float" office:value="0.0257" calcext:value-type="float">
            <text:p>0.0257</text:p>
          </table:table-cell>
          <table:table-cell office:value-type="float" office:value="9.9539" calcext:value-type="float">
            <text:p>9.9539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-0.0204" calcext:value-type="float">
            <text:p>-0.020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9.9786" calcext:value-type="float">
            <text:p>9.9786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1432" calcext:value-type="float">
            <text:p>-0.1432</text:p>
          </table:table-cell>
          <table:table-cell office:value-type="float" office:value="-0.0418" calcext:value-type="float">
            <text:p>-0.041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1432" calcext:value-type="float">
            <text:p>-0.1432</text:p>
          </table:table-cell>
          <table:table-cell office:value-type="float" office:value="-0.0418" calcext:value-type="float">
            <text:p>-0.0418</text:p>
          </table:table-cell>
          <table:table-cell office:value-type="float" office:value="10.0279" calcext:value-type="float">
            <text:p>10.0279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1711" calcext:value-type="float">
            <text:p>-0.1711</text:p>
          </table:table-cell>
          <table:table-cell office:value-type="float" office:value="-0.0139" calcext:value-type="float">
            <text:p>-0.013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55" calcext:value-type="float">
            <text:p>0.6255</text:p>
          </table:table-cell>
          <table:table-cell office:value-type="float" office:value="-0.668" calcext:value-type="float">
            <text:p>-0.668</text:p>
          </table:table-cell>
          <table:table-cell office:value-type="float" office:value="-0.3587" calcext:value-type="float">
            <text:p>-0.3587</text:p>
          </table:table-cell>
          <table:table-cell office:value-type="float" office:value="0.5495" calcext:value-type="float">
            <text:p>0.5495</text:p>
          </table:table-cell>
          <table:table-cell office:value-type="float" office:value="9.995" calcext:value-type="float">
            <text:p>9.99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2357" calcext:value-type="float">
            <text:p>-0.2357</text:p>
          </table:table-cell>
          <table:table-cell office:value-type="float" office:value="-0.915" calcext:value-type="float">
            <text:p>-0.91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5445" calcext:value-type="float">
            <text:p>0.544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2357" calcext:value-type="float">
            <text:p>-0.2357</text:p>
          </table:table-cell>
          <table:table-cell office:value-type="float" office:value="-0.915" calcext:value-type="float">
            <text:p>-0.91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5445" calcext:value-type="float">
            <text:p>0.5445</text:p>
          </table:table-cell>
          <table:table-cell office:value-type="float" office:value="9.1038" calcext:value-type="float">
            <text:p>9.1038</text:p>
          </table:table-cell>
          <table:table-cell office:value-type="float" office:value="-0.8962" calcext:value-type="float">
            <text:p>-0.8962</text:p>
          </table:table-cell>
          <table:table-cell office:value-type="float" office:value="-0.8856" calcext:value-type="float">
            <text:p>-0.8856</text:p>
          </table:table-cell>
          <table:table-cell office:value-type="float" office:value="-0.2817" calcext:value-type="float">
            <text:p>-0.2817</text:p>
          </table:table-cell>
          <table:table-cell office:value-type="float" office:value="0.2846" calcext:value-type="float">
            <text:p>0.2846</text:p>
          </table:table-cell>
          <table:table-cell office:value-type="float" office:value="-0.3517" calcext:value-type="float">
            <text:p>-0.351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8856" calcext:value-type="float">
            <text:p>-0.8856</text:p>
          </table:table-cell>
          <table:table-cell office:value-type="float" office:value="-0.2817" calcext:value-type="float">
            <text:p>-0.2817</text:p>
          </table:table-cell>
          <table:table-cell office:value-type="float" office:value="0.2846" calcext:value-type="float">
            <text:p>0.2846</text:p>
          </table:table-cell>
          <table:table-cell office:value-type="float" office:value="-0.3517" calcext:value-type="float">
            <text:p>-0.3517</text:p>
          </table:table-cell>
          <table:table-cell office:value-type="float" office:value="9.1285" calcext:value-type="float">
            <text:p>9.1285</text:p>
          </table:table-cell>
          <table:table-cell office:value-type="float" office:value="-0.8715" calcext:value-type="float">
            <text:p>-0.8715</text:p>
          </table:table-cell>
          <table:table-cell office:value-type="float" office:value="-0.7069" calcext:value-type="float">
            <text:p>-0.7069</text:p>
          </table:table-cell>
          <table:table-cell office:value-type="float" office:value="0.6114" calcext:value-type="float">
            <text:p>0.6114</text:p>
          </table:table-cell>
          <table:table-cell office:value-type="float" office:value="-0.5029" calcext:value-type="float">
            <text:p>-0.5029</text:p>
          </table:table-cell>
          <table:table-cell office:value-type="float" office:value="-1.2233" calcext:value-type="float">
            <text:p>-1.223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7069" calcext:value-type="float">
            <text:p>-0.7069</text:p>
          </table:table-cell>
          <table:table-cell office:value-type="float" office:value="0.6114" calcext:value-type="float">
            <text:p>0.6114</text:p>
          </table:table-cell>
          <table:table-cell office:value-type="float" office:value="-0.5029" calcext:value-type="float">
            <text:p>-0.5029</text:p>
          </table:table-cell>
          <table:table-cell office:value-type="float" office:value="-1.2233" calcext:value-type="float">
            <text:p>-1.2233</text:p>
          </table:table-cell>
          <table:table-cell office:value-type="float" office:value="11.2875" calcext:value-type="float">
            <text:p>11.2875</text:p>
          </table:table-cell>
          <table:table-cell office:value-type="float" office:value="1.2875" calcext:value-type="float">
            <text:p>1.2875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832" calcext:value-type="float">
            <text:p>0.8832</text:p>
          </table:table-cell>
          <table:table-cell office:value-type="float" office:value="-1.0824" calcext:value-type="float">
            <text:p>-1.0824</text:p>
          </table:table-cell>
          <table:table-cell office:value-type="float" office:value="0.0643" calcext:value-type="float">
            <text:p>0.064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832" calcext:value-type="float">
            <text:p>0.8832</text:p>
          </table:table-cell>
          <table:table-cell office:value-type="float" office:value="-1.0824" calcext:value-type="float">
            <text:p>-1.0824</text:p>
          </table:table-cell>
          <table:table-cell office:value-type="float" office:value="0.0643" calcext:value-type="float">
            <text:p>0.0643</text:p>
          </table:table-cell>
          <table:table-cell office:value-type="float" office:value="11.3913" calcext:value-type="float">
            <text:p>11.3913</text:p>
          </table:table-cell>
          <table:table-cell office:value-type="float" office:value="1.3913" calcext:value-type="float">
            <text:p>1.3913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3072" calcext:value-type="float">
            <text:p>0.3072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1.4556" calcext:value-type="float">
            <text:p>1.455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3072" calcext:value-type="float">
            <text:p>0.3072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1.4556" calcext:value-type="float">
            <text:p>1.4556</text:p>
          </table:table-cell>
          <table:table-cell office:value-type="float" office:value="8.9877" calcext:value-type="float">
            <text:p>8.9877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0.6609" calcext:value-type="float">
            <text:p>0.6609</text:p>
          </table:table-cell>
          <table:table-cell office:value-type="float" office:value="-0.4919" calcext:value-type="float">
            <text:p>-0.49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4433" calcext:value-type="float">
            <text:p>0.4433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6609" calcext:value-type="float">
            <text:p>0.6609</text:p>
          </table:table-cell>
          <table:table-cell office:value-type="float" office:value="-0.4919" calcext:value-type="float">
            <text:p>-0.49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4433" calcext:value-type="float">
            <text:p>0.4433</text:p>
          </table:table-cell>
          <table:table-cell office:value-type="float" office:value="9.678" calcext:value-type="float">
            <text:p>9.678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7686" calcext:value-type="float">
            <text:p>-0.768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1213" calcext:value-type="float">
            <text:p>0.121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7686" calcext:value-type="float">
            <text:p>-0.768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1213" calcext:value-type="float">
            <text:p>0.1213</text:p>
          </table:table-cell>
          <table:table-cell office:value-type="float" office:value="8.7837" calcext:value-type="float">
            <text:p>8.7837</text:p>
          </table:table-cell>
          <table:table-cell office:value-type="float" office:value="-1.2163" calcext:value-type="float">
            <text:p>-1.2163</text:p>
          </table:table-cell>
          <table:table-cell office:value-type="float" office:value="-0.6203" calcext:value-type="float">
            <text:p>-0.6203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0.4224" calcext:value-type="float">
            <text:p>0.4224</text:p>
          </table:table-cell>
          <table:table-cell office:value-type="float" office:value="-1.095" calcext:value-type="float">
            <text:p>-1.09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0.6203" calcext:value-type="float">
            <text:p>-0.6203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0.4224" calcext:value-type="float">
            <text:p>0.4224</text:p>
          </table:table-cell>
          <table:table-cell office:value-type="float" office:value="-1.095" calcext:value-type="float">
            <text:p>-1.095</text:p>
          </table:table-cell>
          <table:table-cell office:value-type="float" office:value="10.2666" calcext:value-type="float">
            <text:p>10.2666</text:p>
          </table:table-cell>
          <table:table-cell office:value-type="float" office:value="0.2666" calcext:value-type="float">
            <text:p>0.2666</text:p>
          </table:table-cell>
          <table:table-cell office:value-type="float" office:value="-0.5962" calcext:value-type="float">
            <text:p>-0.5962</text:p>
          </table:table-cell>
          <table:table-cell office:value-type="float" office:value="0.3796" calcext:value-type="float">
            <text:p>0.3796</text:p>
          </table:table-cell>
          <table:table-cell office:value-type="float" office:value="-0.5393" calcext:value-type="float">
            <text:p>-0.5393</text:p>
          </table:table-cell>
          <table:table-cell office:value-type="float" office:value="-0.8284" calcext:value-type="float">
            <text:p>-0.828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0.5962" calcext:value-type="float">
            <text:p>-0.5962</text:p>
          </table:table-cell>
          <table:table-cell office:value-type="float" office:value="0.3796" calcext:value-type="float">
            <text:p>0.3796</text:p>
          </table:table-cell>
          <table:table-cell office:value-type="float" office:value="-0.5393" calcext:value-type="float">
            <text:p>-0.5393</text:p>
          </table:table-cell>
          <table:table-cell office:value-type="float" office:value="-0.8284" calcext:value-type="float">
            <text:p>-0.8284</text:p>
          </table:table-cell>
          <table:table-cell office:value-type="float" office:value="10.8551" calcext:value-type="float">
            <text:p>10.8551</text:p>
          </table:table-cell>
          <table:table-cell office:value-type="float" office:value="0.8551" calcext:value-type="float">
            <text:p>0.8551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0.6615" calcext:value-type="float">
            <text:p>0.6615</text:p>
          </table:table-cell>
          <table:table-cell office:value-type="float" office:value="-0.9402" calcext:value-type="float">
            <text:p>-0.9402</text:p>
          </table:table-cell>
          <table:table-cell office:value-type="float" office:value="0.0267" calcext:value-type="float">
            <text:p>0.026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0.6615" calcext:value-type="float">
            <text:p>0.6615</text:p>
          </table:table-cell>
          <table:table-cell office:value-type="float" office:value="-0.9402" calcext:value-type="float">
            <text:p>-0.9402</text:p>
          </table:table-cell>
          <table:table-cell office:value-type="float" office:value="0.0267" calcext:value-type="float">
            <text:p>0.0267</text:p>
          </table:table-cell>
          <table:table-cell office:value-type="float" office:value="11.0129" calcext:value-type="float">
            <text:p>11.0129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3105" calcext:value-type="float">
            <text:p>0.3105</text:p>
          </table:table-cell>
          <table:table-cell office:value-type="float" office:value="-0.407" calcext:value-type="float">
            <text:p>-0.407</text:p>
          </table:table-cell>
          <table:table-cell office:value-type="float" office:value="1.0396" calcext:value-type="float">
            <text:p>1.039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3105" calcext:value-type="float">
            <text:p>0.3105</text:p>
          </table:table-cell>
          <table:table-cell office:value-type="float" office:value="-0.407" calcext:value-type="float">
            <text:p>-0.407</text:p>
          </table:table-cell>
          <table:table-cell office:value-type="float" office:value="1.0396" calcext:value-type="float">
            <text:p>1.0396</text:p>
          </table:table-cell>
          <table:table-cell office:value-type="float" office:value="9.6621" calcext:value-type="float">
            <text:p>9.6621</text:p>
          </table:table-cell>
          <table:table-cell office:value-type="float" office:value="-0.3379" calcext:value-type="float">
            <text:p>-0.33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-0.2827" calcext:value-type="float">
            <text:p>-0.2827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7017" calcext:value-type="float">
            <text:p>0.701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5204" calcext:value-type="float">
            <text:p>0.5204</text:p>
          </table:table-cell>
          <table:table-cell office:value-type="float" office:value="-0.2827" calcext:value-type="float">
            <text:p>-0.2827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7017" calcext:value-type="float">
            <text:p>0.7017</text:p>
          </table:table-cell>
          <table:table-cell office:value-type="float" office:value="9.4181" calcext:value-type="float">
            <text:p>9.4181</text:p>
          </table:table-cell>
          <table:table-cell office:value-type="float" office:value="-0.5819" calcext:value-type="float">
            <text:p>-0.5819</text:p>
          </table:table-cell>
          <table:table-cell office:value-type="float" office:value="0.0692" calcext:value-type="float">
            <text:p>0.0692</text:p>
          </table:table-cell>
          <table:table-cell office:value-type="float" office:value="-0.5511" calcext:value-type="float">
            <text:p>-0.5511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1198" calcext:value-type="float">
            <text:p>0.119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692" calcext:value-type="float">
            <text:p>0.0692</text:p>
          </table:table-cell>
          <table:table-cell office:value-type="float" office:value="-0.5511" calcext:value-type="float">
            <text:p>-0.5511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1198" calcext:value-type="float">
            <text:p>0.1198</text:p>
          </table:table-cell>
          <table:table-cell office:value-type="float" office:value="9.0347" calcext:value-type="float">
            <text:p>9.0347</text:p>
          </table:table-cell>
          <table:table-cell office:value-type="float" office:value="-0.9653" calcext:value-type="float">
            <text:p>-0.9653</text:p>
          </table:table-cell>
          <table:table-cell office:value-type="float" office:value="-0.3874" calcext:value-type="float">
            <text:p>-0.3874</text:p>
          </table:table-cell>
          <table:table-cell office:value-type="float" office:value="-0.2862" calcext:value-type="float">
            <text:p>-0.2862</text:p>
          </table:table-cell>
          <table:table-cell office:value-type="float" office:value="0.5114" calcext:value-type="float">
            <text:p>0.5114</text:p>
          </table:table-cell>
          <table:table-cell office:value-type="float" office:value="-0.8456" calcext:value-type="float">
            <text:p>-0.845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0.3874" calcext:value-type="float">
            <text:p>-0.3874</text:p>
          </table:table-cell>
          <table:table-cell office:value-type="float" office:value="-0.2862" calcext:value-type="float">
            <text:p>-0.2862</text:p>
          </table:table-cell>
          <table:table-cell office:value-type="float" office:value="0.5114" calcext:value-type="float">
            <text:p>0.5114</text:p>
          </table:table-cell>
          <table:table-cell office:value-type="float" office:value="-0.8456" calcext:value-type="float">
            <text:p>-0.8456</text:p>
          </table:table-cell>
          <table:table-cell office:value-type="float" office:value="10.0305" calcext:value-type="float">
            <text:p>10.03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4342" calcext:value-type="float">
            <text:p>-0.4342</text:p>
          </table:table-cell>
          <table:table-cell office:value-type="float" office:value="0.2107" calcext:value-type="float">
            <text:p>0.2107</text:p>
          </table:table-cell>
          <table:table-cell office:value-type="float" office:value="-0.3189" calcext:value-type="float">
            <text:p>-0.3189</text:p>
          </table:table-cell>
          <table:table-cell office:value-type="float" office:value="-0.815" calcext:value-type="float">
            <text:p>-0.8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0.4342" calcext:value-type="float">
            <text:p>-0.4342</text:p>
          </table:table-cell>
          <table:table-cell office:value-type="float" office:value="0.2107" calcext:value-type="float">
            <text:p>0.2107</text:p>
          </table:table-cell>
          <table:table-cell office:value-type="float" office:value="-0.3189" calcext:value-type="float">
            <text:p>-0.3189</text:p>
          </table:table-cell>
          <table:table-cell office:value-type="float" office:value="-0.815" calcext:value-type="float">
            <text:p>-0.815</text:p>
          </table:table-cell>
          <table:table-cell office:value-type="float" office:value="10.7526" calcext:value-type="float">
            <text:p>10.7526</text:p>
          </table:table-cell>
          <table:table-cell office:value-type="float" office:value="0.7526" calcext:value-type="float">
            <text:p>0.7526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4521" calcext:value-type="float">
            <text:p>0.4521</text:p>
          </table:table-cell>
          <table:table-cell office:value-type="float" office:value="-0.7576" calcext:value-type="float">
            <text:p>-0.7576</text:p>
          </table:table-cell>
          <table:table-cell office:value-type="float" office:value="-0.0625" calcext:value-type="float">
            <text:p>-0.062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4521" calcext:value-type="float">
            <text:p>0.4521</text:p>
          </table:table-cell>
          <table:table-cell office:value-type="float" office:value="-0.7576" calcext:value-type="float">
            <text:p>-0.7576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0.7514" calcext:value-type="float">
            <text:p>10.7514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2487" calcext:value-type="float">
            <text:p>0.2487</text:p>
          </table:table-cell>
          <table:table-cell office:value-type="float" office:value="-0.4444" calcext:value-type="float">
            <text:p>-0.4444</text:p>
          </table:table-cell>
          <table:table-cell office:value-type="float" office:value="0.6889" calcext:value-type="float">
            <text:p>0.688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2487" calcext:value-type="float">
            <text:p>0.2487</text:p>
          </table:table-cell>
          <table:table-cell office:value-type="float" office:value="-0.4444" calcext:value-type="float">
            <text:p>-0.4444</text:p>
          </table:table-cell>
          <table:table-cell office:value-type="float" office:value="0.6889" calcext:value-type="float">
            <text:p>0.6889</text:p>
          </table:table-cell>
          <table:table-cell office:value-type="float" office:value="10.1602" calcext:value-type="float">
            <text:p>10.1602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3601" calcext:value-type="float">
            <text:p>0.3601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8491" calcext:value-type="float">
            <text:p>0.849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3601" calcext:value-type="float">
            <text:p>0.3601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8491" calcext:value-type="float">
            <text:p>0.8491</text:p>
          </table:table-cell>
          <table:table-cell office:value-type="float" office:value="9.2016" calcext:value-type="float">
            <text:p>9.2016</text:p>
          </table:table-cell>
          <table:table-cell office:value-type="float" office:value="-0.7984" calcext:value-type="float">
            <text:p>-0.7984</text:p>
          </table:table-cell>
          <table:table-cell office:value-type="float" office:value="0.0839" calcext:value-type="float">
            <text:p>0.0839</text:p>
          </table:table-cell>
          <table:table-cell office:value-type="float" office:value="-0.3597" calcext:value-type="float">
            <text:p>-0.3597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0507" calcext:value-type="float">
            <text:p>0.050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0839" calcext:value-type="float">
            <text:p>0.0839</text:p>
          </table:table-cell>
          <table:table-cell office:value-type="float" office:value="-0.3597" calcext:value-type="float">
            <text:p>-0.3597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0507" calcext:value-type="float">
            <text:p>0.0507</text:p>
          </table:table-cell>
          <table:table-cell office:value-type="float" office:value="9.3397" calcext:value-type="float">
            <text:p>9.3397</text:p>
          </table:table-cell>
          <table:table-cell office:value-type="float" office:value="-0.6603" calcext:value-type="float">
            <text:p>-0.6603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026" calcext:value-type="float">
            <text:p>-0.2026</text:p>
          </table:table-cell>
          <table:table-cell office:value-type="float" office:value="0.4951" calcext:value-type="float">
            <text:p>0.4951</text:p>
          </table:table-cell>
          <table:table-cell office:value-type="float" office:value="-0.6095" calcext:value-type="float">
            <text:p>-0.609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026" calcext:value-type="float">
            <text:p>-0.2026</text:p>
          </table:table-cell>
          <table:table-cell office:value-type="float" office:value="0.4951" calcext:value-type="float">
            <text:p>0.4951</text:p>
          </table:table-cell>
          <table:table-cell office:value-type="float" office:value="-0.6095" calcext:value-type="float">
            <text:p>-0.6095</text:p>
          </table:table-cell>
          <table:table-cell office:value-type="float" office:value="9.8944" calcext:value-type="float">
            <text:p>9.8944</text:p>
          </table:table-cell>
          <table:table-cell office:value-type="float" office:value="-0.1056" calcext:value-type="float">
            <text:p>-0.1056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0.1166" calcext:value-type="float">
            <text:p>0.1166</text:p>
          </table:table-cell>
          <table:table-cell office:value-type="float" office:value="-0.1672" calcext:value-type="float">
            <text:p>-0.1672</text:p>
          </table:table-cell>
          <table:table-cell office:value-type="float" office:value="-0.7151" calcext:value-type="float">
            <text:p>-0.715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0.1166" calcext:value-type="float">
            <text:p>0.1166</text:p>
          </table:table-cell>
          <table:table-cell office:value-type="float" office:value="-0.1672" calcext:value-type="float">
            <text:p>-0.1672</text:p>
          </table:table-cell>
          <table:table-cell office:value-type="float" office:value="-0.7151" calcext:value-type="float">
            <text:p>-0.7151</text:p>
          </table:table-cell>
          <table:table-cell office:value-type="float" office:value="10.6052" calcext:value-type="float">
            <text:p>10.6052</text:p>
          </table:table-cell>
          <table:table-cell office:value-type="float" office:value="0.6052" calcext:value-type="float">
            <text:p>0.6052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0.2789" calcext:value-type="float">
            <text:p>0.2789</text:p>
          </table:table-cell>
          <table:table-cell office:value-type="float" office:value="-0.5797" calcext:value-type="float">
            <text:p>-0.5797</text:p>
          </table:table-cell>
          <table:table-cell office:value-type="float" office:value="-0.11" calcext:value-type="float">
            <text:p>-0.1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0.2789" calcext:value-type="float">
            <text:p>0.2789</text:p>
          </table:table-cell>
          <table:table-cell office:value-type="float" office:value="-0.5797" calcext:value-type="float">
            <text:p>-0.579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354" calcext:value-type="float">
            <text:p>10.535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564" calcext:value-type="float">
            <text:p>0.1564</text:p>
          </table:table-cell>
          <table:table-cell office:value-type="float" office:value="-0.422" calcext:value-type="float">
            <text:p>-0.422</text:p>
          </table:table-cell>
          <table:table-cell office:value-type="float" office:value="0.4254" calcext:value-type="float">
            <text:p>0.425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564" calcext:value-type="float">
            <text:p>0.1564</text:p>
          </table:table-cell>
          <table:table-cell office:value-type="float" office:value="-0.422" calcext:value-type="float">
            <text:p>-0.422</text:p>
          </table:table-cell>
          <table:table-cell office:value-type="float" office:value="0.4254" calcext:value-type="float">
            <text:p>0.4254</text:p>
          </table:table-cell>
          <table:table-cell office:value-type="float" office:value="10.2359" calcext:value-type="float">
            <text:p>10.2359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109" calcext:value-type="float">
            <text:p>0.2109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6613" calcext:value-type="float">
            <text:p>0.661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2109" calcext:value-type="float">
            <text:p>0.2109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6613" calcext:value-type="float">
            <text:p>0.6613</text:p>
          </table:table-cell>
          <table:table-cell office:value-type="float" office:value="9.4383" calcext:value-type="float">
            <text:p>9.4383</text:p>
          </table:table-cell>
          <table:table-cell office:value-type="float" office:value="-0.5617" calcext:value-type="float">
            <text:p>-0.5617</text:p>
          </table:table-cell>
          <table:table-cell office:value-type="float" office:value="0.0441" calcext:value-type="float">
            <text:p>0.0441</text:p>
          </table:table-cell>
          <table:table-cell office:value-type="float" office:value="-0.2182" calcext:value-type="float">
            <text:p>-0.2182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0996" calcext:value-type="float">
            <text:p>0.099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0441" calcext:value-type="float">
            <text:p>0.0441</text:p>
          </table:table-cell>
          <table:table-cell office:value-type="float" office:value="-0.2182" calcext:value-type="float">
            <text:p>-0.2182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0996" calcext:value-type="float">
            <text:p>0.0996</text:p>
          </table:table-cell>
          <table:table-cell office:value-type="float" office:value="9.5131" calcext:value-type="float">
            <text:p>9.5131</text:p>
          </table:table-cell>
          <table:table-cell office:value-type="float" office:value="-0.4869" calcext:value-type="float">
            <text:p>-0.4869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145" calcext:value-type="float">
            <text:p>-0.1145</text:p>
          </table:table-cell>
          <table:table-cell office:value-type="float" office:value="0.3579" calcext:value-type="float">
            <text:p>0.3579</text:p>
          </table:table-cell>
          <table:table-cell office:value-type="float" office:value="-0.3873" calcext:value-type="float">
            <text:p>-0.387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145" calcext:value-type="float">
            <text:p>-0.1145</text:p>
          </table:table-cell>
          <table:table-cell office:value-type="float" office:value="0.3579" calcext:value-type="float">
            <text:p>0.3579</text:p>
          </table:table-cell>
          <table:table-cell office:value-type="float" office:value="-0.3873" calcext:value-type="float">
            <text:p>-0.3873</text:p>
          </table:table-cell>
          <table:table-cell office:value-type="float" office:value="9.8323" calcext:value-type="float">
            <text:p>9.8323</text:p>
          </table:table-cell>
          <table:table-cell office:value-type="float" office:value="-0.1677" calcext:value-type="float">
            <text:p>-0.1677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-0.555" calcext:value-type="float">
            <text:p>-0.55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-0.555" calcext:value-type="float">
            <text:p>-0.555</text:p>
          </table:table-cell>
          <table:table-cell office:value-type="float" office:value="10.4447" calcext:value-type="float">
            <text:p>10.4447</text:p>
          </table:table-cell>
          <table:table-cell office:value-type="float" office:value="0.4447" calcext:value-type="float">
            <text:p>0.4447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1665" calcext:value-type="float">
            <text:p>0.1665</text:p>
          </table:table-cell>
          <table:table-cell office:value-type="float" office:value="-0.4458" calcext:value-type="float">
            <text:p>-0.4458</text:p>
          </table:table-cell>
          <table:table-cell office:value-type="float" office:value="-0.1103" calcext:value-type="float">
            <text:p>-0.110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1665" calcext:value-type="float">
            <text:p>0.1665</text:p>
          </table:table-cell>
          <table:table-cell office:value-type="float" office:value="-0.4458" calcext:value-type="float">
            <text:p>-0.4458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10.4052" calcext:value-type="float">
            <text:p>10.4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758" calcext:value-type="float">
            <text:p>0.0758</text:p>
          </table:table-cell>
          <table:table-cell office:value-type="float" office:value="-0.3535" calcext:value-type="float">
            <text:p>-0.3535</text:p>
          </table:table-cell>
          <table:table-cell office:value-type="float" office:value="0.2949" calcext:value-type="float">
            <text:p>0.294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758" calcext:value-type="float">
            <text:p>0.0758</text:p>
          </table:table-cell>
          <table:table-cell office:value-type="float" office:value="-0.3535" calcext:value-type="float">
            <text:p>-0.3535</text:p>
          </table:table-cell>
          <table:table-cell office:value-type="float" office:value="0.2949" calcext:value-type="float">
            <text:p>0.2949</text:p>
          </table:table-cell>
          <table:table-cell office:value-type="float" office:value="10.1481" calcext:value-type="float">
            <text:p>10.1481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443" calcext:value-type="float">
            <text:p>0.44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443" calcext:value-type="float">
            <text:p>0.443</text:p>
          </table:table-cell>
          <table:table-cell office:value-type="float" office:value="9.6806" calcext:value-type="float">
            <text:p>9.6806</text:p>
          </table:table-cell>
          <table:table-cell office:value-type="float" office:value="-0.3194" calcext:value-type="float">
            <text:p>-0.319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1295" calcext:value-type="float">
            <text:p>-0.1295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1235" calcext:value-type="float">
            <text:p>0.123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1295" calcext:value-type="float">
            <text:p>-0.1295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1235" calcext:value-type="float">
            <text:p>0.1235</text:p>
          </table:table-cell>
          <table:table-cell office:value-type="float" office:value="9.5987" calcext:value-type="float">
            <text:p>9.5987</text:p>
          </table:table-cell>
          <table:table-cell office:value-type="float" office:value="-0.4013" calcext:value-type="float">
            <text:p>-0.4013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2214" calcext:value-type="float">
            <text:p>0.2214</text:p>
          </table:table-cell>
          <table:table-cell office:value-type="float" office:value="-0.2778" calcext:value-type="float">
            <text:p>-0.277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2214" calcext:value-type="float">
            <text:p>0.2214</text:p>
          </table:table-cell>
          <table:table-cell office:value-type="float" office:value="-0.2778" calcext:value-type="float">
            <text:p>-0.2778</text:p>
          </table:table-cell>
          <table:table-cell office:value-type="float" office:value="9.8755" calcext:value-type="float">
            <text:p>9.8755</text:p>
          </table:table-cell>
          <table:table-cell office:value-type="float" office:value="-0.1245" calcext:value-type="float">
            <text:p>-0.1245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0.0734" calcext:value-type="float">
            <text:p>0.0734</text:p>
          </table:table-cell>
          <table:table-cell office:value-type="float" office:value="-0.1186" calcext:value-type="float">
            <text:p>-0.1186</text:p>
          </table:table-cell>
          <table:table-cell office:value-type="float" office:value="-0.4023" calcext:value-type="float">
            <text:p>-0.402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0.0734" calcext:value-type="float">
            <text:p>0.0734</text:p>
          </table:table-cell>
          <table:table-cell office:value-type="float" office:value="-0.1186" calcext:value-type="float">
            <text:p>-0.1186</text:p>
          </table:table-cell>
          <table:table-cell office:value-type="float" office:value="-0.4023" calcext:value-type="float">
            <text:p>-0.4023</text:p>
          </table:table-cell>
          <table:table-cell office:value-type="float" office:value="10.333" calcext:value-type="float">
            <text:p>10.3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3544" calcext:value-type="float">
            <text:p>-0.3544</text:p>
          </table:table-cell>
          <table:table-cell office:value-type="float" office:value="-0.0693" calcext:value-type="float">
            <text:p>-0.069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3544" calcext:value-type="float">
            <text:p>-0.354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10.3259" calcext:value-type="float">
            <text:p>10.3259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0.2566" calcext:value-type="float">
            <text:p>0.256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0.2566" calcext:value-type="float">
            <text:p>0.2566</text:p>
          </table:table-cell>
          <table:table-cell office:value-type="float" office:value="10.0322" calcext:value-type="float">
            <text:p>10.032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33" calcext:value-type="float">
            <text:p>0.0433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2888" calcext:value-type="float">
            <text:p>0.288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0433" calcext:value-type="float">
            <text:p>0.0433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2888" calcext:value-type="float">
            <text:p>0.2888</text:p>
          </table:table-cell>
          <table:table-cell office:value-type="float" office:value="9.7173" calcext:value-type="float">
            <text:p>9.7173</text:p>
          </table:table-cell>
          <table:table-cell office:value-type="float" office:value="-0.2827" calcext:value-type="float">
            <text:p>-0.2827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-0.0743" calcext:value-type="float">
            <text:p>-0.0743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061" calcext:value-type="float">
            <text:p>0.006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-0.0743" calcext:value-type="float">
            <text:p>-0.0743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061" calcext:value-type="float">
            <text:p>0.0061</text:p>
          </table:table-cell>
          <table:table-cell office:value-type="float" office:value="9.7492" calcext:value-type="float">
            <text:p>9.7492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743" calcext:value-type="float">
            <text:p>-0.074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401" calcext:value-type="float">
            <text:p>0.0401</text:p>
          </table:table-cell>
          <table:table-cell office:value-type="float" office:value="-0.2448" calcext:value-type="float">
            <text:p>-0.244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-0.0743" calcext:value-type="float">
            <text:p>-0.074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401" calcext:value-type="float">
            <text:p>0.0401</text:p>
          </table:table-cell>
          <table:table-cell office:value-type="float" office:value="-0.2448" calcext:value-type="float">
            <text:p>-0.2448</text:p>
          </table:table-cell>
          <table:table-cell office:value-type="float" office:value="9.9786" calcext:value-type="float">
            <text:p>9.9786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2154" calcext:value-type="float">
            <text:p>-0.2154</text:p>
          </table:table-cell>
          <table:table-cell office:value-type="float" office:value="-0.2661" calcext:value-type="float">
            <text:p>-0.266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2154" calcext:value-type="float">
            <text:p>-0.2154</text:p>
          </table:table-cell>
          <table:table-cell office:value-type="float" office:value="-0.2661" calcext:value-type="float">
            <text:p>-0.2661</text:p>
          </table:table-cell>
          <table:table-cell office:value-type="float" office:value="10.276" calcext:value-type="float">
            <text:p>10.276</text:p>
          </table:table-cell>
          <table:table-cell office:value-type="float" office:value="0.276" calcext:value-type="float">
            <text:p>0.27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0.0099" calcext:value-type="float">
            <text:p>0.009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0.0099" calcext:value-type="float">
            <text:p>0.0099</text:p>
          </table:table-cell>
          <table:table-cell office:value-type="float" office:value="10.2345" calcext:value-type="float">
            <text:p>10.234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2164" calcext:value-type="float">
            <text:p>-0.2164</text:p>
          </table:table-cell>
          <table:table-cell office:value-type="float" office:value="0.2444" calcext:value-type="float">
            <text:p>0.244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2164" calcext:value-type="float">
            <text:p>-0.2164</text:p>
          </table:table-cell>
          <table:table-cell office:value-type="float" office:value="0.2444" calcext:value-type="float">
            <text:p>0.2444</text:p>
          </table:table-cell>
          <table:table-cell office:value-type="float" office:value="9.9321" calcext:value-type="float">
            <text:p>9.9321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1765" calcext:value-type="float">
            <text:p>0.176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1765" calcext:value-type="float">
            <text:p>0.1765</text:p>
          </table:table-cell>
          <table:table-cell office:value-type="float" office:value="9.758" calcext:value-type="float">
            <text:p>9.758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655" calcext:value-type="float">
            <text:p>-0.065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655" calcext:value-type="float">
            <text:p>-0.0655</text:p>
          </table:table-cell>
          <table:table-cell office:value-type="float" office:value="9.8505" calcext:value-type="float">
            <text:p>9.8505</text:p>
          </table:table-cell>
          <table:table-cell office:value-type="float" office:value="-0.1495" calcext:value-type="float">
            <text:p>-0.1495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3" calcext:value-type="float">
            <text:p>0.03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215" calcext:value-type="float">
            <text:p>-0.2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3" calcext:value-type="float">
            <text:p>0.03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215" calcext:value-type="float">
            <text:p>-0.215</text:p>
          </table:table-cell>
          <table:table-cell office:value-type="float" office:value="10.0834" calcext:value-type="float">
            <text:p>10.0834</text:p>
          </table:table-cell>
          <table:table-cell office:value-type="float" office:value="0.0834" calcext:value-type="float">
            <text:p>0.0834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526" calcext:value-type="float">
            <text:p>0.0526</text:p>
          </table:table-cell>
          <table:table-cell office:value-type="float" office:value="-0.2641" calcext:value-type="float">
            <text:p>-0.2641</text:p>
          </table:table-cell>
          <table:table-cell office:value-type="float" office:value="-0.1316" calcext:value-type="float">
            <text:p>-0.131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526" calcext:value-type="float">
            <text:p>0.0526</text:p>
          </table:table-cell>
          <table:table-cell office:value-type="float" office:value="-0.2641" calcext:value-type="float">
            <text:p>-0.2641</text:p>
          </table:table-cell>
          <table:table-cell office:value-type="float" office:value="-0.1316" calcext:value-type="float">
            <text:p>-0.1316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2749" calcext:value-type="float">
            <text:p>-0.2749</text:p>
          </table:table-cell>
          <table:table-cell office:value-type="float" office:value="0.1101" calcext:value-type="float">
            <text:p>0.110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2749" calcext:value-type="float">
            <text:p>-0.2749</text:p>
          </table:table-cell>
          <table:table-cell office:value-type="float" office:value="0.1101" calcext:value-type="float">
            <text:p>0.1101</text:p>
          </table:table-cell>
          <table:table-cell office:value-type="float" office:value="10.0868" calcext:value-type="float">
            <text:p>10.0868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0.1969" calcext:value-type="float">
            <text:p>0.196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0.1969" calcext:value-type="float">
            <text:p>0.1969</text:p>
          </table:table-cell>
          <table:table-cell office:value-type="float" office:value="9.8641" calcext:value-type="float">
            <text:p>9.8641</text:p>
          </table:table-cell>
          <table:table-cell office:value-type="float" office:value="-0.1359" calcext:value-type="float">
            <text:p>-0.1359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61" calcext:value-type="float">
            <text:p>0.06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61" calcext:value-type="float">
            <text:p>0.061</text:p>
          </table:table-cell>
          <table:table-cell office:value-type="float" office:value="9.8146" calcext:value-type="float">
            <text:p>9.8146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1244" calcext:value-type="float">
            <text:p>-0.124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9.9564" calcext:value-type="float">
            <text:p>9.9564</text:p>
          </table:table-cell>
          <table:table-cell office:value-type="float" office:value="-0.0436" calcext:value-type="float">
            <text:p>-0.0436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703" calcext:value-type="float">
            <text:p>-0.1703</text:p>
          </table:table-cell>
          <table:table-cell office:value-type="float" office:value="-0.168" calcext:value-type="float">
            <text:p>-0.16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703" calcext:value-type="float">
            <text:p>-0.1703</text:p>
          </table:table-cell>
          <table:table-cell office:value-type="float" office:value="-0.168" calcext:value-type="float">
            <text:p>-0.168</text:p>
          </table:table-cell>
          <table:table-cell office:value-type="float" office:value="10.1516" calcext:value-type="float">
            <text:p>10.1516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-0.2626" calcext:value-type="float">
            <text:p>-0.2626</text:p>
          </table:table-cell>
          <table:table-cell office:value-type="float" office:value="-0.0164" calcext:value-type="float">
            <text:p>-0.016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-0.2626" calcext:value-type="float">
            <text:p>-0.262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10.1638" calcext:value-type="float">
            <text:p>10.1638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971" calcext:value-type="float">
            <text:p>-0.1971</text:p>
          </table:table-cell>
          <table:table-cell office:value-type="float" office:value="0.1474" calcext:value-type="float">
            <text:p>0.147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971" calcext:value-type="float">
            <text:p>-0.1971</text:p>
          </table:table-cell>
          <table:table-cell office:value-type="float" office:value="0.1474" calcext:value-type="float">
            <text:p>0.1474</text:p>
          </table:table-cell>
          <table:table-cell office:value-type="float" office:value="9.9842" calcext:value-type="float">
            <text:p>9.9842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0.1316" calcext:value-type="float">
            <text:p>0.131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0.1316" calcext:value-type="float">
            <text:p>0.1316</text:p>
          </table:table-cell>
          <table:table-cell office:value-type="float" office:value="9.8408" calcext:value-type="float">
            <text:p>9.8408</text:p>
          </table:table-cell>
          <table:table-cell office:value-type="float" office:value="-0.1592" calcext:value-type="float">
            <text:p>-0.1592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276" calcext:value-type="float">
            <text:p>-0.027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9.885" calcext:value-type="float">
            <text:p>9.88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907" calcext:value-type="float">
            <text:p>-0.0907</text:p>
          </table:table-cell>
          <table:table-cell office:value-type="float" office:value="-0.1426" calcext:value-type="float">
            <text:p>-0.142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907" calcext:value-type="float">
            <text:p>-0.0907</text:p>
          </table:table-cell>
          <table:table-cell office:value-type="float" office:value="-0.1426" calcext:value-type="float">
            <text:p>-0.1426</text:p>
          </table:table-cell>
          <table:table-cell office:value-type="float" office:value="10.0433" calcext:value-type="float">
            <text:p>10.0433</text:p>
          </table:table-cell>
          <table:table-cell office:value-type="float" office:value="0.0433" calcext:value-type="float">
            <text:p>0.0433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2116" calcext:value-type="float">
            <text:p>-0.2116</text:p>
          </table:table-cell>
          <table:table-cell office:value-type="float" office:value="-0.0992" calcext:value-type="float">
            <text:p>-0.099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2116" calcext:value-type="float">
            <text:p>-0.2116</text:p>
          </table:table-cell>
          <table:table-cell office:value-type="float" office:value="-0.0992" calcext:value-type="float">
            <text:p>-0.0992</text:p>
          </table:table-cell>
          <table:table-cell office:value-type="float" office:value="10.1631" calcext:value-type="float">
            <text:p>10.163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2293" calcext:value-type="float">
            <text:p>-0.2293</text:p>
          </table:table-cell>
          <table:table-cell office:value-type="float" office:value="0.0639" calcext:value-type="float">
            <text:p>0.063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2293" calcext:value-type="float">
            <text:p>-0.2293</text:p>
          </table:table-cell>
          <table:table-cell office:value-type="float" office:value="0.0639" calcext:value-type="float">
            <text:p>0.0639</text:p>
          </table:table-cell>
          <table:table-cell office:value-type="float" office:value="10.0696" calcext:value-type="float">
            <text:p>10.0696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1306" calcext:value-type="float">
            <text:p>-0.1306</text:p>
          </table:table-cell>
          <table:table-cell office:value-type="float" office:value="0.1335" calcext:value-type="float">
            <text:p>0.133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1306" calcext:value-type="float">
            <text:p>-0.1306</text:p>
          </table:table-cell>
          <table:table-cell office:value-type="float" office:value="0.1335" calcext:value-type="float">
            <text:p>0.1335</text:p>
          </table:table-cell>
          <table:table-cell office:value-type="float" office:value="9.9163" calcext:value-type="float">
            <text:p>9.9163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498" calcext:value-type="float">
            <text:p>0.049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498" calcext:value-type="float">
            <text:p>0.0498</text:p>
          </table:table-cell>
          <table:table-cell office:value-type="float" office:value="9.8636" calcext:value-type="float">
            <text:p>9.8636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-0.0867" calcext:value-type="float">
            <text:p>-0.086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9.9656" calcext:value-type="float">
            <text:p>9.9656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277" calcext:value-type="float">
            <text:p>0.0277</text:p>
          </table:table-cell>
          <table:table-cell office:value-type="float" office:value="-0.1613" calcext:value-type="float">
            <text:p>-0.1613</text:p>
          </table:table-cell>
          <table:table-cell office:value-type="float" office:value="-0.1211" calcext:value-type="float">
            <text:p>-0.121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277" calcext:value-type="float">
            <text:p>0.0277</text:p>
          </table:table-cell>
          <table:table-cell office:value-type="float" office:value="-0.1613" calcext:value-type="float">
            <text:p>-0.1613</text:p>
          </table:table-cell>
          <table:table-cell office:value-type="float" office:value="-0.1211" calcext:value-type="float">
            <text:p>-0.1211</text:p>
          </table:table-cell>
          <table:table-cell office:value-type="float" office:value="10.1105" calcext:value-type="float">
            <text:p>10.1105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2271" calcext:value-type="float">
            <text:p>-0.2271</text:p>
          </table:table-cell>
          <table:table-cell office:value-type="float" office:value="-0.0106" calcext:value-type="float">
            <text:p>-0.010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2271" calcext:value-type="float">
            <text:p>-0.2271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10.1158" calcext:value-type="float">
            <text:p>10.115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1798" calcext:value-type="float">
            <text:p>-0.1798</text:p>
          </table:table-cell>
          <table:table-cell office:value-type="float" office:value="0.1052" calcext:value-type="float">
            <text:p>0.105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1798" calcext:value-type="float">
            <text:p>-0.1798</text:p>
          </table:table-cell>
          <table:table-cell office:value-type="float" office:value="0.1052" calcext:value-type="float">
            <text:p>0.1052</text:p>
          </table:table-cell>
          <table:table-cell office:value-type="float" office:value="9.986" calcext:value-type="float">
            <text:p>9.98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912" calcext:value-type="float">
            <text:p>0.091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912" calcext:value-type="float">
            <text:p>0.0912</text:p>
          </table:table-cell>
          <table:table-cell office:value-type="float" office:value="9.8876" calcext:value-type="float">
            <text:p>9.8876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-0.0212" calcext:value-type="float">
            <text:p>-0.021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9.9147" calcext:value-type="float">
            <text:p>9.9147</text:p>
          </table:table-cell>
          <table:table-cell office:value-type="float" office:value="-0.0853" calcext:value-type="float">
            <text:p>-0.0853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1065" calcext:value-type="float">
            <text:p>-0.106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1065" calcext:value-type="float">
            <text:p>-0.1065</text:p>
          </table:table-cell>
          <table:table-cell office:value-type="float" office:value="10.0384" calcext:value-type="float">
            <text:p>10.0384</text:p>
          </table:table-cell>
          <table:table-cell office:value-type="float" office:value="0.0384" calcext:value-type="float">
            <text:p>0.038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1976" calcext:value-type="float">
            <text:p>-0.1976</text:p>
          </table:table-cell>
          <table:table-cell office:value-type="float" office:value="-0.0681" calcext:value-type="float">
            <text:p>-0.068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1976" calcext:value-type="float">
            <text:p>-0.1976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10.1192" calcext:value-type="float">
            <text:p>10.1192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7" calcext:value-type="float">
            <text:p>0.0047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0.0511" calcext:value-type="float">
            <text:p>0.051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7" calcext:value-type="float">
            <text:p>0.0047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0.0511" calcext:value-type="float">
            <text:p>0.0511</text:p>
          </table:table-cell>
          <table:table-cell office:value-type="float" office:value="10.045" calcext:value-type="float">
            <text:p>10.045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0.0962" calcext:value-type="float">
            <text:p>0.096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9.9362" calcext:value-type="float">
            <text:p>9.9362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0324" calcext:value-type="float">
            <text:p>0.032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0324" calcext:value-type="float">
            <text:p>0.0324</text:p>
          </table:table-cell>
          <table:table-cell office:value-type="float" office:value="9.9021" calcext:value-type="float">
            <text:p>9.9021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847" calcext:value-type="float">
            <text:p>-0.0847</text:p>
          </table:table-cell>
          <table:table-cell office:value-type="float" office:value="-0.0655" calcext:value-type="float">
            <text:p>-0.065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847" calcext:value-type="float">
            <text:p>-0.0847</text:p>
          </table:table-cell>
          <table:table-cell office:value-type="float" office:value="-0.0655" calcext:value-type="float">
            <text:p>-0.0655</text:p>
          </table:table-cell>
          <table:table-cell office:value-type="float" office:value="9.9784" calcext:value-type="float">
            <text:p>9.9784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871" calcext:value-type="float">
            <text:p>-0.087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10.0843" calcext:value-type="float">
            <text:p>10.0843</text:p>
          </table:table-cell>
          <table:table-cell office:value-type="float" office:value="0.0843" calcext:value-type="float">
            <text:p>0.084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143" calcext:value-type="float">
            <text:p>0.0143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0028" calcext:value-type="float">
            <text:p>-0.002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143" calcext:value-type="float">
            <text:p>0.0143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10.0814" calcext:value-type="float">
            <text:p>10.0814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786" calcext:value-type="float">
            <text:p>0.078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786" calcext:value-type="float">
            <text:p>0.0786</text:p>
          </table:table-cell>
          <table:table-cell office:value-type="float" office:value="9.9854" calcext:value-type="float">
            <text:p>9.985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0.064" calcext:value-type="float">
            <text:p>0.06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0.064" calcext:value-type="float">
            <text:p>0.064</text:p>
          </table:table-cell>
          <table:table-cell office:value-type="float" office:value="9.9164" calcext:value-type="float">
            <text:p>9.9164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-0.0196" calcext:value-type="float">
            <text:p>-0.019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9.9413" calcext:value-type="float">
            <text:p>9.9413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-0.0784" calcext:value-type="float">
            <text:p>-0.078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-0.0784" calcext:value-type="float">
            <text:p>-0.0784</text:p>
          </table:table-cell>
          <table:table-cell office:value-type="float" office:value="10.0326" calcext:value-type="float">
            <text:p>10.0326</text:p>
          </table:table-cell>
          <table:table-cell office:value-type="float" office:value="0.0326" calcext:value-type="float">
            <text:p>0.0326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1856" calcext:value-type="float">
            <text:p>-0.1856</text:p>
          </table:table-cell>
          <table:table-cell office:value-type="float" office:value="-0.0458" calcext:value-type="float">
            <text:p>-0.045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1856" calcext:value-type="float">
            <text:p>-0.1856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10.0866" calcext:value-type="float">
            <text:p>10.0866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1881" calcext:value-type="float">
            <text:p>-0.1881</text:p>
          </table:table-cell>
          <table:table-cell office:value-type="float" office:value="0.0408" calcext:value-type="float">
            <text:p>0.040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1881" calcext:value-type="float">
            <text:p>-0.1881</text:p>
          </table:table-cell>
          <table:table-cell office:value-type="float" office:value="0.0408" calcext:value-type="float">
            <text:p>0.0408</text:p>
          </table:table-cell>
          <table:table-cell office:value-type="float" office:value="10.0285" calcext:value-type="float">
            <text:p>10.0285</text:p>
          </table:table-cell>
          <table:table-cell office:value-type="float" office:value="0.0285" calcext:value-type="float">
            <text:p>0.028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694" calcext:value-type="float">
            <text:p>0.069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694" calcext:value-type="float">
            <text:p>0.0694</text:p>
          </table:table-cell>
          <table:table-cell office:value-type="float" office:value="9.9507" calcext:value-type="float">
            <text:p>9.9507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0883" calcext:value-type="float">
            <text:p>-0.0883</text:p>
          </table:table-cell>
          <table:table-cell office:value-type="float" office:value="0.0201" calcext:value-type="float">
            <text:p>0.020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0883" calcext:value-type="float">
            <text:p>-0.0883</text:p>
          </table:table-cell>
          <table:table-cell office:value-type="float" office:value="0.0201" calcext:value-type="float">
            <text:p>0.0201</text:p>
          </table:table-cell>
          <table:table-cell office:value-type="float" office:value="9.9295" calcext:value-type="float">
            <text:p>9.9295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-0.0505" calcext:value-type="float">
            <text:p>-0.050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9.9882" calcext:value-type="float">
            <text:p>9.9882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598" calcext:value-type="float">
            <text:p>-0.1598</text:p>
          </table:table-cell>
          <table:table-cell office:value-type="float" office:value="-0.0623" calcext:value-type="float">
            <text:p>-0.062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598" calcext:value-type="float">
            <text:p>-0.1598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10.0638" calcext:value-type="float">
            <text:p>10.0638</text:p>
          </table:table-cell>
          <table:table-cell office:value-type="float" office:value="0.0638" calcext:value-type="float">
            <text:p>0.0638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15" calcext:value-type="float">
            <text:p>0.00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10.0572" calcext:value-type="float">
            <text:p>10.0572</text:p>
          </table:table-cell>
          <table:table-cell office:value-type="float" office:value="0.0572" calcext:value-type="float">
            <text:p>0.0572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0.0588" calcext:value-type="float">
            <text:p>0.058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0.0588" calcext:value-type="float">
            <text:p>0.0588</text:p>
          </table:table-cell>
          <table:table-cell office:value-type="float" office:value="9.9864" calcext:value-type="float">
            <text:p>9.9864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81" calcext:value-type="float">
            <text:p>-0.1081</text:p>
          </table:table-cell>
          <table:table-cell office:value-type="float" office:value="0.0452" calcext:value-type="float">
            <text:p>0.045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81" calcext:value-type="float">
            <text:p>-0.1081</text:p>
          </table:table-cell>
          <table:table-cell office:value-type="float" office:value="0.0452" calcext:value-type="float">
            <text:p>0.0452</text:p>
          </table:table-cell>
          <table:table-cell office:value-type="float" office:value="9.9376" calcext:value-type="float">
            <text:p>9.937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-0.0172" calcext:value-type="float">
            <text:p>-0.017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9.9592" calcext:value-type="float">
            <text:p>9.9592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317" calcext:value-type="float">
            <text:p>-0.1317</text:p>
          </table:table-cell>
          <table:table-cell office:value-type="float" office:value="-0.058" calcext:value-type="float">
            <text:p>-0.05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317" calcext:value-type="float">
            <text:p>-0.1317</text:p>
          </table:table-cell>
          <table:table-cell office:value-type="float" office:value="-0.058" calcext:value-type="float">
            <text:p>-0.058</text:p>
          </table:table-cell>
          <table:table-cell office:value-type="float" office:value="10.0268" calcext:value-type="float">
            <text:p>10.0268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1764" calcext:value-type="float">
            <text:p>-0.1764</text:p>
          </table:table-cell>
          <table:table-cell office:value-type="float" office:value="-0.0312" calcext:value-type="float">
            <text:p>-0.031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1764" calcext:value-type="float">
            <text:p>-0.1764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10.0633" calcext:value-type="float">
            <text:p>10.0633</text:p>
          </table:table-cell>
          <table:table-cell office:value-type="float" office:value="0.0633" calcext:value-type="float">
            <text:p>0.0633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759" calcext:value-type="float">
            <text:p>-0.1759</text:p>
          </table:table-cell>
          <table:table-cell office:value-type="float" office:value="0.0321" calcext:value-type="float">
            <text:p>0.032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759" calcext:value-type="float">
            <text:p>-0.1759</text:p>
          </table:table-cell>
          <table:table-cell office:value-type="float" office:value="0.0321" calcext:value-type="float">
            <text:p>0.0321</text:p>
          </table:table-cell>
          <table:table-cell office:value-type="float" office:value="10.0189" calcext:value-type="float">
            <text:p>10.01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1344" calcext:value-type="float">
            <text:p>-0.1344</text:p>
          </table:table-cell>
          <table:table-cell office:value-type="float" office:value="0.051" calcext:value-type="float">
            <text:p>0.05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1344" calcext:value-type="float">
            <text:p>-0.1344</text:p>
          </table:table-cell>
          <table:table-cell office:value-type="float" office:value="0.051" calcext:value-type="float">
            <text:p>0.051</text:p>
          </table:table-cell>
          <table:table-cell office:value-type="float" office:value="9.9615" calcext:value-type="float">
            <text:p>9.9615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0125" calcext:value-type="float">
            <text:p>0.012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0125" calcext:value-type="float">
            <text:p>0.0125</text:p>
          </table:table-cell>
          <table:table-cell office:value-type="float" office:value="9.9486" calcext:value-type="float">
            <text:p>9.9486</text:p>
          </table:table-cell>
          <table:table-cell office:value-type="float" office:value="-0.0514" calcext:value-type="float">
            <text:p>-0.0514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-0.0389" calcext:value-type="float">
            <text:p>-0.038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9.9939" calcext:value-type="float">
            <text:p>9.9939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-0.045" calcext:value-type="float">
            <text:p>-0.04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-0.045" calcext:value-type="float">
            <text:p>-0.045</text:p>
          </table:table-cell>
          <table:table-cell office:value-type="float" office:value="10.0483" calcext:value-type="float">
            <text:p>10.0483</text:p>
          </table:table-cell>
          <table:table-cell office:value-type="float" office:value="0.0483" calcext:value-type="float">
            <text:p>0.0483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33" calcext:value-type="float">
            <text:p>0.003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33" calcext:value-type="float">
            <text:p>0.0033</text:p>
          </table:table-cell>
          <table:table-cell office:value-type="float" office:value="10.0405" calcext:value-type="float">
            <text:p>10.0405</text:p>
          </table:table-cell>
          <table:table-cell office:value-type="float" office:value="0.0405" calcext:value-type="float">
            <text:p>0.040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439" calcext:value-type="float">
            <text:p>0.043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439" calcext:value-type="float">
            <text:p>0.0439</text:p>
          </table:table-cell>
          <table:table-cell office:value-type="float" office:value="9.9883" calcext:value-type="float">
            <text:p>9.9883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322" calcext:value-type="float">
            <text:p>0.032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322" calcext:value-type="float">
            <text:p>0.0322</text:p>
          </table:table-cell>
          <table:table-cell office:value-type="float" office:value="9.9532" calcext:value-type="float">
            <text:p>9.9532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1082" calcext:value-type="float">
            <text:p>-0.1082</text:p>
          </table:table-cell>
          <table:table-cell office:value-type="float" office:value="-0.0146" calcext:value-type="float">
            <text:p>-0.014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1082" calcext:value-type="float">
            <text:p>-0.1082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9.9714" calcext:value-type="float">
            <text:p>9.9714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371" calcext:value-type="float">
            <text:p>-0.1371</text:p>
          </table:table-cell>
          <table:table-cell office:value-type="float" office:value="-0.0432" calcext:value-type="float">
            <text:p>-0.043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371" calcext:value-type="float">
            <text:p>-0.1371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10.0216" calcext:value-type="float">
            <text:p>10.0216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1695" calcext:value-type="float">
            <text:p>-0.1695</text:p>
          </table:table-cell>
          <table:table-cell office:value-type="float" office:value="-0.0216" calcext:value-type="float">
            <text:p>-0.021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272" calcext:value-type="float">
            <text:p>0.6272</text:p>
          </table:table-cell>
          <table:table-cell office:value-type="float" office:value="-0.6938" calcext:value-type="float">
            <text:p>-0.6938</text:p>
          </table:table-cell>
          <table:table-cell office:value-type="float" office:value="-0.3097" calcext:value-type="float">
            <text:p>-0.3097</text:p>
          </table:table-cell>
          <table:table-cell office:value-type="float" office:value="0.591" calcext:value-type="float">
            <text:p>0.591</text:p>
          </table:table-cell>
          <table:table-cell office:value-type="float" office:value="9.8712" calcext:value-type="float">
            <text:p>9.8712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-0.2542" calcext:value-type="float">
            <text:p>-0.2542</text:p>
          </table:table-cell>
          <table:table-cell office:value-type="float" office:value="-0.9266" calcext:value-type="float">
            <text:p>-0.9266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4622" calcext:value-type="float">
            <text:p>0.462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2542" calcext:value-type="float">
            <text:p>-0.2542</text:p>
          </table:table-cell>
          <table:table-cell office:value-type="float" office:value="-0.9266" calcext:value-type="float">
            <text:p>-0.9266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4622" calcext:value-type="float">
            <text:p>0.4622</text:p>
          </table:table-cell>
          <table:table-cell office:value-type="float" office:value="9.2094" calcext:value-type="float">
            <text:p>9.2094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-0.9046" calcext:value-type="float">
            <text:p>-0.9046</text:p>
          </table:table-cell>
          <table:table-cell office:value-type="float" office:value="-0.27" calcext:value-type="float">
            <text:p>-0.27</text:p>
          </table:table-cell>
          <table:table-cell office:value-type="float" office:value="0.2837" calcext:value-type="float">
            <text:p>0.2837</text:p>
          </table:table-cell>
          <table:table-cell office:value-type="float" office:value="-0.3285" calcext:value-type="float">
            <text:p>-0.328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9046" calcext:value-type="float">
            <text:p>-0.9046</text:p>
          </table:table-cell>
          <table:table-cell office:value-type="float" office:value="-0.27" calcext:value-type="float">
            <text:p>-0.27</text:p>
          </table:table-cell>
          <table:table-cell office:value-type="float" office:value="0.2837" calcext:value-type="float">
            <text:p>0.2837</text:p>
          </table:table-cell>
          <table:table-cell office:value-type="float" office:value="-0.3285" calcext:value-type="float">
            <text:p>-0.3285</text:p>
          </table:table-cell>
          <table:table-cell office:value-type="float" office:value="9.0835" calcext:value-type="float">
            <text:p>9.0835</text:p>
          </table:table-cell>
          <table:table-cell office:value-type="float" office:value="-0.9165" calcext:value-type="float">
            <text:p>-0.9165</text:p>
          </table:table-cell>
          <table:table-cell office:value-type="float" office:value="-0.7072" calcext:value-type="float">
            <text:p>-0.7072</text:p>
          </table:table-cell>
          <table:table-cell office:value-type="float" office:value="0.6336" calcext:value-type="float">
            <text:p>0.6336</text:p>
          </table:table-cell>
          <table:table-cell office:value-type="float" office:value="-0.503" calcext:value-type="float">
            <text:p>-0.503</text:p>
          </table:table-cell>
          <table:table-cell office:value-type="float" office:value="-1.2449" calcext:value-type="float">
            <text:p>-1.244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7072" calcext:value-type="float">
            <text:p>-0.7072</text:p>
          </table:table-cell>
          <table:table-cell office:value-type="float" office:value="0.6336" calcext:value-type="float">
            <text:p>0.6336</text:p>
          </table:table-cell>
          <table:table-cell office:value-type="float" office:value="-0.503" calcext:value-type="float">
            <text:p>-0.503</text:p>
          </table:table-cell>
          <table:table-cell office:value-type="float" office:value="-1.2449" calcext:value-type="float">
            <text:p>-1.2449</text:p>
          </table:table-cell>
          <table:table-cell office:value-type="float" office:value="11.3158" calcext:value-type="float">
            <text:p>11.3158</text:p>
          </table:table-cell>
          <table:table-cell office:value-type="float" office:value="1.3158" calcext:value-type="float">
            <text:p>1.315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954" calcext:value-type="float">
            <text:p>0.8954</text:p>
          </table:table-cell>
          <table:table-cell office:value-type="float" office:value="-1.09" calcext:value-type="float">
            <text:p>-1.09</text:p>
          </table:table-cell>
          <table:table-cell office:value-type="float" office:value="0.0709" calcext:value-type="float">
            <text:p>0.070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954" calcext:value-type="float">
            <text:p>0.8954</text:p>
          </table:table-cell>
          <table:table-cell office:value-type="float" office:value="-1.09" calcext:value-type="float">
            <text:p>-1.09</text:p>
          </table:table-cell>
          <table:table-cell office:value-type="float" office:value="0.0709" calcext:value-type="float">
            <text:p>0.0709</text:p>
          </table:table-cell>
          <table:table-cell office:value-type="float" office:value="11.4156" calcext:value-type="float">
            <text:p>11.4156</text:p>
          </table:table-cell>
          <table:table-cell office:value-type="float" office:value="1.4156" calcext:value-type="float">
            <text:p>1.4156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2979" calcext:value-type="float">
            <text:p>0.2979</text:p>
          </table:table-cell>
          <table:table-cell office:value-type="float" office:value="-0.3114" calcext:value-type="float">
            <text:p>-0.3114</text:p>
          </table:table-cell>
          <table:table-cell office:value-type="float" office:value="1.4865" calcext:value-type="float">
            <text:p>1.486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2979" calcext:value-type="float">
            <text:p>0.2979</text:p>
          </table:table-cell>
          <table:table-cell office:value-type="float" office:value="-0.3114" calcext:value-type="float">
            <text:p>-0.3114</text:p>
          </table:table-cell>
          <table:table-cell office:value-type="float" office:value="1.4865" calcext:value-type="float">
            <text:p>1.4865</text:p>
          </table:table-cell>
          <table:table-cell office:value-type="float" office:value="8.9429" calcext:value-type="float">
            <text:p>8.9429</text:p>
          </table:table-cell>
          <table:table-cell office:value-type="float" office:value="-1.0571" calcext:value-type="float">
            <text:p>-1.0571</text:p>
          </table:table-cell>
          <table:table-cell office:value-type="float" office:value="0.6645" calcext:value-type="float">
            <text:p>0.6645</text:p>
          </table:table-cell>
          <table:table-cell office:value-type="float" office:value="-0.5128" calcext:value-type="float">
            <text:p>-0.5128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4293" calcext:value-type="float">
            <text:p>0.429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645" calcext:value-type="float">
            <text:p>0.6645</text:p>
          </table:table-cell>
          <table:table-cell office:value-type="float" office:value="-0.5128" calcext:value-type="float">
            <text:p>-0.5128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4293" calcext:value-type="float">
            <text:p>0.4293</text:p>
          </table:table-cell>
          <table:table-cell office:value-type="float" office:value="9.6725" calcext:value-type="float">
            <text:p>9.6725</text:p>
          </table:table-cell>
          <table:table-cell office:value-type="float" office:value="-0.3275" calcext:value-type="float">
            <text:p>-0.3275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7814" calcext:value-type="float">
            <text:p>-0.7814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1018" calcext:value-type="float">
            <text:p>0.1018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7814" calcext:value-type="float">
            <text:p>-0.7814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1018" calcext:value-type="float">
            <text:p>0.1018</text:p>
          </table:table-cell>
          <table:table-cell office:value-type="float" office:value="8.7846" calcext:value-type="float">
            <text:p>8.7846</text:p>
          </table:table-cell>
          <table:table-cell office:value-type="float" office:value="-1.2154" calcext:value-type="float">
            <text:p>-1.2154</text:p>
          </table:table-cell>
          <table:table-cell office:value-type="float" office:value="-0.6391" calcext:value-type="float">
            <text:p>-0.6391</text:p>
          </table:table-cell>
          <table:table-cell office:value-type="float" office:value="-0.3166" calcext:value-type="float">
            <text:p>-0.3166</text:p>
          </table:table-cell>
          <table:table-cell office:value-type="float" office:value="0.4062" calcext:value-type="float">
            <text:p>0.4062</text:p>
          </table:table-cell>
          <table:table-cell office:value-type="float" office:value="-1.1136" calcext:value-type="float">
            <text:p>-1.113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0.6391" calcext:value-type="float">
            <text:p>-0.6391</text:p>
          </table:table-cell>
          <table:table-cell office:value-type="float" office:value="-0.3166" calcext:value-type="float">
            <text:p>-0.3166</text:p>
          </table:table-cell>
          <table:table-cell office:value-type="float" office:value="0.4062" calcext:value-type="float">
            <text:p>0.4062</text:p>
          </table:table-cell>
          <table:table-cell office:value-type="float" office:value="-1.1136" calcext:value-type="float">
            <text:p>-1.1136</text:p>
          </table:table-cell>
          <table:table-cell office:value-type="float" office:value="10.2914" calcext:value-type="float">
            <text:p>10.2914</text:p>
          </table:table-cell>
          <table:table-cell office:value-type="float" office:value="0.2914" calcext:value-type="float">
            <text:p>0.2914</text:p>
          </table:table-cell>
          <table:table-cell office:value-type="float" office:value="-0.6023" calcext:value-type="float">
            <text:p>-0.6023</text:p>
          </table:table-cell>
          <table:table-cell office:value-type="float" office:value="0.3972" calcext:value-type="float">
            <text:p>0.3972</text:p>
          </table:table-cell>
          <table:table-cell office:value-type="float" office:value="-0.5617" calcext:value-type="float">
            <text:p>-0.5617</text:p>
          </table:table-cell>
          <table:table-cell office:value-type="float" office:value="-0.8222" calcext:value-type="float">
            <text:p>-0.822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0.6023" calcext:value-type="float">
            <text:p>-0.6023</text:p>
          </table:table-cell>
          <table:table-cell office:value-type="float" office:value="0.3972" calcext:value-type="float">
            <text:p>0.3972</text:p>
          </table:table-cell>
          <table:table-cell office:value-type="float" office:value="-0.5617" calcext:value-type="float">
            <text:p>-0.5617</text:p>
          </table:table-cell>
          <table:table-cell office:value-type="float" office:value="-0.8222" calcext:value-type="float">
            <text:p>-0.8222</text:p>
          </table:table-cell>
          <table:table-cell office:value-type="float" office:value="10.86" calcext:value-type="float">
            <text:p>10.86</text:p>
          </table:table-cell>
          <table:table-cell office:value-type="float" office:value="0.86" calcext:value-type="float">
            <text:p>0.86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6744" calcext:value-type="float">
            <text:p>0.6744</text:p>
          </table:table-cell>
          <table:table-cell office:value-type="float" office:value="-0.9539" calcext:value-type="float">
            <text:p>-0.9539</text:p>
          </table:table-cell>
          <table:table-cell office:value-type="float" office:value="0.0378" calcext:value-type="float">
            <text:p>0.037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6744" calcext:value-type="float">
            <text:p>0.6744</text:p>
          </table:table-cell>
          <table:table-cell office:value-type="float" office:value="-0.9539" calcext:value-type="float">
            <text:p>-0.9539</text:p>
          </table:table-cell>
          <table:table-cell office:value-type="float" office:value="0.0378" calcext:value-type="float">
            <text:p>0.0378</text:p>
          </table:table-cell>
          <table:table-cell office:value-type="float" office:value="11.0362" calcext:value-type="float">
            <text:p>11.0362</text:p>
          </table:table-cell>
          <table:table-cell office:value-type="float" office:value="1.0362" calcext:value-type="float">
            <text:p>1.03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3076" calcext:value-type="float">
            <text:p>0.307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74" calcext:value-type="float">
            <text:p>1.07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3076" calcext:value-type="float">
            <text:p>0.307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74" calcext:value-type="float">
            <text:p>1.074</text:p>
          </table:table-cell>
          <table:table-cell office:value-type="float" office:value="9.611" calcext:value-type="float">
            <text:p>9.611</text:p>
          </table:table-cell>
          <table:table-cell office:value-type="float" office:value="-0.389" calcext:value-type="float">
            <text:p>-0.389</text:p>
          </table:table-cell>
          <table:table-cell office:value-type="float" office:value="0.5272" calcext:value-type="float">
            <text:p>0.5272</text:p>
          </table:table-cell>
          <table:table-cell office:value-type="float" office:value="-0.2971" calcext:value-type="float">
            <text:p>-0.2971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685" calcext:value-type="float">
            <text:p>0.68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5272" calcext:value-type="float">
            <text:p>0.5272</text:p>
          </table:table-cell>
          <table:table-cell office:value-type="float" office:value="-0.2971" calcext:value-type="float">
            <text:p>-0.2971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685" calcext:value-type="float">
            <text:p>0.685</text:p>
          </table:table-cell>
          <table:table-cell office:value-type="float" office:value="9.4268" calcext:value-type="float">
            <text:p>9.4268</text:p>
          </table:table-cell>
          <table:table-cell office:value-type="float" office:value="-0.5732" calcext:value-type="float">
            <text:p>-0.5732</text:p>
          </table:table-cell>
          <table:table-cell office:value-type="float" office:value="0.0614" calcext:value-type="float">
            <text:p>0.0614</text:p>
          </table:table-cell>
          <table:table-cell office:value-type="float" office:value="-0.5632" calcext:value-type="float">
            <text:p>-0.5632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1118" calcext:value-type="float">
            <text:p>0.111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614" calcext:value-type="float">
            <text:p>0.0614</text:p>
          </table:table-cell>
          <table:table-cell office:value-type="float" office:value="-0.5632" calcext:value-type="float">
            <text:p>-0.5632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1118" calcext:value-type="float">
            <text:p>0.1118</text:p>
          </table:table-cell>
          <table:table-cell office:value-type="float" office:value="9.0146" calcext:value-type="float">
            <text:p>9.0146</text:p>
          </table:table-cell>
          <table:table-cell office:value-type="float" office:value="-0.9854" calcext:value-type="float">
            <text:p>-0.9854</text:p>
          </table:table-cell>
          <table:table-cell office:value-type="float" office:value="-0.4016" calcext:value-type="float">
            <text:p>-0.4016</text:p>
          </table:table-cell>
          <table:table-cell office:value-type="float" office:value="-0.2859" calcext:value-type="float">
            <text:p>-0.2859</text:p>
          </table:table-cell>
          <table:table-cell office:value-type="float" office:value="0.499" calcext:value-type="float">
            <text:p>0.499</text:p>
          </table:table-cell>
          <table:table-cell office:value-type="float" office:value="-0.8736" calcext:value-type="float">
            <text:p>-0.873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0.4016" calcext:value-type="float">
            <text:p>-0.4016</text:p>
          </table:table-cell>
          <table:table-cell office:value-type="float" office:value="-0.2859" calcext:value-type="float">
            <text:p>-0.2859</text:p>
          </table:table-cell>
          <table:table-cell office:value-type="float" office:value="0.499" calcext:value-type="float">
            <text:p>0.499</text:p>
          </table:table-cell>
          <table:table-cell office:value-type="float" office:value="-0.8736" calcext:value-type="float">
            <text:p>-0.8736</text:p>
          </table:table-cell>
          <table:table-cell office:value-type="float" office:value="10.0683" calcext:value-type="float">
            <text:p>10.0683</text:p>
          </table:table-cell>
          <table:table-cell office:value-type="float" office:value="0.0683" calcext:value-type="float">
            <text:p>0.0683</text:p>
          </table:table-cell>
          <table:table-cell office:value-type="float" office:value="-0.4422" calcext:value-type="float">
            <text:p>-0.44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-0.3404" calcext:value-type="float">
            <text:p>-0.3404</text:p>
          </table:table-cell>
          <table:table-cell office:value-type="float" office:value="-0.8053" calcext:value-type="float">
            <text:p>-0.805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0.4422" calcext:value-type="float">
            <text:p>-0.44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-0.3404" calcext:value-type="float">
            <text:p>-0.3404</text:p>
          </table:table-cell>
          <table:table-cell office:value-type="float" office:value="-0.8053" calcext:value-type="float">
            <text:p>-0.8053</text:p>
          </table:table-cell>
          <table:table-cell office:value-type="float" office:value="10.7498" calcext:value-type="float">
            <text:p>10.7498</text:p>
          </table:table-cell>
          <table:table-cell office:value-type="float" office:value="0.7498" calcext:value-type="float">
            <text:p>0.749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4631" calcext:value-type="float">
            <text:p>0.463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-0.0555" calcext:value-type="float">
            <text:p>-0.055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4631" calcext:value-type="float">
            <text:p>0.463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10.7706" calcext:value-type="float">
            <text:p>10.7706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2502" calcext:value-type="float">
            <text:p>0.2502</text:p>
          </table:table-cell>
          <table:table-cell office:value-type="float" office:value="-0.4409" calcext:value-type="float">
            <text:p>-0.4409</text:p>
          </table:table-cell>
          <table:table-cell office:value-type="float" office:value="0.7151" calcext:value-type="float">
            <text:p>0.715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2502" calcext:value-type="float">
            <text:p>0.2502</text:p>
          </table:table-cell>
          <table:table-cell office:value-type="float" office:value="-0.4409" calcext:value-type="float">
            <text:p>-0.4409</text:p>
          </table:table-cell>
          <table:table-cell office:value-type="float" office:value="0.7151" calcext:value-type="float">
            <text:p>0.7151</text:p>
          </table:table-cell>
          <table:table-cell office:value-type="float" office:value="10.1152" calcext:value-type="float">
            <text:p>10.1152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3676" calcext:value-type="float">
            <text:p>0.3676</text:p>
          </table:table-cell>
          <table:table-cell office:value-type="float" office:value="-0.1641" calcext:value-type="float">
            <text:p>-0.1641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8303" calcext:value-type="float">
            <text:p>0.830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3676" calcext:value-type="float">
            <text:p>0.3676</text:p>
          </table:table-cell>
          <table:table-cell office:value-type="float" office:value="-0.1641" calcext:value-type="float">
            <text:p>-0.1641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8303" calcext:value-type="float">
            <text:p>0.8303</text:p>
          </table:table-cell>
          <table:table-cell office:value-type="float" office:value="9.2233" calcext:value-type="float">
            <text:p>9.2233</text:p>
          </table:table-cell>
          <table:table-cell office:value-type="float" office:value="-0.7767" calcext:value-type="float">
            <text:p>-0.7767</text:p>
          </table:table-cell>
          <table:table-cell office:value-type="float" office:value="0.0812" calcext:value-type="float">
            <text:p>0.0812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0536" calcext:value-type="float">
            <text:p>0.053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812" calcext:value-type="float">
            <text:p>0.0812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9.3242" calcext:value-type="float">
            <text:p>9.3242</text:p>
          </table:table-cell>
          <table:table-cell office:value-type="float" office:value="-0.6758" calcext:value-type="float">
            <text:p>-0.6758</text:p>
          </table:table-cell>
          <table:table-cell office:value-type="float" office:value="-0.2331" calcext:value-type="float">
            <text:p>-0.2331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4894" calcext:value-type="float">
            <text:p>0.4894</text:p>
          </table:table-cell>
          <table:table-cell office:value-type="float" office:value="-0.6222" calcext:value-type="float">
            <text:p>-0.622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0.2331" calcext:value-type="float">
            <text:p>-0.2331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4894" calcext:value-type="float">
            <text:p>0.4894</text:p>
          </table:table-cell>
          <table:table-cell office:value-type="float" office:value="-0.6222" calcext:value-type="float">
            <text:p>-0.6222</text:p>
          </table:table-cell>
          <table:table-cell office:value-type="float" office:value="9.9009" calcext:value-type="float">
            <text:p>9.9009</text:p>
          </table:table-cell>
          <table:table-cell office:value-type="float" office:value="-0.0991" calcext:value-type="float">
            <text:p>-0.0991</text:p>
          </table:table-cell>
          <table:table-cell office:value-type="float" office:value="-0.2825" calcext:value-type="float">
            <text:p>-0.2825</text:p>
          </table:table-cell>
          <table:table-cell office:value-type="float" office:value="0.1228" calcext:value-type="float">
            <text:p>0.1228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-0.7213" calcext:value-type="float">
            <text:p>-0.721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0.2825" calcext:value-type="float">
            <text:p>-0.2825</text:p>
          </table:table-cell>
          <table:table-cell office:value-type="float" office:value="0.1228" calcext:value-type="float">
            <text:p>0.1228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-0.7213" calcext:value-type="float">
            <text:p>-0.7213</text:p>
          </table:table-cell>
          <table:table-cell office:value-type="float" office:value="10.6192" calcext:value-type="float">
            <text:p>10.6192</text:p>
          </table:table-cell>
          <table:table-cell office:value-type="float" office:value="0.6192" calcext:value-type="float">
            <text:p>0.6192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2883" calcext:value-type="float">
            <text:p>0.2883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102" calcext:value-type="float">
            <text:p>-0.10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2883" calcext:value-type="float">
            <text:p>0.2883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102" calcext:value-type="float">
            <text:p>-0.102</text:p>
          </table:table-cell>
          <table:table-cell office:value-type="float" office:value="10.5478" calcext:value-type="float">
            <text:p>10.5478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1605" calcext:value-type="float">
            <text:p>0.1605</text:p>
          </table:table-cell>
          <table:table-cell office:value-type="float" office:value="-0.4221" calcext:value-type="float">
            <text:p>-0.4221</text:p>
          </table:table-cell>
          <table:table-cell office:value-type="float" office:value="0.4458" calcext:value-type="float">
            <text:p>0.445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1605" calcext:value-type="float">
            <text:p>0.1605</text:p>
          </table:table-cell>
          <table:table-cell office:value-type="float" office:value="-0.4221" calcext:value-type="float">
            <text:p>-0.4221</text:p>
          </table:table-cell>
          <table:table-cell office:value-type="float" office:value="0.4458" calcext:value-type="float">
            <text:p>0.4458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6761" calcext:value-type="float">
            <text:p>0.676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2184" calcext:value-type="float">
            <text:p>0.2184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6761" calcext:value-type="float">
            <text:p>0.6761</text:p>
          </table:table-cell>
          <table:table-cell office:value-type="float" office:value="9.412" calcext:value-type="float">
            <text:p>9.412</text:p>
          </table:table-cell>
          <table:table-cell office:value-type="float" office:value="-0.588" calcext:value-type="float">
            <text:p>-0.588</text:p>
          </table:table-cell>
          <table:table-cell office:value-type="float" office:value="0.0459" calcext:value-type="float">
            <text:p>0.0459</text:p>
          </table:table-cell>
          <table:table-cell office:value-type="float" office:value="-0.2251" calcext:value-type="float">
            <text:p>-0.2251</text:p>
          </table:table-cell>
          <table:table-cell office:value-type="float" office:value="0.521" calcext:value-type="float">
            <text:p>0.521</text:p>
          </table:table-cell>
          <table:table-cell office:value-type="float" office:value="0.088" calcext:value-type="float">
            <text:p>0.08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0459" calcext:value-type="float">
            <text:p>0.0459</text:p>
          </table:table-cell>
          <table:table-cell office:value-type="float" office:value="-0.2251" calcext:value-type="float">
            <text:p>-0.2251</text:p>
          </table:table-cell>
          <table:table-cell office:value-type="float" office:value="0.521" calcext:value-type="float">
            <text:p>0.521</text:p>
          </table:table-cell>
          <table:table-cell office:value-type="float" office:value="0.088" calcext:value-type="float">
            <text:p>0.088</text:p>
          </table:table-cell>
          <table:table-cell office:value-type="float" office:value="9.5102" calcext:value-type="float">
            <text:p>9.5102</text:p>
          </table:table-cell>
          <table:table-cell office:value-type="float" office:value="-0.4898" calcext:value-type="float">
            <text:p>-0.4898</text:p>
          </table:table-cell>
          <table:table-cell office:value-type="float" office:value="-0.1411" calcext:value-type="float">
            <text:p>-0.1411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0.3641" calcext:value-type="float">
            <text:p>0.3641</text:p>
          </table:table-cell>
          <table:table-cell office:value-type="float" office:value="-0.4018" calcext:value-type="float">
            <text:p>-0.401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0.1411" calcext:value-type="float">
            <text:p>-0.1411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0.3641" calcext:value-type="float">
            <text:p>0.3641</text:p>
          </table:table-cell>
          <table:table-cell office:value-type="float" office:value="-0.4018" calcext:value-type="float">
            <text:p>-0.4018</text:p>
          </table:table-cell>
          <table:table-cell office:value-type="float" office:value="9.8372" calcext:value-type="float">
            <text:p>9.8372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0.0829" calcext:value-type="float">
            <text:p>0.0829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5646" calcext:value-type="float">
            <text:p>-0.564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0.0829" calcext:value-type="float">
            <text:p>0.0829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5646" calcext:value-type="float">
            <text:p>-0.5646</text:p>
          </table:table-cell>
          <table:table-cell office:value-type="float" office:value="10.4563" calcext:value-type="float">
            <text:p>10.4563</text:p>
          </table:table-cell>
          <table:table-cell office:value-type="float" office:value="0.4563" calcext:value-type="float">
            <text:p>0.4563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714" calcext:value-type="float">
            <text:p>0.1714</text:p>
          </table:table-cell>
          <table:table-cell office:value-type="float" office:value="-0.4556" calcext:value-type="float">
            <text:p>-0.4556</text:p>
          </table:table-cell>
          <table:table-cell office:value-type="float" office:value="-0.1083" calcext:value-type="float">
            <text:p>-0.108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714" calcext:value-type="float">
            <text:p>0.1714</text:p>
          </table:table-cell>
          <table:table-cell office:value-type="float" office:value="-0.4556" calcext:value-type="float">
            <text:p>-0.4556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10.4101" calcext:value-type="float">
            <text:p>10.410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789" calcext:value-type="float">
            <text:p>0.0789</text:p>
          </table:table-cell>
          <table:table-cell office:value-type="float" office:value="-0.3588" calcext:value-type="float">
            <text:p>-0.3588</text:p>
          </table:table-cell>
          <table:table-cell office:value-type="float" office:value="0.3019" calcext:value-type="float">
            <text:p>0.301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789" calcext:value-type="float">
            <text:p>0.0789</text:p>
          </table:table-cell>
          <table:table-cell office:value-type="float" office:value="-0.3588" calcext:value-type="float">
            <text:p>-0.3588</text:p>
          </table:table-cell>
          <table:table-cell office:value-type="float" office:value="0.3019" calcext:value-type="float">
            <text:p>0.3019</text:p>
          </table:table-cell>
          <table:table-cell office:value-type="float" office:value="10.151" calcext:value-type="float">
            <text:p>10.15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16" calcext:value-type="float">
            <text:p>0.1116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4529" calcext:value-type="float">
            <text:p>0.452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1116" calcext:value-type="float">
            <text:p>0.1116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4529" calcext:value-type="float">
            <text:p>0.4529</text:p>
          </table:table-cell>
          <table:table-cell office:value-type="float" office:value="9.6759" calcext:value-type="float">
            <text:p>9.6759</text:p>
          </table:table-cell>
          <table:table-cell office:value-type="float" office:value="-0.3241" calcext:value-type="float">
            <text:p>-0.324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1288" calcext:value-type="float">
            <text:p>0.128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1288" calcext:value-type="float">
            <text:p>0.1288</text:p>
          </table:table-cell>
          <table:table-cell office:value-type="float" office:value="9.588" calcext:value-type="float">
            <text:p>9.588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0978" calcext:value-type="float">
            <text:p>-0.0978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2323" calcext:value-type="float">
            <text:p>0.2323</text:p>
          </table:table-cell>
          <table:table-cell office:value-type="float" office:value="-0.2832" calcext:value-type="float">
            <text:p>-0.283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-0.0978" calcext:value-type="float">
            <text:p>-0.0978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2323" calcext:value-type="float">
            <text:p>0.2323</text:p>
          </table:table-cell>
          <table:table-cell office:value-type="float" office:value="-0.2832" calcext:value-type="float">
            <text:p>-0.2832</text:p>
          </table:table-cell>
          <table:table-cell office:value-type="float" office:value="9.8732" calcext:value-type="float">
            <text:p>9.8732</text:p>
          </table:table-cell>
          <table:table-cell office:value-type="float" office:value="-0.1268" calcext:value-type="float">
            <text:p>-0.1268</text:p>
          </table:table-cell>
          <table:table-cell office:value-type="float" office:value="-0.0845" calcext:value-type="float">
            <text:p>-0.0845</text:p>
          </table:table-cell>
          <table:table-cell office:value-type="float" office:value="0.0745" calcext:value-type="float">
            <text:p>0.0745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-0.4099" calcext:value-type="float">
            <text:p>-0.409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-0.0845" calcext:value-type="float">
            <text:p>-0.0845</text:p>
          </table:table-cell>
          <table:table-cell office:value-type="float" office:value="0.0745" calcext:value-type="float">
            <text:p>0.0745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-0.4099" calcext:value-type="float">
            <text:p>-0.4099</text:p>
          </table:table-cell>
          <table:table-cell office:value-type="float" office:value="10.3386" calcext:value-type="float">
            <text:p>10.3386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009" calcext:value-type="float">
            <text:p>0.009</text:p>
          </table:table-cell>
          <table:table-cell office:value-type="float" office:value="0.1015" calcext:value-type="float">
            <text:p>0.1015</text:p>
          </table:table-cell>
          <table:table-cell office:value-type="float" office:value="-0.3549" calcext:value-type="float">
            <text:p>-0.3549</text:p>
          </table:table-cell>
          <table:table-cell office:value-type="float" office:value="-0.0713" calcext:value-type="float">
            <text:p>-0.071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015" calcext:value-type="float">
            <text:p>0.1015</text:p>
          </table:table-cell>
          <table:table-cell office:value-type="float" office:value="-0.3549" calcext:value-type="float">
            <text:p>-0.3549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10.33" calcext:value-type="float">
            <text:p>10.33</text:p>
          </table:table-cell>
          <table:table-cell office:value-type="float" office:value="0.33" calcext:value-type="float">
            <text:p>0.3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0.2587" calcext:value-type="float">
            <text:p>0.258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0.2587" calcext:value-type="float">
            <text:p>0.2587</text:p>
          </table:table-cell>
          <table:table-cell office:value-type="float" office:value="10.0362" calcext:value-type="float">
            <text:p>10.036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2948" calcext:value-type="float">
            <text:p>0.294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2948" calcext:value-type="float">
            <text:p>0.2948</text:p>
          </table:table-cell>
          <table:table-cell office:value-type="float" office:value="9.7137" calcext:value-type="float">
            <text:p>9.7137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0085" calcext:value-type="float">
            <text:p>0.008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0085" calcext:value-type="float">
            <text:p>0.0085</text:p>
          </table:table-cell>
          <table:table-cell office:value-type="float" office:value="9.7435" calcext:value-type="float">
            <text:p>9.7435</text:p>
          </table:table-cell>
          <table:table-cell office:value-type="float" office:value="-0.2565" calcext:value-type="float">
            <text:p>-0.2565</text:p>
          </table:table-cell>
          <table:table-cell office:value-type="float" office:value="-0.0757" calcext:value-type="float">
            <text:p>-0.075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474" calcext:value-type="float">
            <text:p>0.0474</text:p>
          </table:table-cell>
          <table:table-cell office:value-type="float" office:value="-0.248" calcext:value-type="float">
            <text:p>-0.24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-0.0757" calcext:value-type="float">
            <text:p>-0.075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474" calcext:value-type="float">
            <text:p>0.0474</text:p>
          </table:table-cell>
          <table:table-cell office:value-type="float" office:value="-0.248" calcext:value-type="float">
            <text:p>-0.248</text:p>
          </table:table-cell>
          <table:table-cell office:value-type="float" office:value="9.9765" calcext:value-type="float">
            <text:p>9.976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0664" calcext:value-type="float">
            <text:p>0.0664</text:p>
          </table:table-cell>
          <table:table-cell office:value-type="float" office:value="-0.2124" calcext:value-type="float">
            <text:p>-0.2124</text:p>
          </table:table-cell>
          <table:table-cell office:value-type="float" office:value="-0.2715" calcext:value-type="float">
            <text:p>-0.271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0664" calcext:value-type="float">
            <text:p>0.0664</text:p>
          </table:table-cell>
          <table:table-cell office:value-type="float" office:value="-0.2124" calcext:value-type="float">
            <text:p>-0.212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10.2789" calcext:value-type="float">
            <text:p>10.2789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26" calcext:value-type="float">
            <text:p>0.0526</text:p>
          </table:table-cell>
          <table:table-cell office:value-type="float" office:value="-0.3444" calcext:value-type="float">
            <text:p>-0.3444</text:p>
          </table:table-cell>
          <table:table-cell office:value-type="float" office:value="0.0074" calcext:value-type="float">
            <text:p>0.007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26" calcext:value-type="float">
            <text:p>0.0526</text:p>
          </table:table-cell>
          <table:table-cell office:value-type="float" office:value="-0.3444" calcext:value-type="float">
            <text:p>-0.3444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.2391" calcext:value-type="float">
            <text:p>10.2391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0412" calcext:value-type="float">
            <text:p>0.0412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-0.2175" calcext:value-type="float">
            <text:p>-0.2175</text:p>
          </table:table-cell>
          <table:table-cell office:value-type="float" office:value="0.2465" calcext:value-type="float">
            <text:p>0.246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0412" calcext:value-type="float">
            <text:p>0.0412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-0.2175" calcext:value-type="float">
            <text:p>-0.2175</text:p>
          </table:table-cell>
          <table:table-cell office:value-type="float" office:value="0.2465" calcext:value-type="float">
            <text:p>0.2465</text:p>
          </table:table-cell>
          <table:table-cell office:value-type="float" office:value="9.9348" calcext:value-type="float">
            <text:p>9.9348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1813" calcext:value-type="float">
            <text:p>0.181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1813" calcext:value-type="float">
            <text:p>0.1813</text:p>
          </table:table-cell>
          <table:table-cell office:value-type="float" office:value="9.7548" calcext:value-type="float">
            <text:p>9.7548</text:p>
          </table:table-cell>
          <table:table-cell office:value-type="float" office:value="-0.2452" calcext:value-type="float">
            <text:p>-0.2452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0551" calcext:value-type="float">
            <text:p>0.0551</text:p>
          </table:table-cell>
          <table:table-cell office:value-type="float" office:value="-0.0639" calcext:value-type="float">
            <text:p>-0.063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0551" calcext:value-type="float">
            <text:p>0.0551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9.846" calcext:value-type="float">
            <text:p>9.84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-0.2179" calcext:value-type="float">
            <text:p>-0.217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-0.2179" calcext:value-type="float">
            <text:p>-0.2179</text:p>
          </table:table-cell>
          <table:table-cell office:value-type="float" office:value="10.08" calcext:value-type="float">
            <text:p>1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2637" calcext:value-type="float">
            <text:p>-0.2637</text:p>
          </table:table-cell>
          <table:table-cell office:value-type="float" office:value="-0.1379" calcext:value-type="float">
            <text:p>-0.137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2637" calcext:value-type="float">
            <text:p>-0.2637</text:p>
          </table:table-cell>
          <table:table-cell office:value-type="float" office:value="-0.1379" calcext:value-type="float">
            <text:p>-0.1379</text:p>
          </table:table-cell>
          <table:table-cell office:value-type="float" office:value="10.2448" calcext:value-type="float">
            <text:p>10.2448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2791" calcext:value-type="float">
            <text:p>-0.2791</text:p>
          </table:table-cell>
          <table:table-cell office:value-type="float" office:value="0.1069" calcext:value-type="float">
            <text:p>0.106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2791" calcext:value-type="float">
            <text:p>-0.2791</text:p>
          </table:table-cell>
          <table:table-cell office:value-type="float" office:value="0.1069" calcext:value-type="float">
            <text:p>0.1069</text:p>
          </table:table-cell>
          <table:table-cell office:value-type="float" office:value="10.0933" calcext:value-type="float">
            <text:p>10.0933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63" calcext:value-type="float">
            <text:p>0.0163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1256" calcext:value-type="float">
            <text:p>-0.1256</text:p>
          </table:table-cell>
          <table:table-cell office:value-type="float" office:value="0.2002" calcext:value-type="float">
            <text:p>0.200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0163" calcext:value-type="float">
            <text:p>0.0163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1256" calcext:value-type="float">
            <text:p>-0.1256</text:p>
          </table:table-cell>
          <table:table-cell office:value-type="float" office:value="0.2002" calcext:value-type="float">
            <text:p>0.2002</text:p>
          </table:table-cell>
          <table:table-cell office:value-type="float" office:value="9.8661" calcext:value-type="float">
            <text:p>9.8661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663" calcext:value-type="float">
            <text:p>0.066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663" calcext:value-type="float">
            <text:p>0.0663</text:p>
          </table:table-cell>
          <table:table-cell office:value-type="float" office:value="9.8112" calcext:value-type="float">
            <text:p>9.8112</text:p>
          </table:table-cell>
          <table:table-cell office:value-type="float" office:value="-0.1888" calcext:value-type="float">
            <text:p>-0.1888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1225" calcext:value-type="float">
            <text:p>-0.122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1225" calcext:value-type="float">
            <text:p>-0.1225</text:p>
          </table:table-cell>
          <table:table-cell office:value-type="float" office:value="9.9515" calcext:value-type="float">
            <text:p>9.9515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-0.171" calcext:value-type="float">
            <text:p>-0.17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-0.171" calcext:value-type="float">
            <text:p>-0.171</text:p>
          </table:table-cell>
          <table:table-cell office:value-type="float" office:value="10.1495" calcext:value-type="float">
            <text:p>10.149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2633" calcext:value-type="float">
            <text:p>-0.2633</text:p>
          </table:table-cell>
          <table:table-cell office:value-type="float" office:value="-0.0214" calcext:value-type="float">
            <text:p>-0.021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2633" calcext:value-type="float">
            <text:p>-0.2633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10.1683" calcext:value-type="float">
            <text:p>10.1683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2005" calcext:value-type="float">
            <text:p>-0.2005</text:p>
          </table:table-cell>
          <table:table-cell office:value-type="float" office:value="0.1469" calcext:value-type="float">
            <text:p>0.146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2005" calcext:value-type="float">
            <text:p>-0.2005</text:p>
          </table:table-cell>
          <table:table-cell office:value-type="float" office:value="0.1469" calcext:value-type="float">
            <text:p>0.1469</text:p>
          </table:table-cell>
          <table:table-cell office:value-type="float" office:value="9.9886" calcext:value-type="float">
            <text:p>9.9886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0.1355" calcext:value-type="float">
            <text:p>0.135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0.1355" calcext:value-type="float">
            <text:p>0.1355</text:p>
          </table:table-cell>
          <table:table-cell office:value-type="float" office:value="9.8401" calcext:value-type="float">
            <text:p>9.8401</text:p>
          </table:table-cell>
          <table:table-cell office:value-type="float" office:value="-0.1599" calcext:value-type="float">
            <text:p>-0.1599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243" calcext:value-type="float">
            <text:p>-0.024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9.8813" calcext:value-type="float">
            <text:p>9.8813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191" calcext:value-type="float">
            <text:p>0.0191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-0.1431" calcext:value-type="float">
            <text:p>-0.143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191" calcext:value-type="float">
            <text:p>0.0191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10.04" calcext:value-type="float">
            <text:p>10.04</text:p>
          </table:table-cell>
          <table:table-cell office:value-type="float" office:value="0.04" calcext:value-type="float">
            <text:p>0.04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2105" calcext:value-type="float">
            <text:p>-0.2105</text:p>
          </table:table-cell>
          <table:table-cell office:value-type="float" office:value="-0.1031" calcext:value-type="float">
            <text:p>-0.103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2105" calcext:value-type="float">
            <text:p>-0.2105</text:p>
          </table:table-cell>
          <table:table-cell office:value-type="float" office:value="-0.1031" calcext:value-type="float">
            <text:p>-0.1031</text:p>
          </table:table-cell>
          <table:table-cell office:value-type="float" office:value="10.1642" calcext:value-type="float">
            <text:p>10.1642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2314" calcext:value-type="float">
            <text:p>-0.2314</text:p>
          </table:table-cell>
          <table:table-cell office:value-type="float" office:value="0.0611" calcext:value-type="float">
            <text:p>0.061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2314" calcext:value-type="float">
            <text:p>-0.2314</text:p>
          </table:table-cell>
          <table:table-cell office:value-type="float" office:value="0.0611" calcext:value-type="float">
            <text:p>0.0611</text:p>
          </table:table-cell>
          <table:table-cell office:value-type="float" office:value="10.0742" calcext:value-type="float">
            <text:p>10.0742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1354" calcext:value-type="float">
            <text:p>0.135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1354" calcext:value-type="float">
            <text:p>0.1354</text:p>
          </table:table-cell>
          <table:table-cell office:value-type="float" office:value="9.9181" calcext:value-type="float">
            <text:p>9.9181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534" calcext:value-type="float">
            <text:p>0.053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534" calcext:value-type="float">
            <text:p>0.0534</text:p>
          </table:table-cell>
          <table:table-cell office:value-type="float" office:value="9.8617" calcext:value-type="float">
            <text:p>9.8617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-0.0849" calcext:value-type="float">
            <text:p>-0.084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-0.0849" calcext:value-type="float">
            <text:p>-0.0849</text:p>
          </table:table-cell>
          <table:table-cell office:value-type="float" office:value="9.962" calcext:value-type="float">
            <text:p>9.96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1585" calcext:value-type="float">
            <text:p>-0.1585</text:p>
          </table:table-cell>
          <table:table-cell office:value-type="float" office:value="-0.1229" calcext:value-type="float">
            <text:p>-0.122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1585" calcext:value-type="float">
            <text:p>-0.1585</text:p>
          </table:table-cell>
          <table:table-cell office:value-type="float" office:value="-0.1229" calcext:value-type="float">
            <text:p>-0.1229</text:p>
          </table:table-cell>
          <table:table-cell office:value-type="float" office:value="10.1085" calcext:value-type="float">
            <text:p>10.1085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2271" calcext:value-type="float">
            <text:p>-0.2271</text:p>
          </table:table-cell>
          <table:table-cell office:value-type="float" office:value="-0.0144" calcext:value-type="float">
            <text:p>-0.014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2271" calcext:value-type="float">
            <text:p>-0.227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10.1188" calcext:value-type="float">
            <text:p>10.1188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1821" calcext:value-type="float">
            <text:p>-0.1821</text:p>
          </table:table-cell>
          <table:table-cell office:value-type="float" office:value="0.1044" calcext:value-type="float">
            <text:p>0.104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1821" calcext:value-type="float">
            <text:p>-0.1821</text:p>
          </table:table-cell>
          <table:table-cell office:value-type="float" office:value="0.1044" calcext:value-type="float">
            <text:p>0.1044</text:p>
          </table:table-cell>
          <table:table-cell office:value-type="float" office:value="9.9893" calcext:value-type="float">
            <text:p>9.9893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937" calcext:value-type="float">
            <text:p>0.093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937" calcext:value-type="float">
            <text:p>0.0937</text:p>
          </table:table-cell>
          <table:table-cell office:value-type="float" office:value="9.888" calcext:value-type="float">
            <text:p>9.88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84" calcext:value-type="float">
            <text:p>-0.018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9.9118" calcext:value-type="float">
            <text:p>9.9118</text:p>
          </table:table-cell>
          <table:table-cell office:value-type="float" office:value="-0.0882" calcext:value-type="float">
            <text:p>-0.0882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1079" calcext:value-type="float">
            <text:p>-0.1079</text:p>
          </table:table-cell>
          <table:table-cell office:value-type="float" office:value="-0.1066" calcext:value-type="float">
            <text:p>-0.106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1079" calcext:value-type="float">
            <text:p>-0.1079</text:p>
          </table:table-cell>
          <table:table-cell office:value-type="float" office:value="-0.1066" calcext:value-type="float">
            <text:p>-0.1066</text:p>
          </table:table-cell>
          <table:table-cell office:value-type="float" office:value="10.0353" calcext:value-type="float">
            <text:p>10.0353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1968" calcext:value-type="float">
            <text:p>-0.1968</text:p>
          </table:table-cell>
          <table:table-cell office:value-type="float" office:value="-0.0713" calcext:value-type="float">
            <text:p>-0.071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1968" calcext:value-type="float">
            <text:p>-0.1968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10.1203" calcext:value-type="float">
            <text:p>10.1203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2079" calcext:value-type="float">
            <text:p>-0.2079</text:p>
          </table:table-cell>
          <table:table-cell office:value-type="float" office:value="0.049" calcext:value-type="float">
            <text:p>0.04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2079" calcext:value-type="float">
            <text:p>-0.2079</text:p>
          </table:table-cell>
          <table:table-cell office:value-type="float" office:value="0.049" calcext:value-type="float">
            <text:p>0.049</text:p>
          </table:table-cell>
          <table:table-cell office:value-type="float" office:value="10.0486" calcext:value-type="float">
            <text:p>10.0486</text:p>
          </table:table-cell>
          <table:table-cell office:value-type="float" office:value="0.0486" calcext:value-type="float">
            <text:p>0.048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0976" calcext:value-type="float">
            <text:p>0.097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0976" calcext:value-type="float">
            <text:p>0.0976</text:p>
          </table:table-cell>
          <table:table-cell office:value-type="float" office:value="9.9376" calcext:value-type="float">
            <text:p>9.937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0353" calcext:value-type="float">
            <text:p>0.035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0353" calcext:value-type="float">
            <text:p>0.0353</text:p>
          </table:table-cell>
          <table:table-cell office:value-type="float" office:value="9.9005" calcext:value-type="float">
            <text:p>9.9005</text:p>
          </table:table-cell>
          <table:table-cell office:value-type="float" office:value="-0.0995" calcext:value-type="float">
            <text:p>-0.0995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-0.0642" calcext:value-type="float">
            <text:p>-0.064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9.9755" calcext:value-type="float">
            <text:p>9.9755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887" calcext:value-type="float">
            <text:p>-0.088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10.0832" calcext:value-type="float">
            <text:p>10.0832</text:p>
          </table:table-cell>
          <table:table-cell office:value-type="float" office:value="0.0832" calcext:value-type="float">
            <text:p>0.083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-0.0055" calcext:value-type="float">
            <text:p>-0.005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10.0837" calcext:value-type="float">
            <text:p>10.083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0.0783" calcext:value-type="float">
            <text:p>0.078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9.9876" calcext:value-type="float">
            <text:p>9.9876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0659" calcext:value-type="float">
            <text:p>0.065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0659" calcext:value-type="float">
            <text:p>0.0659</text:p>
          </table:table-cell>
          <table:table-cell office:value-type="float" office:value="9.9164" calcext:value-type="float">
            <text:p>9.9164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0.0177" calcext:value-type="float">
            <text:p>-0.017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9.9391" calcext:value-type="float">
            <text:p>9.9391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1218" calcext:value-type="float">
            <text:p>-0.1218</text:p>
          </table:table-cell>
          <table:table-cell office:value-type="float" office:value="-0.0786" calcext:value-type="float">
            <text:p>-0.078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1218" calcext:value-type="float">
            <text:p>-0.1218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10.0305" calcext:value-type="float">
            <text:p>10.03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1851" calcext:value-type="float">
            <text:p>-0.1851</text:p>
          </table:table-cell>
          <table:table-cell office:value-type="float" office:value="-0.0481" calcext:value-type="float">
            <text:p>-0.048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1851" calcext:value-type="float">
            <text:p>-0.1851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10.0876" calcext:value-type="float">
            <text:p>10.0876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895" calcext:value-type="float">
            <text:p>-0.1895</text:p>
          </table:table-cell>
          <table:table-cell office:value-type="float" office:value="0.0395" calcext:value-type="float">
            <text:p>0.039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895" calcext:value-type="float">
            <text:p>-0.1895</text:p>
          </table:table-cell>
          <table:table-cell office:value-type="float" office:value="0.0395" calcext:value-type="float">
            <text:p>0.0395</text:p>
          </table:table-cell>
          <table:table-cell office:value-type="float" office:value="10.0308" calcext:value-type="float">
            <text:p>10.0308</text:p>
          </table:table-cell>
          <table:table-cell office:value-type="float" office:value="0.0308" calcext:value-type="float">
            <text:p>0.0308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0703" calcext:value-type="float">
            <text:p>0.070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0703" calcext:value-type="float">
            <text:p>0.0703</text:p>
          </table:table-cell>
          <table:table-cell office:value-type="float" office:value="9.9519" calcext:value-type="float">
            <text:p>9.9519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0.0221" calcext:value-type="float">
            <text:p>0.022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0.0221" calcext:value-type="float">
            <text:p>0.0221</text:p>
          </table:table-cell>
          <table:table-cell office:value-type="float" office:value="9.9283" calcext:value-type="float">
            <text:p>9.9283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-0.0496" calcext:value-type="float">
            <text:p>-0.049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9.9861" calcext:value-type="float">
            <text:p>9.9861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635" calcext:value-type="float">
            <text:p>-0.063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1905" calcext:value-type="float">
            <text:p>-0.1905</text:p>
          </table:table-cell>
          <table:table-cell office:value-type="float" office:value="-0.0003" calcext:value-type="float">
            <text:p>-0.000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1905" calcext:value-type="float">
            <text:p>-0.19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10.059" calcext:value-type="float">
            <text:p>10.059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0587" calcext:value-type="float">
            <text:p>0.058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0587" calcext:value-type="float">
            <text:p>0.0587</text:p>
          </table:table-cell>
          <table:table-cell office:value-type="float" office:value="9.988" calcext:value-type="float">
            <text:p>9.98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087" calcext:value-type="float">
            <text:p>-0.1087</text:p>
          </table:table-cell>
          <table:table-cell office:value-type="float" office:value="0.0467" calcext:value-type="float">
            <text:p>0.046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087" calcext:value-type="float">
            <text:p>-0.1087</text:p>
          </table:table-cell>
          <table:table-cell office:value-type="float" office:value="0.0467" calcext:value-type="float">
            <text:p>0.0467</text:p>
          </table:table-cell>
          <table:table-cell office:value-type="float" office:value="9.9375" calcext:value-type="float">
            <text:p>9.937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0.0158" calcext:value-type="float">
            <text:p>-0.015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9.9575" calcext:value-type="float">
            <text:p>9.9575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1303" calcext:value-type="float">
            <text:p>-0.1303</text:p>
          </table:table-cell>
          <table:table-cell office:value-type="float" office:value="-0.0583" calcext:value-type="float">
            <text:p>-0.058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1303" calcext:value-type="float">
            <text:p>-0.1303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10.0252" calcext:value-type="float">
            <text:p>10.0252</text:p>
          </table:table-cell>
          <table:table-cell office:value-type="float" office:value="0.0252" calcext:value-type="float">
            <text:p>0.025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33" calcext:value-type="float">
            <text:p>-0.03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33" calcext:value-type="float">
            <text:p>-0.033</text:p>
          </table:table-cell>
          <table:table-cell office:value-type="float" office:value="10.0641" calcext:value-type="float">
            <text:p>10.0641</text:p>
          </table:table-cell>
          <table:table-cell office:value-type="float" office:value="0.0641" calcext:value-type="float">
            <text:p>0.064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769" calcext:value-type="float">
            <text:p>-0.1769</text:p>
          </table:table-cell>
          <table:table-cell office:value-type="float" office:value="0.0311" calcext:value-type="float">
            <text:p>0.031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769" calcext:value-type="float">
            <text:p>-0.1769</text:p>
          </table:table-cell>
          <table:table-cell office:value-type="float" office:value="0.0311" calcext:value-type="float">
            <text:p>0.0311</text:p>
          </table:table-cell>
          <table:table-cell office:value-type="float" office:value="10.0206" calcext:value-type="float">
            <text:p>10.0206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0.0517" calcext:value-type="float">
            <text:p>0.051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0.0517" calcext:value-type="float">
            <text:p>0.0517</text:p>
          </table:table-cell>
          <table:table-cell office:value-type="float" office:value="9.9624" calcext:value-type="float">
            <text:p>9.9624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14" calcext:value-type="float">
            <text:p>0.01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14" calcext:value-type="float">
            <text:p>0.014</text:p>
          </table:table-cell>
          <table:table-cell office:value-type="float" office:value="9.9477" calcext:value-type="float">
            <text:p>9.9477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148" calcext:value-type="float">
            <text:p>-0.1148</text:p>
          </table:table-cell>
          <table:table-cell office:value-type="float" office:value="-0.0383" calcext:value-type="float">
            <text:p>-0.038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148" calcext:value-type="float">
            <text:p>-0.1148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9.9924" calcext:value-type="float">
            <text:p>9.992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0459" calcext:value-type="float">
            <text:p>-0.045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10.0479" calcext:value-type="float">
            <text:p>10.0479</text:p>
          </table:table-cell>
          <table:table-cell office:value-type="float" office:value="0.0479" calcext:value-type="float">
            <text:p>0.0479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0.002" calcext:value-type="float">
            <text:p>0.00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0.002" calcext:value-type="float">
            <text:p>0.002</text:p>
          </table:table-cell>
          <table:table-cell office:value-type="float" office:value="10.0419" calcext:value-type="float">
            <text:p>10.0419</text:p>
          </table:table-cell>
          <table:table-cell office:value-type="float" office:value="0.0419" calcext:value-type="float">
            <text:p>0.0419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439" calcext:value-type="float">
            <text:p>0.043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439" calcext:value-type="float">
            <text:p>0.0439</text:p>
          </table:table-cell>
          <table:table-cell office:value-type="float" office:value="9.9895" calcext:value-type="float">
            <text:p>9.989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74" calcext:value-type="float">
            <text:p>-0.1174</text:p>
          </table:table-cell>
          <table:table-cell office:value-type="float" office:value="0.0333" calcext:value-type="float">
            <text:p>0.033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74" calcext:value-type="float">
            <text:p>-0.1174</text:p>
          </table:table-cell>
          <table:table-cell office:value-type="float" office:value="0.0333" calcext:value-type="float">
            <text:p>0.0333</text:p>
          </table:table-cell>
          <table:table-cell office:value-type="float" office:value="9.9531" calcext:value-type="float">
            <text:p>9.953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075" calcext:value-type="float">
            <text:p>-0.1075</text:p>
          </table:table-cell>
          <table:table-cell office:value-type="float" office:value="-0.0136" calcext:value-type="float">
            <text:p>-0.013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075" calcext:value-type="float">
            <text:p>-0.1075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9.9701" calcext:value-type="float">
            <text:p>9.9701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435" calcext:value-type="float">
            <text:p>-0.043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10.0205" calcext:value-type="float">
            <text:p>10.020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692" calcext:value-type="float">
            <text:p>-0.1692</text:p>
          </table:table-cell>
          <table:table-cell office:value-type="float" office:value="-0.0229" calcext:value-type="float">
            <text:p>-0.022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814" calcext:value-type="float">
            <text:p>0.6814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-0.3362" calcext:value-type="float">
            <text:p>-0.3362</text:p>
          </table:table-cell>
          <table:table-cell office:value-type="float" office:value="0.5809" calcext:value-type="float">
            <text:p>0.5809</text:p>
          </table:table-cell>
          <table:table-cell office:value-type="float" office:value="9.9801" calcext:value-type="float">
            <text:p>9.9801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1885" calcext:value-type="float">
            <text:p>-0.1885</text:p>
          </table:table-cell>
          <table:table-cell office:value-type="float" office:value="-0.9499" calcext:value-type="float">
            <text:p>-0.9499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61" calcext:value-type="float">
            <text:p>0.56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0.1885" calcext:value-type="float">
            <text:p>-0.1885</text:p>
          </table:table-cell>
          <table:table-cell office:value-type="float" office:value="-0.9499" calcext:value-type="float">
            <text:p>-0.9499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61" calcext:value-type="float">
            <text:p>0.561</text:p>
          </table:table-cell>
          <table:table-cell office:value-type="float" office:value="9.0231" calcext:value-type="float">
            <text:p>9.0231</text:p>
          </table:table-cell>
          <table:table-cell office:value-type="float" office:value="-0.9769" calcext:value-type="float">
            <text:p>-0.9769</text:p>
          </table:table-cell>
          <table:table-cell office:value-type="float" office:value="-0.8873" calcext:value-type="float">
            <text:p>-0.8873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3074" calcext:value-type="float">
            <text:p>0.3074</text:p>
          </table:table-cell>
          <table:table-cell office:value-type="float" office:value="-0.4159" calcext:value-type="float">
            <text:p>-0.415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873" calcext:value-type="float">
            <text:p>-0.8873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3074" calcext:value-type="float">
            <text:p>0.3074</text:p>
          </table:table-cell>
          <table:table-cell office:value-type="float" office:value="-0.4159" calcext:value-type="float">
            <text:p>-0.4159</text:p>
          </table:table-cell>
          <table:table-cell office:value-type="float" office:value="9.2485" calcext:value-type="float">
            <text:p>9.2485</text:p>
          </table:table-cell>
          <table:table-cell office:value-type="float" office:value="-0.7515" calcext:value-type="float">
            <text:p>-0.7515</text:p>
          </table:table-cell>
          <table:table-cell office:value-type="float" office:value="-0.7534" calcext:value-type="float">
            <text:p>-0.7534</text:p>
          </table:table-cell>
          <table:table-cell office:value-type="float" office:value="0.5853" calcext:value-type="float">
            <text:p>0.5853</text:p>
          </table:table-cell>
          <table:table-cell office:value-type="float" office:value="-0.4843" calcext:value-type="float">
            <text:p>-0.4843</text:p>
          </table:table-cell>
          <table:table-cell office:value-type="float" office:value="-1.1674" calcext:value-type="float">
            <text:p>-1.167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7534" calcext:value-type="float">
            <text:p>-0.7534</text:p>
          </table:table-cell>
          <table:table-cell office:value-type="float" office:value="0.5853" calcext:value-type="float">
            <text:p>0.5853</text:p>
          </table:table-cell>
          <table:table-cell office:value-type="float" office:value="-0.4843" calcext:value-type="float">
            <text:p>-0.4843</text:p>
          </table:table-cell>
          <table:table-cell office:value-type="float" office:value="-1.1674" calcext:value-type="float">
            <text:p>-1.1674</text:p>
          </table:table-cell>
          <table:table-cell office:value-type="float" office:value="11.1847" calcext:value-type="float">
            <text:p>11.1847</text:p>
          </table:table-cell>
          <table:table-cell office:value-type="float" office:value="1.1847" calcext:value-type="float">
            <text:p>1.1847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9096" calcext:value-type="float">
            <text:p>0.9096</text:p>
          </table:table-cell>
          <table:table-cell office:value-type="float" office:value="-1.0593" calcext:value-type="float">
            <text:p>-1.0593</text:p>
          </table:table-cell>
          <table:table-cell office:value-type="float" office:value="0.0173" calcext:value-type="float">
            <text:p>0.017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9096" calcext:value-type="float">
            <text:p>0.9096</text:p>
          </table:table-cell>
          <table:table-cell office:value-type="float" office:value="-1.0593" calcext:value-type="float">
            <text:p>-1.0593</text:p>
          </table:table-cell>
          <table:table-cell office:value-type="float" office:value="0.0173" calcext:value-type="float">
            <text:p>0.0173</text:p>
          </table:table-cell>
          <table:table-cell office:value-type="float" office:value="11.3622" calcext:value-type="float">
            <text:p>11.3622</text:p>
          </table:table-cell>
          <table:table-cell office:value-type="float" office:value="1.3622" calcext:value-type="float">
            <text:p>1.3622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618" calcext:value-type="float">
            <text:p>0.3618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1.3795" calcext:value-type="float">
            <text:p>1.379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618" calcext:value-type="float">
            <text:p>0.3618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1.3795" calcext:value-type="float">
            <text:p>1.3795</text:p>
          </table:table-cell>
          <table:table-cell office:value-type="float" office:value="9.1253" calcext:value-type="float">
            <text:p>9.1253</text:p>
          </table:table-cell>
          <table:table-cell office:value-type="float" office:value="-0.8747" calcext:value-type="float">
            <text:p>-0.8747</text:p>
          </table:table-cell>
          <table:table-cell office:value-type="float" office:value="0.7036" calcext:value-type="float">
            <text:p>0.7036</text:p>
          </table:table-cell>
          <table:table-cell office:value-type="float" office:value="-0.4636" calcext:value-type="float">
            <text:p>-0.4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048" calcext:value-type="float">
            <text:p>0.504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7036" calcext:value-type="float">
            <text:p>0.7036</text:p>
          </table:table-cell>
          <table:table-cell office:value-type="float" office:value="-0.4636" calcext:value-type="float">
            <text:p>-0.4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048" calcext:value-type="float">
            <text:p>0.5048</text:p>
          </table:table-cell>
          <table:table-cell office:value-type="float" office:value="9.6896" calcext:value-type="float">
            <text:p>9.6896</text:p>
          </table:table-cell>
          <table:table-cell office:value-type="float" office:value="-0.3104" calcext:value-type="float">
            <text:p>-0.3104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1944" calcext:value-type="float">
            <text:p>0.194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1944" calcext:value-type="float">
            <text:p>0.1944</text:p>
          </table:table-cell>
          <table:table-cell office:value-type="float" office:value="8.7249" calcext:value-type="float">
            <text:p>8.7249</text:p>
          </table:table-cell>
          <table:table-cell office:value-type="float" office:value="-1.2751" calcext:value-type="float">
            <text:p>-1.2751</text:p>
          </table:table-cell>
          <table:table-cell office:value-type="float" office:value="-0.6147" calcext:value-type="float">
            <text:p>-0.6147</text:p>
          </table:table-cell>
          <table:table-cell office:value-type="float" office:value="-0.3717" calcext:value-type="float">
            <text:p>-0.3717</text:p>
          </table:table-cell>
          <table:table-cell office:value-type="float" office:value="0.4877" calcext:value-type="float">
            <text:p>0.4877</text:p>
          </table:table-cell>
          <table:table-cell office:value-type="float" office:value="-1.0806" calcext:value-type="float">
            <text:p>-1.0806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-0.6147" calcext:value-type="float">
            <text:p>-0.6147</text:p>
          </table:table-cell>
          <table:table-cell office:value-type="float" office:value="-0.3717" calcext:value-type="float">
            <text:p>-0.3717</text:p>
          </table:table-cell>
          <table:table-cell office:value-type="float" office:value="0.4877" calcext:value-type="float">
            <text:p>0.4877</text:p>
          </table:table-cell>
          <table:table-cell office:value-type="float" office:value="-1.0806" calcext:value-type="float">
            <text:p>-1.0806</text:p>
          </table:table-cell>
          <table:table-cell office:value-type="float" office:value="10.1905" calcext:value-type="float">
            <text:p>10.1905</text:p>
          </table:table-cell>
          <table:table-cell office:value-type="float" office:value="0.1905" calcext:value-type="float">
            <text:p>0.1905</text:p>
          </table:table-cell>
          <table:table-cell office:value-type="float" office:value="-0.6316" calcext:value-type="float">
            <text:p>-0.6316</text:p>
          </table:table-cell>
          <table:table-cell office:value-type="float" office:value="0.3534" calcext:value-type="float">
            <text:p>0.3534</text:p>
          </table:table-cell>
          <table:table-cell office:value-type="float" office:value="-0.4976" calcext:value-type="float">
            <text:p>-0.4976</text:p>
          </table:table-cell>
          <table:table-cell office:value-type="float" office:value="-0.8901" calcext:value-type="float">
            <text:p>-0.890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0.6316" calcext:value-type="float">
            <text:p>-0.6316</text:p>
          </table:table-cell>
          <table:table-cell office:value-type="float" office:value="0.3534" calcext:value-type="float">
            <text:p>0.3534</text:p>
          </table:table-cell>
          <table:table-cell office:value-type="float" office:value="-0.4976" calcext:value-type="float">
            <text:p>-0.4976</text:p>
          </table:table-cell>
          <table:table-cell office:value-type="float" office:value="-0.8901" calcext:value-type="float">
            <text:p>-0.8901</text:p>
          </table:table-cell>
          <table:table-cell office:value-type="float" office:value="10.8686" calcext:value-type="float">
            <text:p>10.8686</text:p>
          </table:table-cell>
          <table:table-cell office:value-type="float" office:value="0.8686" calcext:value-type="float">
            <text:p>0.8686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0.6805" calcext:value-type="float">
            <text:p>0.6805</text:p>
          </table:table-cell>
          <table:table-cell office:value-type="float" office:value="-0.9535" calcext:value-type="float">
            <text:p>-0.9535</text:p>
          </table:table-cell>
          <table:table-cell office:value-type="float" office:value="-0.0215" calcext:value-type="float">
            <text:p>-0.021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0.6805" calcext:value-type="float">
            <text:p>0.6805</text:p>
          </table:table-cell>
          <table:table-cell office:value-type="float" office:value="-0.9535" calcext:value-type="float">
            <text:p>-0.9535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1.0171" calcext:value-type="float">
            <text:p>11.0171</text:p>
          </table:table-cell>
          <table:table-cell office:value-type="float" office:value="1.0171" calcext:value-type="float">
            <text:p>1.0171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3529" calcext:value-type="float">
            <text:p>0.3529</text:p>
          </table:table-cell>
          <table:table-cell office:value-type="float" office:value="-0.4664" calcext:value-type="float">
            <text:p>-0.4664</text:p>
          </table:table-cell>
          <table:table-cell office:value-type="float" office:value="0.9956" calcext:value-type="float">
            <text:p>0.99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3529" calcext:value-type="float">
            <text:p>0.3529</text:p>
          </table:table-cell>
          <table:table-cell office:value-type="float" office:value="-0.4664" calcext:value-type="float">
            <text:p>-0.46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2413" calcext:value-type="float">
            <text:p>-0.2413</text:p>
          </table:table-cell>
          <table:table-cell office:value-type="float" office:value="0.5497" calcext:value-type="float">
            <text:p>0.5497</text:p>
          </table:table-cell>
          <table:table-cell office:value-type="float" office:value="-0.2591" calcext:value-type="float">
            <text:p>-0.259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7543" calcext:value-type="float">
            <text:p>0.754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5497" calcext:value-type="float">
            <text:p>0.5497</text:p>
          </table:table-cell>
          <table:table-cell office:value-type="float" office:value="-0.2591" calcext:value-type="float">
            <text:p>-0.259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7543" calcext:value-type="float">
            <text:p>0.7543</text:p>
          </table:table-cell>
          <table:table-cell office:value-type="float" office:value="9.4258" calcext:value-type="float">
            <text:p>9.4258</text:p>
          </table:table-cell>
          <table:table-cell office:value-type="float" office:value="-0.5742" calcext:value-type="float">
            <text:p>-0.5742</text:p>
          </table:table-cell>
          <table:table-cell office:value-type="float" office:value="0.1028" calcext:value-type="float">
            <text:p>0.1028</text:p>
          </table:table-cell>
          <table:table-cell office:value-type="float" office:value="-0.5674" calcext:value-type="float">
            <text:p>-0.5674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1801" calcext:value-type="float">
            <text:p>0.180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1028" calcext:value-type="float">
            <text:p>0.1028</text:p>
          </table:table-cell>
          <table:table-cell office:value-type="float" office:value="-0.5674" calcext:value-type="float">
            <text:p>-0.5674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1801" calcext:value-type="float">
            <text:p>0.1801</text:p>
          </table:table-cell>
          <table:table-cell office:value-type="float" office:value="9.031" calcext:value-type="float">
            <text:p>9.031</text:p>
          </table:table-cell>
          <table:table-cell office:value-type="float" office:value="-0.969" calcext:value-type="float">
            <text:p>-0.969</text:p>
          </table:table-cell>
          <table:table-cell office:value-type="float" office:value="-0.3823" calcext:value-type="float">
            <text:p>-0.3823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5714" calcext:value-type="float">
            <text:p>0.5714</text:p>
          </table:table-cell>
          <table:table-cell office:value-type="float" office:value="-0.7889" calcext:value-type="float">
            <text:p>-0.788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0.3823" calcext:value-type="float">
            <text:p>-0.3823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5714" calcext:value-type="float">
            <text:p>0.5714</text:p>
          </table:table-cell>
          <table:table-cell office:value-type="float" office:value="-0.7889" calcext:value-type="float">
            <text:p>-0.7889</text:p>
          </table:table-cell>
          <table:table-cell office:value-type="float" office:value="9.9043" calcext:value-type="float">
            <text:p>9.9043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1913" calcext:value-type="float">
            <text:p>0.1913</text:p>
          </table:table-cell>
          <table:table-cell office:value-type="float" office:value="-0.2653" calcext:value-type="float">
            <text:p>-0.2653</text:p>
          </table:table-cell>
          <table:table-cell office:value-type="float" office:value="-0.8845" calcext:value-type="float">
            <text:p>-0.884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1913" calcext:value-type="float">
            <text:p>0.1913</text:p>
          </table:table-cell>
          <table:table-cell office:value-type="float" office:value="-0.2653" calcext:value-type="float">
            <text:p>-0.2653</text:p>
          </table:table-cell>
          <table:table-cell office:value-type="float" office:value="-0.8845" calcext:value-type="float">
            <text:p>-0.8845</text:p>
          </table:table-cell>
          <table:table-cell office:value-type="float" office:value="10.7827" calcext:value-type="float">
            <text:p>10.7827</text:p>
          </table:table-cell>
          <table:table-cell office:value-type="float" office:value="0.7827" calcext:value-type="float">
            <text:p>0.7827</text:p>
          </table:table-cell>
          <table:table-cell office:value-type="float" office:value="-0.1054" calcext:value-type="float">
            <text:p>-0.1054</text:p>
          </table:table-cell>
          <table:table-cell office:value-type="float" office:value="0.4671" calcext:value-type="float">
            <text:p>0.4671</text:p>
          </table:table-cell>
          <table:table-cell office:value-type="float" office:value="-0.7585" calcext:value-type="float">
            <text:p>-0.7585</text:p>
          </table:table-cell>
          <table:table-cell office:value-type="float" office:value="-0.1018" calcext:value-type="float">
            <text:p>-0.101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0.1054" calcext:value-type="float">
            <text:p>-0.1054</text:p>
          </table:table-cell>
          <table:table-cell office:value-type="float" office:value="0.4671" calcext:value-type="float">
            <text:p>0.4671</text:p>
          </table:table-cell>
          <table:table-cell office:value-type="float" office:value="-0.7585" calcext:value-type="float">
            <text:p>-0.7585</text:p>
          </table:table-cell>
          <table:table-cell office:value-type="float" office:value="-0.1018" calcext:value-type="float">
            <text:p>-0.1018</text:p>
          </table:table-cell>
          <table:table-cell office:value-type="float" office:value="10.7468" calcext:value-type="float">
            <text:p>10.7468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2802" calcext:value-type="float">
            <text:p>0.2802</text:p>
          </table:table-cell>
          <table:table-cell office:value-type="float" office:value="-0.4869" calcext:value-type="float">
            <text:p>-0.4869</text:p>
          </table:table-cell>
          <table:table-cell office:value-type="float" office:value="0.645" calcext:value-type="float">
            <text:p>0.64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2802" calcext:value-type="float">
            <text:p>0.2802</text:p>
          </table:table-cell>
          <table:table-cell office:value-type="float" office:value="-0.4869" calcext:value-type="float">
            <text:p>-0.4869</text:p>
          </table:table-cell>
          <table:table-cell office:value-type="float" office:value="0.645" calcext:value-type="float">
            <text:p>0.645</text:p>
          </table:table-cell>
          <table:table-cell office:value-type="float" office:value="10.2435" calcext:value-type="float">
            <text:p>10.24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8885" calcext:value-type="float">
            <text:p>0.888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8885" calcext:value-type="float">
            <text:p>0.8885</text:p>
          </table:table-cell>
          <table:table-cell office:value-type="float" office:value="9.2178" calcext:value-type="float">
            <text:p>9.2178</text:p>
          </table:table-cell>
          <table:table-cell office:value-type="float" office:value="-0.7822" calcext:value-type="float">
            <text:p>-0.7822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737" calcext:value-type="float">
            <text:p>-0.3737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1062" calcext:value-type="float">
            <text:p>0.106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737" calcext:value-type="float">
            <text:p>-0.3737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1062" calcext:value-type="float">
            <text:p>0.1062</text:p>
          </table:table-cell>
          <table:table-cell office:value-type="float" office:value="9.3173" calcext:value-type="float">
            <text:p>9.3173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-0.2212" calcext:value-type="float">
            <text:p>-0.2212</text:p>
          </table:table-cell>
          <table:table-cell office:value-type="float" office:value="-0.23" calcext:value-type="float">
            <text:p>-0.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-0.5764" calcext:value-type="float">
            <text:p>-0.576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0.2212" calcext:value-type="float">
            <text:p>-0.2212</text:p>
          </table:table-cell>
          <table:table-cell office:value-type="float" office:value="-0.23" calcext:value-type="float">
            <text:p>-0.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-0.5764" calcext:value-type="float">
            <text:p>-0.5764</text:p>
          </table:table-cell>
          <table:table-cell office:value-type="float" office:value="9.8047" calcext:value-type="float">
            <text:p>9.8047</text:p>
          </table:table-cell>
          <table:table-cell office:value-type="float" office:value="-0.1953" calcext:value-type="float">
            <text:p>-0.1953</text:p>
          </table:table-cell>
          <table:table-cell office:value-type="float" office:value="-0.2938" calcext:value-type="float">
            <text:p>-0.2938</text:p>
          </table:table-cell>
          <table:table-cell office:value-type="float" office:value="0.104" calcext:value-type="float">
            <text:p>0.104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7717" calcext:value-type="float">
            <text:p>-0.771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-0.2938" calcext:value-type="float">
            <text:p>-0.2938</text:p>
          </table:table-cell>
          <table:table-cell office:value-type="float" office:value="0.104" calcext:value-type="float">
            <text:p>0.104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7717" calcext:value-type="float">
            <text:p>-0.7717</text:p>
          </table:table-cell>
          <table:table-cell office:value-type="float" office:value="10.6388" calcext:value-type="float">
            <text:p>10.6388</text:p>
          </table:table-cell>
          <table:table-cell office:value-type="float" office:value="0.6388" calcext:value-type="float">
            <text:p>0.6388</text:p>
          </table:table-cell>
          <table:table-cell office:value-type="float" office:value="-0.0827" calcext:value-type="float">
            <text:p>-0.0827</text:p>
          </table:table-cell>
          <table:table-cell office:value-type="float" office:value="0.2917" calcext:value-type="float">
            <text:p>0.2917</text:p>
          </table:table-cell>
          <table:table-cell office:value-type="float" office:value="-0.5843" calcext:value-type="float">
            <text:p>-0.5843</text:p>
          </table:table-cell>
          <table:table-cell office:value-type="float" office:value="-0.1329" calcext:value-type="float">
            <text:p>-0.132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-0.0827" calcext:value-type="float">
            <text:p>-0.0827</text:p>
          </table:table-cell>
          <table:table-cell office:value-type="float" office:value="0.2917" calcext:value-type="float">
            <text:p>0.2917</text:p>
          </table:table-cell>
          <table:table-cell office:value-type="float" office:value="-0.5843" calcext:value-type="float">
            <text:p>-0.5843</text:p>
          </table:table-cell>
          <table:table-cell office:value-type="float" office:value="-0.1329" calcext:value-type="float">
            <text:p>-0.1329</text:p>
          </table:table-cell>
          <table:table-cell office:value-type="float" office:value="10.5356" calcext:value-type="float">
            <text:p>10.5356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1798" calcext:value-type="float">
            <text:p>0.1798</text:p>
          </table:table-cell>
          <table:table-cell office:value-type="float" office:value="-0.4495" calcext:value-type="float">
            <text:p>-0.4495</text:p>
          </table:table-cell>
          <table:table-cell office:value-type="float" office:value="0.4027" calcext:value-type="float">
            <text:p>0.402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1798" calcext:value-type="float">
            <text:p>0.1798</text:p>
          </table:table-cell>
          <table:table-cell office:value-type="float" office:value="-0.4495" calcext:value-type="float">
            <text:p>-0.4495</text:p>
          </table:table-cell>
          <table:table-cell office:value-type="float" office:value="0.4027" calcext:value-type="float">
            <text:p>0.4027</text:p>
          </table:table-cell>
          <table:table-cell office:value-type="float" office:value="10.2942" calcext:value-type="float">
            <text:p>10.2942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6969" calcext:value-type="float">
            <text:p>0.696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6969" calcext:value-type="float">
            <text:p>0.6969</text:p>
          </table:table-cell>
          <table:table-cell office:value-type="float" office:value="9.4391" calcext:value-type="float">
            <text:p>9.4391</text:p>
          </table:table-cell>
          <table:table-cell office:value-type="float" office:value="-0.5609" calcext:value-type="float">
            <text:p>-0.560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229" calcext:value-type="float">
            <text:p>-0.229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1359" calcext:value-type="float">
            <text:p>0.135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229" calcext:value-type="float">
            <text:p>-0.229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1359" calcext:value-type="float">
            <text:p>0.1359</text:p>
          </table:table-cell>
          <table:table-cell office:value-type="float" office:value="9.4887" calcext:value-type="float">
            <text:p>9.4887</text:p>
          </table:table-cell>
          <table:table-cell office:value-type="float" office:value="-0.5113" calcext:value-type="float">
            <text:p>-0.5113</text:p>
          </table:table-cell>
          <table:table-cell office:value-type="float" office:value="-0.1353" calcext:value-type="float">
            <text:p>-0.1353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397" calcext:value-type="float">
            <text:p>0.397</text:p>
          </table:table-cell>
          <table:table-cell office:value-type="float" office:value="-0.3753" calcext:value-type="float">
            <text:p>-0.375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0.1353" calcext:value-type="float">
            <text:p>-0.1353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397" calcext:value-type="float">
            <text:p>0.397</text:p>
          </table:table-cell>
          <table:table-cell office:value-type="float" office:value="-0.3753" calcext:value-type="float">
            <text:p>-0.3753</text:p>
          </table:table-cell>
          <table:table-cell office:value-type="float" office:value="9.7844" calcext:value-type="float">
            <text:p>9.7844</text:p>
          </table:table-cell>
          <table:table-cell office:value-type="float" office:value="-0.2156" calcext:value-type="float">
            <text:p>-0.2156</text:p>
          </table:table-cell>
          <table:table-cell office:value-type="float" office:value="-0.1719" calcext:value-type="float">
            <text:p>-0.1719</text:p>
          </table:table-cell>
          <table:table-cell office:value-type="float" office:value="0.0719" calcext:value-type="float">
            <text:p>0.071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-0.591" calcext:value-type="float">
            <text:p>-0.59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0.1719" calcext:value-type="float">
            <text:p>-0.1719</text:p>
          </table:table-cell>
          <table:table-cell office:value-type="float" office:value="0.0719" calcext:value-type="float">
            <text:p>0.071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-0.591" calcext:value-type="float">
            <text:p>-0.591</text:p>
          </table:table-cell>
          <table:table-cell office:value-type="float" office:value="10.4594" calcext:value-type="float">
            <text:p>10.4594</text:p>
          </table:table-cell>
          <table:table-cell office:value-type="float" office:value="0.4594" calcext:value-type="float">
            <text:p>0.459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1756" calcext:value-type="float">
            <text:p>0.1756</text:p>
          </table:table-cell>
          <table:table-cell office:value-type="float" office:value="-0.4474" calcext:value-type="float">
            <text:p>-0.4474</text:p>
          </table:table-cell>
          <table:table-cell office:value-type="float" office:value="-0.1316" calcext:value-type="float">
            <text:p>-0.131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1756" calcext:value-type="float">
            <text:p>0.1756</text:p>
          </table:table-cell>
          <table:table-cell office:value-type="float" office:value="-0.4474" calcext:value-type="float">
            <text:p>-0.4474</text:p>
          </table:table-cell>
          <table:table-cell office:value-type="float" office:value="-0.1316" calcext:value-type="float">
            <text:p>-0.1316</text:p>
          </table:table-cell>
          <table:table-cell office:value-type="float" office:value="10.4047" calcext:value-type="float">
            <text:p>10.4047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926" calcext:value-type="float">
            <text:p>0.0926</text:p>
          </table:table-cell>
          <table:table-cell office:value-type="float" office:value="-0.3767" calcext:value-type="float">
            <text:p>-0.3767</text:p>
          </table:table-cell>
          <table:table-cell office:value-type="float" office:value="0.2731" calcext:value-type="float">
            <text:p>0.273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926" calcext:value-type="float">
            <text:p>0.0926</text:p>
          </table:table-cell>
          <table:table-cell office:value-type="float" office:value="-0.3767" calcext:value-type="float">
            <text:p>-0.3767</text:p>
          </table:table-cell>
          <table:table-cell office:value-type="float" office:value="0.2731" calcext:value-type="float">
            <text:p>0.2731</text:p>
          </table:table-cell>
          <table:table-cell office:value-type="float" office:value="10.1957" calcext:value-type="float">
            <text:p>10.1957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1204" calcext:value-type="float">
            <text:p>0.1204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4688" calcext:value-type="float">
            <text:p>0.468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1204" calcext:value-type="float">
            <text:p>0.1204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4688" calcext:value-type="float">
            <text:p>0.4688</text:p>
          </table:table-cell>
          <table:table-cell office:value-type="float" office:value="9.6957" calcext:value-type="float">
            <text:p>9.6957</text:p>
          </table:table-cell>
          <table:table-cell office:value-type="float" office:value="-0.3043" calcext:value-type="float">
            <text:p>-0.3043</text:p>
          </table:table-cell>
          <table:table-cell office:value-type="float" office:value="0.0109" calcext:value-type="float">
            <text:p>0.0109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1645" calcext:value-type="float">
            <text:p>0.164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1645" calcext:value-type="float">
            <text:p>0.1645</text:p>
          </table:table-cell>
          <table:table-cell office:value-type="float" office:value="9.5706" calcext:value-type="float">
            <text:p>9.5706</text:p>
          </table:table-cell>
          <table:table-cell office:value-type="float" office:value="-0.4294" calcext:value-type="float">
            <text:p>-0.4294</text:p>
          </table:table-cell>
          <table:table-cell office:value-type="float" office:value="-0.0953" calcext:value-type="float">
            <text:p>-0.0953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0.2605" calcext:value-type="float">
            <text:p>0.2605</text:p>
          </table:table-cell>
          <table:table-cell office:value-type="float" office:value="-0.2649" calcext:value-type="float">
            <text:p>-0.264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-0.0953" calcext:value-type="float">
            <text:p>-0.0953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0.2605" calcext:value-type="float">
            <text:p>0.2605</text:p>
          </table:table-cell>
          <table:table-cell office:value-type="float" office:value="-0.2649" calcext:value-type="float">
            <text:p>-0.2649</text:p>
          </table:table-cell>
          <table:table-cell office:value-type="float" office:value="9.831" calcext:value-type="float">
            <text:p>9.831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0.0684" calcext:value-type="float">
            <text:p>0.0684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-0.4339" calcext:value-type="float">
            <text:p>-0.433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0.0684" calcext:value-type="float">
            <text:p>0.0684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-0.4339" calcext:value-type="float">
            <text:p>-0.4339</text:p>
          </table:table-cell>
          <table:table-cell office:value-type="float" office:value="10.3447" calcext:value-type="float">
            <text:p>10.3447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62" calcext:value-type="float">
            <text:p>0.1062</text:p>
          </table:table-cell>
          <table:table-cell office:value-type="float" office:value="-0.3505" calcext:value-type="float">
            <text:p>-0.3505</text:p>
          </table:table-cell>
          <table:table-cell office:value-type="float" office:value="-0.0892" calcext:value-type="float">
            <text:p>-0.089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62" calcext:value-type="float">
            <text:p>0.1062</text:p>
          </table:table-cell>
          <table:table-cell office:value-type="float" office:value="-0.3505" calcext:value-type="float">
            <text:p>-0.3505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10.3304" calcext:value-type="float">
            <text:p>10.330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282" calcext:value-type="float">
            <text:p>0.0282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0.2412" calcext:value-type="float">
            <text:p>0.241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282" calcext:value-type="float">
            <text:p>0.0282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10.0671" calcext:value-type="float">
            <text:p>10.067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534" calcext:value-type="float">
            <text:p>0.0534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3083" calcext:value-type="float">
            <text:p>0.308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0534" calcext:value-type="float">
            <text:p>0.0534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3083" calcext:value-type="float">
            <text:p>0.3083</text:p>
          </table:table-cell>
          <table:table-cell office:value-type="float" office:value="9.7274" calcext:value-type="float">
            <text:p>9.7274</text:p>
          </table:table-cell>
          <table:table-cell office:value-type="float" office:value="-0.2726" calcext:value-type="float">
            <text:p>-0.2726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-0.0818" calcext:value-type="float">
            <text:p>-0.081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357" calcext:value-type="float">
            <text:p>0.035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-0.0818" calcext:value-type="float">
            <text:p>-0.081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357" calcext:value-type="float">
            <text:p>0.0357</text:p>
          </table:table-cell>
          <table:table-cell office:value-type="float" office:value="9.7312" calcext:value-type="float">
            <text:p>9.7312</text:p>
          </table:table-cell>
          <table:table-cell office:value-type="float" office:value="-0.2688" calcext:value-type="float">
            <text:p>-0.2688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736" calcext:value-type="float">
            <text:p>0.0736</text:p>
          </table:table-cell>
          <table:table-cell office:value-type="float" office:value="-0.2331" calcext:value-type="float">
            <text:p>-0.233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736" calcext:value-type="float">
            <text:p>0.0736</text:p>
          </table:table-cell>
          <table:table-cell office:value-type="float" office:value="-0.2331" calcext:value-type="float">
            <text:p>-0.2331</text:p>
          </table:table-cell>
          <table:table-cell office:value-type="float" office:value="9.9378" calcext:value-type="float">
            <text:p>9.9378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906" calcext:value-type="float">
            <text:p>-0.1906</text:p>
          </table:table-cell>
          <table:table-cell office:value-type="float" office:value="-0.2953" calcext:value-type="float">
            <text:p>-0.295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906" calcext:value-type="float">
            <text:p>-0.1906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10.285" calcext:value-type="float">
            <text:p>10.28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-0.0104" calcext:value-type="float">
            <text:p>-0.010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10.2507" calcext:value-type="float">
            <text:p>10.2507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2284" calcext:value-type="float">
            <text:p>-0.2284</text:p>
          </table:table-cell>
          <table:table-cell office:value-type="float" office:value="0.2403" calcext:value-type="float">
            <text:p>0.240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431" calcext:value-type="float">
            <text:p>0.043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2284" calcext:value-type="float">
            <text:p>-0.2284</text:p>
          </table:table-cell>
          <table:table-cell office:value-type="float" office:value="0.2403" calcext:value-type="float">
            <text:p>0.2403</text:p>
          </table:table-cell>
          <table:table-cell office:value-type="float" office:value="9.9553" calcext:value-type="float">
            <text:p>9.9553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1956" calcext:value-type="float">
            <text:p>0.19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1956" calcext:value-type="float">
            <text:p>0.1956</text:p>
          </table:table-cell>
          <table:table-cell office:value-type="float" office:value="9.7574" calcext:value-type="float">
            <text:p>9.7574</text:p>
          </table:table-cell>
          <table:table-cell office:value-type="float" office:value="-0.2426" calcext:value-type="float">
            <text:p>-0.2426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639" calcext:value-type="float">
            <text:p>0.0639</text:p>
          </table:table-cell>
          <table:table-cell office:value-type="float" office:value="-0.0469" calcext:value-type="float">
            <text:p>-0.046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639" calcext:value-type="float">
            <text:p>0.0639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9.833" calcext:value-type="float">
            <text:p>9.833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2139" calcext:value-type="float">
            <text:p>-0.213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2139" calcext:value-type="float">
            <text:p>-0.2139</text:p>
          </table:table-cell>
          <table:table-cell office:value-type="float" office:value="10.0587" calcext:value-type="float">
            <text:p>10.0587</text:p>
          </table:table-cell>
          <table:table-cell office:value-type="float" office:value="0.0587" calcext:value-type="float">
            <text:p>0.0587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2512" calcext:value-type="float">
            <text:p>-0.2512</text:p>
          </table:table-cell>
          <table:table-cell office:value-type="float" office:value="-0.1552" calcext:value-type="float">
            <text:p>-0.155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2512" calcext:value-type="float">
            <text:p>-0.2512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10.2409" calcext:value-type="float">
            <text:p>10.2409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0856" calcext:value-type="float">
            <text:p>0.08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0856" calcext:value-type="float">
            <text:p>0.0856</text:p>
          </table:table-cell>
          <table:table-cell office:value-type="float" office:value="10.1158" calcext:value-type="float">
            <text:p>10.115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1424" calcext:value-type="float">
            <text:p>-0.1424</text:p>
          </table:table-cell>
          <table:table-cell office:value-type="float" office:value="0.2015" calcext:value-type="float">
            <text:p>0.201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1424" calcext:value-type="float">
            <text:p>-0.1424</text:p>
          </table:table-cell>
          <table:table-cell office:value-type="float" office:value="0.2015" calcext:value-type="float">
            <text:p>0.2015</text:p>
          </table:table-cell>
          <table:table-cell office:value-type="float" office:value="9.8824" calcext:value-type="float">
            <text:p>9.8824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838" calcext:value-type="float">
            <text:p>0.083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838" calcext:value-type="float">
            <text:p>0.0838</text:p>
          </table:table-cell>
          <table:table-cell office:value-type="float" office:value="9.8067" calcext:value-type="float">
            <text:p>9.8067</text:p>
          </table:table-cell>
          <table:table-cell office:value-type="float" office:value="-0.1933" calcext:value-type="float">
            <text:p>-0.1933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1094" calcext:value-type="float">
            <text:p>-0.109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1094" calcext:value-type="float">
            <text:p>-0.1094</text:p>
          </table:table-cell>
          <table:table-cell office:value-type="float" office:value="9.9354" calcext:value-type="float">
            <text:p>9.9354</text:p>
          </table:table-cell>
          <table:table-cell office:value-type="float" office:value="-0.0646" calcext:value-type="float">
            <text:p>-0.0646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-0.174" calcext:value-type="float">
            <text:p>-0.17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-0.174" calcext:value-type="float">
            <text:p>-0.174</text:p>
          </table:table-cell>
          <table:table-cell office:value-type="float" office:value="10.1352" calcext:value-type="float">
            <text:p>10.1352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-0.0388" calcext:value-type="float">
            <text:p>-0.038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10.1775" calcext:value-type="float">
            <text:p>10.1775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202" calcext:value-type="float">
            <text:p>0.020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2108" calcext:value-type="float">
            <text:p>-0.2108</text:p>
          </table:table-cell>
          <table:table-cell office:value-type="float" office:value="0.1387" calcext:value-type="float">
            <text:p>0.138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202" calcext:value-type="float">
            <text:p>0.020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2108" calcext:value-type="float">
            <text:p>-0.2108</text:p>
          </table:table-cell>
          <table:table-cell office:value-type="float" office:value="0.1387" calcext:value-type="float">
            <text:p>0.1387</text:p>
          </table:table-cell>
          <table:table-cell office:value-type="float" office:value="10.0042" calcext:value-type="float">
            <text:p>10.004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1429" calcext:value-type="float">
            <text:p>0.142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1429" calcext:value-type="float">
            <text:p>0.1429</text:p>
          </table:table-cell>
          <table:table-cell office:value-type="float" office:value="9.8467" calcext:value-type="float">
            <text:p>9.8467</text:p>
          </table:table-cell>
          <table:table-cell office:value-type="float" office:value="-0.1533" calcext:value-type="float">
            <text:p>-0.1533</text:p>
          </table:table-cell>
          <table:table-cell office:value-type="float" office:value="-0.0353" calcext:value-type="float">
            <text:p>-0.0353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103" calcext:value-type="float">
            <text:p>-0.010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-0.0353" calcext:value-type="float">
            <text:p>-0.0353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9.8719" calcext:value-type="float">
            <text:p>9.8719</text:p>
          </table:table-cell>
          <table:table-cell office:value-type="float" office:value="-0.1281" calcext:value-type="float">
            <text:p>-0.1281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384" calcext:value-type="float">
            <text:p>-0.138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10.0254" calcext:value-type="float">
            <text:p>10.0254</text:p>
          </table:table-cell>
          <table:table-cell office:value-type="float" office:value="0.0254" calcext:value-type="float">
            <text:p>0.025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2037" calcext:value-type="float">
            <text:p>-0.2037</text:p>
          </table:table-cell>
          <table:table-cell office:value-type="float" office:value="-0.113" calcext:value-type="float">
            <text:p>-0.11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2037" calcext:value-type="float">
            <text:p>-0.2037</text:p>
          </table:table-cell>
          <table:table-cell office:value-type="float" office:value="-0.113" calcext:value-type="float">
            <text:p>-0.113</text:p>
          </table:table-cell>
          <table:table-cell office:value-type="float" office:value="10.1615" calcext:value-type="float">
            <text:p>10.161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485" calcext:value-type="float">
            <text:p>0.048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485" calcext:value-type="float">
            <text:p>0.0485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-0.1436" calcext:value-type="float">
            <text:p>-0.1436</text:p>
          </table:table-cell>
          <table:table-cell office:value-type="float" office:value="0.1362" calcext:value-type="float">
            <text:p>0.136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-0.1436" calcext:value-type="float">
            <text:p>-0.1436</text:p>
          </table:table-cell>
          <table:table-cell office:value-type="float" office:value="0.1362" calcext:value-type="float">
            <text:p>0.1362</text:p>
          </table:table-cell>
          <table:table-cell office:value-type="float" office:value="9.929" calcext:value-type="float">
            <text:p>9.929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0.0652" calcext:value-type="float">
            <text:p>0.065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8599" calcext:value-type="float">
            <text:p>9.8599</text:p>
          </table:table-cell>
          <table:table-cell office:value-type="float" office:value="-0.1401" calcext:value-type="float">
            <text:p>-0.1401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-0.0748" calcext:value-type="float">
            <text:p>-0.074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9.95" calcext:value-type="float">
            <text:p>9.9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263" calcext:value-type="float">
            <text:p>0.0263</text:p>
          </table:table-cell>
          <table:table-cell office:value-type="float" office:value="-0.1475" calcext:value-type="float">
            <text:p>-0.1475</text:p>
          </table:table-cell>
          <table:table-cell office:value-type="float" office:value="-0.1248" calcext:value-type="float">
            <text:p>-0.124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263" calcext:value-type="float">
            <text:p>0.0263</text:p>
          </table:table-cell>
          <table:table-cell office:value-type="float" office:value="-0.1475" calcext:value-type="float">
            <text:p>-0.1475</text:p>
          </table:table-cell>
          <table:table-cell office:value-type="float" office:value="-0.1248" calcext:value-type="float">
            <text:p>-0.1248</text:p>
          </table:table-cell>
          <table:table-cell office:value-type="float" office:value="10.0975" calcext:value-type="float">
            <text:p>10.097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35" calcext:value-type="float">
            <text:p>0.0235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-0.0273" calcext:value-type="float">
            <text:p>-0.027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35" calcext:value-type="float">
            <text:p>0.0235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10.1247" calcext:value-type="float">
            <text:p>10.1247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1" calcext:value-type="float">
            <text:p>0.01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1885" calcext:value-type="float">
            <text:p>-0.1885</text:p>
          </table:table-cell>
          <table:table-cell office:value-type="float" office:value="0.0973" calcext:value-type="float">
            <text:p>0.097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1885" calcext:value-type="float">
            <text:p>-0.1885</text:p>
          </table:table-cell>
          <table:table-cell office:value-type="float" office:value="0.0973" calcext:value-type="float">
            <text:p>0.0973</text:p>
          </table:table-cell>
          <table:table-cell office:value-type="float" office:value="10.0011" calcext:value-type="float">
            <text:p>10.00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0984" calcext:value-type="float">
            <text:p>0.098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0984" calcext:value-type="float">
            <text:p>0.0984</text:p>
          </table:table-cell>
          <table:table-cell office:value-type="float" office:value="9.8935" calcext:value-type="float">
            <text:p>9.8935</text:p>
          </table:table-cell>
          <table:table-cell office:value-type="float" office:value="-0.1065" calcext:value-type="float">
            <text:p>-0.1065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-0.0081" calcext:value-type="float">
            <text:p>-0.008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9.9052" calcext:value-type="float">
            <text:p>9.9052</text:p>
          </table:table-cell>
          <table:table-cell office:value-type="float" office:value="-0.0948" calcext:value-type="float">
            <text:p>-0.0948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029" calcext:value-type="float">
            <text:p>-0.102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10.0234" calcext:value-type="float">
            <text:p>10.0234</text:p>
          </table:table-cell>
          <table:table-cell office:value-type="float" office:value="0.0234" calcext:value-type="float">
            <text:p>0.0234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1922" calcext:value-type="float">
            <text:p>-0.1922</text:p>
          </table:table-cell>
          <table:table-cell office:value-type="float" office:value="-0.0795" calcext:value-type="float">
            <text:p>-0.079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1922" calcext:value-type="float">
            <text:p>-0.1922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10.1196" calcext:value-type="float">
            <text:p>10.1196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119" calcext:value-type="float">
            <text:p>-0.2119</text:p>
          </table:table-cell>
          <table:table-cell office:value-type="float" office:value="0.0401" calcext:value-type="float">
            <text:p>0.040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119" calcext:value-type="float">
            <text:p>-0.2119</text:p>
          </table:table-cell>
          <table:table-cell office:value-type="float" office:value="0.0401" calcext:value-type="float">
            <text:p>0.0401</text:p>
          </table:table-cell>
          <table:table-cell office:value-type="float" office:value="10.0591" calcext:value-type="float">
            <text:p>10.0591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991" calcext:value-type="float">
            <text:p>0.099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991" calcext:value-type="float">
            <text:p>0.0991</text:p>
          </table:table-cell>
          <table:table-cell office:value-type="float" office:value="9.9448" calcext:value-type="float">
            <text:p>9.9448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0.044" calcext:value-type="float">
            <text:p>0.04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0.044" calcext:value-type="float">
            <text:p>0.044</text:p>
          </table:table-cell>
          <table:table-cell office:value-type="float" office:value="9.8986" calcext:value-type="float">
            <text:p>9.8986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-0.0574" calcext:value-type="float">
            <text:p>-0.057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9.9664" calcext:value-type="float">
            <text:p>9.9664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1516" calcext:value-type="float">
            <text:p>-0.1516</text:p>
          </table:table-cell>
          <table:table-cell office:value-type="float" office:value="-0.091" calcext:value-type="float">
            <text:p>-0.09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1516" calcext:value-type="float">
            <text:p>-0.1516</text:p>
          </table:table-cell>
          <table:table-cell office:value-type="float" office:value="-0.091" calcext:value-type="float">
            <text:p>-0.091</text:p>
          </table:table-cell>
          <table:table-cell office:value-type="float" office:value="10.0762" calcext:value-type="float">
            <text:p>10.0762</text:p>
          </table:table-cell>
          <table:table-cell office:value-type="float" office:value="0.0762" calcext:value-type="float">
            <text:p>0.076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-0.0147" calcext:value-type="float">
            <text:p>-0.014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10.0888" calcext:value-type="float">
            <text:p>10.0888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748" calcext:value-type="float">
            <text:p>-0.1748</text:p>
          </table:table-cell>
          <table:table-cell office:value-type="float" office:value="0.074" calcext:value-type="float">
            <text:p>0.07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748" calcext:value-type="float">
            <text:p>-0.1748</text:p>
          </table:table-cell>
          <table:table-cell office:value-type="float" office:value="0.074" calcext:value-type="float">
            <text:p>0.074</text:p>
          </table:table-cell>
          <table:table-cell office:value-type="float" office:value="9.9959" calcext:value-type="float">
            <text:p>9.9959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028" calcext:value-type="float">
            <text:p>-0.1028</text:p>
          </table:table-cell>
          <table:table-cell office:value-type="float" office:value="0.07" calcext:value-type="float">
            <text:p>0.0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028" calcext:value-type="float">
            <text:p>-0.1028</text:p>
          </table:table-cell>
          <table:table-cell office:value-type="float" office:value="0.07" calcext:value-type="float">
            <text:p>0.07</text:p>
          </table:table-cell>
          <table:table-cell office:value-type="float" office:value="9.9197" calcext:value-type="float">
            <text:p>9.9197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104" calcext:value-type="float">
            <text:p>-0.010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9.9338" calcext:value-type="float">
            <text:p>9.9338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-0.0766" calcext:value-type="float">
            <text:p>-0.076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10.0222" calcext:value-type="float">
            <text:p>10.0222</text:p>
          </table:table-cell>
          <table:table-cell office:value-type="float" office:value="0.0222" calcext:value-type="float">
            <text:p>0.0222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0544" calcext:value-type="float">
            <text:p>-0.054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1926" calcext:value-type="float">
            <text:p>-0.1926</text:p>
          </table:table-cell>
          <table:table-cell office:value-type="float" office:value="0.0333" calcext:value-type="float">
            <text:p>0.033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1926" calcext:value-type="float">
            <text:p>-0.1926</text:p>
          </table:table-cell>
          <table:table-cell office:value-type="float" office:value="0.0333" calcext:value-type="float">
            <text:p>0.0333</text:p>
          </table:table-cell>
          <table:table-cell office:value-type="float" office:value="10.0385" calcext:value-type="float">
            <text:p>10.0385</text:p>
          </table:table-cell>
          <table:table-cell office:value-type="float" office:value="0.0385" calcext:value-type="float">
            <text:p>0.038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14" calcext:value-type="float">
            <text:p>-0.14</text:p>
          </table:table-cell>
          <table:table-cell office:value-type="float" office:value="0.0718" calcext:value-type="float">
            <text:p>0.071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14" calcext:value-type="float">
            <text:p>-0.14</text:p>
          </table:table-cell>
          <table:table-cell office:value-type="float" office:value="0.0718" calcext:value-type="float">
            <text:p>0.0718</text:p>
          </table:table-cell>
          <table:table-cell office:value-type="float" office:value="9.9567" calcext:value-type="float">
            <text:p>9.9567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0.0285" calcext:value-type="float">
            <text:p>0.028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0.0285" calcext:value-type="float">
            <text:p>0.0285</text:p>
          </table:table-cell>
          <table:table-cell office:value-type="float" office:value="9.9264" calcext:value-type="float">
            <text:p>9.9264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981" calcext:value-type="float">
            <text:p>-0.0981</text:p>
          </table:table-cell>
          <table:table-cell office:value-type="float" office:value="-0.0451" calcext:value-type="float">
            <text:p>-0.045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981" calcext:value-type="float">
            <text:p>-0.0981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9.9795" calcext:value-type="float">
            <text:p>9.9795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1535" calcext:value-type="float">
            <text:p>-0.1535</text:p>
          </table:table-cell>
          <table:table-cell office:value-type="float" office:value="-0.0656" calcext:value-type="float">
            <text:p>-0.06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1535" calcext:value-type="float">
            <text:p>-0.1535</text:p>
          </table:table-cell>
          <table:table-cell office:value-type="float" office:value="-0.0656" calcext:value-type="float">
            <text:p>-0.0656</text:p>
          </table:table-cell>
          <table:table-cell office:value-type="float" office:value="10.0587" calcext:value-type="float">
            <text:p>10.0587</text:p>
          </table:table-cell>
          <table:table-cell office:value-type="float" office:value="0.0587" calcext:value-type="float">
            <text:p>0.058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897" calcext:value-type="float">
            <text:p>-0.1897</text:p>
          </table:table-cell>
          <table:table-cell office:value-type="float" office:value="-0.0069" calcext:value-type="float">
            <text:p>-0.006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897" calcext:value-type="float">
            <text:p>-0.1897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10.063" calcext:value-type="float">
            <text:p>10.063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1651" calcext:value-type="float">
            <text:p>-0.1651</text:p>
          </table:table-cell>
          <table:table-cell office:value-type="float" office:value="0.0561" calcext:value-type="float">
            <text:p>0.056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1651" calcext:value-type="float">
            <text:p>-0.1651</text:p>
          </table:table-cell>
          <table:table-cell office:value-type="float" office:value="0.0561" calcext:value-type="float">
            <text:p>0.0561</text:p>
          </table:table-cell>
          <table:table-cell office:value-type="float" office:value="9.9939" calcext:value-type="float">
            <text:p>9.9939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0.05" calcext:value-type="float">
            <text:p>0.0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0.05" calcext:value-type="float">
            <text:p>0.05</text:p>
          </table:table-cell>
          <table:table-cell office:value-type="float" office:value="9.9394" calcext:value-type="float">
            <text:p>9.9394</text:p>
          </table:table-cell>
          <table:table-cell office:value-type="float" office:value="-0.0606" calcext:value-type="float">
            <text:p>-0.0606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-0.0107" calcext:value-type="float">
            <text:p>-0.010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9.9534" calcext:value-type="float">
            <text:p>9.9534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-0.0573" calcext:value-type="float">
            <text:p>-0.057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10.0195" calcext:value-type="float">
            <text:p>10.0195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-0.0378" calcext:value-type="float">
            <text:p>-0.037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10.0647" calcext:value-type="float">
            <text:p>10.0647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794" calcext:value-type="float">
            <text:p>-0.1794</text:p>
          </table:table-cell>
          <table:table-cell office:value-type="float" office:value="0.0269" calcext:value-type="float">
            <text:p>0.026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794" calcext:value-type="float">
            <text:p>-0.1794</text:p>
          </table:table-cell>
          <table:table-cell office:value-type="float" office:value="0.0269" calcext:value-type="float">
            <text:p>0.0269</text:p>
          </table:table-cell>
          <table:table-cell office:value-type="float" office:value="10.0255" calcext:value-type="float">
            <text:p>10.0255</text:p>
          </table:table-cell>
          <table:table-cell office:value-type="float" office:value="0.0255" calcext:value-type="float">
            <text:p>0.025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0.0524" calcext:value-type="float">
            <text:p>0.052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0.0524" calcext:value-type="float">
            <text:p>0.0524</text:p>
          </table:table-cell>
          <table:table-cell office:value-type="float" office:value="9.9663" calcext:value-type="float">
            <text:p>9.9663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0.0187" calcext:value-type="float">
            <text:p>0.018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0.0187" calcext:value-type="float">
            <text:p>0.0187</text:p>
          </table:table-cell>
          <table:table-cell office:value-type="float" office:value="9.9463" calcext:value-type="float">
            <text:p>9.9463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0351" calcext:value-type="float">
            <text:p>-0.035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9.9875" calcext:value-type="float">
            <text:p>9.987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1537" calcext:value-type="float">
            <text:p>-0.1537</text:p>
          </table:table-cell>
          <table:table-cell office:value-type="float" office:value="-0.0475" calcext:value-type="float">
            <text:p>-0.047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1537" calcext:value-type="float">
            <text:p>-0.1537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10.0449" calcext:value-type="float">
            <text:p>10.0449</text:p>
          </table:table-cell>
          <table:table-cell office:value-type="float" office:value="0.0449" calcext:value-type="float">
            <text:p>0.044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788" calcext:value-type="float">
            <text:p>-0.1788</text:p>
          </table:table-cell>
          <table:table-cell office:value-type="float" office:value="-0.0027" calcext:value-type="float">
            <text:p>-0.002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788" calcext:value-type="float">
            <text:p>-0.178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10.0451" calcext:value-type="float">
            <text:p>10.0451</text:p>
          </table:table-cell>
          <table:table-cell office:value-type="float" office:value="0.0451" calcext:value-type="float">
            <text:p>0.045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0424" calcext:value-type="float">
            <text:p>0.042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0424" calcext:value-type="float">
            <text:p>0.0424</text:p>
          </table:table-cell>
          <table:table-cell office:value-type="float" office:value="9.9937" calcext:value-type="float">
            <text:p>9.993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0.0361" calcext:value-type="float">
            <text:p>0.036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0.0361" calcext:value-type="float">
            <text:p>0.0361</text:p>
          </table:table-cell>
          <table:table-cell office:value-type="float" office:value="9.9542" calcext:value-type="float">
            <text:p>9.9542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1065" calcext:value-type="float">
            <text:p>-0.1065</text:p>
          </table:table-cell>
          <table:table-cell office:value-type="float" office:value="-0.0097" calcext:value-type="float">
            <text:p>-0.009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1065" calcext:value-type="float">
            <text:p>-0.1065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9.9668" calcext:value-type="float">
            <text:p>9.9668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1328" calcext:value-type="float">
            <text:p>-0.1328</text:p>
          </table:table-cell>
          <table:table-cell office:value-type="float" office:value="-0.0429" calcext:value-type="float">
            <text:p>-0.042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1328" calcext:value-type="float">
            <text:p>-0.132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10.0162" calcext:value-type="float">
            <text:p>10.0162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97" calcext:value-type="float">
            <text:p>0.0097</text:p>
          </table:table-cell>
          <table:table-cell office:value-type="float" office:value="-0.1676" calcext:value-type="float">
            <text:p>-0.1676</text:p>
          </table:table-cell>
          <table:table-cell office:value-type="float" office:value="-0.0268" calcext:value-type="float">
            <text:p>-0.026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-0.6751" calcext:value-type="float">
            <text:p>-0.6751</text:p>
          </table:table-cell>
          <table:table-cell office:value-type="float" office:value="-0.3457" calcext:value-type="float">
            <text:p>-0.34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9.9845" calcext:value-type="float">
            <text:p>9.9845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2469" calcext:value-type="float">
            <text:p>-0.2469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5281" calcext:value-type="float">
            <text:p>0.528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2469" calcext:value-type="float">
            <text:p>-0.2469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5281" calcext:value-type="float">
            <text:p>0.5281</text:p>
          </table:table-cell>
          <table:table-cell office:value-type="float" office:value="9.127" calcext:value-type="float">
            <text:p>9.127</text:p>
          </table:table-cell>
          <table:table-cell office:value-type="float" office:value="-0.873" calcext:value-type="float">
            <text:p>-0.873</text:p>
          </table:table-cell>
          <table:table-cell office:value-type="float" office:value="-0.8866" calcext:value-type="float">
            <text:p>-0.8866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345" calcext:value-type="float">
            <text:p>-0.34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0.8866" calcext:value-type="float">
            <text:p>-0.8866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345" calcext:value-type="float">
            <text:p>-0.345</text:p>
          </table:table-cell>
          <table:table-cell office:value-type="float" office:value="9.1139" calcext:value-type="float">
            <text:p>9.1139</text:p>
          </table:table-cell>
          <table:table-cell office:value-type="float" office:value="-0.8861" calcext:value-type="float">
            <text:p>-0.8861</text:p>
          </table:table-cell>
          <table:table-cell office:value-type="float" office:value="-0.6968" calcext:value-type="float">
            <text:p>-0.69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-0.5064" calcext:value-type="float">
            <text:p>-0.5064</text:p>
          </table:table-cell>
          <table:table-cell office:value-type="float" office:value="-1.2311" calcext:value-type="float">
            <text:p>-1.231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968" calcext:value-type="float">
            <text:p>-0.69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-0.5064" calcext:value-type="float">
            <text:p>-0.5064</text:p>
          </table:table-cell>
          <table:table-cell office:value-type="float" office:value="-1.2311" calcext:value-type="float">
            <text:p>-1.2311</text:p>
          </table:table-cell>
          <table:table-cell office:value-type="float" office:value="11.3061" calcext:value-type="float">
            <text:p>11.306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8785" calcext:value-type="float">
            <text:p>0.8785</text:p>
          </table:table-cell>
          <table:table-cell office:value-type="float" office:value="-1.0844" calcext:value-type="float">
            <text:p>-1.0844</text:p>
          </table:table-cell>
          <table:table-cell office:value-type="float" office:value="0.075" calcext:value-type="float">
            <text:p>0.0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8785" calcext:value-type="float">
            <text:p>0.8785</text:p>
          </table:table-cell>
          <table:table-cell office:value-type="float" office:value="-1.0844" calcext:value-type="float">
            <text:p>-1.0844</text:p>
          </table:table-cell>
          <table:table-cell office:value-type="float" office:value="0.075" calcext:value-type="float">
            <text:p>0.075</text:p>
          </table:table-cell>
          <table:table-cell office:value-type="float" office:value="11.3945" calcext:value-type="float">
            <text:p>11.3945</text:p>
          </table:table-cell>
          <table:table-cell office:value-type="float" office:value="1.3945" calcext:value-type="float">
            <text:p>1.3945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2948" calcext:value-type="float">
            <text:p>0.2948</text:p>
          </table:table-cell>
          <table:table-cell office:value-type="float" office:value="-0.3122" calcext:value-type="float">
            <text:p>-0.3122</text:p>
          </table:table-cell>
          <table:table-cell office:value-type="float" office:value="1.4695" calcext:value-type="float">
            <text:p>1.469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2948" calcext:value-type="float">
            <text:p>0.2948</text:p>
          </table:table-cell>
          <table:table-cell office:value-type="float" office:value="-0.3122" calcext:value-type="float">
            <text:p>-0.3122</text:p>
          </table:table-cell>
          <table:table-cell office:value-type="float" office:value="1.4695" calcext:value-type="float">
            <text:p>1.4695</text:p>
          </table:table-cell>
          <table:table-cell office:value-type="float" office:value="8.9615" calcext:value-type="float">
            <text:p>8.9615</text:p>
          </table:table-cell>
          <table:table-cell office:value-type="float" office:value="-1.0385" calcext:value-type="float">
            <text:p>-1.0385</text:p>
          </table:table-cell>
          <table:table-cell office:value-type="float" office:value="0.6523" calcext:value-type="float">
            <text:p>0.6523</text:p>
          </table:table-cell>
          <table:table-cell office:value-type="float" office:value="-0.4997" calcext:value-type="float">
            <text:p>-0.4997</text:p>
          </table:table-cell>
          <table:table-cell office:value-type="float" office:value="0.638" calcext:value-type="float">
            <text:p>0.638</text:p>
          </table:table-cell>
          <table:table-cell office:value-type="float" office:value="0.4309" calcext:value-type="float">
            <text:p>0.430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523" calcext:value-type="float">
            <text:p>0.6523</text:p>
          </table:table-cell>
          <table:table-cell office:value-type="float" office:value="-0.4997" calcext:value-type="float">
            <text:p>-0.4997</text:p>
          </table:table-cell>
          <table:table-cell office:value-type="float" office:value="0.638" calcext:value-type="float">
            <text:p>0.638</text:p>
          </table:table-cell>
          <table:table-cell office:value-type="float" office:value="0.4309" calcext:value-type="float">
            <text:p>0.4309</text:p>
          </table:table-cell>
          <table:table-cell office:value-type="float" office:value="9.6713" calcext:value-type="float">
            <text:p>9.6713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-0.7648" calcext:value-type="float">
            <text:p>-0.7648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1023" calcext:value-type="float">
            <text:p>0.102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-0.7648" calcext:value-type="float">
            <text:p>-0.7648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1023" calcext:value-type="float">
            <text:p>0.1023</text:p>
          </table:table-cell>
          <table:table-cell office:value-type="float" office:value="8.8032" calcext:value-type="float">
            <text:p>8.8032</text:p>
          </table:table-cell>
          <table:table-cell office:value-type="float" office:value="-1.1968" calcext:value-type="float">
            <text:p>-1.1968</text:p>
          </table:table-cell>
          <table:table-cell office:value-type="float" office:value="-0.6232" calcext:value-type="float">
            <text:p>-0.6232</text:p>
          </table:table-cell>
          <table:table-cell office:value-type="float" office:value="-0.3116" calcext:value-type="float">
            <text:p>-0.3116</text:p>
          </table:table-cell>
          <table:table-cell office:value-type="float" office:value="0.4084" calcext:value-type="float">
            <text:p>0.4084</text:p>
          </table:table-cell>
          <table:table-cell office:value-type="float" office:value="-1.0945" calcext:value-type="float">
            <text:p>-1.094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0.6232" calcext:value-type="float">
            <text:p>-0.6232</text:p>
          </table:table-cell>
          <table:table-cell office:value-type="float" office:value="-0.3116" calcext:value-type="float">
            <text:p>-0.3116</text:p>
          </table:table-cell>
          <table:table-cell office:value-type="float" office:value="0.4084" calcext:value-type="float">
            <text:p>0.4084</text:p>
          </table:table-cell>
          <table:table-cell office:value-type="float" office:value="-1.0945" calcext:value-type="float">
            <text:p>-1.0945</text:p>
          </table:table-cell>
          <table:table-cell office:value-type="float" office:value="10.2771" calcext:value-type="float">
            <text:p>10.2771</text:p>
          </table:table-cell>
          <table:table-cell office:value-type="float" office:value="0.2771" calcext:value-type="float">
            <text:p>0.2771</text:p>
          </table:table-cell>
          <table:table-cell office:value-type="float" office:value="-0.5893" calcext:value-type="float">
            <text:p>-0.5893</text:p>
          </table:table-cell>
          <table:table-cell office:value-type="float" office:value="0.3868" calcext:value-type="float">
            <text:p>0.3868</text:p>
          </table:table-cell>
          <table:table-cell office:value-type="float" office:value="-0.5475" calcext:value-type="float">
            <text:p>-0.5475</text:p>
          </table:table-cell>
          <table:table-cell office:value-type="float" office:value="-0.8174" calcext:value-type="float">
            <text:p>-0.8174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-0.5893" calcext:value-type="float">
            <text:p>-0.5893</text:p>
          </table:table-cell>
          <table:table-cell office:value-type="float" office:value="0.3868" calcext:value-type="float">
            <text:p>0.3868</text:p>
          </table:table-cell>
          <table:table-cell office:value-type="float" office:value="-0.5475" calcext:value-type="float">
            <text:p>-0.5475</text:p>
          </table:table-cell>
          <table:table-cell office:value-type="float" office:value="-0.8174" calcext:value-type="float">
            <text:p>-0.8174</text:p>
          </table:table-cell>
          <table:table-cell office:value-type="float" office:value="10.8516" calcext:value-type="float">
            <text:p>10.8516</text:p>
          </table:table-cell>
          <table:table-cell office:value-type="float" office:value="0.8516" calcext:value-type="float">
            <text:p>0.8516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6589" calcext:value-type="float">
            <text:p>0.6589</text:p>
          </table:table-cell>
          <table:table-cell office:value-type="float" office:value="-0.9392" calcext:value-type="float">
            <text:p>-0.9392</text:p>
          </table:table-cell>
          <table:table-cell office:value-type="float" office:value="0.0341" calcext:value-type="float">
            <text:p>0.034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6589" calcext:value-type="float">
            <text:p>0.6589</text:p>
          </table:table-cell>
          <table:table-cell office:value-type="float" office:value="-0.9392" calcext:value-type="float">
            <text:p>-0.9392</text:p>
          </table:table-cell>
          <table:table-cell office:value-type="float" office:value="0.0341" calcext:value-type="float">
            <text:p>0.0341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1.0193" calcext:value-type="float">
            <text:p>1.0193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3012" calcext:value-type="float">
            <text:p>0.3012</text:p>
          </table:table-cell>
          <table:table-cell office:value-type="float" office:value="-0.3954" calcext:value-type="float">
            <text:p>-0.3954</text:p>
          </table:table-cell>
          <table:table-cell office:value-type="float" office:value="1.0535" calcext:value-type="float">
            <text:p>1.053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3012" calcext:value-type="float">
            <text:p>0.3012</text:p>
          </table:table-cell>
          <table:table-cell office:value-type="float" office:value="-0.3954" calcext:value-type="float">
            <text:p>-0.3954</text:p>
          </table:table-cell>
          <table:table-cell office:value-type="float" office:value="1.0535" calcext:value-type="float">
            <text:p>1.0535</text:p>
          </table:table-cell>
          <table:table-cell office:value-type="float" office:value="9.6362" calcext:value-type="float">
            <text:p>9.6362</text:p>
          </table:table-cell>
          <table:table-cell office:value-type="float" office:value="-0.3638" calcext:value-type="float">
            <text:p>-0.3638</text:p>
          </table:table-cell>
          <table:table-cell office:value-type="float" office:value="0.5149" calcext:value-type="float">
            <text:p>0.5149</text:p>
          </table:table-cell>
          <table:table-cell office:value-type="float" office:value="-0.2893" calcext:value-type="float">
            <text:p>-0.2893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6897" calcext:value-type="float">
            <text:p>0.689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5149" calcext:value-type="float">
            <text:p>0.5149</text:p>
          </table:table-cell>
          <table:table-cell office:value-type="float" office:value="-0.2893" calcext:value-type="float">
            <text:p>-0.2893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6897" calcext:value-type="float">
            <text:p>0.6897</text:p>
          </table:table-cell>
          <table:table-cell office:value-type="float" office:value="9.4151" calcext:value-type="float">
            <text:p>9.4151</text:p>
          </table:table-cell>
          <table:table-cell office:value-type="float" office:value="-0.5849" calcext:value-type="float">
            <text:p>-0.5849</text:p>
          </table:table-cell>
          <table:table-cell office:value-type="float" office:value="0.061" calcext:value-type="float">
            <text:p>0.061</text:p>
          </table:table-cell>
          <table:table-cell office:value-type="float" office:value="-0.5491" calcext:value-type="float">
            <text:p>-0.549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1048" calcext:value-type="float">
            <text:p>0.104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61" calcext:value-type="float">
            <text:p>0.061</text:p>
          </table:table-cell>
          <table:table-cell office:value-type="float" office:value="-0.5491" calcext:value-type="float">
            <text:p>-0.549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1048" calcext:value-type="float">
            <text:p>0.1048</text:p>
          </table:table-cell>
          <table:table-cell office:value-type="float" office:value="9.0354" calcext:value-type="float">
            <text:p>9.0354</text:p>
          </table:table-cell>
          <table:table-cell office:value-type="float" office:value="-0.9646" calcext:value-type="float">
            <text:p>-0.9646</text:p>
          </table:table-cell>
          <table:table-cell office:value-type="float" office:value="-0.3903" calcext:value-type="float">
            <text:p>-0.3903</text:p>
          </table:table-cell>
          <table:table-cell office:value-type="float" office:value="-0.2784" calcext:value-type="float">
            <text:p>-0.2784</text:p>
          </table:table-cell>
          <table:table-cell office:value-type="float" office:value="0.4959" calcext:value-type="float">
            <text:p>0.4959</text:p>
          </table:table-cell>
          <table:table-cell office:value-type="float" office:value="-0.8598" calcext:value-type="float">
            <text:p>-0.859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0.3903" calcext:value-type="float">
            <text:p>-0.3903</text:p>
          </table:table-cell>
          <table:table-cell office:value-type="float" office:value="-0.2784" calcext:value-type="float">
            <text:p>-0.2784</text:p>
          </table:table-cell>
          <table:table-cell office:value-type="float" office:value="0.4959" calcext:value-type="float">
            <text:p>0.4959</text:p>
          </table:table-cell>
          <table:table-cell office:value-type="float" office:value="-0.8598" calcext:value-type="float">
            <text:p>-0.8598</text:p>
          </table:table-cell>
          <table:table-cell office:value-type="float" office:value="10.0611" calcext:value-type="float">
            <text:p>10.0611</text:p>
          </table:table-cell>
          <table:table-cell office:value-type="float" office:value="0.0611" calcext:value-type="float">
            <text:p>0.0611</text:p>
          </table:table-cell>
          <table:table-cell office:value-type="float" office:value="-0.4299" calcext:value-type="float">
            <text:p>-0.4299</text:p>
          </table:table-cell>
          <table:table-cell office:value-type="float" office:value="0.2161" calcext:value-type="float">
            <text:p>0.2161</text:p>
          </table:table-cell>
          <table:table-cell office:value-type="float" office:value="-0.3334" calcext:value-type="float">
            <text:p>-0.3334</text:p>
          </table:table-cell>
          <table:table-cell office:value-type="float" office:value="-0.7988" calcext:value-type="float">
            <text:p>-0.798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0.4299" calcext:value-type="float">
            <text:p>-0.4299</text:p>
          </table:table-cell>
          <table:table-cell office:value-type="float" office:value="0.2161" calcext:value-type="float">
            <text:p>0.2161</text:p>
          </table:table-cell>
          <table:table-cell office:value-type="float" office:value="-0.3334" calcext:value-type="float">
            <text:p>-0.3334</text:p>
          </table:table-cell>
          <table:table-cell office:value-type="float" office:value="-0.7988" calcext:value-type="float">
            <text:p>-0.7988</text:p>
          </table:table-cell>
          <table:table-cell office:value-type="float" office:value="10.7449" calcext:value-type="float">
            <text:p>10.7449</text:p>
          </table:table-cell>
          <table:table-cell office:value-type="float" office:value="0.7449" calcext:value-type="float">
            <text:p>0.7449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4502" calcext:value-type="float">
            <text:p>0.4502</text:p>
          </table:table-cell>
          <table:table-cell office:value-type="float" office:value="-0.7597" calcext:value-type="float">
            <text:p>-0.7597</text:p>
          </table:table-cell>
          <table:table-cell office:value-type="float" office:value="-0.0538" calcext:value-type="float">
            <text:p>-0.053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4502" calcext:value-type="float">
            <text:p>0.4502</text:p>
          </table:table-cell>
          <table:table-cell office:value-type="float" office:value="-0.7597" calcext:value-type="float">
            <text:p>-0.7597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10.7551" calcext:value-type="float">
            <text:p>10.7551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2423" calcext:value-type="float">
            <text:p>0.2423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7013" calcext:value-type="float">
            <text:p>0.701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2423" calcext:value-type="float">
            <text:p>0.2423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7013" calcext:value-type="float">
            <text:p>0.7013</text:p>
          </table:table-cell>
          <table:table-cell office:value-type="float" office:value="10.1274" calcext:value-type="float">
            <text:p>10.127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3561" calcext:value-type="float">
            <text:p>0.3561</text:p>
          </table:table-cell>
          <table:table-cell office:value-type="float" office:value="-0.1603" calcext:value-type="float">
            <text:p>-0.1603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86" calcext:value-type="float">
            <text:p>0.828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3561" calcext:value-type="float">
            <text:p>0.3561</text:p>
          </table:table-cell>
          <table:table-cell office:value-type="float" office:value="-0.1603" calcext:value-type="float">
            <text:p>-0.1603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86" calcext:value-type="float">
            <text:p>0.8286</text:p>
          </table:table-cell>
          <table:table-cell office:value-type="float" office:value="9.2149" calcext:value-type="float">
            <text:p>9.2149</text:p>
          </table:table-cell>
          <table:table-cell office:value-type="float" office:value="-0.7851" calcext:value-type="float">
            <text:p>-0.7851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3584" calcext:value-type="float">
            <text:p>-0.3584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0435" calcext:value-type="float">
            <text:p>0.043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3584" calcext:value-type="float">
            <text:p>-0.3584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0435" calcext:value-type="float">
            <text:p>0.0435</text:p>
          </table:table-cell>
          <table:table-cell office:value-type="float" office:value="9.342" calcext:value-type="float">
            <text:p>9.342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2255" calcext:value-type="float">
            <text:p>-0.2255</text:p>
          </table:table-cell>
          <table:table-cell office:value-type="float" office:value="-0.1978" calcext:value-type="float">
            <text:p>-0.1978</text:p>
          </table:table-cell>
          <table:table-cell office:value-type="float" office:value="0.4796" calcext:value-type="float">
            <text:p>0.4796</text:p>
          </table:table-cell>
          <table:table-cell office:value-type="float" office:value="-0.6145" calcext:value-type="float">
            <text:p>-0.614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0.2255" calcext:value-type="float">
            <text:p>-0.2255</text:p>
          </table:table-cell>
          <table:table-cell office:value-type="float" office:value="-0.1978" calcext:value-type="float">
            <text:p>-0.1978</text:p>
          </table:table-cell>
          <table:table-cell office:value-type="float" office:value="0.4796" calcext:value-type="float">
            <text:p>0.4796</text:p>
          </table:table-cell>
          <table:table-cell office:value-type="float" office:value="-0.6145" calcext:value-type="float">
            <text:p>-0.6145</text:p>
          </table:table-cell>
          <table:table-cell office:value-type="float" office:value="9.9092" calcext:value-type="float">
            <text:p>9.9092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2719" calcext:value-type="float">
            <text:p>-0.2719</text:p>
          </table:table-cell>
          <table:table-cell office:value-type="float" office:value="0.1201" calcext:value-type="float">
            <text:p>0.1201</text:p>
          </table:table-cell>
          <table:table-cell office:value-type="float" office:value="-0.1803" calcext:value-type="float">
            <text:p>-0.1803</text:p>
          </table:table-cell>
          <table:table-cell office:value-type="float" office:value="-0.7053" calcext:value-type="float">
            <text:p>-0.705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0.2719" calcext:value-type="float">
            <text:p>-0.2719</text:p>
          </table:table-cell>
          <table:table-cell office:value-type="float" office:value="0.1201" calcext:value-type="float">
            <text:p>0.1201</text:p>
          </table:table-cell>
          <table:table-cell office:value-type="float" office:value="-0.1803" calcext:value-type="float">
            <text:p>-0.1803</text:p>
          </table:table-cell>
          <table:table-cell office:value-type="float" office:value="-0.7053" calcext:value-type="float">
            <text:p>-0.7053</text:p>
          </table:table-cell>
          <table:table-cell office:value-type="float" office:value="10.6038" calcext:value-type="float">
            <text:p>10.6038</text:p>
          </table:table-cell>
          <table:table-cell office:value-type="float" office:value="0.6038" calcext:value-type="float">
            <text:p>0.603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2781" calcext:value-type="float">
            <text:p>0.2781</text:p>
          </table:table-cell>
          <table:table-cell office:value-type="float" office:value="-0.5838" calcext:value-type="float">
            <text:p>-0.5838</text:p>
          </table:table-cell>
          <table:table-cell office:value-type="float" office:value="-0.1015" calcext:value-type="float">
            <text:p>-0.101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2781" calcext:value-type="float">
            <text:p>0.2781</text:p>
          </table:table-cell>
          <table:table-cell office:value-type="float" office:value="-0.5838" calcext:value-type="float">
            <text:p>-0.5838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10.5359" calcext:value-type="float">
            <text:p>10.5359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528" calcext:value-type="float">
            <text:p>0.1528</text:p>
          </table:table-cell>
          <table:table-cell office:value-type="float" office:value="-0.4174" calcext:value-type="float">
            <text:p>-0.4174</text:p>
          </table:table-cell>
          <table:table-cell office:value-type="float" office:value="0.4343" calcext:value-type="float">
            <text:p>0.434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528" calcext:value-type="float">
            <text:p>0.1528</text:p>
          </table:table-cell>
          <table:table-cell office:value-type="float" office:value="-0.4174" calcext:value-type="float">
            <text:p>-0.4174</text:p>
          </table:table-cell>
          <table:table-cell office:value-type="float" office:value="0.4343" calcext:value-type="float">
            <text:p>0.4343</text:p>
          </table:table-cell>
          <table:table-cell office:value-type="float" office:value="10.2225" calcext:value-type="float">
            <text:p>10.222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86" calcext:value-type="float">
            <text:p>0.2086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6568" calcext:value-type="float">
            <text:p>0.656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2086" calcext:value-type="float">
            <text:p>0.2086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6568" calcext:value-type="float">
            <text:p>0.6568</text:p>
          </table:table-cell>
          <table:table-cell office:value-type="float" office:value="9.4343" calcext:value-type="float">
            <text:p>9.4343</text:p>
          </table:table-cell>
          <table:table-cell office:value-type="float" office:value="-0.5657" calcext:value-type="float">
            <text:p>-0.5657</text:p>
          </table:table-cell>
          <table:table-cell office:value-type="float" office:value="0.0411" calcext:value-type="float">
            <text:p>0.0411</text:p>
          </table:table-cell>
          <table:table-cell office:value-type="float" office:value="-0.2171" calcext:value-type="float">
            <text:p>-0.2171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0911" calcext:value-type="float">
            <text:p>0.091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411" calcext:value-type="float">
            <text:p>0.0411</text:p>
          </table:table-cell>
          <table:table-cell office:value-type="float" office:value="-0.2171" calcext:value-type="float">
            <text:p>-0.2171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0911" calcext:value-type="float">
            <text:p>0.0911</text:p>
          </table:table-cell>
          <table:table-cell office:value-type="float" office:value="9.5166" calcext:value-type="float">
            <text:p>9.5166</text:p>
          </table:table-cell>
          <table:table-cell office:value-type="float" office:value="-0.4834" calcext:value-type="float">
            <text:p>-0.4834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3516" calcext:value-type="float">
            <text:p>0.3516</text:p>
          </table:table-cell>
          <table:table-cell office:value-type="float" office:value="-0.3922" calcext:value-type="float">
            <text:p>-0.392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3516" calcext:value-type="float">
            <text:p>0.3516</text:p>
          </table:table-cell>
          <table:table-cell office:value-type="float" office:value="-0.3922" calcext:value-type="float">
            <text:p>-0.3922</text:p>
          </table:table-cell>
          <table:table-cell office:value-type="float" office:value="9.843" calcext:value-type="float">
            <text:p>9.843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558" calcext:value-type="float">
            <text:p>-0.1558</text:p>
          </table:table-cell>
          <table:table-cell office:value-type="float" office:value="0.0828" calcext:value-type="float">
            <text:p>0.0828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5493" calcext:value-type="float">
            <text:p>-0.549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-0.1558" calcext:value-type="float">
            <text:p>-0.1558</text:p>
          </table:table-cell>
          <table:table-cell office:value-type="float" office:value="0.0828" calcext:value-type="float">
            <text:p>0.0828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5493" calcext:value-type="float">
            <text:p>-0.5493</text:p>
          </table:table-cell>
          <table:table-cell office:value-type="float" office:value="10.443" calcext:value-type="float">
            <text:p>10.443</text:p>
          </table:table-cell>
          <table:table-cell office:value-type="float" office:value="0.443" calcext:value-type="float">
            <text:p>0.443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1654" calcext:value-type="float">
            <text:p>0.1654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-0.1063" calcext:value-type="float">
            <text:p>-0.106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1654" calcext:value-type="float">
            <text:p>0.1654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-0.1063" calcext:value-type="float">
            <text:p>-0.1063</text:p>
          </table:table-cell>
          <table:table-cell office:value-type="float" office:value="10.4058" calcext:value-type="float">
            <text:p>10.405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31" calcext:value-type="float">
            <text:p>0.0731</text:p>
          </table:table-cell>
          <table:table-cell office:value-type="float" office:value="-0.3503" calcext:value-type="float">
            <text:p>-0.3503</text:p>
          </table:table-cell>
          <table:table-cell office:value-type="float" office:value="0.2995" calcext:value-type="float">
            <text:p>0.299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31" calcext:value-type="float">
            <text:p>0.0731</text:p>
          </table:table-cell>
          <table:table-cell office:value-type="float" office:value="-0.3503" calcext:value-type="float">
            <text:p>-0.3503</text:p>
          </table:table-cell>
          <table:table-cell office:value-type="float" office:value="0.2995" calcext:value-type="float">
            <text:p>0.2995</text:p>
          </table:table-cell>
          <table:table-cell office:value-type="float" office:value="10.14" calcext:value-type="float">
            <text:p>1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1057" calcext:value-type="float">
            <text:p>0.1057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4395" calcext:value-type="float">
            <text:p>0.439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1057" calcext:value-type="float">
            <text:p>0.1057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4395" calcext:value-type="float">
            <text:p>0.4395</text:p>
          </table:table-cell>
          <table:table-cell office:value-type="float" office:value="9.6774" calcext:value-type="float">
            <text:p>9.6774</text:p>
          </table:table-cell>
          <table:table-cell office:value-type="float" office:value="-0.3226" calcext:value-type="float">
            <text:p>-0.322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1284" calcext:value-type="float">
            <text:p>-0.1284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169" calcext:value-type="float">
            <text:p>0.116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1284" calcext:value-type="float">
            <text:p>-0.1284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169" calcext:value-type="float">
            <text:p>0.1169</text:p>
          </table:table-cell>
          <table:table-cell office:value-type="float" office:value="9.6023" calcext:value-type="float">
            <text:p>9.6023</text:p>
          </table:table-cell>
          <table:table-cell office:value-type="float" office:value="-0.3977" calcext:value-type="float">
            <text:p>-0.3977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2155" calcext:value-type="float">
            <text:p>0.2155</text:p>
          </table:table-cell>
          <table:table-cell office:value-type="float" office:value="-0.2809" calcext:value-type="float">
            <text:p>-0.280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2155" calcext:value-type="float">
            <text:p>0.2155</text:p>
          </table:table-cell>
          <table:table-cell office:value-type="float" office:value="-0.2809" calcext:value-type="float">
            <text:p>-0.2809</text:p>
          </table:table-cell>
          <table:table-cell office:value-type="float" office:value="9.8834" calcext:value-type="float">
            <text:p>9.8834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-0.3974" calcext:value-type="float">
            <text:p>-0.397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-0.3974" calcext:value-type="float">
            <text:p>-0.3974</text:p>
          </table:table-cell>
          <table:table-cell office:value-type="float" office:value="10.3326" calcext:value-type="float">
            <text:p>10.3326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973" calcext:value-type="float">
            <text:p>0.0973</text:p>
          </table:table-cell>
          <table:table-cell office:value-type="float" office:value="-0.3548" calcext:value-type="float">
            <text:p>-0.3548</text:p>
          </table:table-cell>
          <table:table-cell office:value-type="float" office:value="-0.0648" calcext:value-type="float">
            <text:p>-0.064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973" calcext:value-type="float">
            <text:p>0.0973</text:p>
          </table:table-cell>
          <table:table-cell office:value-type="float" office:value="-0.3548" calcext:value-type="float">
            <text:p>-0.3548</text:p>
          </table:table-cell>
          <table:table-cell office:value-type="float" office:value="-0.0648" calcext:value-type="float">
            <text:p>-0.0648</text:p>
          </table:table-cell>
          <table:table-cell office:value-type="float" office:value="10.3243" calcext:value-type="float">
            <text:p>10.3243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2575" calcext:value-type="float">
            <text:p>-0.2575</text:p>
          </table:table-cell>
          <table:table-cell office:value-type="float" office:value="0.2594" calcext:value-type="float">
            <text:p>0.259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2575" calcext:value-type="float">
            <text:p>-0.2575</text:p>
          </table:table-cell>
          <table:table-cell office:value-type="float" office:value="0.2594" calcext:value-type="float">
            <text:p>0.2594</text:p>
          </table:table-cell>
          <table:table-cell office:value-type="float" office:value="10.026" calcext:value-type="float">
            <text:p>10.02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19" calcext:value-type="float">
            <text:p>0.0419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2855" calcext:value-type="float">
            <text:p>0.285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0419" calcext:value-type="float">
            <text:p>0.0419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2855" calcext:value-type="float">
            <text:p>0.2855</text:p>
          </table:table-cell>
          <table:table-cell office:value-type="float" office:value="9.7155" calcext:value-type="float">
            <text:p>9.7155</text:p>
          </table:table-cell>
          <table:table-cell office:value-type="float" office:value="-0.2845" calcext:value-type="float">
            <text:p>-0.2845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09" calcext:value-type="float">
            <text:p>0.000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09" calcext:value-type="float">
            <text:p>0.0009</text:p>
          </table:table-cell>
          <table:table-cell office:value-type="float" office:value="9.7521" calcext:value-type="float">
            <text:p>9.7521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51" calcext:value-type="float">
            <text:p>0.0351</text:p>
          </table:table-cell>
          <table:table-cell office:value-type="float" office:value="-0.247" calcext:value-type="float">
            <text:p>-0.24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51" calcext:value-type="float">
            <text:p>0.0351</text:p>
          </table:table-cell>
          <table:table-cell office:value-type="float" office:value="-0.247" calcext:value-type="float">
            <text:p>-0.247</text:p>
          </table:table-cell>
          <table:table-cell office:value-type="float" office:value="9.9856" calcext:value-type="float">
            <text:p>9.985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656" calcext:value-type="float">
            <text:p>0.0656</text:p>
          </table:table-cell>
          <table:table-cell office:value-type="float" office:value="-0.2191" calcext:value-type="float">
            <text:p>-0.2191</text:p>
          </table:table-cell>
          <table:table-cell office:value-type="float" office:value="-0.2614" calcext:value-type="float">
            <text:p>-0.261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656" calcext:value-type="float">
            <text:p>0.0656</text:p>
          </table:table-cell>
          <table:table-cell office:value-type="float" office:value="-0.2191" calcext:value-type="float">
            <text:p>-0.2191</text:p>
          </table:table-cell>
          <table:table-cell office:value-type="float" office:value="-0.2614" calcext:value-type="float">
            <text:p>-0.2614</text:p>
          </table:table-cell>
          <table:table-cell office:value-type="float" office:value="10.2742" calcext:value-type="float">
            <text:p>10.2742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0128" calcext:value-type="float">
            <text:p>0.012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0128" calcext:value-type="float">
            <text:p>0.0128</text:p>
          </table:table-cell>
          <table:table-cell office:value-type="float" office:value="10.2321" calcext:value-type="float">
            <text:p>10.2321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0388" calcext:value-type="float">
            <text:p>0.0388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2145" calcext:value-type="float">
            <text:p>-0.2145</text:p>
          </table:table-cell>
          <table:table-cell office:value-type="float" office:value="0.2449" calcext:value-type="float">
            <text:p>0.244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0388" calcext:value-type="float">
            <text:p>0.0388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2145" calcext:value-type="float">
            <text:p>-0.2145</text:p>
          </table:table-cell>
          <table:table-cell office:value-type="float" office:value="0.2449" calcext:value-type="float">
            <text:p>0.2449</text:p>
          </table:table-cell>
          <table:table-cell office:value-type="float" office:value="9.9286" calcext:value-type="float">
            <text:p>9.9286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1736" calcext:value-type="float">
            <text:p>0.173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1736" calcext:value-type="float">
            <text:p>0.1736</text:p>
          </table:table-cell>
          <table:table-cell office:value-type="float" office:value="9.7579" calcext:value-type="float">
            <text:p>9.7579</text:p>
          </table:table-cell>
          <table:table-cell office:value-type="float" office:value="-0.2421" calcext:value-type="float">
            <text:p>-0.2421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0685" calcext:value-type="float">
            <text:p>-0.068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0685" calcext:value-type="float">
            <text:p>-0.0685</text:p>
          </table:table-cell>
          <table:table-cell office:value-type="float" office:value="9.8533" calcext:value-type="float">
            <text:p>9.8533</text:p>
          </table:table-cell>
          <table:table-cell office:value-type="float" office:value="-0.1467" calcext:value-type="float">
            <text:p>-0.1467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0.0309" calcext:value-type="float">
            <text:p>0.0309</text:p>
          </table:table-cell>
          <table:table-cell office:value-type="float" office:value="-0.0946" calcext:value-type="float">
            <text:p>-0.0946</text:p>
          </table:table-cell>
          <table:table-cell office:value-type="float" office:value="-0.2153" calcext:value-type="float">
            <text:p>-0.215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0.0309" calcext:value-type="float">
            <text:p>0.0309</text:p>
          </table:table-cell>
          <table:table-cell office:value-type="float" office:value="-0.0946" calcext:value-type="float">
            <text:p>-0.0946</text:p>
          </table:table-cell>
          <table:table-cell office:value-type="float" office:value="-0.2153" calcext:value-type="float">
            <text:p>-0.2153</text:p>
          </table:table-cell>
          <table:table-cell office:value-type="float" office:value="10.0873" calcext:value-type="float">
            <text:p>10.0873</text:p>
          </table:table-cell>
          <table:table-cell office:value-type="float" office:value="0.0873" calcext:value-type="float">
            <text:p>0.087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0524" calcext:value-type="float">
            <text:p>0.0524</text:p>
          </table:table-cell>
          <table:table-cell office:value-type="float" office:value="-0.2663" calcext:value-type="float">
            <text:p>-0.2663</text:p>
          </table:table-cell>
          <table:table-cell office:value-type="float" office:value="-0.128" calcext:value-type="float">
            <text:p>-0.12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0524" calcext:value-type="float">
            <text:p>0.0524</text:p>
          </table:table-cell>
          <table:table-cell office:value-type="float" office:value="-0.2663" calcext:value-type="float">
            <text:p>-0.2663</text:p>
          </table:table-cell>
          <table:table-cell office:value-type="float" office:value="-0.128" calcext:value-type="float">
            <text:p>-0.128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2733" calcext:value-type="float">
            <text:p>-0.2733</text:p>
          </table:table-cell>
          <table:table-cell office:value-type="float" office:value="0.1139" calcext:value-type="float">
            <text:p>0.113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2733" calcext:value-type="float">
            <text:p>-0.2733</text:p>
          </table:table-cell>
          <table:table-cell office:value-type="float" office:value="0.1139" calcext:value-type="float">
            <text:p>0.1139</text:p>
          </table:table-cell>
          <table:table-cell office:value-type="float" office:value="10.0824" calcext:value-type="float">
            <text:p>10.08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0.1963" calcext:value-type="float">
            <text:p>0.196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0.1963" calcext:value-type="float">
            <text:p>0.1963</text:p>
          </table:table-cell>
          <table:table-cell office:value-type="float" office:value="9.8612" calcext:value-type="float">
            <text:p>9.8612</text:p>
          </table:table-cell>
          <table:table-cell office:value-type="float" office:value="-0.1388" calcext:value-type="float">
            <text:p>-0.1388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575" calcext:value-type="float">
            <text:p>0.05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575" calcext:value-type="float">
            <text:p>0.0575</text:p>
          </table:table-cell>
          <table:table-cell office:value-type="float" office:value="9.8158" calcext:value-type="float">
            <text:p>9.8158</text:p>
          </table:table-cell>
          <table:table-cell office:value-type="float" office:value="-0.1842" calcext:value-type="float">
            <text:p>-0.1842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267" calcext:value-type="float">
            <text:p>-0.126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267" calcext:value-type="float">
            <text:p>-0.1267</text:p>
          </table:table-cell>
          <table:table-cell office:value-type="float" office:value="9.9596" calcext:value-type="float">
            <text:p>9.9596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0392" calcext:value-type="float">
            <text:p>0.0392</text:p>
          </table:table-cell>
          <table:table-cell office:value-type="float" office:value="-0.1729" calcext:value-type="float">
            <text:p>-0.1729</text:p>
          </table:table-cell>
          <table:table-cell office:value-type="float" office:value="-0.1671" calcext:value-type="float">
            <text:p>-0.167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0392" calcext:value-type="float">
            <text:p>0.0392</text:p>
          </table:table-cell>
          <table:table-cell office:value-type="float" office:value="-0.1729" calcext:value-type="float">
            <text:p>-0.1729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10.1542" calcext:value-type="float">
            <text:p>10.1542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308" calcext:value-type="float">
            <text:p>0.0308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-0.0129" calcext:value-type="float">
            <text:p>-0.012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308" calcext:value-type="float">
            <text:p>0.0308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10.1617" calcext:value-type="float">
            <text:p>10.1617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487" calcext:value-type="float">
            <text:p>0.148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487" calcext:value-type="float">
            <text:p>0.1487</text:p>
          </table:table-cell>
          <table:table-cell office:value-type="float" office:value="9.9808" calcext:value-type="float">
            <text:p>9.9808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1295" calcext:value-type="float">
            <text:p>0.129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1295" calcext:value-type="float">
            <text:p>0.1295</text:p>
          </table:table-cell>
          <table:table-cell office:value-type="float" office:value="9.8403" calcext:value-type="float">
            <text:p>9.8403</text:p>
          </table:table-cell>
          <table:table-cell office:value-type="float" office:value="-0.1597" calcext:value-type="float">
            <text:p>-0.1597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0302" calcext:value-type="float">
            <text:p>-0.030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9.8871" calcext:value-type="float">
            <text:p>9.8871</text:p>
          </table:table-cell>
          <table:table-cell office:value-type="float" office:value="-0.1129" calcext:value-type="float">
            <text:p>-0.1129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928" calcext:value-type="float">
            <text:p>-0.0928</text:p>
          </table:table-cell>
          <table:table-cell office:value-type="float" office:value="-0.1431" calcext:value-type="float">
            <text:p>-0.143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928" calcext:value-type="float">
            <text:p>-0.0928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10.046" calcext:value-type="float">
            <text:p>10.046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129" calcext:value-type="float">
            <text:p>-0.2129</text:p>
          </table:table-cell>
          <table:table-cell office:value-type="float" office:value="-0.0971" calcext:value-type="float">
            <text:p>-0.097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129" calcext:value-type="float">
            <text:p>-0.2129</text:p>
          </table:table-cell>
          <table:table-cell office:value-type="float" office:value="-0.0971" calcext:value-type="float">
            <text:p>-0.0971</text:p>
          </table:table-cell>
          <table:table-cell office:value-type="float" office:value="10.1633" calcext:value-type="float">
            <text:p>10.1633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2283" calcext:value-type="float">
            <text:p>-0.2283</text:p>
          </table:table-cell>
          <table:table-cell office:value-type="float" office:value="0.0662" calcext:value-type="float">
            <text:p>0.066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2283" calcext:value-type="float">
            <text:p>-0.2283</text:p>
          </table:table-cell>
          <table:table-cell office:value-type="float" office:value="0.0662" calcext:value-type="float">
            <text:p>0.0662</text:p>
          </table:table-cell>
          <table:table-cell office:value-type="float" office:value="10.0668" calcext:value-type="float">
            <text:p>10.066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1287" calcext:value-type="float">
            <text:p>-0.1287</text:p>
          </table:table-cell>
          <table:table-cell office:value-type="float" office:value="0.1331" calcext:value-type="float">
            <text:p>0.133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1287" calcext:value-type="float">
            <text:p>-0.1287</text:p>
          </table:table-cell>
          <table:table-cell office:value-type="float" office:value="0.1331" calcext:value-type="float">
            <text:p>0.1331</text:p>
          </table:table-cell>
          <table:table-cell office:value-type="float" office:value="9.9144" calcext:value-type="float">
            <text:p>9.9144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0.0475" calcext:value-type="float">
            <text:p>0.04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0.0475" calcext:value-type="float">
            <text:p>0.0475</text:p>
          </table:table-cell>
          <table:table-cell office:value-type="float" office:value="9.8642" calcext:value-type="float">
            <text:p>9.8642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589" calcext:value-type="float">
            <text:p>-0.0589</text:p>
          </table:table-cell>
          <table:table-cell office:value-type="float" office:value="-0.0884" calcext:value-type="float">
            <text:p>-0.088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589" calcext:value-type="float">
            <text:p>-0.0589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9.9679" calcext:value-type="float">
            <text:p>9.9679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-0.1205" calcext:value-type="float">
            <text:p>-0.120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-0.1205" calcext:value-type="float">
            <text:p>-0.1205</text:p>
          </table:table-cell>
          <table:table-cell office:value-type="float" office:value="10.1124" calcext:value-type="float">
            <text:p>10.1124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-0.0081" calcext:value-type="float">
            <text:p>-0.008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10.1144" calcext:value-type="float">
            <text:p>10.114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785" calcext:value-type="float">
            <text:p>-0.1785</text:p>
          </table:table-cell>
          <table:table-cell office:value-type="float" office:value="0.1063" calcext:value-type="float">
            <text:p>0.106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785" calcext:value-type="float">
            <text:p>-0.1785</text:p>
          </table:table-cell>
          <table:table-cell office:value-type="float" office:value="0.1063" calcext:value-type="float">
            <text:p>0.1063</text:p>
          </table:table-cell>
          <table:table-cell office:value-type="float" office:value="9.9838" calcext:value-type="float">
            <text:p>9.9838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0.0901" calcext:value-type="float">
            <text:p>0.090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0.0901" calcext:value-type="float">
            <text:p>0.0901</text:p>
          </table:table-cell>
          <table:table-cell office:value-type="float" office:value="9.8868" calcext:value-type="float">
            <text:p>9.8868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31" calcext:value-type="float">
            <text:p>-0.023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9.9162" calcext:value-type="float">
            <text:p>9.9162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1118" calcext:value-type="float">
            <text:p>-0.1118</text:p>
          </table:table-cell>
          <table:table-cell office:value-type="float" office:value="-0.1069" calcext:value-type="float">
            <text:p>-0.106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1118" calcext:value-type="float">
            <text:p>-0.1118</text:p>
          </table:table-cell>
          <table:table-cell office:value-type="float" office:value="-0.1069" calcext:value-type="float">
            <text:p>-0.1069</text:p>
          </table:table-cell>
          <table:table-cell office:value-type="float" office:value="10.0406" calcext:value-type="float">
            <text:p>10.0406</text:p>
          </table:table-cell>
          <table:table-cell office:value-type="float" office:value="0.0406" calcext:value-type="float">
            <text:p>0.0406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1985" calcext:value-type="float">
            <text:p>-0.1985</text:p>
          </table:table-cell>
          <table:table-cell office:value-type="float" office:value="-0.0663" calcext:value-type="float">
            <text:p>-0.066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1985" calcext:value-type="float">
            <text:p>-0.1985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10.1191" calcext:value-type="float">
            <text:p>10.1191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0.0528" calcext:value-type="float">
            <text:p>0.052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0.0528" calcext:value-type="float">
            <text:p>0.0528</text:p>
          </table:table-cell>
          <table:table-cell office:value-type="float" office:value="10.0429" calcext:value-type="float">
            <text:p>10.0429</text:p>
          </table:table-cell>
          <table:table-cell office:value-type="float" office:value="0.0429" calcext:value-type="float">
            <text:p>0.042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0957" calcext:value-type="float">
            <text:p>0.095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0957" calcext:value-type="float">
            <text:p>0.0957</text:p>
          </table:table-cell>
          <table:table-cell office:value-type="float" office:value="9.9349" calcext:value-type="float">
            <text:p>9.9349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0306" calcext:value-type="float">
            <text:p>0.030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0306" calcext:value-type="float">
            <text:p>0.0306</text:p>
          </table:table-cell>
          <table:table-cell office:value-type="float" office:value="9.9027" calcext:value-type="float">
            <text:p>9.9027</text:p>
          </table:table-cell>
          <table:table-cell office:value-type="float" office:value="-0.0973" calcext:value-type="float">
            <text:p>-0.097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-0.0667" calcext:value-type="float">
            <text:p>-0.066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9.9802" calcext:value-type="float">
            <text:p>9.980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1624" calcext:value-type="float">
            <text:p>-0.1624</text:p>
          </table:table-cell>
          <table:table-cell office:value-type="float" office:value="-0.0865" calcext:value-type="float">
            <text:p>-0.086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1624" calcext:value-type="float">
            <text:p>-0.1624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10.0855" calcext:value-type="float">
            <text:p>10.0855</text:p>
          </table:table-cell>
          <table:table-cell office:value-type="float" office:value="0.0855" calcext:value-type="float">
            <text:p>0.085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2062" calcext:value-type="float">
            <text:p>-0.2062</text:p>
          </table:table-cell>
          <table:table-cell office:value-type="float" office:value="-0.001" calcext:value-type="float">
            <text:p>-0.00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2062" calcext:value-type="float">
            <text:p>-0.20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0.0802" calcext:value-type="float">
            <text:p>10.0802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793" calcext:value-type="float">
            <text:p>0.079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793" calcext:value-type="float">
            <text:p>0.0793</text:p>
          </table:table-cell>
          <table:table-cell office:value-type="float" office:value="9.9838" calcext:value-type="float">
            <text:p>9.9838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58" calcext:value-type="float">
            <text:p>-0.0958</text:p>
          </table:table-cell>
          <table:table-cell office:value-type="float" office:value="0.0631" calcext:value-type="float">
            <text:p>0.063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58" calcext:value-type="float">
            <text:p>-0.0958</text:p>
          </table:table-cell>
          <table:table-cell office:value-type="float" office:value="0.0631" calcext:value-type="float">
            <text:p>0.0631</text:p>
          </table:table-cell>
          <table:table-cell office:value-type="float" office:value="9.9159" calcext:value-type="float">
            <text:p>9.9159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-0.021" calcext:value-type="float">
            <text:p>-0.02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-0.021" calcext:value-type="float">
            <text:p>-0.021</text:p>
          </table:table-cell>
          <table:table-cell office:value-type="float" office:value="9.9424" calcext:value-type="float">
            <text:p>9.9424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1246" calcext:value-type="float">
            <text:p>-0.1246</text:p>
          </table:table-cell>
          <table:table-cell office:value-type="float" office:value="-0.0786" calcext:value-type="float">
            <text:p>-0.078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1246" calcext:value-type="float">
            <text:p>-0.1246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10.0341" calcext:value-type="float">
            <text:p>10.0341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1862" calcext:value-type="float">
            <text:p>-0.1862</text:p>
          </table:table-cell>
          <table:table-cell office:value-type="float" office:value="-0.0445" calcext:value-type="float">
            <text:p>-0.044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1862" calcext:value-type="float">
            <text:p>-0.1862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10.0864" calcext:value-type="float">
            <text:p>10.0864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0.0419" calcext:value-type="float">
            <text:p>0.041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0.0419" calcext:value-type="float">
            <text:p>0.0419</text:p>
          </table:table-cell>
          <table:table-cell office:value-type="float" office:value="10.0272" calcext:value-type="float">
            <text:p>10.0272</text:p>
          </table:table-cell>
          <table:table-cell office:value-type="float" office:value="0.0272" calcext:value-type="float">
            <text:p>0.0272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319" calcext:value-type="float">
            <text:p>-0.1319</text:p>
          </table:table-cell>
          <table:table-cell office:value-type="float" office:value="0.0691" calcext:value-type="float">
            <text:p>0.069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319" calcext:value-type="float">
            <text:p>-0.1319</text:p>
          </table:table-cell>
          <table:table-cell office:value-type="float" office:value="0.0691" calcext:value-type="float">
            <text:p>0.0691</text:p>
          </table:table-cell>
          <table:table-cell office:value-type="float" office:value="9.9497" calcext:value-type="float">
            <text:p>9.9497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188" calcext:value-type="float">
            <text:p>0.018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188" calcext:value-type="float">
            <text:p>0.0188</text:p>
          </table:table-cell>
          <table:table-cell office:value-type="float" office:value="9.9299" calcext:value-type="float">
            <text:p>9.9299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-0.0513" calcext:value-type="float">
            <text:p>-0.051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9.9895" calcext:value-type="float">
            <text:p>9.989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607" calcext:value-type="float">
            <text:p>-0.1607</text:p>
          </table:table-cell>
          <table:table-cell office:value-type="float" office:value="-0.0618" calcext:value-type="float">
            <text:p>-0.061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607" calcext:value-type="float">
            <text:p>-0.160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0.0646" calcext:value-type="float">
            <text:p>10.0646</text:p>
          </table:table-cell>
          <table:table-cell office:value-type="float" office:value="0.0646" calcext:value-type="float">
            <text:p>0.0646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28" calcext:value-type="float">
            <text:p>0.002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28" calcext:value-type="float">
            <text:p>0.0028</text:p>
          </table:table-cell>
          <table:table-cell office:value-type="float" office:value="10.0563" calcext:value-type="float">
            <text:p>10.0563</text:p>
          </table:table-cell>
          <table:table-cell office:value-type="float" office:value="0.0563" calcext:value-type="float">
            <text:p>0.056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593" calcext:value-type="float">
            <text:p>-0.1593</text:p>
          </table:table-cell>
          <table:table-cell office:value-type="float" office:value="0.0591" calcext:value-type="float">
            <text:p>0.059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593" calcext:value-type="float">
            <text:p>-0.1593</text:p>
          </table:table-cell>
          <table:table-cell office:value-type="float" office:value="0.0591" calcext:value-type="float">
            <text:p>0.0591</text:p>
          </table:table-cell>
          <table:table-cell office:value-type="float" office:value="9.9853" calcext:value-type="float">
            <text:p>9.9853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75" calcext:value-type="float">
            <text:p>-0.1075</text:p>
          </table:table-cell>
          <table:table-cell office:value-type="float" office:value="0.0444" calcext:value-type="float">
            <text:p>0.044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75" calcext:value-type="float">
            <text:p>-0.1075</text:p>
          </table:table-cell>
          <table:table-cell office:value-type="float" office:value="0.0444" calcext:value-type="float">
            <text:p>0.0444</text:p>
          </table:table-cell>
          <table:table-cell office:value-type="float" office:value="9.9373" calcext:value-type="float">
            <text:p>9.937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183" calcext:value-type="float">
            <text:p>-0.018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9.9601" calcext:value-type="float">
            <text:p>9.9601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-0.0581" calcext:value-type="float">
            <text:p>-0.058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10.0279" calcext:value-type="float">
            <text:p>10.0279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-0.0302" calcext:value-type="float">
            <text:p>-0.030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754" calcext:value-type="float">
            <text:p>-0.1754</text:p>
          </table:table-cell>
          <table:table-cell office:value-type="float" office:value="0.0329" calcext:value-type="float">
            <text:p>0.032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754" calcext:value-type="float">
            <text:p>-0.1754</text:p>
          </table:table-cell>
          <table:table-cell office:value-type="float" office:value="0.0329" calcext:value-type="float">
            <text:p>0.0329</text:p>
          </table:table-cell>
          <table:table-cell office:value-type="float" office:value="10.0179" calcext:value-type="float">
            <text:p>10.0179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335" calcext:value-type="float">
            <text:p>-0.1335</text:p>
          </table:table-cell>
          <table:table-cell office:value-type="float" office:value="0.0508" calcext:value-type="float">
            <text:p>0.050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335" calcext:value-type="float">
            <text:p>-0.1335</text:p>
          </table:table-cell>
          <table:table-cell office:value-type="float" office:value="0.0508" calcext:value-type="float">
            <text:p>0.0508</text:p>
          </table:table-cell>
          <table:table-cell office:value-type="float" office:value="9.9608" calcext:value-type="float">
            <text:p>9.9608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0.0116" calcext:value-type="float">
            <text:p>0.011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0.0116" calcext:value-type="float">
            <text:p>0.0116</text:p>
          </table:table-cell>
          <table:table-cell office:value-type="float" office:value="9.9489" calcext:value-type="float">
            <text:p>9.9489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163" calcext:value-type="float">
            <text:p>-0.1163</text:p>
          </table:table-cell>
          <table:table-cell office:value-type="float" office:value="-0.0395" calcext:value-type="float">
            <text:p>-0.039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163" calcext:value-type="float">
            <text:p>-0.1163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9.9949" calcext:value-type="float">
            <text:p>9.994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-0.0446" calcext:value-type="float">
            <text:p>-0.044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10.0488" calcext:value-type="float">
            <text:p>10.0488</text:p>
          </table:table-cell>
          <table:table-cell office:value-type="float" office:value="0.0488" calcext:value-type="float">
            <text:p>0.0488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42" calcext:value-type="float">
            <text:p>0.004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42" calcext:value-type="float">
            <text:p>0.0042</text:p>
          </table:table-cell>
          <table:table-cell office:value-type="float" office:value="10.0398" calcext:value-type="float">
            <text:p>10.0398</text:p>
          </table:table-cell>
          <table:table-cell office:value-type="float" office:value="0.0398" calcext:value-type="float">
            <text:p>0.0398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0.0441" calcext:value-type="float">
            <text:p>0.044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0.0441" calcext:value-type="float">
            <text:p>0.0441</text:p>
          </table:table-cell>
          <table:table-cell office:value-type="float" office:value="9.9875" calcext:value-type="float">
            <text:p>9.987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0.0316" calcext:value-type="float">
            <text:p>0.031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0.0316" calcext:value-type="float">
            <text:p>0.0316</text:p>
          </table:table-cell>
          <table:table-cell office:value-type="float" office:value="9.953" calcext:value-type="float">
            <text:p>9.95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1085" calcext:value-type="float">
            <text:p>-0.1085</text:p>
          </table:table-cell>
          <table:table-cell office:value-type="float" office:value="-0.0154" calcext:value-type="float">
            <text:p>-0.015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1085" calcext:value-type="float">
            <text:p>-0.1085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9.9721" calcext:value-type="float">
            <text:p>9.9721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-0.0433" calcext:value-type="float">
            <text:p>-0.043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10.0225" calcext:value-type="float">
            <text:p>10.022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-0.0208" calcext:value-type="float">
            <text:p>-0.0208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2T15:58:45.158048120</dc:date>
    <meta:editing-duration>PT35M42S</meta:editing-duration>
    <meta:editing-cycles>2</meta:editing-cycles>
    <meta:generator>LibreOffice/24.2.7.2$Linux_X86_64 LibreOffice_project/420$Build-2</meta:generator>
    <meta:document-statistic meta:table-count="1" meta:cell-count="12012" meta:object-count="0"/>
  </office:meta>
</office:document-meta>
</file>