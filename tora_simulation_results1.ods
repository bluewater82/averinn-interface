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08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5154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9016in"/>
    </style:style>
    <style:style style:name="co12" style:family="table-column">
      <style:table-column-properties fo:break-before="auto" style:column-width="1.976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ora_simulation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72" table:default-cell-style-name="Default"/>
        <table:table-row table:style-name="ro1">
          <table:table-cell table:style-name="ce1" office:value-type="string" calcext:value-type="string">
            <text:p>Trajectory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Rotor Angle</text:p>
          </table:table-cell>
          <table:table-cell table:style-name="ce1" office:value-type="string" calcext:value-type="string">
            <text:p>Rotor Speed</text:p>
          </table:table-cell>
          <table:table-cell table:style-name="ce1" office:value-type="string" calcext:value-type="string">
            <text:p>Raw Output</text:p>
          </table:table-cell>
          <table:table-cell table:style-name="ce1" office:value-type="string" calcext:value-type="string">
            <text:p>Normalized Output</text:p>
          </table:table-cell>
          <table:table-cell table:style-name="ce1" office:value-type="string" calcext:value-type="string">
            <text:p>next_Position</text:p>
          </table:table-cell>
          <table:table-cell table:style-name="ce1" office:value-type="string" calcext:value-type="string">
            <text:p>next_Velocity</text:p>
          </table:table-cell>
          <table:table-cell table:style-name="ce1" office:value-type="string" calcext:value-type="string">
            <text:p>next_Rotor Angle</text:p>
          </table:table-cell>
          <table:table-cell table:style-name="ce1" office:value-type="string" calcext:value-type="string">
            <text:p>next_Rotor Speed</text:p>
          </table:table-cell>
          <table:table-cell table:style-name="ce1" table:number-columns-repeated="1637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6987" calcext:value-type="float">
            <text:p>0.6987</text:p>
          </table:table-cell>
          <table:table-cell office:value-type="float" office:value="-0.6254" calcext:value-type="float">
            <text:p>-0.6254</text:p>
          </table:table-cell>
          <table:table-cell office:value-type="float" office:value="-0.3964" calcext:value-type="float">
            <text:p>-0.3964</text:p>
          </table:table-cell>
          <table:table-cell office:value-type="float" office:value="0.5675" calcext:value-type="float">
            <text:p>0.5675</text:p>
          </table:table-cell>
          <table:table-cell office:value-type="float" office:value="10.0784" calcext:value-type="float">
            <text:p>10.0784</text:p>
          </table:table-cell>
          <table:table-cell office:value-type="float" office:value="0.0784" calcext:value-type="float">
            <text:p>0.0784</text:p>
          </table:table-cell>
          <table:table-cell office:value-type="float" office:value="-0.1618" calcext:value-type="float">
            <text:p>-0.1618</text:p>
          </table:table-cell>
          <table:table-cell office:value-type="float" office:value="-0.9562" calcext:value-type="float">
            <text:p>-0.9562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459" calcext:value-type="float">
            <text:p>0.645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618" calcext:value-type="float">
            <text:p>-0.1618</text:p>
          </table:table-cell>
          <table:table-cell office:value-type="float" office:value="-0.9562" calcext:value-type="float">
            <text:p>-0.9562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459" calcext:value-type="float">
            <text:p>0.6459</text:p>
          </table:table-cell>
          <table:table-cell office:value-type="float" office:value="8.9039" calcext:value-type="float">
            <text:p>8.9039</text:p>
          </table:table-cell>
          <table:table-cell office:value-type="float" office:value="-1.0961" calcext:value-type="float">
            <text:p>-1.0961</text:p>
          </table:table-cell>
          <table:table-cell office:value-type="float" office:value="-0.8788" calcext:value-type="float">
            <text:p>-0.8788</text:p>
          </table:table-cell>
          <table:table-cell office:value-type="float" office:value="-0.3649" calcext:value-type="float">
            <text:p>-0.3649</text:p>
          </table:table-cell>
          <table:table-cell office:value-type="float" office:value="0.308" calcext:value-type="float">
            <text:p>0.308</text:p>
          </table:table-cell>
          <table:table-cell office:value-type="float" office:value="-0.4502" calcext:value-type="float">
            <text:p>-0.450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8788" calcext:value-type="float">
            <text:p>-0.8788</text:p>
          </table:table-cell>
          <table:table-cell office:value-type="float" office:value="-0.3649" calcext:value-type="float">
            <text:p>-0.3649</text:p>
          </table:table-cell>
          <table:table-cell office:value-type="float" office:value="0.308" calcext:value-type="float">
            <text:p>0.308</text:p>
          </table:table-cell>
          <table:table-cell office:value-type="float" office:value="-0.4502" calcext:value-type="float">
            <text:p>-0.4502</text:p>
          </table:table-cell>
          <table:table-cell office:value-type="float" office:value="9.3183" calcext:value-type="float">
            <text:p>9.3183</text:p>
          </table:table-cell>
          <table:table-cell office:value-type="float" office:value="-0.6817" calcext:value-type="float">
            <text:p>-0.6817</text:p>
          </table:table-cell>
          <table:table-cell office:value-type="float" office:value="-0.7727" calcext:value-type="float">
            <text:p>-0.7727</text:p>
          </table:table-cell>
          <table:table-cell office:value-type="float" office:value="0.5632" calcext:value-type="float">
            <text:p>0.5632</text:p>
          </table:table-cell>
          <table:table-cell office:value-type="float" office:value="-0.4831" calcext:value-type="float">
            <text:p>-0.4831</text:p>
          </table:table-cell>
          <table:table-cell office:value-type="float" office:value="-1.1319" calcext:value-type="float">
            <text:p>-1.131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7727" calcext:value-type="float">
            <text:p>-0.7727</text:p>
          </table:table-cell>
          <table:table-cell office:value-type="float" office:value="0.5632" calcext:value-type="float">
            <text:p>0.5632</text:p>
          </table:table-cell>
          <table:table-cell office:value-type="float" office:value="-0.4831" calcext:value-type="float">
            <text:p>-0.4831</text:p>
          </table:table-cell>
          <table:table-cell office:value-type="float" office:value="-1.1319" calcext:value-type="float">
            <text:p>-1.1319</text:p>
          </table:table-cell>
          <table:table-cell office:value-type="float" office:value="11.1295" calcext:value-type="float">
            <text:p>11.1295</text:p>
          </table:table-cell>
          <table:table-cell office:value-type="float" office:value="1.1295" calcext:value-type="float">
            <text:p>1.1295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9139" calcext:value-type="float">
            <text:p>0.9139</text:p>
          </table:table-cell>
          <table:table-cell office:value-type="float" office:value="-1.0503" calcext:value-type="float">
            <text:p>-1.0503</text:p>
          </table:table-cell>
          <table:table-cell office:value-type="float" office:value="-0.0025" calcext:value-type="float">
            <text:p>-0.002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9139" calcext:value-type="float">
            <text:p>0.9139</text:p>
          </table:table-cell>
          <table:table-cell office:value-type="float" office:value="-1.0503" calcext:value-type="float">
            <text:p>-1.0503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11.3349" calcext:value-type="float">
            <text:p>11.3349</text:p>
          </table:table-cell>
          <table:table-cell office:value-type="float" office:value="1.3349" calcext:value-type="float">
            <text:p>1.3349</text:p>
          </table:table-cell>
          <table:table-cell office:value-type="float" office:value="0.7381" calcext:value-type="float">
            <text:p>0.7381</text:p>
          </table:table-cell>
          <table:table-cell office:value-type="float" office:value="0.3888" calcext:value-type="float">
            <text:p>0.3888</text:p>
          </table:table-cell>
          <table:table-cell office:value-type="float" office:value="-0.3853" calcext:value-type="float">
            <text:p>-0.3853</text:p>
          </table:table-cell>
          <table:table-cell office:value-type="float" office:value="1.3324" calcext:value-type="float">
            <text:p>1.332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381" calcext:value-type="float">
            <text:p>0.7381</text:p>
          </table:table-cell>
          <table:table-cell office:value-type="float" office:value="0.3888" calcext:value-type="float">
            <text:p>0.3888</text:p>
          </table:table-cell>
          <table:table-cell office:value-type="float" office:value="-0.3853" calcext:value-type="float">
            <text:p>-0.3853</text:p>
          </table:table-cell>
          <table:table-cell office:value-type="float" office:value="1.3324" calcext:value-type="float">
            <text:p>1.3324</text:p>
          </table:table-cell>
          <table:table-cell office:value-type="float" office:value="9.2087" calcext:value-type="float">
            <text:p>9.2087</text:p>
          </table:table-cell>
          <table:table-cell office:value-type="float" office:value="-0.7913" calcext:value-type="float">
            <text:p>-0.7913</text:p>
          </table:table-cell>
          <table:table-cell office:value-type="float" office:value="0.7186" calcext:value-type="float">
            <text:p>0.7186</text:p>
          </table:table-cell>
          <table:table-cell office:value-type="float" office:value="-0.441" calcext:value-type="float">
            <text:p>-0.441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411" calcext:value-type="float">
            <text:p>0.541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7186" calcext:value-type="float">
            <text:p>0.7186</text:p>
          </table:table-cell>
          <table:table-cell office:value-type="float" office:value="-0.441" calcext:value-type="float">
            <text:p>-0.441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411" calcext:value-type="float">
            <text:p>0.5411</text:p>
          </table:table-cell>
          <table:table-cell office:value-type="float" office:value="9.6877" calcext:value-type="float">
            <text:p>9.6877</text:p>
          </table:table-cell>
          <table:table-cell office:value-type="float" office:value="-0.3123" calcext:value-type="float">
            <text:p>-0.3123</text:p>
          </table:table-cell>
          <table:table-cell office:value-type="float" office:value="0.046" calcext:value-type="float">
            <text:p>0.046</text:p>
          </table:table-cell>
          <table:table-cell office:value-type="float" office:value="-0.7956" calcext:value-type="float">
            <text:p>-0.7956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2288" calcext:value-type="float">
            <text:p>0.228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46" calcext:value-type="float">
            <text:p>0.046</text:p>
          </table:table-cell>
          <table:table-cell office:value-type="float" office:value="-0.7956" calcext:value-type="float">
            <text:p>-0.7956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2288" calcext:value-type="float">
            <text:p>0.2288</text:p>
          </table:table-cell>
          <table:table-cell office:value-type="float" office:value="8.7247" calcext:value-type="float">
            <text:p>8.7247</text:p>
          </table:table-cell>
          <table:table-cell office:value-type="float" office:value="-1.2753" calcext:value-type="float">
            <text:p>-1.2753</text:p>
          </table:table-cell>
          <table:table-cell office:value-type="float" office:value="-0.6024" calcext:value-type="float">
            <text:p>-0.6024</text:p>
          </table:table-cell>
          <table:table-cell office:value-type="float" office:value="-0.3945" calcext:value-type="float">
            <text:p>-0.3945</text:p>
          </table:table-cell>
          <table:table-cell office:value-type="float" office:value="0.5275" calcext:value-type="float">
            <text:p>0.5275</text:p>
          </table:table-cell>
          <table:table-cell office:value-type="float" office:value="-1.0465" calcext:value-type="float">
            <text:p>-1.046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6024" calcext:value-type="float">
            <text:p>-0.6024</text:p>
          </table:table-cell>
          <table:table-cell office:value-type="float" office:value="-0.3945" calcext:value-type="float">
            <text:p>-0.3945</text:p>
          </table:table-cell>
          <table:table-cell office:value-type="float" office:value="0.5275" calcext:value-type="float">
            <text:p>0.5275</text:p>
          </table:table-cell>
          <table:table-cell office:value-type="float" office:value="-1.0465" calcext:value-type="float">
            <text:p>-1.0465</text:p>
          </table:table-cell>
          <table:table-cell office:value-type="float" office:value="10.121" calcext:value-type="float">
            <text:p>10.121</text:p>
          </table:table-cell>
          <table:table-cell office:value-type="float" office:value="0.121" calcext:value-type="float">
            <text:p>0.121</text:p>
          </table:table-cell>
          <table:table-cell office:value-type="float" office:value="-0.6422" calcext:value-type="float">
            <text:p>-0.6422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4585" calcext:value-type="float">
            <text:p>-0.4585</text:p>
          </table:table-cell>
          <table:table-cell office:value-type="float" office:value="-0.9255" calcext:value-type="float">
            <text:p>-0.925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6422" calcext:value-type="float">
            <text:p>-0.6422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4585" calcext:value-type="float">
            <text:p>-0.4585</text:p>
          </table:table-cell>
          <table:table-cell office:value-type="float" office:value="-0.9255" calcext:value-type="float">
            <text:p>-0.9255</text:p>
          </table:table-cell>
          <table:table-cell office:value-type="float" office:value="10.8692" calcext:value-type="float">
            <text:p>10.8692</text:p>
          </table:table-cell>
          <table:table-cell office:value-type="float" office:value="0.8692" calcext:value-type="float">
            <text:p>0.8692</text:p>
          </table:table-cell>
          <table:table-cell office:value-type="float" office:value="-0.0931" calcext:value-type="float">
            <text:p>-0.0931</text:p>
          </table:table-cell>
          <table:table-cell office:value-type="float" office:value="0.6821" calcext:value-type="float">
            <text:p>0.6821</text:p>
          </table:table-cell>
          <table:table-cell office:value-type="float" office:value="-0.9494" calcext:value-type="float">
            <text:p>-0.9494</text:p>
          </table:table-cell>
          <table:table-cell office:value-type="float" office:value="-0.0563" calcext:value-type="float">
            <text:p>-0.056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931" calcext:value-type="float">
            <text:p>-0.0931</text:p>
          </table:table-cell>
          <table:table-cell office:value-type="float" office:value="0.6821" calcext:value-type="float">
            <text:p>0.6821</text:p>
          </table:table-cell>
          <table:table-cell office:value-type="float" office:value="-0.9494" calcext:value-type="float">
            <text:p>-0.9494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11.0184" calcext:value-type="float">
            <text:p>11.0184</text:p>
          </table:table-cell>
          <table:table-cell office:value-type="float" office:value="1.0184" calcext:value-type="float">
            <text:p>1.0184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3713" calcext:value-type="float">
            <text:p>0.3713</text:p>
          </table:table-cell>
          <table:table-cell office:value-type="float" office:value="-0.4965" calcext:value-type="float">
            <text:p>-0.4965</text:p>
          </table:table-cell>
          <table:table-cell office:value-type="float" office:value="0.9622" calcext:value-type="float">
            <text:p>0.962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3713" calcext:value-type="float">
            <text:p>0.3713</text:p>
          </table:table-cell>
          <table:table-cell office:value-type="float" office:value="-0.4965" calcext:value-type="float">
            <text:p>-0.4965</text:p>
          </table:table-cell>
          <table:table-cell office:value-type="float" office:value="0.9622" calcext:value-type="float">
            <text:p>0.9622</text:p>
          </table:table-cell>
          <table:table-cell office:value-type="float" office:value="9.827" calcext:value-type="float">
            <text:p>9.827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5582" calcext:value-type="float">
            <text:p>0.5582</text:p>
          </table:table-cell>
          <table:table-cell office:value-type="float" office:value="-0.2431" calcext:value-type="float">
            <text:p>-0.243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7891" calcext:value-type="float">
            <text:p>0.789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5582" calcext:value-type="float">
            <text:p>0.5582</text:p>
          </table:table-cell>
          <table:table-cell office:value-type="float" office:value="-0.2431" calcext:value-type="float">
            <text:p>-0.243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7891" calcext:value-type="float">
            <text:p>0.7891</text:p>
          </table:table-cell>
          <table:table-cell office:value-type="float" office:value="9.4138" calcext:value-type="float">
            <text:p>9.4138</text:p>
          </table:table-cell>
          <table:table-cell office:value-type="float" office:value="-0.5862" calcext:value-type="float">
            <text:p>-0.5862</text:p>
          </table:table-cell>
          <table:table-cell office:value-type="float" office:value="0.1199" calcext:value-type="float">
            <text:p>0.1199</text:p>
          </table:table-cell>
          <table:table-cell office:value-type="float" office:value="-0.5683" calcext:value-type="float">
            <text:p>-0.5683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2029" calcext:value-type="float">
            <text:p>0.202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1199" calcext:value-type="float">
            <text:p>0.1199</text:p>
          </table:table-cell>
          <table:table-cell office:value-type="float" office:value="-0.5683" calcext:value-type="float">
            <text:p>-0.5683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2029" calcext:value-type="float">
            <text:p>0.2029</text:p>
          </table:table-cell>
          <table:table-cell office:value-type="float" office:value="9.0399" calcext:value-type="float">
            <text:p>9.0399</text:p>
          </table:table-cell>
          <table:table-cell office:value-type="float" office:value="-0.9601" calcext:value-type="float">
            <text:p>-0.9601</text:p>
          </table:table-cell>
          <table:table-cell office:value-type="float" office:value="-0.3737" calcext:value-type="float">
            <text:p>-0.3737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0.598" calcext:value-type="float">
            <text:p>0.598</text:p>
          </table:table-cell>
          <table:table-cell office:value-type="float" office:value="-0.7572" calcext:value-type="float">
            <text:p>-0.757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3737" calcext:value-type="float">
            <text:p>-0.3737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0.598" calcext:value-type="float">
            <text:p>0.598</text:p>
          </table:table-cell>
          <table:table-cell office:value-type="float" office:value="-0.7572" calcext:value-type="float">
            <text:p>-0.7572</text:p>
          </table:table-cell>
          <table:table-cell office:value-type="float" office:value="9.8427" calcext:value-type="float">
            <text:p>9.8427</text:p>
          </table:table-cell>
          <table:table-cell office:value-type="float" office:value="-0.1573" calcext:value-type="float">
            <text:p>-0.1573</text:p>
          </table:table-cell>
          <table:table-cell office:value-type="float" office:value="-0.4657" calcext:value-type="float">
            <text:p>-0.4657</text:p>
          </table:table-cell>
          <table:table-cell office:value-type="float" office:value="0.1782" calcext:value-type="float">
            <text:p>0.1782</text:p>
          </table:table-cell>
          <table:table-cell office:value-type="float" office:value="-0.2378" calcext:value-type="float">
            <text:p>-0.2378</text:p>
          </table:table-cell>
          <table:table-cell office:value-type="float" office:value="-0.9145" calcext:value-type="float">
            <text:p>-0.914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4657" calcext:value-type="float">
            <text:p>-0.4657</text:p>
          </table:table-cell>
          <table:table-cell office:value-type="float" office:value="0.1782" calcext:value-type="float">
            <text:p>0.1782</text:p>
          </table:table-cell>
          <table:table-cell office:value-type="float" office:value="-0.2378" calcext:value-type="float">
            <text:p>-0.2378</text:p>
          </table:table-cell>
          <table:table-cell office:value-type="float" office:value="-0.9145" calcext:value-type="float">
            <text:p>-0.9145</text:p>
          </table:table-cell>
          <table:table-cell office:value-type="float" office:value="10.795" calcext:value-type="float">
            <text:p>10.795</text:p>
          </table:table-cell>
          <table:table-cell office:value-type="float" office:value="0.795" calcext:value-type="float">
            <text:p>0.795</text:p>
          </table:table-cell>
          <table:table-cell office:value-type="float" office:value="-0.1188" calcext:value-type="float">
            <text:p>-0.1188</text:p>
          </table:table-cell>
          <table:table-cell office:value-type="float" office:value="0.4677" calcext:value-type="float">
            <text:p>0.4677</text:p>
          </table:table-cell>
          <table:table-cell office:value-type="float" office:value="-0.7547" calcext:value-type="float">
            <text:p>-0.7547</text:p>
          </table:table-cell>
          <table:table-cell office:value-type="float" office:value="-0.1194" calcext:value-type="float">
            <text:p>-0.119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1188" calcext:value-type="float">
            <text:p>-0.1188</text:p>
          </table:table-cell>
          <table:table-cell office:value-type="float" office:value="0.4677" calcext:value-type="float">
            <text:p>0.4677</text:p>
          </table:table-cell>
          <table:table-cell office:value-type="float" office:value="-0.7547" calcext:value-type="float">
            <text:p>-0.7547</text:p>
          </table:table-cell>
          <table:table-cell office:value-type="float" office:value="-0.1194" calcext:value-type="float">
            <text:p>-0.1194</text:p>
          </table:table-cell>
          <table:table-cell office:value-type="float" office:value="10.735" calcext:value-type="float">
            <text:p>10.735</text:p>
          </table:table-cell>
          <table:table-cell office:value-type="float" office:value="0.735" calcext:value-type="float">
            <text:p>0.735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292" calcext:value-type="float">
            <text:p>0.292</text:p>
          </table:table-cell>
          <table:table-cell office:value-type="float" office:value="-0.5066" calcext:value-type="float">
            <text:p>-0.5066</text:p>
          </table:table-cell>
          <table:table-cell office:value-type="float" office:value="0.6156" calcext:value-type="float">
            <text:p>0.615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292" calcext:value-type="float">
            <text:p>0.292</text:p>
          </table:table-cell>
          <table:table-cell office:value-type="float" office:value="-0.5066" calcext:value-type="float">
            <text:p>-0.5066</text:p>
          </table:table-cell>
          <table:table-cell office:value-type="float" office:value="0.6156" calcext:value-type="float">
            <text:p>0.6156</text:p>
          </table:table-cell>
          <table:table-cell office:value-type="float" office:value="10.2869" calcext:value-type="float">
            <text:p>10.2869</text:p>
          </table:table-cell>
          <table:table-cell office:value-type="float" office:value="0.2869" calcext:value-type="float">
            <text:p>0.2869</text:p>
          </table:table-cell>
          <table:table-cell office:value-type="float" office:value="0.388" calcext:value-type="float">
            <text:p>0.388</text:p>
          </table:table-cell>
          <table:table-cell office:value-type="float" office:value="-0.1294" calcext:value-type="float">
            <text:p>-0.1294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9025" calcext:value-type="float">
            <text:p>0.902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388" calcext:value-type="float">
            <text:p>0.388</text:p>
          </table:table-cell>
          <table:table-cell office:value-type="float" office:value="-0.1294" calcext:value-type="float">
            <text:p>-0.1294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9025" calcext:value-type="float">
            <text:p>0.9025</text:p>
          </table:table-cell>
          <table:table-cell office:value-type="float" office:value="9.2239" calcext:value-type="float">
            <text:p>9.2239</text:p>
          </table:table-cell>
          <table:table-cell office:value-type="float" office:value="-0.7761" calcext:value-type="float">
            <text:p>-0.7761</text:p>
          </table:table-cell>
          <table:table-cell office:value-type="float" office:value="0.1185" calcext:value-type="float">
            <text:p>0.1185</text:p>
          </table:table-cell>
          <table:table-cell office:value-type="float" office:value="-0.3746" calcext:value-type="float">
            <text:p>-0.3746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1264" calcext:value-type="float">
            <text:p>0.126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1185" calcext:value-type="float">
            <text:p>0.1185</text:p>
          </table:table-cell>
          <table:table-cell office:value-type="float" office:value="-0.3746" calcext:value-type="float">
            <text:p>-0.3746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1264" calcext:value-type="float">
            <text:p>0.1264</text:p>
          </table:table-cell>
          <table:table-cell office:value-type="float" office:value="9.3221" calcext:value-type="float">
            <text:p>9.3221</text:p>
          </table:table-cell>
          <table:table-cell office:value-type="float" office:value="-0.6779" calcext:value-type="float">
            <text:p>-0.6779</text:p>
          </table:table-cell>
          <table:table-cell office:value-type="float" office:value="-0.2166" calcext:value-type="float">
            <text:p>-0.2166</text:p>
          </table:table-cell>
          <table:table-cell office:value-type="float" office:value="-0.2401" calcext:value-type="float">
            <text:p>-0.2401</text:p>
          </table:table-cell>
          <table:table-cell office:value-type="float" office:value="0.5543" calcext:value-type="float">
            <text:p>0.5543</text:p>
          </table:table-cell>
          <table:table-cell office:value-type="float" office:value="-0.5515" calcext:value-type="float">
            <text:p>-0.551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2166" calcext:value-type="float">
            <text:p>-0.2166</text:p>
          </table:table-cell>
          <table:table-cell office:value-type="float" office:value="-0.2401" calcext:value-type="float">
            <text:p>-0.2401</text:p>
          </table:table-cell>
          <table:table-cell office:value-type="float" office:value="0.5543" calcext:value-type="float">
            <text:p>0.5543</text:p>
          </table:table-cell>
          <table:table-cell office:value-type="float" office:value="-0.5515" calcext:value-type="float">
            <text:p>-0.5515</text:p>
          </table:table-cell>
          <table:table-cell office:value-type="float" office:value="9.7594" calcext:value-type="float">
            <text:p>9.7594</text:p>
          </table:table-cell>
          <table:table-cell office:value-type="float" office:value="-0.2406" calcext:value-type="float">
            <text:p>-0.2406</text:p>
          </table:table-cell>
          <table:table-cell office:value-type="float" office:value="-0.2991" calcext:value-type="float">
            <text:p>-0.2991</text:p>
          </table:table-cell>
          <table:table-cell office:value-type="float" office:value="0.0956" calcext:value-type="float">
            <text:p>0.0956</text:p>
          </table:table-cell>
          <table:table-cell office:value-type="float" office:value="-0.1175" calcext:value-type="float">
            <text:p>-0.1175</text:p>
          </table:table-cell>
          <table:table-cell office:value-type="float" office:value="-0.7921" calcext:value-type="float">
            <text:p>-0.792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0.2991" calcext:value-type="float">
            <text:p>-0.2991</text:p>
          </table:table-cell>
          <table:table-cell office:value-type="float" office:value="0.0956" calcext:value-type="float">
            <text:p>0.0956</text:p>
          </table:table-cell>
          <table:table-cell office:value-type="float" office:value="-0.1175" calcext:value-type="float">
            <text:p>-0.1175</text:p>
          </table:table-cell>
          <table:table-cell office:value-type="float" office:value="-0.7921" calcext:value-type="float">
            <text:p>-0.7921</text:p>
          </table:table-cell>
          <table:table-cell office:value-type="float" office:value="10.6485" calcext:value-type="float">
            <text:p>10.6485</text:p>
          </table:table-cell>
          <table:table-cell office:value-type="float" office:value="0.6485" calcext:value-type="float">
            <text:p>0.6485</text:p>
          </table:table-cell>
          <table:table-cell office:value-type="float" office:value="-0.0921" calcext:value-type="float">
            <text:p>-0.0921</text:p>
          </table:table-cell>
          <table:table-cell office:value-type="float" office:value="0.2928" calcext:value-type="float">
            <text:p>0.2928</text:p>
          </table:table-cell>
          <table:table-cell office:value-type="float" office:value="-0.5854" calcext:value-type="float">
            <text:p>-0.5854</text:p>
          </table:table-cell>
          <table:table-cell office:value-type="float" office:value="-0.1436" calcext:value-type="float">
            <text:p>-0.143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0.0921" calcext:value-type="float">
            <text:p>-0.0921</text:p>
          </table:table-cell>
          <table:table-cell office:value-type="float" office:value="0.2928" calcext:value-type="float">
            <text:p>0.2928</text:p>
          </table:table-cell>
          <table:table-cell office:value-type="float" office:value="-0.5854" calcext:value-type="float">
            <text:p>-0.5854</text:p>
          </table:table-cell>
          <table:table-cell office:value-type="float" office:value="-0.1436" calcext:value-type="float">
            <text:p>-0.1436</text:p>
          </table:table-cell>
          <table:table-cell office:value-type="float" office:value="10.5299" calcext:value-type="float">
            <text:p>10.5299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1882" calcext:value-type="float">
            <text:p>0.1882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3863" calcext:value-type="float">
            <text:p>0.386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1882" calcext:value-type="float">
            <text:p>0.1882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3863" calcext:value-type="float">
            <text:p>0.3863</text:p>
          </table:table-cell>
          <table:table-cell office:value-type="float" office:value="10.3191" calcext:value-type="float">
            <text:p>10.3191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2329" calcext:value-type="float">
            <text:p>0.2329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7054" calcext:value-type="float">
            <text:p>0.705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2329" calcext:value-type="float">
            <text:p>0.2329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7054" calcext:value-type="float">
            <text:p>0.7054</text:p>
          </table:table-cell>
          <table:table-cell office:value-type="float" office:value="9.4524" calcext:value-type="float">
            <text:p>9.4524</text:p>
          </table:table-cell>
          <table:table-cell office:value-type="float" office:value="-0.5476" calcext:value-type="float">
            <text:p>-0.5476</text:p>
          </table:table-cell>
          <table:table-cell office:value-type="float" office:value="0.0698" calcext:value-type="float">
            <text:p>0.0698</text:p>
          </table:table-cell>
          <table:table-cell office:value-type="float" office:value="-0.23" calcext:value-type="float">
            <text:p>-0.23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1578" calcext:value-type="float">
            <text:p>0.157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698" calcext:value-type="float">
            <text:p>0.0698</text:p>
          </table:table-cell>
          <table:table-cell office:value-type="float" office:value="-0.23" calcext:value-type="float">
            <text:p>-0.23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1578" calcext:value-type="float">
            <text:p>0.1578</text:p>
          </table:table-cell>
          <table:table-cell office:value-type="float" office:value="9.4812" calcext:value-type="float">
            <text:p>9.4812</text:p>
          </table:table-cell>
          <table:table-cell office:value-type="float" office:value="-0.5188" calcext:value-type="float">
            <text:p>-0.5188</text:p>
          </table:table-cell>
          <table:table-cell office:value-type="float" office:value="-0.1322" calcext:value-type="float">
            <text:p>-0.1322</text:p>
          </table:table-cell>
          <table:table-cell office:value-type="float" office:value="-0.1414" calcext:value-type="float">
            <text:p>-0.1414</text:p>
          </table:table-cell>
          <table:table-cell office:value-type="float" office:value="0.4118" calcext:value-type="float">
            <text:p>0.4118</text:p>
          </table:table-cell>
          <table:table-cell office:value-type="float" office:value="-0.3611" calcext:value-type="float">
            <text:p>-0.361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0.1322" calcext:value-type="float">
            <text:p>-0.1322</text:p>
          </table:table-cell>
          <table:table-cell office:value-type="float" office:value="-0.1414" calcext:value-type="float">
            <text:p>-0.1414</text:p>
          </table:table-cell>
          <table:table-cell office:value-type="float" office:value="0.4118" calcext:value-type="float">
            <text:p>0.4118</text:p>
          </table:table-cell>
          <table:table-cell office:value-type="float" office:value="-0.3611" calcext:value-type="float">
            <text:p>-0.3611</text:p>
          </table:table-cell>
          <table:table-cell office:value-type="float" office:value="9.7578" calcext:value-type="float">
            <text:p>9.7578</text:p>
          </table:table-cell>
          <table:table-cell office:value-type="float" office:value="-0.2422" calcext:value-type="float">
            <text:p>-0.2422</text:p>
          </table:table-cell>
          <table:table-cell office:value-type="float" office:value="-0.1752" calcext:value-type="float">
            <text:p>-0.1752</text:p>
          </table:table-cell>
          <table:table-cell office:value-type="float" office:value="0.0667" calcext:value-type="float">
            <text:p>0.0667</text:p>
          </table:table-cell>
          <table:table-cell office:value-type="float" office:value="-0.0704" calcext:value-type="float">
            <text:p>-0.0704</text:p>
          </table:table-cell>
          <table:table-cell office:value-type="float" office:value="-0.6033" calcext:value-type="float">
            <text:p>-0.603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0.1752" calcext:value-type="float">
            <text:p>-0.1752</text:p>
          </table:table-cell>
          <table:table-cell office:value-type="float" office:value="0.0667" calcext:value-type="float">
            <text:p>0.0667</text:p>
          </table:table-cell>
          <table:table-cell office:value-type="float" office:value="-0.0704" calcext:value-type="float">
            <text:p>-0.0704</text:p>
          </table:table-cell>
          <table:table-cell office:value-type="float" office:value="-0.6033" calcext:value-type="float">
            <text:p>-0.6033</text:p>
          </table:table-cell>
          <table:table-cell office:value-type="float" office:value="10.4601" calcext:value-type="float">
            <text:p>10.4601</text:p>
          </table:table-cell>
          <table:table-cell office:value-type="float" office:value="0.4601" calcext:value-type="float">
            <text:p>0.4601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177" calcext:value-type="float">
            <text:p>0.177</text:p>
          </table:table-cell>
          <table:table-cell office:value-type="float" office:value="-0.4436" calcext:value-type="float">
            <text:p>-0.4436</text:p>
          </table:table-cell>
          <table:table-cell office:value-type="float" office:value="-0.1431" calcext:value-type="float">
            <text:p>-0.143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177" calcext:value-type="float">
            <text:p>0.177</text:p>
          </table:table-cell>
          <table:table-cell office:value-type="float" office:value="-0.4436" calcext:value-type="float">
            <text:p>-0.4436</text:p>
          </table:table-cell>
          <table:table-cell office:value-type="float" office:value="-0.1431" calcext:value-type="float">
            <text:p>-0.1431</text:p>
          </table:table-cell>
          <table:table-cell office:value-type="float" office:value="10.4028" calcext:value-type="float">
            <text:p>10.4028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982" calcext:value-type="float">
            <text:p>0.0982</text:p>
          </table:table-cell>
          <table:table-cell office:value-type="float" office:value="-0.3853" calcext:value-type="float">
            <text:p>-0.3853</text:p>
          </table:table-cell>
          <table:table-cell office:value-type="float" office:value="0.2597" calcext:value-type="float">
            <text:p>0.259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982" calcext:value-type="float">
            <text:p>0.0982</text:p>
          </table:table-cell>
          <table:table-cell office:value-type="float" office:value="-0.3853" calcext:value-type="float">
            <text:p>-0.3853</text:p>
          </table:table-cell>
          <table:table-cell office:value-type="float" office:value="0.2597" calcext:value-type="float">
            <text:p>0.2597</text:p>
          </table:table-cell>
          <table:table-cell office:value-type="float" office:value="10.2153" calcext:value-type="float">
            <text:p>10.2153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1237" calcext:value-type="float">
            <text:p>0.1237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475" calcext:value-type="float">
            <text:p>0.47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237" calcext:value-type="float">
            <text:p>0.1237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475" calcext:value-type="float">
            <text:p>0.475</text:p>
          </table:table-cell>
          <table:table-cell office:value-type="float" office:value="9.7048" calcext:value-type="float">
            <text:p>9.7048</text:p>
          </table:table-cell>
          <table:table-cell office:value-type="float" office:value="-0.2952" calcext:value-type="float">
            <text:p>-0.2952</text:p>
          </table:table-cell>
          <table:table-cell office:value-type="float" office:value="0.0155" calcext:value-type="float">
            <text:p>0.0155</text:p>
          </table:table-cell>
          <table:table-cell office:value-type="float" office:value="-0.1395" calcext:value-type="float">
            <text:p>-0.139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1798" calcext:value-type="float">
            <text:p>0.179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155" calcext:value-type="float">
            <text:p>0.0155</text:p>
          </table:table-cell>
          <table:table-cell office:value-type="float" office:value="-0.1395" calcext:value-type="float">
            <text:p>-0.139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1798" calcext:value-type="float">
            <text:p>0.1798</text:p>
          </table:table-cell>
          <table:table-cell office:value-type="float" office:value="9.5639" calcext:value-type="float">
            <text:p>9.5639</text:p>
          </table:table-cell>
          <table:table-cell office:value-type="float" office:value="-0.4361" calcext:value-type="float">
            <text:p>-0.4361</text:p>
          </table:table-cell>
          <table:table-cell office:value-type="float" office:value="-0.0942" calcext:value-type="float">
            <text:p>-0.0942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0.2712" calcext:value-type="float">
            <text:p>0.2712</text:p>
          </table:table-cell>
          <table:table-cell office:value-type="float" office:value="-0.2563" calcext:value-type="float">
            <text:p>-0.256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0.0942" calcext:value-type="float">
            <text:p>-0.0942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0.2712" calcext:value-type="float">
            <text:p>0.2712</text:p>
          </table:table-cell>
          <table:table-cell office:value-type="float" office:value="-0.2563" calcext:value-type="float">
            <text:p>-0.2563</text:p>
          </table:table-cell>
          <table:table-cell office:value-type="float" office:value="9.8123" calcext:value-type="float">
            <text:p>9.8123</text:p>
          </table:table-cell>
          <table:table-cell office:value-type="float" office:value="-0.1877" calcext:value-type="float">
            <text:p>-0.1877</text:p>
          </table:table-cell>
          <table:table-cell office:value-type="float" office:value="-0.0945" calcext:value-type="float">
            <text:p>-0.0945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444" calcext:value-type="float">
            <text:p>-0.44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0.0945" calcext:value-type="float">
            <text:p>-0.0945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444" calcext:value-type="float">
            <text:p>-0.444</text:p>
          </table:table-cell>
          <table:table-cell office:value-type="float" office:value="10.3475" calcext:value-type="float">
            <text:p>10.3475</text:p>
          </table:table-cell>
          <table:table-cell office:value-type="float" office:value="0.3475" calcext:value-type="float">
            <text:p>0.347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108" calcext:value-type="float">
            <text:p>0.108</text:p>
          </table:table-cell>
          <table:table-cell office:value-type="float" office:value="-0.3492" calcext:value-type="float">
            <text:p>-0.3492</text:p>
          </table:table-cell>
          <table:table-cell office:value-type="float" office:value="-0.0965" calcext:value-type="float">
            <text:p>-0.096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108" calcext:value-type="float">
            <text:p>0.108</text:p>
          </table:table-cell>
          <table:table-cell office:value-type="float" office:value="-0.3492" calcext:value-type="float">
            <text:p>-0.3492</text:p>
          </table:table-cell>
          <table:table-cell office:value-type="float" office:value="-0.0965" calcext:value-type="float">
            <text:p>-0.0965</text:p>
          </table:table-cell>
          <table:table-cell office:value-type="float" office:value="10.3304" calcext:value-type="float">
            <text:p>10.330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321" calcext:value-type="float">
            <text:p>0.0321</text:p>
          </table:table-cell>
          <table:table-cell office:value-type="float" office:value="-0.2805" calcext:value-type="float">
            <text:p>-0.2805</text:p>
          </table:table-cell>
          <table:table-cell office:value-type="float" office:value="0.2339" calcext:value-type="float">
            <text:p>0.233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321" calcext:value-type="float">
            <text:p>0.0321</text:p>
          </table:table-cell>
          <table:table-cell office:value-type="float" office:value="-0.2805" calcext:value-type="float">
            <text:p>-0.2805</text:p>
          </table:table-cell>
          <table:table-cell office:value-type="float" office:value="0.2339" calcext:value-type="float">
            <text:p>0.2339</text:p>
          </table:table-cell>
          <table:table-cell office:value-type="float" office:value="10.0797" calcext:value-type="float">
            <text:p>10.0797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3136" calcext:value-type="float">
            <text:p>0.313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3136" calcext:value-type="float">
            <text:p>0.3136</text:p>
          </table:table-cell>
          <table:table-cell office:value-type="float" office:value="9.7336" calcext:value-type="float">
            <text:p>9.7336</text:p>
          </table:table-cell>
          <table:table-cell office:value-type="float" office:value="-0.2664" calcext:value-type="float">
            <text:p>-0.2664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0472" calcext:value-type="float">
            <text:p>0.047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0472" calcext:value-type="float">
            <text:p>0.0472</text:p>
          </table:table-cell>
          <table:table-cell office:value-type="float" office:value="9.7247" calcext:value-type="float">
            <text:p>9.7247</text:p>
          </table:table-cell>
          <table:table-cell office:value-type="float" office:value="-0.2753" calcext:value-type="float">
            <text:p>-0.2753</text:p>
          </table:table-cell>
          <table:table-cell office:value-type="float" office:value="-0.0754" calcext:value-type="float">
            <text:p>-0.0754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833" calcext:value-type="float">
            <text:p>0.0833</text:p>
          </table:table-cell>
          <table:table-cell office:value-type="float" office:value="-0.228" calcext:value-type="float">
            <text:p>-0.22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0.0754" calcext:value-type="float">
            <text:p>-0.0754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833" calcext:value-type="float">
            <text:p>0.0833</text:p>
          </table:table-cell>
          <table:table-cell office:value-type="float" office:value="-0.228" calcext:value-type="float">
            <text:p>-0.228</text:p>
          </table:table-cell>
          <table:table-cell office:value-type="float" office:value="9.9274" calcext:value-type="float">
            <text:p>9.9274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0.0629" calcext:value-type="float">
            <text:p>0.0629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3006" calcext:value-type="float">
            <text:p>-0.300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0.0629" calcext:value-type="float">
            <text:p>0.0629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3006" calcext:value-type="float">
            <text:p>-0.3006</text:p>
          </table:table-cell>
          <table:table-cell office:value-type="float" office:value="10.2806" calcext:value-type="float">
            <text:p>10.2806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3413" calcext:value-type="float">
            <text:p>-0.3413</text:p>
          </table:table-cell>
          <table:table-cell office:value-type="float" office:value="-0.02" calcext:value-type="float">
            <text:p>-0.0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3413" calcext:value-type="float">
            <text:p>-0.3413</text:p>
          </table:table-cell>
          <table:table-cell office:value-type="float" office:value="-0.02" calcext:value-type="float">
            <text:p>-0.02</text:p>
          </table:table-cell>
          <table:table-cell office:value-type="float" office:value="10.2564" calcext:value-type="float">
            <text:p>10.2564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438" calcext:value-type="float">
            <text:p>0.0438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-0.2332" calcext:value-type="float">
            <text:p>-0.2332</text:p>
          </table:table-cell>
          <table:table-cell office:value-type="float" office:value="0.2364" calcext:value-type="float">
            <text:p>0.236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438" calcext:value-type="float">
            <text:p>0.0438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-0.2332" calcext:value-type="float">
            <text:p>-0.2332</text:p>
          </table:table-cell>
          <table:table-cell office:value-type="float" office:value="0.2364" calcext:value-type="float">
            <text:p>0.2364</text:p>
          </table:table-cell>
          <table:table-cell office:value-type="float" office:value="9.9651" calcext:value-type="float">
            <text:p>9.9651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2015" calcext:value-type="float">
            <text:p>0.201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2015" calcext:value-type="float">
            <text:p>0.2015</text:p>
          </table:table-cell>
          <table:table-cell office:value-type="float" office:value="9.7594" calcext:value-type="float">
            <text:p>9.7594</text:p>
          </table:table-cell>
          <table:table-cell office:value-type="float" office:value="-0.2406" calcext:value-type="float">
            <text:p>-0.2406</text:p>
          </table:table-cell>
          <table:table-cell office:value-type="float" office:value="-0.0462" calcext:value-type="float">
            <text:p>-0.0462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0.0669" calcext:value-type="float">
            <text:p>0.0669</text:p>
          </table:table-cell>
          <table:table-cell office:value-type="float" office:value="-0.0391" calcext:value-type="float">
            <text:p>-0.039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0.0462" calcext:value-type="float">
            <text:p>-0.0462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0.0669" calcext:value-type="float">
            <text:p>0.0669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9.8274" calcext:value-type="float">
            <text:p>9.8274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0.0218" calcext:value-type="float">
            <text:p>0.0218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-0.2117" calcext:value-type="float">
            <text:p>-0.211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0.0218" calcext:value-type="float">
            <text:p>0.0218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-0.2117" calcext:value-type="float">
            <text:p>-0.2117</text:p>
          </table:table-cell>
          <table:table-cell office:value-type="float" office:value="10.0491" calcext:value-type="float">
            <text:p>10.0491</text:p>
          </table:table-cell>
          <table:table-cell office:value-type="float" office:value="0.0491" calcext:value-type="float">
            <text:p>0.0491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2457" calcext:value-type="float">
            <text:p>-0.2457</text:p>
          </table:table-cell>
          <table:table-cell office:value-type="float" office:value="-0.1627" calcext:value-type="float">
            <text:p>-0.162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2457" calcext:value-type="float">
            <text:p>-0.2457</text:p>
          </table:table-cell>
          <table:table-cell office:value-type="float" office:value="-0.1627" calcext:value-type="float">
            <text:p>-0.1627</text:p>
          </table:table-cell>
          <table:table-cell office:value-type="float" office:value="10.2391" calcext:value-type="float">
            <text:p>10.2391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2888" calcext:value-type="float">
            <text:p>-0.2888</text:p>
          </table:table-cell>
          <table:table-cell office:value-type="float" office:value="0.0764" calcext:value-type="float">
            <text:p>0.076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2888" calcext:value-type="float">
            <text:p>-0.2888</text:p>
          </table:table-cell>
          <table:table-cell office:value-type="float" office:value="0.0764" calcext:value-type="float">
            <text:p>0.0764</text:p>
          </table:table-cell>
          <table:table-cell office:value-type="float" office:value="10.1254" calcext:value-type="float">
            <text:p>10.1254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1497" calcext:value-type="float">
            <text:p>-0.1497</text:p>
          </table:table-cell>
          <table:table-cell office:value-type="float" office:value="0.2018" calcext:value-type="float">
            <text:p>0.201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1497" calcext:value-type="float">
            <text:p>-0.1497</text:p>
          </table:table-cell>
          <table:table-cell office:value-type="float" office:value="0.2018" calcext:value-type="float">
            <text:p>0.2018</text:p>
          </table:table-cell>
          <table:table-cell office:value-type="float" office:value="9.8896" calcext:value-type="float">
            <text:p>9.8896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0914" calcext:value-type="float">
            <text:p>0.091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0914" calcext:value-type="float">
            <text:p>0.0914</text:p>
          </table:table-cell>
          <table:table-cell office:value-type="float" office:value="9.8057" calcext:value-type="float">
            <text:p>9.8057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1029" calcext:value-type="float">
            <text:p>-0.102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1029" calcext:value-type="float">
            <text:p>-0.1029</text:p>
          </table:table-cell>
          <table:table-cell office:value-type="float" office:value="9.9278" calcext:value-type="float">
            <text:p>9.9278</text:p>
          </table:table-cell>
          <table:table-cell office:value-type="float" office:value="-0.0722" calcext:value-type="float">
            <text:p>-0.0722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036" calcext:value-type="float">
            <text:p>0.036</text:p>
          </table:table-cell>
          <table:table-cell office:value-type="float" office:value="-0.1478" calcext:value-type="float">
            <text:p>-0.1478</text:p>
          </table:table-cell>
          <table:table-cell office:value-type="float" office:value="-0.1751" calcext:value-type="float">
            <text:p>-0.175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036" calcext:value-type="float">
            <text:p>0.036</text:p>
          </table:table-cell>
          <table:table-cell office:value-type="float" office:value="-0.1478" calcext:value-type="float">
            <text:p>-0.1478</text:p>
          </table:table-cell>
          <table:table-cell office:value-type="float" office:value="-0.1751" calcext:value-type="float">
            <text:p>-0.1751</text:p>
          </table:table-cell>
          <table:table-cell office:value-type="float" office:value="10.1282" calcext:value-type="float">
            <text:p>10.1282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61" calcext:value-type="float">
            <text:p>0.0361</text:p>
          </table:table-cell>
          <table:table-cell office:value-type="float" office:value="-0.2588" calcext:value-type="float">
            <text:p>-0.2588</text:p>
          </table:table-cell>
          <table:table-cell office:value-type="float" office:value="-0.0469" calcext:value-type="float">
            <text:p>-0.046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61" calcext:value-type="float">
            <text:p>0.0361</text:p>
          </table:table-cell>
          <table:table-cell office:value-type="float" office:value="-0.2588" calcext:value-type="float">
            <text:p>-0.2588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10.1815" calcext:value-type="float">
            <text:p>10.181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1345" calcext:value-type="float">
            <text:p>0.134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1345" calcext:value-type="float">
            <text:p>0.1345</text:p>
          </table:table-cell>
          <table:table-cell office:value-type="float" office:value="10.0114" calcext:value-type="float">
            <text:p>10.0114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0.146" calcext:value-type="float">
            <text:p>0.14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0.146" calcext:value-type="float">
            <text:p>0.146</text:p>
          </table:table-cell>
          <table:table-cell office:value-type="float" office:value="9.85" calcext:value-type="float">
            <text:p>9.8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-0.004" calcext:value-type="float">
            <text:p>-0.00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-0.004" calcext:value-type="float">
            <text:p>-0.004</text:p>
          </table:table-cell>
          <table:table-cell office:value-type="float" office:value="9.8678" calcext:value-type="float">
            <text:p>9.8678</text:p>
          </table:table-cell>
          <table:table-cell office:value-type="float" office:value="-0.1322" calcext:value-type="float">
            <text:p>-0.1322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739" calcext:value-type="float">
            <text:p>-0.0739</text:p>
          </table:table-cell>
          <table:table-cell office:value-type="float" office:value="-0.1363" calcext:value-type="float">
            <text:p>-0.136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739" calcext:value-type="float">
            <text:p>-0.0739</text:p>
          </table:table-cell>
          <table:table-cell office:value-type="float" office:value="-0.1363" calcext:value-type="float">
            <text:p>-0.1363</text:p>
          </table:table-cell>
          <table:table-cell office:value-type="float" office:value="10.0188" calcext:value-type="float">
            <text:p>10.0188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349" calcext:value-type="float">
            <text:p>0.0349</text:p>
          </table:table-cell>
          <table:table-cell office:value-type="float" office:value="-0.2008" calcext:value-type="float">
            <text:p>-0.2008</text:p>
          </table:table-cell>
          <table:table-cell office:value-type="float" office:value="-0.1174" calcext:value-type="float">
            <text:p>-0.117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349" calcext:value-type="float">
            <text:p>0.0349</text:p>
          </table:table-cell>
          <table:table-cell office:value-type="float" office:value="-0.2008" calcext:value-type="float">
            <text:p>-0.2008</text:p>
          </table:table-cell>
          <table:table-cell office:value-type="float" office:value="-0.1174" calcext:value-type="float">
            <text:p>-0.1174</text:p>
          </table:table-cell>
          <table:table-cell office:value-type="float" office:value="10.1602" calcext:value-type="float">
            <text:p>10.1602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428" calcext:value-type="float">
            <text:p>0.042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428" calcext:value-type="float">
            <text:p>0.0428</text:p>
          </table:table-cell>
          <table:table-cell office:value-type="float" office:value="10.0938" calcext:value-type="float">
            <text:p>10.0938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1484" calcext:value-type="float">
            <text:p>-0.1484</text:p>
          </table:table-cell>
          <table:table-cell office:value-type="float" office:value="0.1366" calcext:value-type="float">
            <text:p>0.136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1484" calcext:value-type="float">
            <text:p>-0.1484</text:p>
          </table:table-cell>
          <table:table-cell office:value-type="float" office:value="0.1366" calcext:value-type="float">
            <text:p>0.1366</text:p>
          </table:table-cell>
          <table:table-cell office:value-type="float" office:value="9.9341" calcext:value-type="float">
            <text:p>9.9341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707" calcext:value-type="float">
            <text:p>0.070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707" calcext:value-type="float">
            <text:p>0.0707</text:p>
          </table:table-cell>
          <table:table-cell office:value-type="float" office:value="9.8592" calcext:value-type="float">
            <text:p>9.8592</text:p>
          </table:table-cell>
          <table:table-cell office:value-type="float" office:value="-0.1408" calcext:value-type="float">
            <text:p>-0.1408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-0.0702" calcext:value-type="float">
            <text:p>-0.070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9.9445" calcext:value-type="float">
            <text:p>9.9445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0.0257" calcext:value-type="float">
            <text:p>0.0257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-0.1256" calcext:value-type="float">
            <text:p>-0.125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0.0257" calcext:value-type="float">
            <text:p>0.0257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-0.1256" calcext:value-type="float">
            <text:p>-0.1256</text:p>
          </table:table-cell>
          <table:table-cell office:value-type="float" office:value="10.0923" calcext:value-type="float">
            <text:p>10.0923</text:p>
          </table:table-cell>
          <table:table-cell office:value-type="float" office:value="0.0923" calcext:value-type="float">
            <text:p>0.092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242" calcext:value-type="float">
            <text:p>0.0242</text:p>
          </table:table-cell>
          <table:table-cell office:value-type="float" office:value="-0.2218" calcext:value-type="float">
            <text:p>-0.2218</text:p>
          </table:table-cell>
          <table:table-cell office:value-type="float" office:value="-0.0333" calcext:value-type="float">
            <text:p>-0.033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242" calcext:value-type="float">
            <text:p>0.0242</text:p>
          </table:table-cell>
          <table:table-cell office:value-type="float" office:value="-0.2218" calcext:value-type="float">
            <text:p>-0.2218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10.1273" calcext:value-type="float">
            <text:p>10.1273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094" calcext:value-type="float">
            <text:p>0.09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094" calcext:value-type="float">
            <text:p>0.094</text:p>
          </table:table-cell>
          <table:table-cell office:value-type="float" office:value="10.0065" calcext:value-type="float">
            <text:p>10.0065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941" calcext:value-type="float">
            <text:p>-0.0941</text:p>
          </table:table-cell>
          <table:table-cell office:value-type="float" office:value="0.1005" calcext:value-type="float">
            <text:p>0.100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941" calcext:value-type="float">
            <text:p>-0.0941</text:p>
          </table:table-cell>
          <table:table-cell office:value-type="float" office:value="0.1005" calcext:value-type="float">
            <text:p>0.1005</text:p>
          </table:table-cell>
          <table:table-cell office:value-type="float" office:value="9.896" calcext:value-type="float">
            <text:p>9.896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-0.0035" calcext:value-type="float">
            <text:p>-0.003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9.9023" calcext:value-type="float">
            <text:p>9.9023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0979" calcext:value-type="float">
            <text:p>-0.0979</text:p>
          </table:table-cell>
          <table:table-cell office:value-type="float" office:value="-0.1012" calcext:value-type="float">
            <text:p>-0.101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0979" calcext:value-type="float">
            <text:p>-0.0979</text:p>
          </table:table-cell>
          <table:table-cell office:value-type="float" office:value="-0.1012" calcext:value-type="float">
            <text:p>-0.1012</text:p>
          </table:table-cell>
          <table:table-cell office:value-type="float" office:value="10.018" calcext:value-type="float">
            <text:p>10.01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1901" calcext:value-type="float">
            <text:p>-0.1901</text:p>
          </table:table-cell>
          <table:table-cell office:value-type="float" office:value="-0.0831" calcext:value-type="float">
            <text:p>-0.083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1901" calcext:value-type="float">
            <text:p>-0.1901</text:p>
          </table:table-cell>
          <table:table-cell office:value-type="float" office:value="-0.0831" calcext:value-type="float">
            <text:p>-0.0831</text:p>
          </table:table-cell>
          <table:table-cell office:value-type="float" office:value="10.1192" calcext:value-type="float">
            <text:p>10.1192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2137" calcext:value-type="float">
            <text:p>-0.2137</text:p>
          </table:table-cell>
          <table:table-cell office:value-type="float" office:value="0.036" calcext:value-type="float">
            <text:p>0.03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2137" calcext:value-type="float">
            <text:p>-0.2137</text:p>
          </table:table-cell>
          <table:table-cell office:value-type="float" office:value="0.036" calcext:value-type="float">
            <text:p>0.036</text:p>
          </table:table-cell>
          <table:table-cell office:value-type="float" office:value="10.0638" calcext:value-type="float">
            <text:p>10.0638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-0.1458" calcext:value-type="float">
            <text:p>-0.1458</text:p>
          </table:table-cell>
          <table:table-cell office:value-type="float" office:value="0.0998" calcext:value-type="float">
            <text:p>0.099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-0.1458" calcext:value-type="float">
            <text:p>-0.1458</text:p>
          </table:table-cell>
          <table:table-cell office:value-type="float" office:value="0.0998" calcext:value-type="float">
            <text:p>0.0998</text:p>
          </table:table-cell>
          <table:table-cell office:value-type="float" office:value="9.9482" calcext:value-type="float">
            <text:p>9.9482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719" calcext:value-type="float">
            <text:p>-0.0719</text:p>
          </table:table-cell>
          <table:table-cell office:value-type="float" office:value="0.048" calcext:value-type="float">
            <text:p>0.04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719" calcext:value-type="float">
            <text:p>-0.0719</text:p>
          </table:table-cell>
          <table:table-cell office:value-type="float" office:value="0.048" calcext:value-type="float">
            <text:p>0.048</text:p>
          </table:table-cell>
          <table:table-cell office:value-type="float" office:value="9.8978" calcext:value-type="float">
            <text:p>9.8978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542" calcext:value-type="float">
            <text:p>-0.054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9.9623" calcext:value-type="float">
            <text:p>9.9623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1481" calcext:value-type="float">
            <text:p>-0.1481</text:p>
          </table:table-cell>
          <table:table-cell office:value-type="float" office:value="-0.092" calcext:value-type="float">
            <text:p>-0.09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1481" calcext:value-type="float">
            <text:p>-0.1481</text:p>
          </table:table-cell>
          <table:table-cell office:value-type="float" office:value="-0.092" calcext:value-type="float">
            <text:p>-0.092</text:p>
          </table:table-cell>
          <table:table-cell office:value-type="float" office:value="10.073" calcext:value-type="float">
            <text:p>10.073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2036" calcext:value-type="float">
            <text:p>-0.2036</text:p>
          </table:table-cell>
          <table:table-cell office:value-type="float" office:value="-0.019" calcext:value-type="float">
            <text:p>-0.01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2036" calcext:value-type="float">
            <text:p>-0.2036</text:p>
          </table:table-cell>
          <table:table-cell office:value-type="float" office:value="-0.019" calcext:value-type="float">
            <text:p>-0.019</text:p>
          </table:table-cell>
          <table:table-cell office:value-type="float" office:value="10.091" calcext:value-type="float">
            <text:p>10.09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2" calcext:value-type="float">
            <text:p>0.003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1771" calcext:value-type="float">
            <text:p>-0.1771</text:p>
          </table:table-cell>
          <table:table-cell office:value-type="float" office:value="0.072" calcext:value-type="float">
            <text:p>0.07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0032" calcext:value-type="float">
            <text:p>0.003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1771" calcext:value-type="float">
            <text:p>-0.1771</text:p>
          </table:table-cell>
          <table:table-cell office:value-type="float" office:value="0.072" calcext:value-type="float">
            <text:p>0.072</text:p>
          </table:table-cell>
          <table:table-cell office:value-type="float" office:value="9.9997" calcext:value-type="float">
            <text:p>9.9997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052" calcext:value-type="float">
            <text:p>-0.1052</text:p>
          </table:table-cell>
          <table:table-cell office:value-type="float" office:value="0.0718" calcext:value-type="float">
            <text:p>0.071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052" calcext:value-type="float">
            <text:p>-0.1052</text:p>
          </table:table-cell>
          <table:table-cell office:value-type="float" office:value="0.0718" calcext:value-type="float">
            <text:p>0.0718</text:p>
          </table:table-cell>
          <table:table-cell office:value-type="float" office:value="9.9212" calcext:value-type="float">
            <text:p>9.9212</text:p>
          </table:table-cell>
          <table:table-cell office:value-type="float" office:value="-0.0788" calcext:value-type="float">
            <text:p>-0.0788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728" calcext:value-type="float">
            <text:p>-0.0728</text:p>
          </table:table-cell>
          <table:table-cell office:value-type="float" office:value="-0.007" calcext:value-type="float">
            <text:p>-0.00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728" calcext:value-type="float">
            <text:p>-0.0728</text:p>
          </table:table-cell>
          <table:table-cell office:value-type="float" office:value="-0.007" calcext:value-type="float">
            <text:p>-0.007</text:p>
          </table:table-cell>
          <table:table-cell office:value-type="float" office:value="9.9314" calcext:value-type="float">
            <text:p>9.9314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141" calcext:value-type="float">
            <text:p>-0.1141</text:p>
          </table:table-cell>
          <table:table-cell office:value-type="float" office:value="-0.0756" calcext:value-type="float">
            <text:p>-0.0756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141" calcext:value-type="float">
            <text:p>-0.1141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10.0183" calcext:value-type="float">
            <text:p>10.0183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-0.0572" calcext:value-type="float">
            <text:p>-0.0572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-0.0572" calcext:value-type="float">
            <text:p>-0.0572</text:p>
          </table:table-cell>
          <table:table-cell office:value-type="float" office:value="10.0877" calcext:value-type="float">
            <text:p>10.0877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1939" calcext:value-type="float">
            <text:p>-0.1939</text:p>
          </table:table-cell>
          <table:table-cell office:value-type="float" office:value="0.0305" calcext:value-type="float">
            <text:p>0.030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1939" calcext:value-type="float">
            <text:p>-0.1939</text:p>
          </table:table-cell>
          <table:table-cell office:value-type="float" office:value="0.0305" calcext:value-type="float">
            <text:p>0.0305</text:p>
          </table:table-cell>
          <table:table-cell office:value-type="float" office:value="10.042" calcext:value-type="float">
            <text:p>10.042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-0.1424" calcext:value-type="float">
            <text:p>-0.1424</text:p>
          </table:table-cell>
          <table:table-cell office:value-type="float" office:value="0.0725" calcext:value-type="float">
            <text:p>0.072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-0.1424" calcext:value-type="float">
            <text:p>-0.1424</text:p>
          </table:table-cell>
          <table:table-cell office:value-type="float" office:value="0.0725" calcext:value-type="float">
            <text:p>0.0725</text:p>
          </table:table-cell>
          <table:table-cell office:value-type="float" office:value="9.9589" calcext:value-type="float">
            <text:p>9.9589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0905" calcext:value-type="float">
            <text:p>-0.0905</text:p>
          </table:table-cell>
          <table:table-cell office:value-type="float" office:value="0.0314" calcext:value-type="float">
            <text:p>0.031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0905" calcext:value-type="float">
            <text:p>-0.0905</text:p>
          </table:table-cell>
          <table:table-cell office:value-type="float" office:value="0.0314" calcext:value-type="float">
            <text:p>0.0314</text:p>
          </table:table-cell>
          <table:table-cell office:value-type="float" office:value="9.9256" calcext:value-type="float">
            <text:p>9.9256</text:p>
          </table:table-cell>
          <table:table-cell office:value-type="float" office:value="-0.0744" calcext:value-type="float">
            <text:p>-0.0744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963" calcext:value-type="float">
            <text:p>-0.0963</text:p>
          </table:table-cell>
          <table:table-cell office:value-type="float" office:value="-0.043" calcext:value-type="float">
            <text:p>-0.04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963" calcext:value-type="float">
            <text:p>-0.0963</text:p>
          </table:table-cell>
          <table:table-cell office:value-type="float" office:value="-0.043" calcext:value-type="float">
            <text:p>-0.043</text:p>
          </table:table-cell>
          <table:table-cell office:value-type="float" office:value="9.9765" calcext:value-type="float">
            <text:p>9.976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1511" calcext:value-type="float">
            <text:p>-0.1511</text:p>
          </table:table-cell>
          <table:table-cell office:value-type="float" office:value="-0.0665" calcext:value-type="float">
            <text:p>-0.066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1511" calcext:value-type="float">
            <text:p>-0.1511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10.0566" calcext:value-type="float">
            <text:p>10.0566</text:p>
          </table:table-cell>
          <table:table-cell office:value-type="float" office:value="0.0566" calcext:value-type="float">
            <text:p>0.0566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0118" calcext:value-type="float">
            <text:p>0.0118</text:p>
          </table:table-cell>
          <table:table-cell office:value-type="float" office:value="-0.1893" calcext:value-type="float">
            <text:p>-0.1893</text:p>
          </table:table-cell>
          <table:table-cell office:value-type="float" office:value="-0.0099" calcext:value-type="float">
            <text:p>-0.009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0118" calcext:value-type="float">
            <text:p>0.0118</text:p>
          </table:table-cell>
          <table:table-cell office:value-type="float" office:value="-0.1893" calcext:value-type="float">
            <text:p>-0.1893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10.0648" calcext:value-type="float">
            <text:p>10.0648</text:p>
          </table:table-cell>
          <table:table-cell office:value-type="float" office:value="0.0648" calcext:value-type="float">
            <text:p>0.0648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549" calcext:value-type="float">
            <text:p>0.054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549" calcext:value-type="float">
            <text:p>0.0549</text:p>
          </table:table-cell>
          <table:table-cell office:value-type="float" office:value="9.9966" calcext:value-type="float">
            <text:p>9.9966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137" calcext:value-type="float">
            <text:p>-0.1137</text:p>
          </table:table-cell>
          <table:table-cell office:value-type="float" office:value="0.0514" calcext:value-type="float">
            <text:p>0.051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137" calcext:value-type="float">
            <text:p>-0.1137</text:p>
          </table:table-cell>
          <table:table-cell office:value-type="float" office:value="0.0514" calcext:value-type="float">
            <text:p>0.0514</text:p>
          </table:table-cell>
          <table:table-cell office:value-type="float" office:value="9.9402" calcext:value-type="float">
            <text:p>9.9402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-0.0921" calcext:value-type="float">
            <text:p>-0.0921</text:p>
          </table:table-cell>
          <table:table-cell office:value-type="float" office:value="-0.0083" calcext:value-type="float">
            <text:p>-0.008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-0.0921" calcext:value-type="float">
            <text:p>-0.0921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9.9516" calcext:value-type="float">
            <text:p>9.9516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1247" calcext:value-type="float">
            <text:p>-0.1247</text:p>
          </table:table-cell>
          <table:table-cell office:value-type="float" office:value="-0.0568" calcext:value-type="float">
            <text:p>-0.056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1247" calcext:value-type="float">
            <text:p>-0.1247</text:p>
          </table:table-cell>
          <table:table-cell office:value-type="float" office:value="-0.0568" calcext:value-type="float">
            <text:p>-0.0568</text:p>
          </table:table-cell>
          <table:table-cell office:value-type="float" office:value="10.0168" calcext:value-type="float">
            <text:p>10.0168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0399" calcext:value-type="float">
            <text:p>-0.0399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10.0649" calcext:value-type="float">
            <text:p>10.0649</text:p>
          </table:table-cell>
          <table:table-cell office:value-type="float" office:value="0.0649" calcext:value-type="float">
            <text:p>0.064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31" calcext:value-type="float">
            <text:p>0.0031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0.025" calcext:value-type="float">
            <text:p>0.025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31" calcext:value-type="float">
            <text:p>0.0031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0.025" calcext:value-type="float">
            <text:p>0.025</text:p>
          </table:table-cell>
          <table:table-cell office:value-type="float" office:value="10.028" calcext:value-type="float">
            <text:p>10.028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1415" calcext:value-type="float">
            <text:p>-0.1415</text:p>
          </table:table-cell>
          <table:table-cell office:value-type="float" office:value="0.053" calcext:value-type="float">
            <text:p>0.05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1415" calcext:value-type="float">
            <text:p>-0.1415</text:p>
          </table:table-cell>
          <table:table-cell office:value-type="float" office:value="0.053" calcext:value-type="float">
            <text:p>0.053</text:p>
          </table:table-cell>
          <table:table-cell office:value-type="float" office:value="9.9678" calcext:value-type="float">
            <text:p>9.9678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1045" calcext:value-type="float">
            <text:p>-0.1045</text:p>
          </table:table-cell>
          <table:table-cell office:value-type="float" office:value="0.0208" calcext:value-type="float">
            <text:p>0.020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1045" calcext:value-type="float">
            <text:p>-0.1045</text:p>
          </table:table-cell>
          <table:table-cell office:value-type="float" office:value="0.0208" calcext:value-type="float">
            <text:p>0.0208</text:p>
          </table:table-cell>
          <table:table-cell office:value-type="float" office:value="9.9455" calcext:value-type="float">
            <text:p>9.9455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337" calcext:value-type="float">
            <text:p>-0.033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9.9853" calcext:value-type="float">
            <text:p>9.9853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0484" calcext:value-type="float">
            <text:p>-0.0484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10.0436" calcext:value-type="float">
            <text:p>10.0436</text:p>
          </table:table-cell>
          <table:table-cell office:value-type="float" office:value="0.0436" calcext:value-type="float">
            <text:p>0.043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-0.0048" calcext:value-type="float">
            <text:p>-0.0048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10.0465" calcext:value-type="float">
            <text:p>10.0465</text:p>
          </table:table-cell>
          <table:table-cell office:value-type="float" office:value="0.0465" calcext:value-type="float">
            <text:p>0.0465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602" calcext:value-type="float">
            <text:p>-0.1602</text:p>
          </table:table-cell>
          <table:table-cell office:value-type="float" office:value="0.0417" calcext:value-type="float">
            <text:p>0.041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602" calcext:value-type="float">
            <text:p>-0.1602</text:p>
          </table:table-cell>
          <table:table-cell office:value-type="float" office:value="0.0417" calcext:value-type="float">
            <text:p>0.0417</text:p>
          </table:table-cell>
          <table:table-cell office:value-type="float" office:value="9.9956" calcext:value-type="float">
            <text:p>9.9956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207" calcext:value-type="float">
            <text:p>-0.1207</text:p>
          </table:table-cell>
          <table:table-cell office:value-type="float" office:value="0.0373" calcext:value-type="float">
            <text:p>0.0373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207" calcext:value-type="float">
            <text:p>-0.1207</text:p>
          </table:table-cell>
          <table:table-cell office:value-type="float" office:value="0.0373" calcext:value-type="float">
            <text:p>0.0373</text:p>
          </table:table-cell>
          <table:table-cell office:value-type="float" office:value="9.9546" calcext:value-type="float">
            <text:p>9.9546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1061" calcext:value-type="float">
            <text:p>-0.1061</text:p>
          </table:table-cell>
          <table:table-cell office:value-type="float" office:value="-0.0081" calcext:value-type="float">
            <text:p>-0.0081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1061" calcext:value-type="float">
            <text:p>-0.106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9.9653" calcext:value-type="float">
            <text:p>9.9653</text:p>
          </table:table-cell>
          <table:table-cell office:value-type="float" office:value="-0.0347" calcext:value-type="float">
            <text:p>-0.0347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062" calcext:value-type="float">
            <text:p>0.0062</text:p>
          </table:table-cell>
          <table:table-cell office:value-type="float" office:value="-0.1315" calcext:value-type="float">
            <text:p>-0.1315</text:p>
          </table:table-cell>
          <table:table-cell office:value-type="float" office:value="-0.0427" calcext:value-type="float">
            <text:p>-0.0427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062" calcext:value-type="float">
            <text:p>0.0062</text:p>
          </table:table-cell>
          <table:table-cell office:value-type="float" office:value="-0.1315" calcext:value-type="float">
            <text:p>-0.1315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10.0144" calcext:value-type="float">
            <text:p>10.0144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0.0099" calcext:value-type="float">
            <text:p>0.0099</text:p>
          </table:table-cell>
          <table:table-cell office:value-type="float" office:value="-0.1671" calcext:value-type="float">
            <text:p>-0.1671</text:p>
          </table:table-cell>
          <table:table-cell office:value-type="float" office:value="-0.0284" calcext:value-type="float">
            <text:p>-0.028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73" calcext:value-type="float">
            <text:p>0.6673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3576" calcext:value-type="float">
            <text:p>-0.3576</text:p>
          </table:table-cell>
          <table:table-cell office:value-type="float" office:value="0.5128" calcext:value-type="float">
            <text:p>0.5128</text:p>
          </table:table-cell>
          <table:table-cell office:value-type="float" office:value="10.1194" calcext:value-type="float">
            <text:p>10.1194</text:p>
          </table:table-cell>
          <table:table-cell office:value-type="float" office:value="0.1194" calcext:value-type="float">
            <text:p>0.1194</text:p>
          </table:table-cell>
          <table:table-cell office:value-type="float" office:value="-0.2044" calcext:value-type="float">
            <text:p>-0.2044</text:p>
          </table:table-cell>
          <table:table-cell office:value-type="float" office:value="-0.944" calcext:value-type="float">
            <text:p>-0.944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6321" calcext:value-type="float">
            <text:p>0.6321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-0.2044" calcext:value-type="float">
            <text:p>-0.2044</text:p>
          </table:table-cell>
          <table:table-cell office:value-type="float" office:value="-0.944" calcext:value-type="float">
            <text:p>-0.944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6321" calcext:value-type="float">
            <text:p>0.6321</text:p>
          </table:table-cell>
          <table:table-cell office:value-type="float" office:value="8.9226" calcext:value-type="float">
            <text:p>8.9226</text:p>
          </table:table-cell>
          <table:table-cell office:value-type="float" office:value="-1.0774" calcext:value-type="float">
            <text:p>-1.0774</text:p>
          </table:table-cell>
          <table:table-cell office:value-type="float" office:value="-0.8914" calcext:value-type="float">
            <text:p>-0.8914</text:p>
          </table:table-cell>
          <table:table-cell office:value-type="float" office:value="-0.322" calcext:value-type="float">
            <text:p>-0.322</text:p>
          </table:table-cell>
          <table:table-cell office:value-type="float" office:value="0.3083" calcext:value-type="float">
            <text:p>0.3083</text:p>
          </table:table-cell>
          <table:table-cell office:value-type="float" office:value="-0.4452" calcext:value-type="float">
            <text:p>-0.445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.8914" calcext:value-type="float">
            <text:p>-0.8914</text:p>
          </table:table-cell>
          <table:table-cell office:value-type="float" office:value="-0.322" calcext:value-type="float">
            <text:p>-0.322</text:p>
          </table:table-cell>
          <table:table-cell office:value-type="float" office:value="0.3083" calcext:value-type="float">
            <text:p>0.3083</text:p>
          </table:table-cell>
          <table:table-cell office:value-type="float" office:value="-0.4452" calcext:value-type="float">
            <text:p>-0.4452</text:p>
          </table:table-cell>
          <table:table-cell office:value-type="float" office:value="9.2945" calcext:value-type="float">
            <text:p>9.2945</text:p>
          </table:table-cell>
          <table:table-cell office:value-type="float" office:value="-0.7055" calcext:value-type="float">
            <text:p>-0.7055</text:p>
          </table:table-cell>
          <table:table-cell office:value-type="float" office:value="-0.7434" calcext:value-type="float">
            <text:p>-0.7434</text:p>
          </table:table-cell>
          <table:table-cell office:value-type="float" office:value="0.5969" calcext:value-type="float">
            <text:p>0.5969</text:p>
          </table:table-cell>
          <table:table-cell office:value-type="float" office:value="-0.4897" calcext:value-type="float">
            <text:p>-0.4897</text:p>
          </table:table-cell>
          <table:table-cell office:value-type="float" office:value="-1.1507" calcext:value-type="float">
            <text:p>-1.150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0.7434" calcext:value-type="float">
            <text:p>-0.7434</text:p>
          </table:table-cell>
          <table:table-cell office:value-type="float" office:value="0.5969" calcext:value-type="float">
            <text:p>0.5969</text:p>
          </table:table-cell>
          <table:table-cell office:value-type="float" office:value="-0.4897" calcext:value-type="float">
            <text:p>-0.4897</text:p>
          </table:table-cell>
          <table:table-cell office:value-type="float" office:value="-1.1507" calcext:value-type="float">
            <text:p>-1.1507</text:p>
          </table:table-cell>
          <table:table-cell office:value-type="float" office:value="11.1812" calcext:value-type="float">
            <text:p>11.1812</text:p>
          </table:table-cell>
          <table:table-cell office:value-type="float" office:value="1.1812" calcext:value-type="float">
            <text:p>1.181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907" calcext:value-type="float">
            <text:p>0.907</text:p>
          </table:table-cell>
          <table:table-cell office:value-type="float" office:value="-1.0499" calcext:value-type="float">
            <text:p>-1.0499</text:p>
          </table:table-cell>
          <table:table-cell office:value-type="float" office:value="0.0304" calcext:value-type="float">
            <text:p>0.030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907" calcext:value-type="float">
            <text:p>0.907</text:p>
          </table:table-cell>
          <table:table-cell office:value-type="float" office:value="-1.0499" calcext:value-type="float">
            <text:p>-1.0499</text:p>
          </table:table-cell>
          <table:table-cell office:value-type="float" office:value="0.0304" calcext:value-type="float">
            <text:p>0.0304</text:p>
          </table:table-cell>
          <table:table-cell office:value-type="float" office:value="11.3606" calcext:value-type="float">
            <text:p>11.3606</text:p>
          </table:table-cell>
          <table:table-cell office:value-type="float" office:value="1.3606" calcext:value-type="float">
            <text:p>1.360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3485" calcext:value-type="float">
            <text:p>0.3485</text:p>
          </table:table-cell>
          <table:table-cell office:value-type="float" office:value="-0.3391" calcext:value-type="float">
            <text:p>-0.3391</text:p>
          </table:table-cell>
          <table:table-cell office:value-type="float" office:value="1.391" calcext:value-type="float">
            <text:p>1.39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3485" calcext:value-type="float">
            <text:p>0.3485</text:p>
          </table:table-cell>
          <table:table-cell office:value-type="float" office:value="-0.3391" calcext:value-type="float">
            <text:p>-0.3391</text:p>
          </table:table-cell>
          <table:table-cell office:value-type="float" office:value="1.391" calcext:value-type="float">
            <text:p>1.391</text:p>
          </table:table-cell>
          <table:table-cell office:value-type="float" office:value="9.0968" calcext:value-type="float">
            <text:p>9.0968</text:p>
          </table:table-cell>
          <table:table-cell office:value-type="float" office:value="-0.9032" calcext:value-type="float">
            <text:p>-0.9032</text:p>
          </table:table-cell>
          <table:table-cell office:value-type="float" office:value="0.6969" calcext:value-type="float">
            <text:p>0.6969</text:p>
          </table:table-cell>
          <table:table-cell office:value-type="float" office:value="-0.4745" calcext:value-type="float">
            <text:p>-0.4745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878" calcext:value-type="float">
            <text:p>0.487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969" calcext:value-type="float">
            <text:p>0.6969</text:p>
          </table:table-cell>
          <table:table-cell office:value-type="float" office:value="-0.4745" calcext:value-type="float">
            <text:p>-0.4745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878" calcext:value-type="float">
            <text:p>0.4878</text:p>
          </table:table-cell>
          <table:table-cell office:value-type="float" office:value="9.6876" calcext:value-type="float">
            <text:p>9.6876</text:p>
          </table:table-cell>
          <table:table-cell office:value-type="float" office:value="-0.3124" calcext:value-type="float">
            <text:p>-0.3124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7916" calcext:value-type="float">
            <text:p>-0.7916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1754" calcext:value-type="float">
            <text:p>0.175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7916" calcext:value-type="float">
            <text:p>-0.7916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1754" calcext:value-type="float">
            <text:p>0.1754</text:p>
          </table:table-cell>
          <table:table-cell office:value-type="float" office:value="8.7253" calcext:value-type="float">
            <text:p>8.7253</text:p>
          </table:table-cell>
          <table:table-cell office:value-type="float" office:value="-1.2747" calcext:value-type="float">
            <text:p>-1.2747</text:p>
          </table:table-cell>
          <table:table-cell office:value-type="float" office:value="-0.6203" calcext:value-type="float">
            <text:p>-0.620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47" calcext:value-type="float">
            <text:p>0.47</text:p>
          </table:table-cell>
          <table:table-cell office:value-type="float" office:value="-1.0993" calcext:value-type="float">
            <text:p>-1.099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0.6203" calcext:value-type="float">
            <text:p>-0.620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47" calcext:value-type="float">
            <text:p>0.47</text:p>
          </table:table-cell>
          <table:table-cell office:value-type="float" office:value="-1.0993" calcext:value-type="float">
            <text:p>-1.0993</text:p>
          </table:table-cell>
          <table:table-cell office:value-type="float" office:value="10.226" calcext:value-type="float">
            <text:p>10.226</text:p>
          </table:table-cell>
          <table:table-cell office:value-type="float" office:value="0.226" calcext:value-type="float">
            <text:p>0.226</text:p>
          </table:table-cell>
          <table:table-cell office:value-type="float" office:value="-0.6265" calcext:value-type="float">
            <text:p>-0.6265</text:p>
          </table:table-cell>
          <table:table-cell office:value-type="float" office:value="0.3625" calcext:value-type="float">
            <text:p>0.3625</text:p>
          </table:table-cell>
          <table:table-cell office:value-type="float" office:value="-0.5163" calcext:value-type="float">
            <text:p>-0.5163</text:p>
          </table:table-cell>
          <table:table-cell office:value-type="float" office:value="-0.8732" calcext:value-type="float">
            <text:p>-0.873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0.6265" calcext:value-type="float">
            <text:p>-0.6265</text:p>
          </table:table-cell>
          <table:table-cell office:value-type="float" office:value="0.3625" calcext:value-type="float">
            <text:p>0.3625</text:p>
          </table:table-cell>
          <table:table-cell office:value-type="float" office:value="-0.5163" calcext:value-type="float">
            <text:p>-0.5163</text:p>
          </table:table-cell>
          <table:table-cell office:value-type="float" office:value="-0.8732" calcext:value-type="float">
            <text:p>-0.8732</text:p>
          </table:table-cell>
          <table:table-cell office:value-type="float" office:value="10.8682" calcext:value-type="float">
            <text:p>10.8682</text:p>
          </table:table-cell>
          <table:table-cell office:value-type="float" office:value="0.8682" calcext:value-type="float">
            <text:p>0.8682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9554" calcext:value-type="float">
            <text:p>-0.9554</text:p>
          </table:table-cell>
          <table:table-cell office:value-type="float" office:value="-0.005" calcext:value-type="float">
            <text:p>-0.00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9554" calcext:value-type="float">
            <text:p>-0.9554</text:p>
          </table:table-cell>
          <table:table-cell office:value-type="float" office:value="-0.005" calcext:value-type="float">
            <text:p>-0.005</text:p>
          </table:table-cell>
          <table:table-cell office:value-type="float" office:value="11.0163" calcext:value-type="float">
            <text:p>11.0163</text:p>
          </table:table-cell>
          <table:table-cell office:value-type="float" office:value="1.0163" calcext:value-type="float">
            <text:p>1.0163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3441" calcext:value-type="float">
            <text:p>0.3441</text:p>
          </table:table-cell>
          <table:table-cell office:value-type="float" office:value="-0.4523" calcext:value-type="float">
            <text:p>-0.4523</text:p>
          </table:table-cell>
          <table:table-cell office:value-type="float" office:value="1.0113" calcext:value-type="float">
            <text:p>1.011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3441" calcext:value-type="float">
            <text:p>0.3441</text:p>
          </table:table-cell>
          <table:table-cell office:value-type="float" office:value="-0.4523" calcext:value-type="float">
            <text:p>-0.4523</text:p>
          </table:table-cell>
          <table:table-cell office:value-type="float" office:value="1.0113" calcext:value-type="float">
            <text:p>1.0113</text:p>
          </table:table-cell>
          <table:table-cell office:value-type="float" office:value="9.7273" calcext:value-type="float">
            <text:p>9.7273</text:p>
          </table:table-cell>
          <table:table-cell office:value-type="float" office:value="-0.2727" calcext:value-type="float">
            <text:p>-0.2727</text:p>
          </table:table-cell>
          <table:table-cell office:value-type="float" office:value="0.5455" calcext:value-type="float">
            <text:p>0.5455</text:p>
          </table:table-cell>
          <table:table-cell office:value-type="float" office:value="-0.2665" calcext:value-type="float">
            <text:p>-0.2665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7386" calcext:value-type="float">
            <text:p>0.738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5455" calcext:value-type="float">
            <text:p>0.5455</text:p>
          </table:table-cell>
          <table:table-cell office:value-type="float" office:value="-0.2665" calcext:value-type="float">
            <text:p>-0.2665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7386" calcext:value-type="float">
            <text:p>0.7386</text:p>
          </table:table-cell>
          <table:table-cell office:value-type="float" office:value="9.4294" calcext:value-type="float">
            <text:p>9.4294</text:p>
          </table:table-cell>
          <table:table-cell office:value-type="float" office:value="-0.5706" calcext:value-type="float">
            <text:p>-0.5706</text:p>
          </table:table-cell>
          <table:table-cell office:value-type="float" office:value="0.0948" calcext:value-type="float">
            <text:p>0.0948</text:p>
          </table:table-cell>
          <table:table-cell office:value-type="float" office:value="-0.5667" calcext:value-type="float">
            <text:p>-0.5667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168" calcext:value-type="float">
            <text:p>0.16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948" calcext:value-type="float">
            <text:p>0.0948</text:p>
          </table:table-cell>
          <table:table-cell office:value-type="float" office:value="-0.5667" calcext:value-type="float">
            <text:p>-0.5667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168" calcext:value-type="float">
            <text:p>0.168</text:p>
          </table:table-cell>
          <table:table-cell office:value-type="float" office:value="9.0265" calcext:value-type="float">
            <text:p>9.0265</text:p>
          </table:table-cell>
          <table:table-cell office:value-type="float" office:value="-0.9735" calcext:value-type="float">
            <text:p>-0.9735</text:p>
          </table:table-cell>
          <table:table-cell office:value-type="float" office:value="-0.3862" calcext:value-type="float">
            <text:p>-0.3862</text:p>
          </table:table-cell>
          <table:table-cell office:value-type="float" office:value="-0.3159" calcext:value-type="float">
            <text:p>-0.3159</text:p>
          </table:table-cell>
          <table:table-cell office:value-type="float" office:value="0.5573" calcext:value-type="float">
            <text:p>0.5573</text:p>
          </table:table-cell>
          <table:table-cell office:value-type="float" office:value="-0.8055" calcext:value-type="float">
            <text:p>-0.805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0.3862" calcext:value-type="float">
            <text:p>-0.3862</text:p>
          </table:table-cell>
          <table:table-cell office:value-type="float" office:value="-0.3159" calcext:value-type="float">
            <text:p>-0.3159</text:p>
          </table:table-cell>
          <table:table-cell office:value-type="float" office:value="0.5573" calcext:value-type="float">
            <text:p>0.5573</text:p>
          </table:table-cell>
          <table:table-cell office:value-type="float" office:value="-0.8055" calcext:value-type="float">
            <text:p>-0.8055</text:p>
          </table:table-cell>
          <table:table-cell office:value-type="float" office:value="9.9364" calcext:value-type="float">
            <text:p>9.9364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-0.4562" calcext:value-type="float">
            <text:p>-0.4562</text:p>
          </table:table-cell>
          <table:table-cell office:value-type="float" office:value="0.1973" calcext:value-type="float">
            <text:p>0.1973</text:p>
          </table:table-cell>
          <table:table-cell office:value-type="float" office:value="-0.28" calcext:value-type="float">
            <text:p>-0.28</text:p>
          </table:table-cell>
          <table:table-cell office:value-type="float" office:value="-0.8692" calcext:value-type="float">
            <text:p>-0.869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0.4562" calcext:value-type="float">
            <text:p>-0.4562</text:p>
          </table:table-cell>
          <table:table-cell office:value-type="float" office:value="0.1973" calcext:value-type="float">
            <text:p>0.1973</text:p>
          </table:table-cell>
          <table:table-cell office:value-type="float" office:value="-0.28" calcext:value-type="float">
            <text:p>-0.28</text:p>
          </table:table-cell>
          <table:table-cell office:value-type="float" office:value="-0.8692" calcext:value-type="float">
            <text:p>-0.8692</text:p>
          </table:table-cell>
          <table:table-cell office:value-type="float" office:value="10.7763" calcext:value-type="float">
            <text:p>10.7763</text:p>
          </table:table-cell>
          <table:table-cell office:value-type="float" office:value="0.7763" calcext:value-type="float">
            <text:p>0.7763</text:p>
          </table:table-cell>
          <table:table-cell office:value-type="float" office:value="-0.0992" calcext:value-type="float">
            <text:p>-0.0992</text:p>
          </table:table-cell>
          <table:table-cell office:value-type="float" office:value="0.4665" calcext:value-type="float">
            <text:p>0.4665</text:p>
          </table:table-cell>
          <table:table-cell office:value-type="float" office:value="-0.761" calcext:value-type="float">
            <text:p>-0.761</text:p>
          </table:table-cell>
          <table:table-cell office:value-type="float" office:value="-0.0928" calcext:value-type="float">
            <text:p>-0.092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0.0992" calcext:value-type="float">
            <text:p>-0.0992</text:p>
          </table:table-cell>
          <table:table-cell office:value-type="float" office:value="0.4665" calcext:value-type="float">
            <text:p>0.4665</text:p>
          </table:table-cell>
          <table:table-cell office:value-type="float" office:value="-0.761" calcext:value-type="float">
            <text:p>-0.761</text:p>
          </table:table-cell>
          <table:table-cell office:value-type="float" office:value="-0.0928" calcext:value-type="float">
            <text:p>-0.0928</text:p>
          </table:table-cell>
          <table:table-cell office:value-type="float" office:value="10.7519" calcext:value-type="float">
            <text:p>10.7519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5" calcext:value-type="float">
            <text:p>0.2745</text:p>
          </table:table-cell>
          <table:table-cell office:value-type="float" office:value="-0.4779" calcext:value-type="float">
            <text:p>-0.4779</text:p>
          </table:table-cell>
          <table:table-cell office:value-type="float" office:value="0.6591" calcext:value-type="float">
            <text:p>0.659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5" calcext:value-type="float">
            <text:p>0.2745</text:p>
          </table:table-cell>
          <table:table-cell office:value-type="float" office:value="-0.4779" calcext:value-type="float">
            <text:p>-0.4779</text:p>
          </table:table-cell>
          <table:table-cell office:value-type="float" office:value="0.6591" calcext:value-type="float">
            <text:p>0.6591</text:p>
          </table:table-cell>
          <table:table-cell office:value-type="float" office:value="10.2227" calcext:value-type="float">
            <text:p>10.2227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3801" calcext:value-type="float">
            <text:p>0.3801</text:p>
          </table:table-cell>
          <table:table-cell office:value-type="float" office:value="-0.1446" calcext:value-type="float">
            <text:p>-0.1446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8817" calcext:value-type="float">
            <text:p>0.881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3801" calcext:value-type="float">
            <text:p>0.3801</text:p>
          </table:table-cell>
          <table:table-cell office:value-type="float" office:value="-0.1446" calcext:value-type="float">
            <text:p>-0.1446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8817" calcext:value-type="float">
            <text:p>0.8817</text:p>
          </table:table-cell>
          <table:table-cell office:value-type="float" office:value="9.2124" calcext:value-type="float">
            <text:p>9.2124</text:p>
          </table:table-cell>
          <table:table-cell office:value-type="float" office:value="-0.7876" calcext:value-type="float">
            <text:p>-0.7876</text:p>
          </table:table-cell>
          <table:table-cell office:value-type="float" office:value="0.1031" calcext:value-type="float">
            <text:p>0.1031</text:p>
          </table:table-cell>
          <table:table-cell office:value-type="float" office:value="-0.3729" calcext:value-type="float">
            <text:p>-0.3729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0941" calcext:value-type="float">
            <text:p>0.094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1031" calcext:value-type="float">
            <text:p>0.1031</text:p>
          </table:table-cell>
          <table:table-cell office:value-type="float" office:value="-0.3729" calcext:value-type="float">
            <text:p>-0.3729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0941" calcext:value-type="float">
            <text:p>0.0941</text:p>
          </table:table-cell>
          <table:table-cell office:value-type="float" office:value="9.319" calcext:value-type="float">
            <text:p>9.319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2232" calcext:value-type="float">
            <text:p>-0.2232</text:p>
          </table:table-cell>
          <table:table-cell office:value-type="float" office:value="-0.2252" calcext:value-type="float">
            <text:p>-0.2252</text:p>
          </table:table-cell>
          <table:table-cell office:value-type="float" office:value="0.534" calcext:value-type="float">
            <text:p>0.534</text:p>
          </table:table-cell>
          <table:table-cell office:value-type="float" office:value="-0.5869" calcext:value-type="float">
            <text:p>-0.586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0.2232" calcext:value-type="float">
            <text:p>-0.2232</text:p>
          </table:table-cell>
          <table:table-cell office:value-type="float" office:value="-0.2252" calcext:value-type="float">
            <text:p>-0.2252</text:p>
          </table:table-cell>
          <table:table-cell office:value-type="float" office:value="0.534" calcext:value-type="float">
            <text:p>0.534</text:p>
          </table:table-cell>
          <table:table-cell office:value-type="float" office:value="-0.5869" calcext:value-type="float">
            <text:p>-0.5869</text:p>
          </table:table-cell>
          <table:table-cell office:value-type="float" office:value="9.8255" calcext:value-type="float">
            <text:p>9.8255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2912" calcext:value-type="float">
            <text:p>-0.2912</text:p>
          </table:table-cell>
          <table:table-cell office:value-type="float" office:value="0.1076" calcext:value-type="float">
            <text:p>0.1076</text:p>
          </table:table-cell>
          <table:table-cell office:value-type="float" office:value="-0.1402" calcext:value-type="float">
            <text:p>-0.1402</text:p>
          </table:table-cell>
          <table:table-cell office:value-type="float" office:value="-0.7614" calcext:value-type="float">
            <text:p>-0.761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0.2912" calcext:value-type="float">
            <text:p>-0.2912</text:p>
          </table:table-cell>
          <table:table-cell office:value-type="float" office:value="0.1076" calcext:value-type="float">
            <text:p>0.1076</text:p>
          </table:table-cell>
          <table:table-cell office:value-type="float" office:value="-0.1402" calcext:value-type="float">
            <text:p>-0.1402</text:p>
          </table:table-cell>
          <table:table-cell office:value-type="float" office:value="-0.7614" calcext:value-type="float">
            <text:p>-0.7614</text:p>
          </table:table-cell>
          <table:table-cell office:value-type="float" office:value="10.6332" calcext:value-type="float">
            <text:p>10.6332</text:p>
          </table:table-cell>
          <table:table-cell office:value-type="float" office:value="0.6332" calcext:value-type="float">
            <text:p>0.6332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2908" calcext:value-type="float">
            <text:p>0.2908</text:p>
          </table:table-cell>
          <table:table-cell office:value-type="float" office:value="-0.585" calcext:value-type="float">
            <text:p>-0.585</text:p>
          </table:table-cell>
          <table:table-cell office:value-type="float" office:value="-0.1282" calcext:value-type="float">
            <text:p>-0.128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2908" calcext:value-type="float">
            <text:p>0.2908</text:p>
          </table:table-cell>
          <table:table-cell office:value-type="float" office:value="-0.585" calcext:value-type="float">
            <text:p>-0.585</text:p>
          </table:table-cell>
          <table:table-cell office:value-type="float" office:value="-0.1282" calcext:value-type="float">
            <text:p>-0.1282</text:p>
          </table:table-cell>
          <table:table-cell office:value-type="float" office:value="10.5386" calcext:value-type="float">
            <text:p>10.5386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1759" calcext:value-type="float">
            <text:p>0.1759</text:p>
          </table:table-cell>
          <table:table-cell office:value-type="float" office:value="-0.4439" calcext:value-type="float">
            <text:p>-0.4439</text:p>
          </table:table-cell>
          <table:table-cell office:value-type="float" office:value="0.4104" calcext:value-type="float">
            <text:p>0.410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1759" calcext:value-type="float">
            <text:p>0.1759</text:p>
          </table:table-cell>
          <table:table-cell office:value-type="float" office:value="-0.4439" calcext:value-type="float">
            <text:p>-0.4439</text:p>
          </table:table-cell>
          <table:table-cell office:value-type="float" office:value="0.4104" calcext:value-type="float">
            <text:p>0.4104</text:p>
          </table:table-cell>
          <table:table-cell office:value-type="float" office:value="10.2821" calcext:value-type="float">
            <text:p>10.2821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2267" calcext:value-type="float">
            <text:p>0.2267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6925" calcext:value-type="float">
            <text:p>0.692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2267" calcext:value-type="float">
            <text:p>0.2267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6925" calcext:value-type="float">
            <text:p>0.6925</text:p>
          </table:table-cell>
          <table:table-cell office:value-type="float" office:value="9.434" calcext:value-type="float">
            <text:p>9.434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0591" calcext:value-type="float">
            <text:p>0.0591</text:p>
          </table:table-cell>
          <table:table-cell office:value-type="float" office:value="-0.2282" calcext:value-type="float">
            <text:p>-0.2282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1265" calcext:value-type="float">
            <text:p>0.126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591" calcext:value-type="float">
            <text:p>0.0591</text:p>
          </table:table-cell>
          <table:table-cell office:value-type="float" office:value="-0.2282" calcext:value-type="float">
            <text:p>-0.2282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1265" calcext:value-type="float">
            <text:p>0.1265</text:p>
          </table:table-cell>
          <table:table-cell office:value-type="float" office:value="9.4925" calcext:value-type="float">
            <text:p>9.4925</text:p>
          </table:table-cell>
          <table:table-cell office:value-type="float" office:value="-0.5075" calcext:value-type="float">
            <text:p>-0.5075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-0.1312" calcext:value-type="float">
            <text:p>-0.1312</text:p>
          </table:table-cell>
          <table:table-cell office:value-type="float" office:value="0.3899" calcext:value-type="float">
            <text:p>0.3899</text:p>
          </table:table-cell>
          <table:table-cell office:value-type="float" office:value="-0.381" calcext:value-type="float">
            <text:p>-0.38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-0.1312" calcext:value-type="float">
            <text:p>-0.1312</text:p>
          </table:table-cell>
          <table:table-cell office:value-type="float" office:value="0.3899" calcext:value-type="float">
            <text:p>0.3899</text:p>
          </table:table-cell>
          <table:table-cell office:value-type="float" office:value="-0.381" calcext:value-type="float">
            <text:p>-0.381</text:p>
          </table:table-cell>
          <table:table-cell office:value-type="float" office:value="9.7957" calcext:value-type="float">
            <text:p>9.7957</text:p>
          </table:table-cell>
          <table:table-cell office:value-type="float" office:value="-0.2043" calcext:value-type="float">
            <text:p>-0.2043</text:p>
          </table:table-cell>
          <table:table-cell office:value-type="float" office:value="-0.1701" calcext:value-type="float">
            <text:p>-0.1701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-0.5853" calcext:value-type="float">
            <text:p>-0.585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0.1701" calcext:value-type="float">
            <text:p>-0.1701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-0.5853" calcext:value-type="float">
            <text:p>-0.5853</text:p>
          </table:table-cell>
          <table:table-cell office:value-type="float" office:value="10.4585" calcext:value-type="float">
            <text:p>10.4585</text:p>
          </table:table-cell>
          <table:table-cell office:value-type="float" office:value="0.4585" calcext:value-type="float">
            <text:p>0.458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1747" calcext:value-type="float">
            <text:p>0.1747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1268" calcext:value-type="float">
            <text:p>-0.126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1747" calcext:value-type="float">
            <text:p>0.1747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1268" calcext:value-type="float">
            <text:p>-0.1268</text:p>
          </table:table-cell>
          <table:table-cell office:value-type="float" office:value="10.4057" calcext:value-type="float">
            <text:p>10.4057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898" calcext:value-type="float">
            <text:p>0.0898</text:p>
          </table:table-cell>
          <table:table-cell office:value-type="float" office:value="-0.3732" calcext:value-type="float">
            <text:p>-0.3732</text:p>
          </table:table-cell>
          <table:table-cell office:value-type="float" office:value="0.2789" calcext:value-type="float">
            <text:p>0.278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898" calcext:value-type="float">
            <text:p>0.0898</text:p>
          </table:table-cell>
          <table:table-cell office:value-type="float" office:value="-0.3732" calcext:value-type="float">
            <text:p>-0.3732</text:p>
          </table:table-cell>
          <table:table-cell office:value-type="float" office:value="0.2789" calcext:value-type="float">
            <text:p>0.2789</text:p>
          </table:table-cell>
          <table:table-cell office:value-type="float" office:value="10.1866" calcext:value-type="float">
            <text:p>10.186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1185" calcext:value-type="float">
            <text:p>0.1185</text:p>
          </table:table-cell>
          <table:table-cell office:value-type="float" office:value="-0.0698" calcext:value-type="float">
            <text:p>-0.06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655" calcext:value-type="float">
            <text:p>0.465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1185" calcext:value-type="float">
            <text:p>0.1185</text:p>
          </table:table-cell>
          <table:table-cell office:value-type="float" office:value="-0.0698" calcext:value-type="float">
            <text:p>-0.06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655" calcext:value-type="float">
            <text:p>0.4655</text:p>
          </table:table-cell>
          <table:table-cell office:value-type="float" office:value="9.6917" calcext:value-type="float">
            <text:p>9.6917</text:p>
          </table:table-cell>
          <table:table-cell office:value-type="float" office:value="-0.3083" calcext:value-type="float">
            <text:p>-0.308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1368" calcext:value-type="float">
            <text:p>-0.1368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1572" calcext:value-type="float">
            <text:p>0.157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1368" calcext:value-type="float">
            <text:p>-0.1368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1572" calcext:value-type="float">
            <text:p>0.1572</text:p>
          </table:table-cell>
          <table:table-cell office:value-type="float" office:value="9.5743" calcext:value-type="float">
            <text:p>9.5743</text:p>
          </table:table-cell>
          <table:table-cell office:value-type="float" office:value="-0.4257" calcext:value-type="float">
            <text:p>-0.4257</text:p>
          </table:table-cell>
          <table:table-cell office:value-type="float" office:value="-0.0958" calcext:value-type="float">
            <text:p>-0.0958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0.2547" calcext:value-type="float">
            <text:p>0.2547</text:p>
          </table:table-cell>
          <table:table-cell office:value-type="float" office:value="-0.2685" calcext:value-type="float">
            <text:p>-0.268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0.0958" calcext:value-type="float">
            <text:p>-0.0958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0.2547" calcext:value-type="float">
            <text:p>0.2547</text:p>
          </table:table-cell>
          <table:table-cell office:value-type="float" office:value="-0.2685" calcext:value-type="float">
            <text:p>-0.2685</text:p>
          </table:table-cell>
          <table:table-cell office:value-type="float" office:value="9.8396" calcext:value-type="float">
            <text:p>9.8396</text:p>
          </table:table-cell>
          <table:table-cell office:value-type="float" office:value="-0.1604" calcext:value-type="float">
            <text:p>-0.1604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0.0696" calcext:value-type="float">
            <text:p>0.0696</text:p>
          </table:table-cell>
          <table:table-cell office:value-type="float" office:value="-0.0939" calcext:value-type="float">
            <text:p>-0.0939</text:p>
          </table:table-cell>
          <table:table-cell office:value-type="float" office:value="-0.4289" calcext:value-type="float">
            <text:p>-0.428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0.0696" calcext:value-type="float">
            <text:p>0.0696</text:p>
          </table:table-cell>
          <table:table-cell office:value-type="float" office:value="-0.0939" calcext:value-type="float">
            <text:p>-0.0939</text:p>
          </table:table-cell>
          <table:table-cell office:value-type="float" office:value="-0.4289" calcext:value-type="float">
            <text:p>-0.4289</text:p>
          </table:table-cell>
          <table:table-cell office:value-type="float" office:value="10.3432" calcext:value-type="float">
            <text:p>10.3432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1052" calcext:value-type="float">
            <text:p>0.1052</text:p>
          </table:table-cell>
          <table:table-cell office:value-type="float" office:value="-0.3512" calcext:value-type="float">
            <text:p>-0.3512</text:p>
          </table:table-cell>
          <table:table-cell office:value-type="float" office:value="-0.0857" calcext:value-type="float">
            <text:p>-0.085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1052" calcext:value-type="float">
            <text:p>0.1052</text:p>
          </table:table-cell>
          <table:table-cell office:value-type="float" office:value="-0.3512" calcext:value-type="float">
            <text:p>-0.3512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10.3303" calcext:value-type="float">
            <text:p>10.3303</text:p>
          </table:table-cell>
          <table:table-cell office:value-type="float" office:value="0.3303" calcext:value-type="float">
            <text:p>0.3303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262" calcext:value-type="float">
            <text:p>0.0262</text:p>
          </table:table-cell>
          <table:table-cell office:value-type="float" office:value="-0.2717" calcext:value-type="float">
            <text:p>-0.2717</text:p>
          </table:table-cell>
          <table:table-cell office:value-type="float" office:value="0.2446" calcext:value-type="float">
            <text:p>0.244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262" calcext:value-type="float">
            <text:p>0.0262</text:p>
          </table:table-cell>
          <table:table-cell office:value-type="float" office:value="-0.2717" calcext:value-type="float">
            <text:p>-0.2717</text:p>
          </table:table-cell>
          <table:table-cell office:value-type="float" office:value="0.2446" calcext:value-type="float">
            <text:p>0.2446</text:p>
          </table:table-cell>
          <table:table-cell office:value-type="float" office:value="10.0609" calcext:value-type="float">
            <text:p>10.0609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519" calcext:value-type="float">
            <text:p>0.0519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3055" calcext:value-type="float">
            <text:p>0.305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519" calcext:value-type="float">
            <text:p>0.0519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3055" calcext:value-type="float">
            <text:p>0.3055</text:p>
          </table:table-cell>
          <table:table-cell office:value-type="float" office:value="9.7247" calcext:value-type="float">
            <text:p>9.7247</text:p>
          </table:table-cell>
          <table:table-cell office:value-type="float" office:value="-0.2753" calcext:value-type="float">
            <text:p>-0.2753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0302" calcext:value-type="float">
            <text:p>0.030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0302" calcext:value-type="float">
            <text:p>0.0302</text:p>
          </table:table-cell>
          <table:table-cell office:value-type="float" office:value="9.7337" calcext:value-type="float">
            <text:p>9.7337</text:p>
          </table:table-cell>
          <table:table-cell office:value-type="float" office:value="-0.2663" calcext:value-type="float">
            <text:p>-0.2663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683" calcext:value-type="float">
            <text:p>0.0683</text:p>
          </table:table-cell>
          <table:table-cell office:value-type="float" office:value="-0.2361" calcext:value-type="float">
            <text:p>-0.236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683" calcext:value-type="float">
            <text:p>0.0683</text:p>
          </table:table-cell>
          <table:table-cell office:value-type="float" office:value="-0.2361" calcext:value-type="float">
            <text:p>-0.2361</text:p>
          </table:table-cell>
          <table:table-cell office:value-type="float" office:value="9.9456" calcext:value-type="float">
            <text:p>9.9456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0.0645" calcext:value-type="float">
            <text:p>0.0645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2905" calcext:value-type="float">
            <text:p>-0.290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0.0645" calcext:value-type="float">
            <text:p>0.0645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2905" calcext:value-type="float">
            <text:p>-0.2905</text:p>
          </table:table-cell>
          <table:table-cell office:value-type="float" office:value="10.2837" calcext:value-type="float">
            <text:p>10.2837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566" calcext:value-type="float">
            <text:p>0.0566</text:p>
          </table:table-cell>
          <table:table-cell office:value-type="float" office:value="-0.3436" calcext:value-type="float">
            <text:p>-0.3436</text:p>
          </table:table-cell>
          <table:table-cell office:value-type="float" office:value="-0.0068" calcext:value-type="float">
            <text:p>-0.006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566" calcext:value-type="float">
            <text:p>0.0566</text:p>
          </table:table-cell>
          <table:table-cell office:value-type="float" office:value="-0.3436" calcext:value-type="float">
            <text:p>-0.3436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10.2483" calcext:value-type="float">
            <text:p>10.2483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0427" calcext:value-type="float">
            <text:p>0.0427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2262" calcext:value-type="float">
            <text:p>-0.2262</text:p>
          </table:table-cell>
          <table:table-cell office:value-type="float" office:value="0.2415" calcext:value-type="float">
            <text:p>0.241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427" calcext:value-type="float">
            <text:p>0.0427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2262" calcext:value-type="float">
            <text:p>-0.2262</text:p>
          </table:table-cell>
          <table:table-cell office:value-type="float" office:value="0.2415" calcext:value-type="float">
            <text:p>0.2415</text:p>
          </table:table-cell>
          <table:table-cell office:value-type="float" office:value="9.9512" calcext:value-type="float">
            <text:p>9.9512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0.0037" calcext:value-type="float">
            <text:p>0.0037</text:p>
          </table:table-cell>
          <table:table-cell office:value-type="float" office:value="-0.0612" calcext:value-type="float">
            <text:p>-0.0612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.1927" calcext:value-type="float">
            <text:p>0.192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37" calcext:value-type="float">
            <text:p>0.0037</text:p>
          </table:table-cell>
          <table:table-cell office:value-type="float" office:value="-0.0612" calcext:value-type="float">
            <text:p>-0.0612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.1927" calcext:value-type="float">
            <text:p>0.1927</text:p>
          </table:table-cell>
          <table:table-cell office:value-type="float" office:value="9.7569" calcext:value-type="float">
            <text:p>9.7569</text:p>
          </table:table-cell>
          <table:table-cell office:value-type="float" office:value="-0.2431" calcext:value-type="float">
            <text:p>-0.2431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0504" calcext:value-type="float">
            <text:p>-0.050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9.8357" calcext:value-type="float">
            <text:p>9.8357</text:p>
          </table:table-cell>
          <table:table-cell office:value-type="float" office:value="-0.1643" calcext:value-type="float">
            <text:p>-0.1643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-0.2147" calcext:value-type="float">
            <text:p>-0.214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-0.2147" calcext:value-type="float">
            <text:p>-0.2147</text:p>
          </table:table-cell>
          <table:table-cell office:value-type="float" office:value="10.063" calcext:value-type="float">
            <text:p>10.063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536" calcext:value-type="float">
            <text:p>0.0536</text:p>
          </table:table-cell>
          <table:table-cell office:value-type="float" office:value="-0.2537" calcext:value-type="float">
            <text:p>-0.2537</text:p>
          </table:table-cell>
          <table:table-cell office:value-type="float" office:value="-0.1517" calcext:value-type="float">
            <text:p>-0.151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536" calcext:value-type="float">
            <text:p>0.0536</text:p>
          </table:table-cell>
          <table:table-cell office:value-type="float" office:value="-0.2537" calcext:value-type="float">
            <text:p>-0.2537</text:p>
          </table:table-cell>
          <table:table-cell office:value-type="float" office:value="-0.1517" calcext:value-type="float">
            <text:p>-0.1517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196" calcext:value-type="float">
            <text:p>0.0196</text:p>
          </table:table-cell>
          <table:table-cell office:value-type="float" office:value="-0.2846" calcext:value-type="float">
            <text:p>-0.2846</text:p>
          </table:table-cell>
          <table:table-cell office:value-type="float" office:value="0.0899" calcext:value-type="float">
            <text:p>0.089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196" calcext:value-type="float">
            <text:p>0.0196</text:p>
          </table:table-cell>
          <table:table-cell office:value-type="float" office:value="-0.2846" calcext:value-type="float">
            <text:p>-0.2846</text:p>
          </table:table-cell>
          <table:table-cell office:value-type="float" office:value="0.0899" calcext:value-type="float">
            <text:p>0.0899</text:p>
          </table:table-cell>
          <table:table-cell office:value-type="float" office:value="10.1113" calcext:value-type="float">
            <text:p>10.111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2012" calcext:value-type="float">
            <text:p>0.201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2012" calcext:value-type="float">
            <text:p>0.2012</text:p>
          </table:table-cell>
          <table:table-cell office:value-type="float" office:value="9.8791" calcext:value-type="float">
            <text:p>9.8791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803" calcext:value-type="float">
            <text:p>0.080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803" calcext:value-type="float">
            <text:p>0.0803</text:p>
          </table:table-cell>
          <table:table-cell office:value-type="float" office:value="9.8076" calcext:value-type="float">
            <text:p>9.8076</text:p>
          </table:table-cell>
          <table:table-cell office:value-type="float" office:value="-0.1924" calcext:value-type="float">
            <text:p>-0.1924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1121" calcext:value-type="float">
            <text:p>-0.112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1121" calcext:value-type="float">
            <text:p>-0.1121</text:p>
          </table:table-cell>
          <table:table-cell office:value-type="float" office:value="9.9387" calcext:value-type="float">
            <text:p>9.9387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0.0373" calcext:value-type="float">
            <text:p>0.0373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-0.1734" calcext:value-type="float">
            <text:p>-0.173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0.0373" calcext:value-type="float">
            <text:p>0.0373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-0.1734" calcext:value-type="float">
            <text:p>-0.1734</text:p>
          </table:table-cell>
          <table:table-cell office:value-type="float" office:value="10.1381" calcext:value-type="float">
            <text:p>10.138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345" calcext:value-type="float">
            <text:p>0.0345</text:p>
          </table:table-cell>
          <table:table-cell office:value-type="float" office:value="-0.2612" calcext:value-type="float">
            <text:p>-0.2612</text:p>
          </table:table-cell>
          <table:table-cell office:value-type="float" office:value="-0.0352" calcext:value-type="float">
            <text:p>-0.035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345" calcext:value-type="float">
            <text:p>0.0345</text:p>
          </table:table-cell>
          <table:table-cell office:value-type="float" office:value="-0.2612" calcext:value-type="float">
            <text:p>-0.2612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10.1756" calcext:value-type="float">
            <text:p>10.1756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2086" calcext:value-type="float">
            <text:p>-0.2086</text:p>
          </table:table-cell>
          <table:table-cell office:value-type="float" office:value="0.1404" calcext:value-type="float">
            <text:p>0.140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2086" calcext:value-type="float">
            <text:p>-0.2086</text:p>
          </table:table-cell>
          <table:table-cell office:value-type="float" office:value="0.1404" calcext:value-type="float">
            <text:p>0.1404</text:p>
          </table:table-cell>
          <table:table-cell office:value-type="float" office:value="10.001" calcext:value-type="float">
            <text:p>1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0677" calcext:value-type="float">
            <text:p>-0.0677</text:p>
          </table:table-cell>
          <table:table-cell office:value-type="float" office:value="0.1414" calcext:value-type="float">
            <text:p>0.141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0677" calcext:value-type="float">
            <text:p>-0.0677</text:p>
          </table:table-cell>
          <table:table-cell office:value-type="float" office:value="0.1414" calcext:value-type="float">
            <text:p>0.1414</text:p>
          </table:table-cell>
          <table:table-cell office:value-type="float" office:value="9.8453" calcext:value-type="float">
            <text:p>9.8453</text:p>
          </table:table-cell>
          <table:table-cell office:value-type="float" office:value="-0.1547" calcext:value-type="float">
            <text:p>-0.1547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132" calcext:value-type="float">
            <text:p>-0.013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9.8738" calcext:value-type="float">
            <text:p>9.8738</text:p>
          </table:table-cell>
          <table:table-cell office:value-type="float" office:value="-0.1262" calcext:value-type="float">
            <text:p>-0.1262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-0.1394" calcext:value-type="float">
            <text:p>-0.139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-0.1394" calcext:value-type="float">
            <text:p>-0.1394</text:p>
          </table:table-cell>
          <table:table-cell office:value-type="float" office:value="10.0284" calcext:value-type="float">
            <text:p>10.0284</text:p>
          </table:table-cell>
          <table:table-cell office:value-type="float" office:value="0.0284" calcext:value-type="float">
            <text:p>0.0284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348" calcext:value-type="float">
            <text:p>0.0348</text:p>
          </table:table-cell>
          <table:table-cell office:value-type="float" office:value="-0.2051" calcext:value-type="float">
            <text:p>-0.2051</text:p>
          </table:table-cell>
          <table:table-cell office:value-type="float" office:value="-0.111" calcext:value-type="float">
            <text:p>-0.11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348" calcext:value-type="float">
            <text:p>0.0348</text:p>
          </table:table-cell>
          <table:table-cell office:value-type="float" office:value="-0.2051" calcext:value-type="float">
            <text:p>-0.2051</text:p>
          </table:table-cell>
          <table:table-cell office:value-type="float" office:value="-0.111" calcext:value-type="float">
            <text:p>-0.111</text:p>
          </table:table-cell>
          <table:table-cell office:value-type="float" office:value="10.1621" calcext:value-type="float">
            <text:p>10.1621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2351" calcext:value-type="float">
            <text:p>-0.2351</text:p>
          </table:table-cell>
          <table:table-cell office:value-type="float" office:value="0.0511" calcext:value-type="float">
            <text:p>0.051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2351" calcext:value-type="float">
            <text:p>-0.2351</text:p>
          </table:table-cell>
          <table:table-cell office:value-type="float" office:value="0.0511" calcext:value-type="float">
            <text:p>0.0511</text:p>
          </table:table-cell>
          <table:table-cell office:value-type="float" office:value="10.085" calcext:value-type="float">
            <text:p>10.0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1415" calcext:value-type="float">
            <text:p>-0.1415</text:p>
          </table:table-cell>
          <table:table-cell office:value-type="float" office:value="0.1361" calcext:value-type="float">
            <text:p>0.136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1415" calcext:value-type="float">
            <text:p>-0.1415</text:p>
          </table:table-cell>
          <table:table-cell office:value-type="float" office:value="0.1361" calcext:value-type="float">
            <text:p>0.1361</text:p>
          </table:table-cell>
          <table:table-cell office:value-type="float" office:value="9.9267" calcext:value-type="float">
            <text:p>9.9267</text:p>
          </table:table-cell>
          <table:table-cell office:value-type="float" office:value="-0.0733" calcext:value-type="float">
            <text:p>-0.0733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628" calcext:value-type="float">
            <text:p>0.062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628" calcext:value-type="float">
            <text:p>0.0628</text:p>
          </table:table-cell>
          <table:table-cell office:value-type="float" office:value="9.8603" calcext:value-type="float">
            <text:p>9.8603</text:p>
          </table:table-cell>
          <table:table-cell office:value-type="float" office:value="-0.1397" calcext:value-type="float">
            <text:p>-0.1397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-0.0769" calcext:value-type="float">
            <text:p>-0.076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9.9525" calcext:value-type="float">
            <text:p>9.9525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1497" calcext:value-type="float">
            <text:p>-0.1497</text:p>
          </table:table-cell>
          <table:table-cell office:value-type="float" office:value="-0.1244" calcext:value-type="float">
            <text:p>-0.1244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1497" calcext:value-type="float">
            <text:p>-0.1497</text:p>
          </table:table-cell>
          <table:table-cell office:value-type="float" office:value="-0.1244" calcext:value-type="float">
            <text:p>-0.1244</text:p>
          </table:table-cell>
          <table:table-cell office:value-type="float" office:value="10.0998" calcext:value-type="float">
            <text:p>10.0998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231" calcext:value-type="float">
            <text:p>0.0231</text:p>
          </table:table-cell>
          <table:table-cell office:value-type="float" office:value="-0.2243" calcext:value-type="float">
            <text:p>-0.2243</text:p>
          </table:table-cell>
          <table:table-cell office:value-type="float" office:value="-0.0247" calcext:value-type="float">
            <text:p>-0.024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231" calcext:value-type="float">
            <text:p>0.0231</text:p>
          </table:table-cell>
          <table:table-cell office:value-type="float" office:value="-0.2243" calcext:value-type="float">
            <text:p>-0.2243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10.1235" calcext:value-type="float">
            <text:p>10.1235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-0.1872" calcext:value-type="float">
            <text:p>-0.1872</text:p>
          </table:table-cell>
          <table:table-cell office:value-type="float" office:value="0.0988" calcext:value-type="float">
            <text:p>0.098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-0.1872" calcext:value-type="float">
            <text:p>-0.1872</text:p>
          </table:table-cell>
          <table:table-cell office:value-type="float" office:value="0.0988" calcext:value-type="float">
            <text:p>0.0988</text:p>
          </table:table-cell>
          <table:table-cell office:value-type="float" office:value="9.9986" calcext:value-type="float">
            <text:p>9.9986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0975" calcext:value-type="float">
            <text:p>0.097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0975" calcext:value-type="float">
            <text:p>0.0975</text:p>
          </table:table-cell>
          <table:table-cell office:value-type="float" office:value="9.8923" calcext:value-type="float">
            <text:p>9.8923</text:p>
          </table:table-cell>
          <table:table-cell office:value-type="float" office:value="-0.1077" calcext:value-type="float">
            <text:p>-0.107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102" calcext:value-type="float">
            <text:p>-0.010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9.9066" calcext:value-type="float">
            <text:p>9.9066</text:p>
          </table:table-cell>
          <table:table-cell office:value-type="float" office:value="-0.0934" calcext:value-type="float">
            <text:p>-0.0934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024" calcext:value-type="float">
            <text:p>-0.1024</text:p>
          </table:table-cell>
          <table:table-cell office:value-type="float" office:value="-0.1036" calcext:value-type="float">
            <text:p>-0.103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024" calcext:value-type="float">
            <text:p>-0.1024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0.0258" calcext:value-type="float">
            <text:p>0.0258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249" calcext:value-type="float">
            <text:p>0.0249</text:p>
          </table:table-cell>
          <table:table-cell office:value-type="float" office:value="-0.1931" calcext:value-type="float">
            <text:p>-0.1931</text:p>
          </table:table-cell>
          <table:table-cell office:value-type="float" office:value="-0.0778" calcext:value-type="float">
            <text:p>-0.077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249" calcext:value-type="float">
            <text:p>0.0249</text:p>
          </table:table-cell>
          <table:table-cell office:value-type="float" office:value="-0.1931" calcext:value-type="float">
            <text:p>-0.1931</text:p>
          </table:table-cell>
          <table:table-cell office:value-type="float" office:value="-0.0778" calcext:value-type="float">
            <text:p>-0.0778</text:p>
          </table:table-cell>
          <table:table-cell office:value-type="float" office:value="10.1197" calcext:value-type="float">
            <text:p>10.119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0419" calcext:value-type="float">
            <text:p>0.041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0419" calcext:value-type="float">
            <text:p>0.0419</text:p>
          </table:table-cell>
          <table:table-cell office:value-type="float" office:value="10.0569" calcext:value-type="float">
            <text:p>10.0569</text:p>
          </table:table-cell>
          <table:table-cell office:value-type="float" office:value="0.0569" calcext:value-type="float">
            <text:p>0.0569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0.1407" calcext:value-type="float">
            <text:p>-0.1407</text:p>
          </table:table-cell>
          <table:table-cell office:value-type="float" office:value="0.0988" calcext:value-type="float">
            <text:p>0.098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0.1407" calcext:value-type="float">
            <text:p>-0.1407</text:p>
          </table:table-cell>
          <table:table-cell office:value-type="float" office:value="0.0988" calcext:value-type="float">
            <text:p>0.0988</text:p>
          </table:table-cell>
          <table:table-cell office:value-type="float" office:value="9.9434" calcext:value-type="float">
            <text:p>9.9434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701" calcext:value-type="float">
            <text:p>-0.0701</text:p>
          </table:table-cell>
          <table:table-cell office:value-type="float" office:value="0.0422" calcext:value-type="float">
            <text:p>0.042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701" calcext:value-type="float">
            <text:p>-0.0701</text:p>
          </table:table-cell>
          <table:table-cell office:value-type="float" office:value="0.0422" calcext:value-type="float">
            <text:p>0.0422</text:p>
          </table:table-cell>
          <table:table-cell office:value-type="float" office:value="9.899" calcext:value-type="float">
            <text:p>9.899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784" calcext:value-type="float">
            <text:p>-0.0784</text:p>
          </table:table-cell>
          <table:table-cell office:value-type="float" office:value="-0.0588" calcext:value-type="float">
            <text:p>-0.058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784" calcext:value-type="float">
            <text:p>-0.0784</text:p>
          </table:table-cell>
          <table:table-cell office:value-type="float" office:value="-0.0588" calcext:value-type="float">
            <text:p>-0.0588</text:p>
          </table:table-cell>
          <table:table-cell office:value-type="float" office:value="9.9683" calcext:value-type="float">
            <text:p>9.9683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-0.0905" calcext:value-type="float">
            <text:p>-0.090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-0.0905" calcext:value-type="float">
            <text:p>-0.0905</text:p>
          </table:table-cell>
          <table:table-cell office:value-type="float" office:value="10.0777" calcext:value-type="float">
            <text:p>10.0777</text:p>
          </table:table-cell>
          <table:table-cell office:value-type="float" office:value="0.0777" calcext:value-type="float">
            <text:p>0.0777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2048" calcext:value-type="float">
            <text:p>-0.2048</text:p>
          </table:table-cell>
          <table:table-cell office:value-type="float" office:value="-0.0128" calcext:value-type="float">
            <text:p>-0.012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2048" calcext:value-type="float">
            <text:p>-0.2048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10.0877" calcext:value-type="float">
            <text:p>10.0877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-0.1738" calcext:value-type="float">
            <text:p>-0.1738</text:p>
          </table:table-cell>
          <table:table-cell office:value-type="float" office:value="0.0749" calcext:value-type="float">
            <text:p>0.074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-0.1738" calcext:value-type="float">
            <text:p>-0.1738</text:p>
          </table:table-cell>
          <table:table-cell office:value-type="float" office:value="0.0749" calcext:value-type="float">
            <text:p>0.0749</text:p>
          </table:table-cell>
          <table:table-cell office:value-type="float" office:value="9.9942" calcext:value-type="float">
            <text:p>9.9942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1018" calcext:value-type="float">
            <text:p>-0.1018</text:p>
          </table:table-cell>
          <table:table-cell office:value-type="float" office:value="0.0691" calcext:value-type="float">
            <text:p>0.069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1018" calcext:value-type="float">
            <text:p>-0.1018</text:p>
          </table:table-cell>
          <table:table-cell office:value-type="float" office:value="0.0691" calcext:value-type="float">
            <text:p>0.0691</text:p>
          </table:table-cell>
          <table:table-cell office:value-type="float" office:value="9.919" calcext:value-type="float">
            <text:p>9.919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-0.0119" calcext:value-type="float">
            <text:p>-0.0119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9.9349" calcext:value-type="float">
            <text:p>9.9349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-0.077" calcext:value-type="float">
            <text:p>-0.07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-0.077" calcext:value-type="float">
            <text:p>-0.077</text:p>
          </table:table-cell>
          <table:table-cell office:value-type="float" office:value="10.0239" calcext:value-type="float">
            <text:p>10.0239</text:p>
          </table:table-cell>
          <table:table-cell office:value-type="float" office:value="0.0239" calcext:value-type="float">
            <text:p>0.0239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826" calcext:value-type="float">
            <text:p>-0.1826</text:p>
          </table:table-cell>
          <table:table-cell office:value-type="float" office:value="-0.0531" calcext:value-type="float">
            <text:p>-0.053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826" calcext:value-type="float">
            <text:p>-0.1826</text:p>
          </table:table-cell>
          <table:table-cell office:value-type="float" office:value="-0.0531" calcext:value-type="float">
            <text:p>-0.0531</text:p>
          </table:table-cell>
          <table:table-cell office:value-type="float" office:value="10.0877" calcext:value-type="float">
            <text:p>10.0877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1919" calcext:value-type="float">
            <text:p>-0.1919</text:p>
          </table:table-cell>
          <table:table-cell office:value-type="float" office:value="0.0346" calcext:value-type="float">
            <text:p>0.034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1919" calcext:value-type="float">
            <text:p>-0.1919</text:p>
          </table:table-cell>
          <table:table-cell office:value-type="float" office:value="0.0346" calcext:value-type="float">
            <text:p>0.0346</text:p>
          </table:table-cell>
          <table:table-cell office:value-type="float" office:value="10.0369" calcext:value-type="float">
            <text:p>10.0369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1389" calcext:value-type="float">
            <text:p>-0.1389</text:p>
          </table:table-cell>
          <table:table-cell office:value-type="float" office:value="0.0715" calcext:value-type="float">
            <text:p>0.071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1389" calcext:value-type="float">
            <text:p>-0.1389</text:p>
          </table:table-cell>
          <table:table-cell office:value-type="float" office:value="0.0715" calcext:value-type="float">
            <text:p>0.0715</text:p>
          </table:table-cell>
          <table:table-cell office:value-type="float" office:value="9.9557" calcext:value-type="float">
            <text:p>9.9557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895" calcext:value-type="float">
            <text:p>-0.0895</text:p>
          </table:table-cell>
          <table:table-cell office:value-type="float" office:value="0.0272" calcext:value-type="float">
            <text:p>0.027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895" calcext:value-type="float">
            <text:p>-0.0895</text:p>
          </table:table-cell>
          <table:table-cell office:value-type="float" office:value="0.0272" calcext:value-type="float">
            <text:p>0.0272</text:p>
          </table:table-cell>
          <table:table-cell office:value-type="float" office:value="9.9268" calcext:value-type="float">
            <text:p>9.926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989" calcext:value-type="float">
            <text:p>-0.0989</text:p>
          </table:table-cell>
          <table:table-cell office:value-type="float" office:value="-0.046" calcext:value-type="float">
            <text:p>-0.04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989" calcext:value-type="float">
            <text:p>-0.0989</text:p>
          </table:table-cell>
          <table:table-cell office:value-type="float" office:value="-0.046" calcext:value-type="float">
            <text:p>-0.046</text:p>
          </table:table-cell>
          <table:table-cell office:value-type="float" office:value="9.9808" calcext:value-type="float">
            <text:p>9.9808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1545" calcext:value-type="float">
            <text:p>-0.1545</text:p>
          </table:table-cell>
          <table:table-cell office:value-type="float" office:value="-0.0652" calcext:value-type="float">
            <text:p>-0.065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1545" calcext:value-type="float">
            <text:p>-0.1545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10.0596" calcext:value-type="float">
            <text:p>10.0596</text:p>
          </table:table-cell>
          <table:table-cell office:value-type="float" office:value="0.0596" calcext:value-type="float">
            <text:p>0.059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1899" calcext:value-type="float">
            <text:p>-0.1899</text:p>
          </table:table-cell>
          <table:table-cell office:value-type="float" office:value="-0.0056" calcext:value-type="float">
            <text:p>-0.005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1899" calcext:value-type="float">
            <text:p>-0.1899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10.0622" calcext:value-type="float">
            <text:p>10.0622</text:p>
          </table:table-cell>
          <table:table-cell office:value-type="float" office:value="0.0622" calcext:value-type="float">
            <text:p>0.062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0.0566" calcext:value-type="float">
            <text:p>0.056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0.0566" calcext:value-type="float">
            <text:p>0.0566</text:p>
          </table:table-cell>
          <table:table-cell office:value-type="float" office:value="9.9927" calcext:value-type="float">
            <text:p>9.9927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0493" calcext:value-type="float">
            <text:p>0.049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0493" calcext:value-type="float">
            <text:p>0.0493</text:p>
          </table:table-cell>
          <table:table-cell office:value-type="float" office:value="9.939" calcext:value-type="float">
            <text:p>9.939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926" calcext:value-type="float">
            <text:p>-0.0926</text:p>
          </table:table-cell>
          <table:table-cell office:value-type="float" office:value="-0.0117" calcext:value-type="float">
            <text:p>-0.011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926" calcext:value-type="float">
            <text:p>-0.0926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9.9543" calcext:value-type="float">
            <text:p>9.9543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1272" calcext:value-type="float">
            <text:p>-0.1272</text:p>
          </table:table-cell>
          <table:table-cell office:value-type="float" office:value="-0.0575" calcext:value-type="float">
            <text:p>-0.057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1272" calcext:value-type="float">
            <text:p>-0.1272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10.0206" calcext:value-type="float">
            <text:p>10.0206</text:p>
          </table:table-cell>
          <table:table-cell office:value-type="float" office:value="0.0206" calcext:value-type="float">
            <text:p>0.0206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1744" calcext:value-type="float">
            <text:p>-0.1744</text:p>
          </table:table-cell>
          <table:table-cell office:value-type="float" office:value="-0.0368" calcext:value-type="float">
            <text:p>-0.036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1744" calcext:value-type="float">
            <text:p>-0.1744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10.0646" calcext:value-type="float">
            <text:p>10.0646</text:p>
          </table:table-cell>
          <table:table-cell office:value-type="float" office:value="0.0646" calcext:value-type="float">
            <text:p>0.064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1789" calcext:value-type="float">
            <text:p>-0.1789</text:p>
          </table:table-cell>
          <table:table-cell office:value-type="float" office:value="0.0278" calcext:value-type="float">
            <text:p>0.027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1789" calcext:value-type="float">
            <text:p>-0.1789</text:p>
          </table:table-cell>
          <table:table-cell office:value-type="float" office:value="0.0278" calcext:value-type="float">
            <text:p>0.0278</text:p>
          </table:table-cell>
          <table:table-cell office:value-type="float" office:value="10.0245" calcext:value-type="float">
            <text:p>10.0245</text:p>
          </table:table-cell>
          <table:table-cell office:value-type="float" office:value="0.0245" calcext:value-type="float">
            <text:p>0.024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389" calcext:value-type="float">
            <text:p>-0.1389</text:p>
          </table:table-cell>
          <table:table-cell office:value-type="float" office:value="0.0523" calcext:value-type="float">
            <text:p>0.052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389" calcext:value-type="float">
            <text:p>-0.1389</text:p>
          </table:table-cell>
          <table:table-cell office:value-type="float" office:value="0.0523" calcext:value-type="float">
            <text:p>0.0523</text:p>
          </table:table-cell>
          <table:table-cell office:value-type="float" office:value="9.9655" calcext:value-type="float">
            <text:p>9.9655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0.0177" calcext:value-type="float">
            <text:p>0.017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0.0177" calcext:value-type="float">
            <text:p>0.0177</text:p>
          </table:table-cell>
          <table:table-cell office:value-type="float" office:value="9.9466" calcext:value-type="float">
            <text:p>9.9466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1129" calcext:value-type="float">
            <text:p>-0.1129</text:p>
          </table:table-cell>
          <table:table-cell office:value-type="float" office:value="-0.0357" calcext:value-type="float">
            <text:p>-0.035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1129" calcext:value-type="float">
            <text:p>-0.1129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9.9885" calcext:value-type="float">
            <text:p>9.9885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44" calcext:value-type="float">
            <text:p>-0.1544</text:p>
          </table:table-cell>
          <table:table-cell office:value-type="float" office:value="-0.0472" calcext:value-type="float">
            <text:p>-0.0472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44" calcext:value-type="float">
            <text:p>-0.1544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10.0455" calcext:value-type="float">
            <text:p>10.0455</text:p>
          </table:table-cell>
          <table:table-cell office:value-type="float" office:value="0.0455" calcext:value-type="float">
            <text:p>0.0455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1788" calcext:value-type="float">
            <text:p>-0.1788</text:p>
          </table:table-cell>
          <table:table-cell office:value-type="float" office:value="-0.0017" calcext:value-type="float">
            <text:p>-0.001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1788" calcext:value-type="float">
            <text:p>-0.178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0.0444" calcext:value-type="float">
            <text:p>10.0444</text:p>
          </table:table-cell>
          <table:table-cell office:value-type="float" office:value="0.0444" calcext:value-type="float">
            <text:p>0.0444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1583" calcext:value-type="float">
            <text:p>-0.1583</text:p>
          </table:table-cell>
          <table:table-cell office:value-type="float" office:value="0.0427" calcext:value-type="float">
            <text:p>0.0427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1583" calcext:value-type="float">
            <text:p>-0.1583</text:p>
          </table:table-cell>
          <table:table-cell office:value-type="float" office:value="0.0427" calcext:value-type="float">
            <text:p>0.0427</text:p>
          </table:table-cell>
          <table:table-cell office:value-type="float" office:value="9.9929" calcext:value-type="float">
            <text:p>9.9929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92" calcext:value-type="float">
            <text:p>-0.1192</text:p>
          </table:table-cell>
          <table:table-cell office:value-type="float" office:value="0.0356" calcext:value-type="float">
            <text:p>0.035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92" calcext:value-type="float">
            <text:p>-0.1192</text:p>
          </table:table-cell>
          <table:table-cell office:value-type="float" office:value="0.0356" calcext:value-type="float">
            <text:p>0.0356</text:p>
          </table:table-cell>
          <table:table-cell office:value-type="float" office:value="9.9539" calcext:value-type="float">
            <text:p>9.9539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1067" calcext:value-type="float">
            <text:p>-0.1067</text:p>
          </table:table-cell>
          <table:table-cell office:value-type="float" office:value="-0.0105" calcext:value-type="float">
            <text:p>-0.0105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1067" calcext:value-type="float">
            <text:p>-0.106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9.9675" calcext:value-type="float">
            <text:p>9.9675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1335" calcext:value-type="float">
            <text:p>-0.1335</text:p>
          </table:table-cell>
          <table:table-cell office:value-type="float" office:value="-0.043" calcext:value-type="float">
            <text:p>-0.043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1335" calcext:value-type="float">
            <text:p>-0.1335</text:p>
          </table:table-cell>
          <table:table-cell office:value-type="float" office:value="-0.043" calcext:value-type="float">
            <text:p>-0.043</text:p>
          </table:table-cell>
          <table:table-cell office:value-type="float" office:value="10.0171" calcext:value-type="float">
            <text:p>10.0171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026" calcext:value-type="float">
            <text:p>-0.02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333" calcext:value-type="float">
            <text:p>0.6333</text:p>
          </table:table-cell>
          <table:table-cell office:value-type="float" office:value="-0.672" calcext:value-type="float">
            <text:p>-0.672</text:p>
          </table:table-cell>
          <table:table-cell office:value-type="float" office:value="-0.3643" calcext:value-type="float">
            <text:p>-0.3643</text:p>
          </table:table-cell>
          <table:table-cell office:value-type="float" office:value="0.5564" calcext:value-type="float">
            <text:p>0.5564</text:p>
          </table:table-cell>
          <table:table-cell office:value-type="float" office:value="9.9895" calcext:value-type="float">
            <text:p>9.9895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2351" calcext:value-type="float">
            <text:p>-0.2351</text:p>
          </table:table-cell>
          <table:table-cell office:value-type="float" office:value="-0.9242" calcext:value-type="float">
            <text:p>-0.9242</text:p>
          </table:table-cell>
          <table:table-cell office:value-type="float" office:value="0.187" calcext:value-type="float">
            <text:p>0.187</text:p>
          </table:table-cell>
          <table:table-cell office:value-type="float" office:value="0.546" calcext:value-type="float">
            <text:p>0.54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2351" calcext:value-type="float">
            <text:p>-0.2351</text:p>
          </table:table-cell>
          <table:table-cell office:value-type="float" office:value="-0.9242" calcext:value-type="float">
            <text:p>-0.9242</text:p>
          </table:table-cell>
          <table:table-cell office:value-type="float" office:value="0.187" calcext:value-type="float">
            <text:p>0.187</text:p>
          </table:table-cell>
          <table:table-cell office:value-type="float" office:value="0.546" calcext:value-type="float">
            <text:p>0.546</text:p>
          </table:table-cell>
          <table:table-cell office:value-type="float" office:value="9.1134" calcext:value-type="float">
            <text:p>9.1134</text:p>
          </table:table-cell>
          <table:table-cell office:value-type="float" office:value="-0.8866" calcext:value-type="float">
            <text:p>-0.8866</text:p>
          </table:table-cell>
          <table:table-cell office:value-type="float" office:value="-0.8931" calcext:value-type="float">
            <text:p>-0.8931</text:p>
          </table:table-cell>
          <table:table-cell office:value-type="float" office:value="-0.2873" calcext:value-type="float">
            <text:p>-0.2873</text:p>
          </table:table-cell>
          <table:table-cell office:value-type="float" office:value="0.2897" calcext:value-type="float">
            <text:p>0.2897</text:p>
          </table:table-cell>
          <table:table-cell office:value-type="float" office:value="-0.3406" calcext:value-type="float">
            <text:p>-0.3406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-0.8931" calcext:value-type="float">
            <text:p>-0.8931</text:p>
          </table:table-cell>
          <table:table-cell office:value-type="float" office:value="-0.2873" calcext:value-type="float">
            <text:p>-0.2873</text:p>
          </table:table-cell>
          <table:table-cell office:value-type="float" office:value="0.2897" calcext:value-type="float">
            <text:p>0.2897</text:p>
          </table:table-cell>
          <table:table-cell office:value-type="float" office:value="-0.3406" calcext:value-type="float">
            <text:p>-0.3406</text:p>
          </table:table-cell>
          <table:table-cell office:value-type="float" office:value="9.1073" calcext:value-type="float">
            <text:p>9.1073</text:p>
          </table:table-cell>
          <table:table-cell office:value-type="float" office:value="-0.8927" calcext:value-type="float">
            <text:p>-0.8927</text:p>
          </table:table-cell>
          <table:table-cell office:value-type="float" office:value="-0.7153" calcext:value-type="float">
            <text:p>-0.7153</text:p>
          </table:table-cell>
          <table:table-cell office:value-type="float" office:value="0.6151" calcext:value-type="float">
            <text:p>0.6151</text:p>
          </table:table-cell>
          <table:table-cell office:value-type="float" office:value="-0.4973" calcext:value-type="float">
            <text:p>-0.4973</text:p>
          </table:table-cell>
          <table:table-cell office:value-type="float" office:value="-1.2333" calcext:value-type="float">
            <text:p>-1.233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0.7153" calcext:value-type="float">
            <text:p>-0.7153</text:p>
          </table:table-cell>
          <table:table-cell office:value-type="float" office:value="0.6151" calcext:value-type="float">
            <text:p>0.6151</text:p>
          </table:table-cell>
          <table:table-cell office:value-type="float" office:value="-0.4973" calcext:value-type="float">
            <text:p>-0.4973</text:p>
          </table:table-cell>
          <table:table-cell office:value-type="float" office:value="-1.2333" calcext:value-type="float">
            <text:p>-1.2333</text:p>
          </table:table-cell>
          <table:table-cell office:value-type="float" office:value="11.2903" calcext:value-type="float">
            <text:p>11.2903</text:p>
          </table:table-cell>
          <table:table-cell office:value-type="float" office:value="1.2903" calcext:value-type="float">
            <text:p>1.290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8927" calcext:value-type="float">
            <text:p>0.8927</text:p>
          </table:table-cell>
          <table:table-cell office:value-type="float" office:value="-1.0855" calcext:value-type="float">
            <text:p>-1.0855</text:p>
          </table:table-cell>
          <table:table-cell office:value-type="float" office:value="0.057" calcext:value-type="float">
            <text:p>0.05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8927" calcext:value-type="float">
            <text:p>0.8927</text:p>
          </table:table-cell>
          <table:table-cell office:value-type="float" office:value="-1.0855" calcext:value-type="float">
            <text:p>-1.0855</text:p>
          </table:table-cell>
          <table:table-cell office:value-type="float" office:value="0.057" calcext:value-type="float">
            <text:p>0.057</text:p>
          </table:table-cell>
          <table:table-cell office:value-type="float" office:value="11.4023" calcext:value-type="float">
            <text:p>11.4023</text:p>
          </table:table-cell>
          <table:table-cell office:value-type="float" office:value="1.4023" calcext:value-type="float">
            <text:p>1.4023</text:p>
          </table:table-cell>
          <table:table-cell office:value-type="float" office:value="0.759" calcext:value-type="float">
            <text:p>0.759</text:p>
          </table:table-cell>
          <table:table-cell office:value-type="float" office:value="0.3132" calcext:value-type="float">
            <text:p>0.3132</text:p>
          </table:table-cell>
          <table:table-cell office:value-type="float" office:value="-0.3273" calcext:value-type="float">
            <text:p>-0.3273</text:p>
          </table:table-cell>
          <table:table-cell office:value-type="float" office:value="1.4593" calcext:value-type="float">
            <text:p>1.459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59" calcext:value-type="float">
            <text:p>0.759</text:p>
          </table:table-cell>
          <table:table-cell office:value-type="float" office:value="0.3132" calcext:value-type="float">
            <text:p>0.3132</text:p>
          </table:table-cell>
          <table:table-cell office:value-type="float" office:value="-0.3273" calcext:value-type="float">
            <text:p>-0.3273</text:p>
          </table:table-cell>
          <table:table-cell office:value-type="float" office:value="1.4593" calcext:value-type="float">
            <text:p>1.4593</text:p>
          </table:table-cell>
          <table:table-cell office:value-type="float" office:value="8.9877" calcext:value-type="float">
            <text:p>8.9877</text:p>
          </table:table-cell>
          <table:table-cell office:value-type="float" office:value="-1.0123" calcext:value-type="float">
            <text:p>-1.0123</text:p>
          </table:table-cell>
          <table:table-cell office:value-type="float" office:value="0.6696" calcext:value-type="float">
            <text:p>0.6696</text:p>
          </table:table-cell>
          <table:table-cell office:value-type="float" office:value="-0.495" calcext:value-type="float">
            <text:p>-0.495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447" calcext:value-type="float">
            <text:p>0.44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696" calcext:value-type="float">
            <text:p>0.6696</text:p>
          </table:table-cell>
          <table:table-cell office:value-type="float" office:value="-0.495" calcext:value-type="float">
            <text:p>-0.495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447" calcext:value-type="float">
            <text:p>0.447</text:p>
          </table:table-cell>
          <table:table-cell office:value-type="float" office:value="9.6815" calcext:value-type="float">
            <text:p>9.6815</text:p>
          </table:table-cell>
          <table:table-cell office:value-type="float" office:value="-0.3185" calcext:value-type="float">
            <text:p>-0.3185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1285" calcext:value-type="float">
            <text:p>0.128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1285" calcext:value-type="float">
            <text:p>0.1285</text:p>
          </table:table-cell>
          <table:table-cell office:value-type="float" office:value="8.7659" calcext:value-type="float">
            <text:p>8.7659</text:p>
          </table:table-cell>
          <table:table-cell office:value-type="float" office:value="-1.2341" calcext:value-type="float">
            <text:p>-1.2341</text:p>
          </table:table-cell>
          <table:table-cell office:value-type="float" office:value="-0.6266" calcext:value-type="float">
            <text:p>-0.6266</text:p>
          </table:table-cell>
          <table:table-cell office:value-type="float" office:value="-0.3287" calcext:value-type="float">
            <text:p>-0.3287</text:p>
          </table:table-cell>
          <table:table-cell office:value-type="float" office:value="0.4251" calcext:value-type="float">
            <text:p>0.4251</text:p>
          </table:table-cell>
          <table:table-cell office:value-type="float" office:value="-1.1056" calcext:value-type="float">
            <text:p>-1.105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0.6266" calcext:value-type="float">
            <text:p>-0.6266</text:p>
          </table:table-cell>
          <table:table-cell office:value-type="float" office:value="-0.3287" calcext:value-type="float">
            <text:p>-0.3287</text:p>
          </table:table-cell>
          <table:table-cell office:value-type="float" office:value="0.4251" calcext:value-type="float">
            <text:p>0.4251</text:p>
          </table:table-cell>
          <table:table-cell office:value-type="float" office:value="-1.1056" calcext:value-type="float">
            <text:p>-1.1056</text:p>
          </table:table-cell>
          <table:table-cell office:value-type="float" office:value="10.2724" calcext:value-type="float">
            <text:p>10.2724</text:p>
          </table:table-cell>
          <table:table-cell office:value-type="float" office:value="0.2724" calcext:value-type="float">
            <text:p>0.2724</text:p>
          </table:table-cell>
          <table:table-cell office:value-type="float" office:value="-0.6049" calcext:value-type="float">
            <text:p>-0.6049</text:p>
          </table:table-cell>
          <table:table-cell office:value-type="float" office:value="0.3817" calcext:value-type="float">
            <text:p>0.3817</text:p>
          </table:table-cell>
          <table:table-cell office:value-type="float" office:value="-0.5443" calcext:value-type="float">
            <text:p>-0.5443</text:p>
          </table:table-cell>
          <table:table-cell office:value-type="float" office:value="-0.8332" calcext:value-type="float">
            <text:p>-0.833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0.6049" calcext:value-type="float">
            <text:p>-0.6049</text:p>
          </table:table-cell>
          <table:table-cell office:value-type="float" office:value="0.3817" calcext:value-type="float">
            <text:p>0.3817</text:p>
          </table:table-cell>
          <table:table-cell office:value-type="float" office:value="-0.5443" calcext:value-type="float">
            <text:p>-0.5443</text:p>
          </table:table-cell>
          <table:table-cell office:value-type="float" office:value="-0.8332" calcext:value-type="float">
            <text:p>-0.8332</text:p>
          </table:table-cell>
          <table:table-cell office:value-type="float" office:value="10.8593" calcext:value-type="float">
            <text:p>10.8593</text:p>
          </table:table-cell>
          <table:table-cell office:value-type="float" office:value="0.8593" calcext:value-type="float">
            <text:p>0.8593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0.6695" calcext:value-type="float">
            <text:p>0.6695</text:p>
          </table:table-cell>
          <table:table-cell office:value-type="float" office:value="-0.9479" calcext:value-type="float">
            <text:p>-0.9479</text:p>
          </table:table-cell>
          <table:table-cell office:value-type="float" office:value="0.0261" calcext:value-type="float">
            <text:p>0.026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0.6695" calcext:value-type="float">
            <text:p>0.6695</text:p>
          </table:table-cell>
          <table:table-cell office:value-type="float" office:value="-0.9479" calcext:value-type="float">
            <text:p>-0.9479</text:p>
          </table:table-cell>
          <table:table-cell office:value-type="float" office:value="0.0261" calcext:value-type="float">
            <text:p>0.0261</text:p>
          </table:table-cell>
          <table:table-cell office:value-type="float" office:value="11.0178" calcext:value-type="float">
            <text:p>11.0178</text:p>
          </table:table-cell>
          <table:table-cell office:value-type="float" office:value="1.0178" calcext:value-type="float">
            <text:p>1.0178</text:p>
          </table:table-cell>
          <table:table-cell office:value-type="float" office:value="0.503" calcext:value-type="float">
            <text:p>0.503</text:p>
          </table:table-cell>
          <table:table-cell office:value-type="float" office:value="0.3169" calcext:value-type="float">
            <text:p>0.3169</text:p>
          </table:table-cell>
          <table:table-cell office:value-type="float" office:value="-0.4129" calcext:value-type="float">
            <text:p>-0.4129</text:p>
          </table:table-cell>
          <table:table-cell office:value-type="float" office:value="1.0439" calcext:value-type="float">
            <text:p>1.043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503" calcext:value-type="float">
            <text:p>0.503</text:p>
          </table:table-cell>
          <table:table-cell office:value-type="float" office:value="0.3169" calcext:value-type="float">
            <text:p>0.3169</text:p>
          </table:table-cell>
          <table:table-cell office:value-type="float" office:value="-0.4129" calcext:value-type="float">
            <text:p>-0.4129</text:p>
          </table:table-cell>
          <table:table-cell office:value-type="float" office:value="1.0439" calcext:value-type="float">
            <text:p>1.0439</text:p>
          </table:table-cell>
          <table:table-cell office:value-type="float" office:value="9.6602" calcext:value-type="float">
            <text:p>9.6602</text:p>
          </table:table-cell>
          <table:table-cell office:value-type="float" office:value="-0.3398" calcext:value-type="float">
            <text:p>-0.3398</text:p>
          </table:table-cell>
          <table:table-cell office:value-type="float" office:value="0.5281" calcext:value-type="float">
            <text:p>0.5281</text:p>
          </table:table-cell>
          <table:table-cell office:value-type="float" office:value="-0.2836" calcext:value-type="float">
            <text:p>-0.2836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7041" calcext:value-type="float">
            <text:p>0.704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5281" calcext:value-type="float">
            <text:p>0.5281</text:p>
          </table:table-cell>
          <table:table-cell office:value-type="float" office:value="-0.2836" calcext:value-type="float">
            <text:p>-0.2836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7041" calcext:value-type="float">
            <text:p>0.7041</text:p>
          </table:table-cell>
          <table:table-cell office:value-type="float" office:value="9.4237" calcext:value-type="float">
            <text:p>9.4237</text:p>
          </table:table-cell>
          <table:table-cell office:value-type="float" office:value="-0.5763" calcext:value-type="float">
            <text:p>-0.5763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5583" calcext:value-type="float">
            <text:p>-0.558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1279" calcext:value-type="float">
            <text:p>0.127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5583" calcext:value-type="float">
            <text:p>-0.558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1279" calcext:value-type="float">
            <text:p>0.1279</text:p>
          </table:table-cell>
          <table:table-cell office:value-type="float" office:value="9.0259" calcext:value-type="float">
            <text:p>9.0259</text:p>
          </table:table-cell>
          <table:table-cell office:value-type="float" office:value="-0.9741" calcext:value-type="float">
            <text:p>-0.9741</text:p>
          </table:table-cell>
          <table:table-cell office:value-type="float" office:value="-0.3915" calcext:value-type="float">
            <text:p>-0.3915</text:p>
          </table:table-cell>
          <table:table-cell office:value-type="float" office:value="-0.2926" calcext:value-type="float">
            <text:p>-0.2926</text:p>
          </table:table-cell>
          <table:table-cell office:value-type="float" office:value="0.518" calcext:value-type="float">
            <text:p>0.518</text:p>
          </table:table-cell>
          <table:table-cell office:value-type="float" office:value="-0.8463" calcext:value-type="float">
            <text:p>-0.846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0.3915" calcext:value-type="float">
            <text:p>-0.3915</text:p>
          </table:table-cell>
          <table:table-cell office:value-type="float" office:value="-0.2926" calcext:value-type="float">
            <text:p>-0.2926</text:p>
          </table:table-cell>
          <table:table-cell office:value-type="float" office:value="0.518" calcext:value-type="float">
            <text:p>0.518</text:p>
          </table:table-cell>
          <table:table-cell office:value-type="float" office:value="-0.8463" calcext:value-type="float">
            <text:p>-0.8463</text:p>
          </table:table-cell>
          <table:table-cell office:value-type="float" office:value="10.0226" calcext:value-type="float">
            <text:p>10.0226</text:p>
          </table:table-cell>
          <table:table-cell office:value-type="float" office:value="0.0226" calcext:value-type="float">
            <text:p>0.0226</text:p>
          </table:table-cell>
          <table:table-cell office:value-type="float" office:value="-0.4414" calcext:value-type="float">
            <text:p>-0.4414</text:p>
          </table:table-cell>
          <table:table-cell office:value-type="float" office:value="0.2112" calcext:value-type="float">
            <text:p>0.2112</text:p>
          </table:table-cell>
          <table:table-cell office:value-type="float" office:value="-0.317" calcext:value-type="float">
            <text:p>-0.317</text:p>
          </table:table-cell>
          <table:table-cell office:value-type="float" office:value="-0.8237" calcext:value-type="float">
            <text:p>-0.823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0.4414" calcext:value-type="float">
            <text:p>-0.4414</text:p>
          </table:table-cell>
          <table:table-cell office:value-type="float" office:value="0.2112" calcext:value-type="float">
            <text:p>0.2112</text:p>
          </table:table-cell>
          <table:table-cell office:value-type="float" office:value="-0.317" calcext:value-type="float">
            <text:p>-0.317</text:p>
          </table:table-cell>
          <table:table-cell office:value-type="float" office:value="-0.8237" calcext:value-type="float">
            <text:p>-0.8237</text:p>
          </table:table-cell>
          <table:table-cell office:value-type="float" office:value="10.7567" calcext:value-type="float">
            <text:p>10.7567</text:p>
          </table:table-cell>
          <table:table-cell office:value-type="float" office:value="0.7567" calcext:value-type="float">
            <text:p>0.7567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0.4586" calcext:value-type="float">
            <text:p>0.4586</text:p>
          </table:table-cell>
          <table:table-cell office:value-type="float" office:value="-0.7623" calcext:value-type="float">
            <text:p>-0.7623</text:p>
          </table:table-cell>
          <table:table-cell office:value-type="float" office:value="-0.067" calcext:value-type="float">
            <text:p>-0.06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0.4586" calcext:value-type="float">
            <text:p>0.4586</text:p>
          </table:table-cell>
          <table:table-cell office:value-type="float" office:value="-0.7623" calcext:value-type="float">
            <text:p>-0.7623</text:p>
          </table:table-cell>
          <table:table-cell office:value-type="float" office:value="-0.067" calcext:value-type="float">
            <text:p>-0.067</text:p>
          </table:table-cell>
          <table:table-cell office:value-type="float" office:value="10.7576" calcext:value-type="float">
            <text:p>10.7576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548" calcext:value-type="float">
            <text:p>0.2548</text:p>
          </table:table-cell>
          <table:table-cell office:value-type="float" office:value="-0.4505" calcext:value-type="float">
            <text:p>-0.4505</text:p>
          </table:table-cell>
          <table:table-cell office:value-type="float" office:value="0.6906" calcext:value-type="float">
            <text:p>0.690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548" calcext:value-type="float">
            <text:p>0.2548</text:p>
          </table:table-cell>
          <table:table-cell office:value-type="float" office:value="-0.4505" calcext:value-type="float">
            <text:p>-0.4505</text:p>
          </table:table-cell>
          <table:table-cell office:value-type="float" office:value="0.6906" calcext:value-type="float">
            <text:p>0.6906</text:p>
          </table:table-cell>
          <table:table-cell office:value-type="float" office:value="10.1673" calcext:value-type="float">
            <text:p>10.1673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3667" calcext:value-type="float">
            <text:p>0.3667</text:p>
          </table:table-cell>
          <table:table-cell office:value-type="float" office:value="-0.1559" calcext:value-type="float">
            <text:p>-0.1559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8579" calcext:value-type="float">
            <text:p>0.857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3667" calcext:value-type="float">
            <text:p>0.3667</text:p>
          </table:table-cell>
          <table:table-cell office:value-type="float" office:value="-0.1559" calcext:value-type="float">
            <text:p>-0.1559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8579" calcext:value-type="float">
            <text:p>0.8579</text:p>
          </table:table-cell>
          <table:table-cell office:value-type="float" office:value="9.2" calcext:value-type="float">
            <text:p>9.2</text:p>
          </table:table-cell>
          <table:table-cell office:value-type="float" office:value="-0.8" calcext:value-type="float">
            <text:p>-0.8</text:p>
          </table:table-cell>
          <table:table-cell office:value-type="float" office:value="0.0875" calcext:value-type="float">
            <text:p>0.0875</text:p>
          </table:table-cell>
          <table:table-cell office:value-type="float" office:value="-0.3654" calcext:value-type="float">
            <text:p>-0.3654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0579" calcext:value-type="float">
            <text:p>0.057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875" calcext:value-type="float">
            <text:p>0.0875</text:p>
          </table:table-cell>
          <table:table-cell office:value-type="float" office:value="-0.3654" calcext:value-type="float">
            <text:p>-0.3654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0579" calcext:value-type="float">
            <text:p>0.0579</text:p>
          </table:table-cell>
          <table:table-cell office:value-type="float" office:value="9.3312" calcext:value-type="float">
            <text:p>9.3312</text:p>
          </table:table-cell>
          <table:table-cell office:value-type="float" office:value="-0.6688" calcext:value-type="float">
            <text:p>-0.6688</text:p>
          </table:table-cell>
          <table:table-cell office:value-type="float" office:value="-0.2255" calcext:value-type="float">
            <text:p>-0.22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0.5051" calcext:value-type="float">
            <text:p>0.5051</text:p>
          </table:table-cell>
          <table:table-cell office:value-type="float" office:value="-0.6109" calcext:value-type="float">
            <text:p>-0.610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0.2255" calcext:value-type="float">
            <text:p>-0.22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0.5051" calcext:value-type="float">
            <text:p>0.5051</text:p>
          </table:table-cell>
          <table:table-cell office:value-type="float" office:value="-0.6109" calcext:value-type="float">
            <text:p>-0.6109</text:p>
          </table:table-cell>
          <table:table-cell office:value-type="float" office:value="9.8849" calcext:value-type="float">
            <text:p>9.8849</text:p>
          </table:table-cell>
          <table:table-cell office:value-type="float" office:value="-0.1151" calcext:value-type="float">
            <text:p>-0.1151</text:p>
          </table:table-cell>
          <table:table-cell office:value-type="float" office:value="-0.2794" calcext:value-type="float">
            <text:p>-0.2794</text:p>
          </table:table-cell>
          <table:table-cell office:value-type="float" office:value="0.1165" calcext:value-type="float">
            <text:p>0.1165</text:p>
          </table:table-cell>
          <table:table-cell office:value-type="float" office:value="-0.1633" calcext:value-type="float">
            <text:p>-0.1633</text:p>
          </table:table-cell>
          <table:table-cell office:value-type="float" office:value="-0.726" calcext:value-type="float">
            <text:p>-0.72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0.2794" calcext:value-type="float">
            <text:p>-0.2794</text:p>
          </table:table-cell>
          <table:table-cell office:value-type="float" office:value="0.1165" calcext:value-type="float">
            <text:p>0.1165</text:p>
          </table:table-cell>
          <table:table-cell office:value-type="float" office:value="-0.1633" calcext:value-type="float">
            <text:p>-0.1633</text:p>
          </table:table-cell>
          <table:table-cell office:value-type="float" office:value="-0.726" calcext:value-type="float">
            <text:p>-0.726</text:p>
          </table:table-cell>
          <table:table-cell office:value-type="float" office:value="10.6132" calcext:value-type="float">
            <text:p>10.6132</text:p>
          </table:table-cell>
          <table:table-cell office:value-type="float" office:value="0.6132" calcext:value-type="float">
            <text:p>0.6132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0.2838" calcext:value-type="float">
            <text:p>0.2838</text:p>
          </table:table-cell>
          <table:table-cell office:value-type="float" office:value="-0.5827" calcext:value-type="float">
            <text:p>-0.5827</text:p>
          </table:table-cell>
          <table:table-cell office:value-type="float" office:value="-0.1128" calcext:value-type="float">
            <text:p>-0.112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0.2838" calcext:value-type="float">
            <text:p>0.2838</text:p>
          </table:table-cell>
          <table:table-cell office:value-type="float" office:value="-0.5827" calcext:value-type="float">
            <text:p>-0.5827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10.5399" calcext:value-type="float">
            <text:p>10.5399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1613" calcext:value-type="float">
            <text:p>0.1613</text:p>
          </table:table-cell>
          <table:table-cell office:value-type="float" office:value="-0.4257" calcext:value-type="float">
            <text:p>-0.4257</text:p>
          </table:table-cell>
          <table:table-cell office:value-type="float" office:value="0.427" calcext:value-type="float">
            <text:p>0.42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1613" calcext:value-type="float">
            <text:p>0.1613</text:p>
          </table:table-cell>
          <table:table-cell office:value-type="float" office:value="-0.4257" calcext:value-type="float">
            <text:p>-0.4257</text:p>
          </table:table-cell>
          <table:table-cell office:value-type="float" office:value="0.427" calcext:value-type="float">
            <text:p>0.427</text:p>
          </table:table-cell>
          <table:table-cell office:value-type="float" office:value="10.2446" calcext:value-type="float">
            <text:p>10.2446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2162" calcext:value-type="float">
            <text:p>0.2162</text:p>
          </table:table-cell>
          <table:table-cell office:value-type="float" office:value="-0.0946" calcext:value-type="float">
            <text:p>-0.0946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6716" calcext:value-type="float">
            <text:p>0.671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2162" calcext:value-type="float">
            <text:p>0.2162</text:p>
          </table:table-cell>
          <table:table-cell office:value-type="float" office:value="-0.0946" calcext:value-type="float">
            <text:p>-0.0946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6716" calcext:value-type="float">
            <text:p>0.6716</text:p>
          </table:table-cell>
          <table:table-cell office:value-type="float" office:value="9.43" calcext:value-type="float">
            <text:p>9.43</text:p>
          </table:table-cell>
          <table:table-cell office:value-type="float" office:value="-0.57" calcext:value-type="float">
            <text:p>-0.57</text:p>
          </table:table-cell>
          <table:table-cell office:value-type="float" office:value="0.0475" calcext:value-type="float">
            <text:p>0.0475</text:p>
          </table:table-cell>
          <table:table-cell office:value-type="float" office:value="-0.2222" calcext:value-type="float">
            <text:p>-0.2222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1016" calcext:value-type="float">
            <text:p>0.101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475" calcext:value-type="float">
            <text:p>0.0475</text:p>
          </table:table-cell>
          <table:table-cell office:value-type="float" office:value="-0.2222" calcext:value-type="float">
            <text:p>-0.2222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1016" calcext:value-type="float">
            <text:p>0.1016</text:p>
          </table:table-cell>
          <table:table-cell office:value-type="float" office:value="9.5078" calcext:value-type="float">
            <text:p>9.5078</text:p>
          </table:table-cell>
          <table:table-cell office:value-type="float" office:value="-0.4922" calcext:value-type="float">
            <text:p>-0.4922</text:p>
          </table:table-cell>
          <table:table-cell office:value-type="float" office:value="-0.1382" calcext:value-type="float">
            <text:p>-0.1382</text:p>
          </table:table-cell>
          <table:table-cell office:value-type="float" office:value="-0.1189" calcext:value-type="float">
            <text:p>-0.1189</text:p>
          </table:table-cell>
          <table:table-cell office:value-type="float" office:value="0.3657" calcext:value-type="float">
            <text:p>0.3657</text:p>
          </table:table-cell>
          <table:table-cell office:value-type="float" office:value="-0.3906" calcext:value-type="float">
            <text:p>-0.390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0.1382" calcext:value-type="float">
            <text:p>-0.1382</text:p>
          </table:table-cell>
          <table:table-cell office:value-type="float" office:value="-0.1189" calcext:value-type="float">
            <text:p>-0.1189</text:p>
          </table:table-cell>
          <table:table-cell office:value-type="float" office:value="0.3657" calcext:value-type="float">
            <text:p>0.3657</text:p>
          </table:table-cell>
          <table:table-cell office:value-type="float" office:value="-0.3906" calcext:value-type="float">
            <text:p>-0.3906</text:p>
          </table:table-cell>
          <table:table-cell office:value-type="float" office:value="9.827" calcext:value-type="float">
            <text:p>9.827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617" calcext:value-type="float">
            <text:p>-0.1617</text:p>
          </table:table-cell>
          <table:table-cell office:value-type="float" office:value="0.0803" calcext:value-type="float">
            <text:p>0.0803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-0.5636" calcext:value-type="float">
            <text:p>-0.563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0.1617" calcext:value-type="float">
            <text:p>-0.1617</text:p>
          </table:table-cell>
          <table:table-cell office:value-type="float" office:value="0.0803" calcext:value-type="float">
            <text:p>0.0803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-0.5636" calcext:value-type="float">
            <text:p>-0.5636</text:p>
          </table:table-cell>
          <table:table-cell office:value-type="float" office:value="10.4508" calcext:value-type="float">
            <text:p>10.4508</text:p>
          </table:table-cell>
          <table:table-cell office:value-type="float" office:value="0.4508" calcext:value-type="float">
            <text:p>0.4508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0.1696" calcext:value-type="float">
            <text:p>0.1696</text:p>
          </table:table-cell>
          <table:table-cell office:value-type="float" office:value="-0.4496" calcext:value-type="float">
            <text:p>-0.4496</text:p>
          </table:table-cell>
          <table:table-cell office:value-type="float" office:value="-0.1128" calcext:value-type="float">
            <text:p>-0.112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0.1696" calcext:value-type="float">
            <text:p>0.1696</text:p>
          </table:table-cell>
          <table:table-cell office:value-type="float" office:value="-0.4496" calcext:value-type="float">
            <text:p>-0.4496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10.4068" calcext:value-type="float">
            <text:p>10.4068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794" calcext:value-type="float">
            <text:p>0.0794</text:p>
          </table:table-cell>
          <table:table-cell office:value-type="float" office:value="-0.359" calcext:value-type="float">
            <text:p>-0.359</text:p>
          </table:table-cell>
          <table:table-cell office:value-type="float" office:value="0.294" calcext:value-type="float">
            <text:p>0.29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794" calcext:value-type="float">
            <text:p>0.0794</text:p>
          </table:table-cell>
          <table:table-cell office:value-type="float" office:value="-0.359" calcext:value-type="float">
            <text:p>-0.359</text:p>
          </table:table-cell>
          <table:table-cell office:value-type="float" office:value="0.294" calcext:value-type="float">
            <text:p>0.294</text:p>
          </table:table-cell>
          <table:table-cell office:value-type="float" office:value="10.1563" calcext:value-type="float">
            <text:p>10.1563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1109" calcext:value-type="float">
            <text:p>0.1109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4503" calcext:value-type="float">
            <text:p>0.450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1109" calcext:value-type="float">
            <text:p>0.1109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4503" calcext:value-type="float">
            <text:p>0.4503</text:p>
          </table:table-cell>
          <table:table-cell office:value-type="float" office:value="9.6814" calcext:value-type="float">
            <text:p>9.6814</text:p>
          </table:table-cell>
          <table:table-cell office:value-type="float" office:value="-0.3186" calcext:value-type="float">
            <text:p>-0.318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1321" calcext:value-type="float">
            <text:p>-0.1321</text:p>
          </table:table-cell>
          <table:table-cell office:value-type="float" office:value="0.3041" calcext:value-type="float">
            <text:p>0.3041</text:p>
          </table:table-cell>
          <table:table-cell office:value-type="float" office:value="0.1316" calcext:value-type="float">
            <text:p>0.131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1321" calcext:value-type="float">
            <text:p>-0.1321</text:p>
          </table:table-cell>
          <table:table-cell office:value-type="float" office:value="0.3041" calcext:value-type="float">
            <text:p>0.3041</text:p>
          </table:table-cell>
          <table:table-cell office:value-type="float" office:value="0.1316" calcext:value-type="float">
            <text:p>0.1316</text:p>
          </table:table-cell>
          <table:table-cell office:value-type="float" office:value="9.5909" calcext:value-type="float">
            <text:p>9.5909</text:p>
          </table:table-cell>
          <table:table-cell office:value-type="float" office:value="-0.4091" calcext:value-type="float">
            <text:p>-0.4091</text:p>
          </table:table-cell>
          <table:table-cell office:value-type="float" office:value="-0.0965" calcext:value-type="float">
            <text:p>-0.0965</text:p>
          </table:table-cell>
          <table:table-cell office:value-type="float" office:value="-0.0477" calcext:value-type="float">
            <text:p>-0.0477</text:p>
          </table:table-cell>
          <table:table-cell office:value-type="float" office:value="0.2311" calcext:value-type="float">
            <text:p>0.2311</text:p>
          </table:table-cell>
          <table:table-cell office:value-type="float" office:value="-0.2775" calcext:value-type="float">
            <text:p>-0.277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0.0965" calcext:value-type="float">
            <text:p>-0.0965</text:p>
          </table:table-cell>
          <table:table-cell office:value-type="float" office:value="-0.0477" calcext:value-type="float">
            <text:p>-0.0477</text:p>
          </table:table-cell>
          <table:table-cell office:value-type="float" office:value="0.2311" calcext:value-type="float">
            <text:p>0.2311</text:p>
          </table:table-cell>
          <table:table-cell office:value-type="float" office:value="-0.2775" calcext:value-type="float">
            <text:p>-0.2775</text:p>
          </table:table-cell>
          <table:table-cell office:value-type="float" office:value="9.8678" calcext:value-type="float">
            <text:p>9.8678</text:p>
          </table:table-cell>
          <table:table-cell office:value-type="float" office:value="-0.1322" calcext:value-type="float">
            <text:p>-0.1322</text:p>
          </table:table-cell>
          <table:table-cell office:value-type="float" office:value="-0.0844" calcext:value-type="float">
            <text:p>-0.0844</text:p>
          </table:table-cell>
          <table:table-cell office:value-type="float" office:value="0.073" calcext:value-type="float">
            <text:p>0.073</text:p>
          </table:table-cell>
          <table:table-cell office:value-type="float" office:value="-0.1124" calcext:value-type="float">
            <text:p>-0.1124</text:p>
          </table:table-cell>
          <table:table-cell office:value-type="float" office:value="-0.4097" calcext:value-type="float">
            <text:p>-0.409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0.0844" calcext:value-type="float">
            <text:p>-0.0844</text:p>
          </table:table-cell>
          <table:table-cell office:value-type="float" office:value="0.073" calcext:value-type="float">
            <text:p>0.073</text:p>
          </table:table-cell>
          <table:table-cell office:value-type="float" office:value="-0.1124" calcext:value-type="float">
            <text:p>-0.1124</text:p>
          </table:table-cell>
          <table:table-cell office:value-type="float" office:value="-0.4097" calcext:value-type="float">
            <text:p>-0.4097</text:p>
          </table:table-cell>
          <table:table-cell office:value-type="float" office:value="10.3364" calcext:value-type="float">
            <text:p>10.3364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1007" calcext:value-type="float">
            <text:p>0.100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-0.0732" calcext:value-type="float">
            <text:p>-0.073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1007" calcext:value-type="float">
            <text:p>0.100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10.3281" calcext:value-type="float">
            <text:p>10.3281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191" calcext:value-type="float">
            <text:p>0.0191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2549" calcext:value-type="float">
            <text:p>0.254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191" calcext:value-type="float">
            <text:p>0.0191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2549" calcext:value-type="float">
            <text:p>0.2549</text:p>
          </table:table-cell>
          <table:table-cell office:value-type="float" office:value="10.0391" calcext:value-type="float">
            <text:p>10.0391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458" calcext:value-type="float">
            <text:p>0.0458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294" calcext:value-type="float">
            <text:p>0.29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0458" calcext:value-type="float">
            <text:p>0.0458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294" calcext:value-type="float">
            <text:p>0.294</text:p>
          </table:table-cell>
          <table:table-cell office:value-type="float" office:value="9.7175" calcext:value-type="float">
            <text:p>9.7175</text:p>
          </table:table-cell>
          <table:table-cell office:value-type="float" office:value="-0.2825" calcext:value-type="float">
            <text:p>-0.2825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-0.0763" calcext:value-type="float">
            <text:p>-0.0763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0115" calcext:value-type="float">
            <text:p>0.011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-0.0763" calcext:value-type="float">
            <text:p>-0.0763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0115" calcext:value-type="float">
            <text:p>0.0115</text:p>
          </table:table-cell>
          <table:table-cell office:value-type="float" office:value="9.7444" calcext:value-type="float">
            <text:p>9.7444</text:p>
          </table:table-cell>
          <table:table-cell office:value-type="float" office:value="-0.2556" calcext:value-type="float">
            <text:p>-0.255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478" calcext:value-type="float">
            <text:p>0.0478</text:p>
          </table:table-cell>
          <table:table-cell office:value-type="float" office:value="-0.2441" calcext:value-type="float">
            <text:p>-0.244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478" calcext:value-type="float">
            <text:p>0.0478</text:p>
          </table:table-cell>
          <table:table-cell office:value-type="float" office:value="-0.2441" calcext:value-type="float">
            <text:p>-0.2441</text:p>
          </table:table-cell>
          <table:table-cell office:value-type="float" office:value="9.9717" calcext:value-type="float">
            <text:p>9.9717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655" calcext:value-type="float">
            <text:p>0.0655</text:p>
          </table:table-cell>
          <table:table-cell office:value-type="float" office:value="-0.2105" calcext:value-type="float">
            <text:p>-0.2105</text:p>
          </table:table-cell>
          <table:table-cell office:value-type="float" office:value="-0.2725" calcext:value-type="float">
            <text:p>-0.27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655" calcext:value-type="float">
            <text:p>0.0655</text:p>
          </table:table-cell>
          <table:table-cell office:value-type="float" office:value="-0.2105" calcext:value-type="float">
            <text:p>-0.2105</text:p>
          </table:table-cell>
          <table:table-cell office:value-type="float" office:value="-0.2725" calcext:value-type="float">
            <text:p>-0.2725</text:p>
          </table:table-cell>
          <table:table-cell office:value-type="float" office:value="10.2784" calcext:value-type="float">
            <text:p>10.2784</text:p>
          </table:table-cell>
          <table:table-cell office:value-type="float" office:value="0.2784" calcext:value-type="float">
            <text:p>0.2784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22" calcext:value-type="float">
            <text:p>0.0522</text:p>
          </table:table-cell>
          <table:table-cell office:value-type="float" office:value="-0.3438" calcext:value-type="float">
            <text:p>-0.3438</text:p>
          </table:table-cell>
          <table:table-cell office:value-type="float" office:value="0.0059" calcext:value-type="float">
            <text:p>0.005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22" calcext:value-type="float">
            <text:p>0.0522</text:p>
          </table:table-cell>
          <table:table-cell office:value-type="float" office:value="-0.3438" calcext:value-type="float">
            <text:p>-0.3438</text:p>
          </table:table-cell>
          <table:table-cell office:value-type="float" office:value="0.0059" calcext:value-type="float">
            <text:p>0.0059</text:p>
          </table:table-cell>
          <table:table-cell office:value-type="float" office:value="10.2386" calcext:value-type="float">
            <text:p>10.2386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0406" calcext:value-type="float">
            <text:p>0.0406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2186" calcext:value-type="float">
            <text:p>-0.2186</text:p>
          </table:table-cell>
          <table:table-cell office:value-type="float" office:value="0.2445" calcext:value-type="float">
            <text:p>0.244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0406" calcext:value-type="float">
            <text:p>0.0406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2186" calcext:value-type="float">
            <text:p>-0.2186</text:p>
          </table:table-cell>
          <table:table-cell office:value-type="float" office:value="0.2445" calcext:value-type="float">
            <text:p>0.2445</text:p>
          </table:table-cell>
          <table:table-cell office:value-type="float" office:value="9.9366" calcext:value-type="float">
            <text:p>9.9366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1811" calcext:value-type="float">
            <text:p>0.181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1811" calcext:value-type="float">
            <text:p>0.1811</text:p>
          </table:table-cell>
          <table:table-cell office:value-type="float" office:value="9.7568" calcext:value-type="float">
            <text:p>9.7568</text:p>
          </table:table-cell>
          <table:table-cell office:value-type="float" office:value="-0.2432" calcext:value-type="float">
            <text:p>-0.2432</text:p>
          </table:table-cell>
          <table:table-cell office:value-type="float" office:value="-0.0512" calcext:value-type="float">
            <text:p>-0.0512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0.0536" calcext:value-type="float">
            <text:p>0.0536</text:p>
          </table:table-cell>
          <table:table-cell office:value-type="float" office:value="-0.0621" calcext:value-type="float">
            <text:p>-0.062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-0.0512" calcext:value-type="float">
            <text:p>-0.0512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0.0536" calcext:value-type="float">
            <text:p>0.0536</text:p>
          </table:table-cell>
          <table:table-cell office:value-type="float" office:value="-0.0621" calcext:value-type="float">
            <text:p>-0.0621</text:p>
          </table:table-cell>
          <table:table-cell office:value-type="float" office:value="9.8463" calcext:value-type="float">
            <text:p>9.8463</text:p>
          </table:table-cell>
          <table:table-cell office:value-type="float" office:value="-0.1537" calcext:value-type="float">
            <text:p>-0.1537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0.0287" calcext:value-type="float">
            <text:p>0.0287</text:p>
          </table:table-cell>
          <table:table-cell office:value-type="float" office:value="-0.0854" calcext:value-type="float">
            <text:p>-0.0854</text:p>
          </table:table-cell>
          <table:table-cell office:value-type="float" office:value="-0.2159" calcext:value-type="float">
            <text:p>-0.215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0.0287" calcext:value-type="float">
            <text:p>0.0287</text:p>
          </table:table-cell>
          <table:table-cell office:value-type="float" office:value="-0.0854" calcext:value-type="float">
            <text:p>-0.0854</text:p>
          </table:table-cell>
          <table:table-cell office:value-type="float" office:value="-0.2159" calcext:value-type="float">
            <text:p>-0.2159</text:p>
          </table:table-cell>
          <table:table-cell office:value-type="float" office:value="10.0785" calcext:value-type="float">
            <text:p>10.0785</text:p>
          </table:table-cell>
          <table:table-cell office:value-type="float" office:value="0.0785" calcext:value-type="float">
            <text:p>0.0785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53" calcext:value-type="float">
            <text:p>0.053</text:p>
          </table:table-cell>
          <table:table-cell office:value-type="float" office:value="-0.262" calcext:value-type="float">
            <text:p>-0.262</text:p>
          </table:table-cell>
          <table:table-cell office:value-type="float" office:value="-0.1374" calcext:value-type="float">
            <text:p>-0.137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53" calcext:value-type="float">
            <text:p>0.053</text:p>
          </table:table-cell>
          <table:table-cell office:value-type="float" office:value="-0.262" calcext:value-type="float">
            <text:p>-0.262</text:p>
          </table:table-cell>
          <table:table-cell office:value-type="float" office:value="-0.1374" calcext:value-type="float">
            <text:p>-0.1374</text:p>
          </table:table-cell>
          <table:table-cell office:value-type="float" office:value="10.2427" calcext:value-type="float">
            <text:p>10.2427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1053" calcext:value-type="float">
            <text:p>0.105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1053" calcext:value-type="float">
            <text:p>0.1053</text:p>
          </table:table-cell>
          <table:table-cell office:value-type="float" office:value="10.0935" calcext:value-type="float">
            <text:p>10.0935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161" calcext:value-type="float">
            <text:p>0.0161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1988" calcext:value-type="float">
            <text:p>0.198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0161" calcext:value-type="float">
            <text:p>0.0161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1988" calcext:value-type="float">
            <text:p>0.1988</text:p>
          </table:table-cell>
          <table:table-cell office:value-type="float" office:value="9.8677" calcext:value-type="float">
            <text:p>9.8677</text:p>
          </table:table-cell>
          <table:table-cell office:value-type="float" office:value="-0.1323" calcext:value-type="float">
            <text:p>-0.1323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664" calcext:value-type="float">
            <text:p>0.066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664" calcext:value-type="float">
            <text:p>0.0664</text:p>
          </table:table-cell>
          <table:table-cell office:value-type="float" office:value="9.8121" calcext:value-type="float">
            <text:p>9.8121</text:p>
          </table:table-cell>
          <table:table-cell office:value-type="float" office:value="-0.1879" calcext:value-type="float">
            <text:p>-0.1879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1215" calcext:value-type="float">
            <text:p>-0.121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1215" calcext:value-type="float">
            <text:p>-0.1215</text:p>
          </table:table-cell>
          <table:table-cell office:value-type="float" office:value="9.9515" calcext:value-type="float">
            <text:p>9.9515</text:p>
          </table:table-cell>
          <table:table-cell office:value-type="float" office:value="-0.0485" calcext:value-type="float">
            <text:p>-0.0485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0.0386" calcext:value-type="float">
            <text:p>0.0386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-0.17" calcext:value-type="float">
            <text:p>-0.1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0.0386" calcext:value-type="float">
            <text:p>0.0386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-0.17" calcext:value-type="float">
            <text:p>-0.17</text:p>
          </table:table-cell>
          <table:table-cell office:value-type="float" office:value="10.1484" calcext:value-type="float">
            <text:p>10.1484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323" calcext:value-type="float">
            <text:p>0.0323</text:p>
          </table:table-cell>
          <table:table-cell office:value-type="float" office:value="-0.2625" calcext:value-type="float">
            <text:p>-0.2625</text:p>
          </table:table-cell>
          <table:table-cell office:value-type="float" office:value="-0.0216" calcext:value-type="float">
            <text:p>-0.021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323" calcext:value-type="float">
            <text:p>0.0323</text:p>
          </table:table-cell>
          <table:table-cell office:value-type="float" office:value="-0.2625" calcext:value-type="float">
            <text:p>-0.2625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10.1675" calcext:value-type="float">
            <text:p>10.1675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194" calcext:value-type="float">
            <text:p>0.0194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2003" calcext:value-type="float">
            <text:p>-0.2003</text:p>
          </table:table-cell>
          <table:table-cell office:value-type="float" office:value="0.1459" calcext:value-type="float">
            <text:p>0.145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.0194" calcext:value-type="float">
            <text:p>0.0194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2003" calcext:value-type="float">
            <text:p>-0.2003</text:p>
          </table:table-cell>
          <table:table-cell office:value-type="float" office:value="0.1459" calcext:value-type="float">
            <text:p>0.1459</text:p>
          </table:table-cell>
          <table:table-cell office:value-type="float" office:value="9.989" calcext:value-type="float">
            <text:p>9.989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599" calcext:value-type="float">
            <text:p>-0.0599</text:p>
          </table:table-cell>
          <table:table-cell office:value-type="float" office:value="0.1349" calcext:value-type="float">
            <text:p>0.134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599" calcext:value-type="float">
            <text:p>-0.0599</text:p>
          </table:table-cell>
          <table:table-cell office:value-type="float" office:value="0.1349" calcext:value-type="float">
            <text:p>0.1349</text:p>
          </table:table-cell>
          <table:table-cell office:value-type="float" office:value="9.8413" calcext:value-type="float">
            <text:p>9.8413</text:p>
          </table:table-cell>
          <table:table-cell office:value-type="float" office:value="-0.1587" calcext:value-type="float">
            <text:p>-0.1587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239" calcext:value-type="float">
            <text:p>-0.023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9.8817" calcext:value-type="float">
            <text:p>9.8817</text:p>
          </table:table-cell>
          <table:table-cell office:value-type="float" office:value="-0.1183" calcext:value-type="float">
            <text:p>-0.118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-0.1422" calcext:value-type="float">
            <text:p>-0.142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-0.1422" calcext:value-type="float">
            <text:p>-0.1422</text:p>
          </table:table-cell>
          <table:table-cell office:value-type="float" office:value="10.0395" calcext:value-type="float">
            <text:p>10.0395</text:p>
          </table:table-cell>
          <table:table-cell office:value-type="float" office:value="0.0395" calcext:value-type="float">
            <text:p>0.0395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0344" calcext:value-type="float">
            <text:p>0.0344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027" calcext:value-type="float">
            <text:p>-0.102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0344" calcext:value-type="float">
            <text:p>0.0344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10.1633" calcext:value-type="float">
            <text:p>10.1633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231" calcext:value-type="float">
            <text:p>-0.231</text:p>
          </table:table-cell>
          <table:table-cell office:value-type="float" office:value="0.0606" calcext:value-type="float">
            <text:p>0.060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231" calcext:value-type="float">
            <text:p>-0.231</text:p>
          </table:table-cell>
          <table:table-cell office:value-type="float" office:value="0.0606" calcext:value-type="float">
            <text:p>0.0606</text:p>
          </table:table-cell>
          <table:table-cell office:value-type="float" office:value="10.074" calcext:value-type="float">
            <text:p>10.07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-0.1334" calcext:value-type="float">
            <text:p>-0.1334</text:p>
          </table:table-cell>
          <table:table-cell office:value-type="float" office:value="0.1346" calcext:value-type="float">
            <text:p>0.134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-0.1334" calcext:value-type="float">
            <text:p>-0.1334</text:p>
          </table:table-cell>
          <table:table-cell office:value-type="float" office:value="0.1346" calcext:value-type="float">
            <text:p>0.1346</text:p>
          </table:table-cell>
          <table:table-cell office:value-type="float" office:value="9.9188" calcext:value-type="float">
            <text:p>9.9188</text:p>
          </table:table-cell>
          <table:table-cell office:value-type="float" office:value="-0.0812" calcext:value-type="float">
            <text:p>-0.0812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0.0534" calcext:value-type="float">
            <text:p>0.053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0.0534" calcext:value-type="float">
            <text:p>0.0534</text:p>
          </table:table-cell>
          <table:table-cell office:value-type="float" office:value="9.8623" calcext:value-type="float">
            <text:p>9.8623</text:p>
          </table:table-cell>
          <table:table-cell office:value-type="float" office:value="-0.1377" calcext:value-type="float">
            <text:p>-0.1377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843" calcext:value-type="float">
            <text:p>-0.084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843" calcext:value-type="float">
            <text:p>-0.0843</text:p>
          </table:table-cell>
          <table:table-cell office:value-type="float" office:value="9.962" calcext:value-type="float">
            <text:p>9.96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75" calcext:value-type="float">
            <text:p>0.0275</text:p>
          </table:table-cell>
          <table:table-cell office:value-type="float" office:value="-0.1583" calcext:value-type="float">
            <text:p>-0.1583</text:p>
          </table:table-cell>
          <table:table-cell office:value-type="float" office:value="-0.1223" calcext:value-type="float">
            <text:p>-0.122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75" calcext:value-type="float">
            <text:p>0.0275</text:p>
          </table:table-cell>
          <table:table-cell office:value-type="float" office:value="-0.1583" calcext:value-type="float">
            <text:p>-0.1583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0.1079" calcext:value-type="float">
            <text:p>10.1079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17" calcext:value-type="float">
            <text:p>0.0217</text:p>
          </table:table-cell>
          <table:table-cell office:value-type="float" office:value="-0.2267" calcext:value-type="float">
            <text:p>-0.2267</text:p>
          </table:table-cell>
          <table:table-cell office:value-type="float" office:value="-0.0144" calcext:value-type="float">
            <text:p>-0.014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17" calcext:value-type="float">
            <text:p>0.0217</text:p>
          </table:table-cell>
          <table:table-cell office:value-type="float" office:value="-0.2267" calcext:value-type="float">
            <text:p>-0.2267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10.1182" calcext:value-type="float">
            <text:p>10.1182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1819" calcext:value-type="float">
            <text:p>-0.1819</text:p>
          </table:table-cell>
          <table:table-cell office:value-type="float" office:value="0.1038" calcext:value-type="float">
            <text:p>0.103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1819" calcext:value-type="float">
            <text:p>-0.1819</text:p>
          </table:table-cell>
          <table:table-cell office:value-type="float" office:value="0.1038" calcext:value-type="float">
            <text:p>0.1038</text:p>
          </table:table-cell>
          <table:table-cell office:value-type="float" office:value="9.9894" calcext:value-type="float">
            <text:p>9.9894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34" calcext:value-type="float">
            <text:p>-0.0834</text:p>
          </table:table-cell>
          <table:table-cell office:value-type="float" office:value="0.0932" calcext:value-type="float">
            <text:p>0.093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34" calcext:value-type="float">
            <text:p>-0.0834</text:p>
          </table:table-cell>
          <table:table-cell office:value-type="float" office:value="0.0932" calcext:value-type="float">
            <text:p>0.0932</text:p>
          </table:table-cell>
          <table:table-cell office:value-type="float" office:value="9.8885" calcext:value-type="float">
            <text:p>9.8885</text:p>
          </table:table-cell>
          <table:table-cell office:value-type="float" office:value="-0.1115" calcext:value-type="float">
            <text:p>-0.1115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-0.0182" calcext:value-type="float">
            <text:p>-0.018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9.9122" calcext:value-type="float">
            <text:p>9.9122</text:p>
          </table:table-cell>
          <table:table-cell office:value-type="float" office:value="-0.0878" calcext:value-type="float">
            <text:p>-0.0878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06" calcext:value-type="float">
            <text:p>-0.10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06" calcext:value-type="float">
            <text:p>-0.106</text:p>
          </table:table-cell>
          <table:table-cell office:value-type="float" office:value="10.0351" calcext:value-type="float">
            <text:p>10.0351</text:p>
          </table:table-cell>
          <table:table-cell office:value-type="float" office:value="0.0351" calcext:value-type="float">
            <text:p>0.0351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0245" calcext:value-type="float">
            <text:p>0.0245</text:p>
          </table:table-cell>
          <table:table-cell office:value-type="float" office:value="-0.1965" calcext:value-type="float">
            <text:p>-0.1965</text:p>
          </table:table-cell>
          <table:table-cell office:value-type="float" office:value="-0.071" calcext:value-type="float">
            <text:p>-0.07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0245" calcext:value-type="float">
            <text:p>0.0245</text:p>
          </table:table-cell>
          <table:table-cell office:value-type="float" office:value="-0.1965" calcext:value-type="float">
            <text:p>-0.1965</text:p>
          </table:table-cell>
          <table:table-cell office:value-type="float" office:value="-0.071" calcext:value-type="float">
            <text:p>-0.071</text:p>
          </table:table-cell>
          <table:table-cell office:value-type="float" office:value="10.1197" calcext:value-type="float">
            <text:p>10.119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2076" calcext:value-type="float">
            <text:p>-0.2076</text:p>
          </table:table-cell>
          <table:table-cell office:value-type="float" office:value="0.0488" calcext:value-type="float">
            <text:p>0.048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2076" calcext:value-type="float">
            <text:p>-0.2076</text:p>
          </table:table-cell>
          <table:table-cell office:value-type="float" office:value="0.0488" calcext:value-type="float">
            <text:p>0.0488</text:p>
          </table:table-cell>
          <table:table-cell office:value-type="float" office:value="10.0484" calcext:value-type="float">
            <text:p>10.0484</text:p>
          </table:table-cell>
          <table:table-cell office:value-type="float" office:value="0.0484" calcext:value-type="float">
            <text:p>0.0484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1347" calcext:value-type="float">
            <text:p>-0.1347</text:p>
          </table:table-cell>
          <table:table-cell office:value-type="float" office:value="0.0972" calcext:value-type="float">
            <text:p>0.097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1347" calcext:value-type="float">
            <text:p>-0.1347</text:p>
          </table:table-cell>
          <table:table-cell office:value-type="float" office:value="0.0972" calcext:value-type="float">
            <text:p>0.0972</text:p>
          </table:table-cell>
          <table:table-cell office:value-type="float" office:value="9.938" calcext:value-type="float">
            <text:p>9.938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0685" calcext:value-type="float">
            <text:p>-0.0685</text:p>
          </table:table-cell>
          <table:table-cell office:value-type="float" office:value="0.0352" calcext:value-type="float">
            <text:p>0.035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0685" calcext:value-type="float">
            <text:p>-0.0685</text:p>
          </table:table-cell>
          <table:table-cell office:value-type="float" office:value="0.0352" calcext:value-type="float">
            <text:p>0.0352</text:p>
          </table:table-cell>
          <table:table-cell office:value-type="float" office:value="9.901" calcext:value-type="float">
            <text:p>9.901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829" calcext:value-type="float">
            <text:p>-0.0829</text:p>
          </table:table-cell>
          <table:table-cell office:value-type="float" office:value="-0.0639" calcext:value-type="float">
            <text:p>-0.063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829" calcext:value-type="float">
            <text:p>-0.0829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9.9756" calcext:value-type="float">
            <text:p>9.9756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-0.0883" calcext:value-type="float">
            <text:p>-0.088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-0.0883" calcext:value-type="float">
            <text:p>-0.0883</text:p>
          </table:table-cell>
          <table:table-cell office:value-type="float" office:value="10.0828" calcext:value-type="float">
            <text:p>10.0828</text:p>
          </table:table-cell>
          <table:table-cell office:value-type="float" office:value="0.0828" calcext:value-type="float">
            <text:p>0.082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148" calcext:value-type="float">
            <text:p>0.0148</text:p>
          </table:table-cell>
          <table:table-cell office:value-type="float" office:value="-0.2058" calcext:value-type="float">
            <text:p>-0.2058</text:p>
          </table:table-cell>
          <table:table-cell office:value-type="float" office:value="-0.0055" calcext:value-type="float">
            <text:p>-0.005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148" calcext:value-type="float">
            <text:p>0.0148</text:p>
          </table:table-cell>
          <table:table-cell office:value-type="float" office:value="-0.2058" calcext:value-type="float">
            <text:p>-0.2058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10.0834" calcext:value-type="float">
            <text:p>10.0834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0.0778" calcext:value-type="float">
            <text:p>0.077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0.0778" calcext:value-type="float">
            <text:p>0.0778</text:p>
          </table:table-cell>
          <table:table-cell office:value-type="float" office:value="9.9877" calcext:value-type="float">
            <text:p>9.9877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979" calcext:value-type="float">
            <text:p>-0.0979</text:p>
          </table:table-cell>
          <table:table-cell office:value-type="float" office:value="0.0656" calcext:value-type="float">
            <text:p>0.065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979" calcext:value-type="float">
            <text:p>-0.0979</text:p>
          </table:table-cell>
          <table:table-cell office:value-type="float" office:value="0.0656" calcext:value-type="float">
            <text:p>0.0656</text:p>
          </table:table-cell>
          <table:table-cell office:value-type="float" office:value="9.9168" calcext:value-type="float">
            <text:p>9.9168</text:p>
          </table:table-cell>
          <table:table-cell office:value-type="float" office:value="-0.0832" calcext:value-type="float">
            <text:p>-0.0832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739" calcext:value-type="float">
            <text:p>-0.0739</text:p>
          </table:table-cell>
          <table:table-cell office:value-type="float" office:value="-0.0176" calcext:value-type="float">
            <text:p>-0.017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739" calcext:value-type="float">
            <text:p>-0.0739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9.9393" calcext:value-type="float">
            <text:p>9.9393</text:p>
          </table:table-cell>
          <table:table-cell office:value-type="float" office:value="-0.0607" calcext:value-type="float">
            <text:p>-0.0607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0116" calcext:value-type="float">
            <text:p>0.0116</text:p>
          </table:table-cell>
          <table:table-cell office:value-type="float" office:value="-0.1219" calcext:value-type="float">
            <text:p>-0.1219</text:p>
          </table:table-cell>
          <table:table-cell office:value-type="float" office:value="-0.0782" calcext:value-type="float">
            <text:p>-0.078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0116" calcext:value-type="float">
            <text:p>0.0116</text:p>
          </table:table-cell>
          <table:table-cell office:value-type="float" office:value="-0.1219" calcext:value-type="float">
            <text:p>-0.1219</text:p>
          </table:table-cell>
          <table:table-cell office:value-type="float" office:value="-0.0782" calcext:value-type="float">
            <text:p>-0.0782</text:p>
          </table:table-cell>
          <table:table-cell office:value-type="float" office:value="10.0303" calcext:value-type="float">
            <text:p>10.0303</text:p>
          </table:table-cell>
          <table:table-cell office:value-type="float" office:value="0.0303" calcext:value-type="float">
            <text:p>0.0303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1849" calcext:value-type="float">
            <text:p>-0.1849</text:p>
          </table:table-cell>
          <table:table-cell office:value-type="float" office:value="-0.0479" calcext:value-type="float">
            <text:p>-0.047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1849" calcext:value-type="float">
            <text:p>-0.1849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10.0872" calcext:value-type="float">
            <text:p>10.0872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1893" calcext:value-type="float">
            <text:p>-0.1893</text:p>
          </table:table-cell>
          <table:table-cell office:value-type="float" office:value="0.0392" calcext:value-type="float">
            <text:p>0.039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1893" calcext:value-type="float">
            <text:p>-0.1893</text:p>
          </table:table-cell>
          <table:table-cell office:value-type="float" office:value="0.0392" calcext:value-type="float">
            <text:p>0.0392</text:p>
          </table:table-cell>
          <table:table-cell office:value-type="float" office:value="10.0307" calcext:value-type="float">
            <text:p>10.0307</text:p>
          </table:table-cell>
          <table:table-cell office:value-type="float" office:value="0.0307" calcext:value-type="float">
            <text:p>0.0307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1347" calcext:value-type="float">
            <text:p>-0.1347</text:p>
          </table:table-cell>
          <table:table-cell office:value-type="float" office:value="0.0699" calcext:value-type="float">
            <text:p>0.069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1347" calcext:value-type="float">
            <text:p>-0.1347</text:p>
          </table:table-cell>
          <table:table-cell office:value-type="float" office:value="0.0699" calcext:value-type="float">
            <text:p>0.0699</text:p>
          </table:table-cell>
          <table:table-cell office:value-type="float" office:value="9.9521" calcext:value-type="float">
            <text:p>9.9521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0.0221" calcext:value-type="float">
            <text:p>0.022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0.0221" calcext:value-type="float">
            <text:p>0.0221</text:p>
          </table:table-cell>
          <table:table-cell office:value-type="float" office:value="9.9286" calcext:value-type="float">
            <text:p>9.9286</text:p>
          </table:table-cell>
          <table:table-cell office:value-type="float" office:value="-0.0714" calcext:value-type="float">
            <text:p>-0.0714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-0.0493" calcext:value-type="float">
            <text:p>-0.049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9.9861" calcext:value-type="float">
            <text:p>9.9861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-0.0632" calcext:value-type="float">
            <text:p>-0.063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-0.0632" calcext:value-type="float">
            <text:p>-0.0632</text:p>
          </table:table-cell>
          <table:table-cell office:value-type="float" office:value="10.0628" calcext:value-type="float">
            <text:p>10.0628</text:p>
          </table:table-cell>
          <table:table-cell office:value-type="float" office:value="0.0628" calcext:value-type="float">
            <text:p>0.0628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1903" calcext:value-type="float">
            <text:p>-0.1903</text:p>
          </table:table-cell>
          <table:table-cell office:value-type="float" office:value="-0.0004" calcext:value-type="float">
            <text:p>-0.000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1903" calcext:value-type="float">
            <text:p>-0.190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10.0587" calcext:value-type="float">
            <text:p>10.0587</text:p>
          </table:table-cell>
          <table:table-cell office:value-type="float" office:value="0.0587" calcext:value-type="float">
            <text:p>0.058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1613" calcext:value-type="float">
            <text:p>-0.1613</text:p>
          </table:table-cell>
          <table:table-cell office:value-type="float" office:value="0.0584" calcext:value-type="float">
            <text:p>0.058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1613" calcext:value-type="float">
            <text:p>-0.1613</text:p>
          </table:table-cell>
          <table:table-cell office:value-type="float" office:value="0.0584" calcext:value-type="float">
            <text:p>0.0584</text:p>
          </table:table-cell>
          <table:table-cell office:value-type="float" office:value="9.9881" calcext:value-type="float">
            <text:p>9.9881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1089" calcext:value-type="float">
            <text:p>-0.1089</text:p>
          </table:table-cell>
          <table:table-cell office:value-type="float" office:value="0.0465" calcext:value-type="float">
            <text:p>0.046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1089" calcext:value-type="float">
            <text:p>-0.1089</text:p>
          </table:table-cell>
          <table:table-cell office:value-type="float" office:value="0.0465" calcext:value-type="float">
            <text:p>0.0465</text:p>
          </table:table-cell>
          <table:table-cell office:value-type="float" office:value="9.9378" calcext:value-type="float">
            <text:p>9.9378</text:p>
          </table:table-cell>
          <table:table-cell office:value-type="float" office:value="-0.0622" calcext:value-type="float">
            <text:p>-0.0622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-0.0157" calcext:value-type="float">
            <text:p>-0.015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9.9577" calcext:value-type="float">
            <text:p>9.9577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1304" calcext:value-type="float">
            <text:p>-0.1304</text:p>
          </table:table-cell>
          <table:table-cell office:value-type="float" office:value="-0.058" calcext:value-type="float">
            <text:p>-0.058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1304" calcext:value-type="float">
            <text:p>-0.1304</text:p>
          </table:table-cell>
          <table:table-cell office:value-type="float" office:value="-0.058" calcext:value-type="float">
            <text:p>-0.058</text:p>
          </table:table-cell>
          <table:table-cell office:value-type="float" office:value="10.0251" calcext:value-type="float">
            <text:p>10.0251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1758" calcext:value-type="float">
            <text:p>-0.1758</text:p>
          </table:table-cell>
          <table:table-cell office:value-type="float" office:value="-0.0329" calcext:value-type="float">
            <text:p>-0.032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1758" calcext:value-type="float">
            <text:p>-0.1758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10.0638" calcext:value-type="float">
            <text:p>10.0638</text:p>
          </table:table-cell>
          <table:table-cell office:value-type="float" office:value="0.0638" calcext:value-type="float">
            <text:p>0.0638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0.0309" calcext:value-type="float">
            <text:p>0.030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0.0309" calcext:value-type="float">
            <text:p>0.0309</text:p>
          </table:table-cell>
          <table:table-cell office:value-type="float" office:value="10.0205" calcext:value-type="float">
            <text:p>10.0205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356" calcext:value-type="float">
            <text:p>-0.1356</text:p>
          </table:table-cell>
          <table:table-cell office:value-type="float" office:value="0.0514" calcext:value-type="float">
            <text:p>0.051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356" calcext:value-type="float">
            <text:p>-0.1356</text:p>
          </table:table-cell>
          <table:table-cell office:value-type="float" office:value="0.0514" calcext:value-type="float">
            <text:p>0.0514</text:p>
          </table:table-cell>
          <table:table-cell office:value-type="float" office:value="9.9626" calcext:value-type="float">
            <text:p>9.9626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1029" calcext:value-type="float">
            <text:p>-0.1029</text:p>
          </table:table-cell>
          <table:table-cell office:value-type="float" office:value="0.014" calcext:value-type="float">
            <text:p>0.014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1029" calcext:value-type="float">
            <text:p>-0.1029</text:p>
          </table:table-cell>
          <table:table-cell office:value-type="float" office:value="0.014" calcext:value-type="float">
            <text:p>0.014</text:p>
          </table:table-cell>
          <table:table-cell office:value-type="float" office:value="9.9479" calcext:value-type="float">
            <text:p>9.9479</text:p>
          </table:table-cell>
          <table:table-cell office:value-type="float" office:value="-0.0521" calcext:value-type="float">
            <text:p>-0.0521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381" calcext:value-type="float">
            <text:p>-0.0381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9.9924" calcext:value-type="float">
            <text:p>9.992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-0.0457" calcext:value-type="float">
            <text:p>-0.0457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10.0476" calcext:value-type="float">
            <text:p>10.0476</text:p>
          </table:table-cell>
          <table:table-cell office:value-type="float" office:value="0.0476" calcext:value-type="float">
            <text:p>0.0476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1787" calcext:value-type="float">
            <text:p>-0.1787</text:p>
          </table:table-cell>
          <table:table-cell office:value-type="float" office:value="0.0019" calcext:value-type="float">
            <text:p>0.0019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1787" calcext:value-type="float">
            <text:p>-0.1787</text:p>
          </table:table-cell>
          <table:table-cell office:value-type="float" office:value="0.0019" calcext:value-type="float">
            <text:p>0.0019</text:p>
          </table:table-cell>
          <table:table-cell office:value-type="float" office:value="10.0417" calcext:value-type="float">
            <text:p>10.0417</text:p>
          </table:table-cell>
          <table:table-cell office:value-type="float" office:value="0.0417" calcext:value-type="float">
            <text:p>0.0417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436" calcext:value-type="float">
            <text:p>0.0436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436" calcext:value-type="float">
            <text:p>0.0436</text:p>
          </table:table-cell>
          <table:table-cell office:value-type="float" office:value="9.9896" calcext:value-type="float">
            <text:p>9.9896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75" calcext:value-type="float">
            <text:p>-0.1175</text:p>
          </table:table-cell>
          <table:table-cell office:value-type="float" office:value="0.0332" calcext:value-type="float">
            <text:p>0.0332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75" calcext:value-type="float">
            <text:p>-0.1175</text:p>
          </table:table-cell>
          <table:table-cell office:value-type="float" office:value="0.0332" calcext:value-type="float">
            <text:p>0.0332</text:p>
          </table:table-cell>
          <table:table-cell office:value-type="float" office:value="9.9533" calcext:value-type="float">
            <text:p>9.9533</text:p>
          </table:table-cell>
          <table:table-cell office:value-type="float" office:value="-0.0467" calcext:value-type="float">
            <text:p>-0.0467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077" calcext:value-type="float">
            <text:p>-0.1077</text:p>
          </table:table-cell>
          <table:table-cell office:value-type="float" office:value="-0.0135" calcext:value-type="float">
            <text:p>-0.013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077" calcext:value-type="float">
            <text:p>-0.107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9.9702" calcext:value-type="float">
            <text:p>9.9702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1361" calcext:value-type="float">
            <text:p>-0.1361</text:p>
          </table:table-cell>
          <table:table-cell office:value-type="float" office:value="-0.0433" calcext:value-type="float">
            <text:p>-0.0433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1361" calcext:value-type="float">
            <text:p>-0.1361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10.0204" calcext:value-type="float">
            <text:p>10.0204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1691" calcext:value-type="float">
            <text:p>-0.1691</text:p>
          </table:table-cell>
          <table:table-cell office:value-type="float" office:value="-0.0229" calcext:value-type="float">
            <text:p>-0.022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166" calcext:value-type="float">
            <text:p>0.6166</text:p>
          </table:table-cell>
          <table:table-cell office:value-type="float" office:value="-0.6811" calcext:value-type="float">
            <text:p>-0.6811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5999" calcext:value-type="float">
            <text:p>0.5999</text:p>
          </table:table-cell>
          <table:table-cell office:value-type="float" office:value="9.8503" calcext:value-type="float">
            <text:p>9.8503</text:p>
          </table:table-cell>
          <table:table-cell office:value-type="float" office:value="-0.1497" calcext:value-type="float">
            <text:p>-0.1497</text:p>
          </table:table-cell>
          <table:table-cell office:value-type="float" office:value="-0.2493" calcext:value-type="float">
            <text:p>-0.2493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4502" calcext:value-type="float">
            <text:p>0.450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2493" calcext:value-type="float">
            <text:p>-0.2493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4502" calcext:value-type="float">
            <text:p>0.4502</text:p>
          </table:table-cell>
          <table:table-cell office:value-type="float" office:value="9.2111" calcext:value-type="float">
            <text:p>9.2111</text:p>
          </table:table-cell>
          <table:table-cell office:value-type="float" office:value="-0.7889" calcext:value-type="float">
            <text:p>-0.7889</text:p>
          </table:table-cell>
          <table:table-cell office:value-type="float" office:value="-0.889" calcext:value-type="float">
            <text:p>-0.889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2699" calcext:value-type="float">
            <text:p>0.2699</text:p>
          </table:table-cell>
          <table:table-cell office:value-type="float" office:value="-0.3387" calcext:value-type="float">
            <text:p>-0.338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0.889" calcext:value-type="float">
            <text:p>-0.889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2699" calcext:value-type="float">
            <text:p>0.2699</text:p>
          </table:table-cell>
          <table:table-cell office:value-type="float" office:value="-0.3387" calcext:value-type="float">
            <text:p>-0.3387</text:p>
          </table:table-cell>
          <table:table-cell office:value-type="float" office:value="9.1088" calcext:value-type="float">
            <text:p>9.1088</text:p>
          </table:table-cell>
          <table:table-cell office:value-type="float" office:value="-0.8912" calcext:value-type="float">
            <text:p>-0.8912</text:p>
          </table:table-cell>
          <table:table-cell office:value-type="float" office:value="-0.696" calcext:value-type="float">
            <text:p>-0.696</text:p>
          </table:table-cell>
          <table:table-cell office:value-type="float" office:value="0.6215" calcext:value-type="float">
            <text:p>0.6215</text:p>
          </table:table-cell>
          <table:table-cell office:value-type="float" office:value="-0.5143" calcext:value-type="float">
            <text:p>-0.5143</text:p>
          </table:table-cell>
          <table:table-cell office:value-type="float" office:value="-1.2298" calcext:value-type="float">
            <text:p>-1.2298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-0.696" calcext:value-type="float">
            <text:p>-0.696</text:p>
          </table:table-cell>
          <table:table-cell office:value-type="float" office:value="0.6215" calcext:value-type="float">
            <text:p>0.6215</text:p>
          </table:table-cell>
          <table:table-cell office:value-type="float" office:value="-0.5143" calcext:value-type="float">
            <text:p>-0.5143</text:p>
          </table:table-cell>
          <table:table-cell office:value-type="float" office:value="-1.2298" calcext:value-type="float">
            <text:p>-1.2298</text:p>
          </table:table-cell>
          <table:table-cell office:value-type="float" office:value="11.3101" calcext:value-type="float">
            <text:p>11.3101</text:p>
          </table:table-cell>
          <table:table-cell office:value-type="float" office:value="1.3101" calcext:value-type="float">
            <text:p>1.3101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8786" calcext:value-type="float">
            <text:p>0.8786</text:p>
          </table:table-cell>
          <table:table-cell office:value-type="float" office:value="-1.0891" calcext:value-type="float">
            <text:p>-1.0891</text:p>
          </table:table-cell>
          <table:table-cell office:value-type="float" office:value="0.0802" calcext:value-type="float">
            <text:p>0.080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8786" calcext:value-type="float">
            <text:p>0.8786</text:p>
          </table:table-cell>
          <table:table-cell office:value-type="float" office:value="-1.0891" calcext:value-type="float">
            <text:p>-1.0891</text:p>
          </table:table-cell>
          <table:table-cell office:value-type="float" office:value="0.0802" calcext:value-type="float">
            <text:p>0.0802</text:p>
          </table:table-cell>
          <table:table-cell office:value-type="float" office:value="11.3939" calcext:value-type="float">
            <text:p>11.3939</text:p>
          </table:table-cell>
          <table:table-cell office:value-type="float" office:value="1.3939" calcext:value-type="float">
            <text:p>1.3939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2926" calcext:value-type="float">
            <text:p>0.2926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4741" calcext:value-type="float">
            <text:p>1.474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2926" calcext:value-type="float">
            <text:p>0.2926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4741" calcext:value-type="float">
            <text:p>1.4741</text:p>
          </table:table-cell>
          <table:table-cell office:value-type="float" office:value="8.9549" calcext:value-type="float">
            <text:p>8.9549</text:p>
          </table:table-cell>
          <table:table-cell office:value-type="float" office:value="-1.0451" calcext:value-type="float">
            <text:p>-1.0451</text:p>
          </table:table-cell>
          <table:table-cell office:value-type="float" office:value="0.6511" calcext:value-type="float">
            <text:p>0.6511</text:p>
          </table:table-cell>
          <table:table-cell office:value-type="float" office:value="-0.5018" calcext:value-type="float">
            <text:p>-0.5018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429" calcext:value-type="float">
            <text:p>0.42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511" calcext:value-type="float">
            <text:p>0.6511</text:p>
          </table:table-cell>
          <table:table-cell office:value-type="float" office:value="-0.5018" calcext:value-type="float">
            <text:p>-0.5018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429" calcext:value-type="float">
            <text:p>0.429</text:p>
          </table:table-cell>
          <table:table-cell office:value-type="float" office:value="9.6695" calcext:value-type="float">
            <text:p>9.6695</text:p>
          </table:table-cell>
          <table:table-cell office:value-type="float" office:value="-0.3305" calcext:value-type="float">
            <text:p>-0.3305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7648" calcext:value-type="float">
            <text:p>-0.7648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0985" calcext:value-type="float">
            <text:p>0.098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7648" calcext:value-type="float">
            <text:p>-0.7648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0985" calcext:value-type="float">
            <text:p>0.0985</text:p>
          </table:table-cell>
          <table:table-cell office:value-type="float" office:value="8.8032" calcext:value-type="float">
            <text:p>8.8032</text:p>
          </table:table-cell>
          <table:table-cell office:value-type="float" office:value="-1.1968" calcext:value-type="float">
            <text:p>-1.1968</text:p>
          </table:table-cell>
          <table:table-cell office:value-type="float" office:value="-0.6247" calcext:value-type="float">
            <text:p>-0.6247</text:p>
          </table:table-cell>
          <table:table-cell office:value-type="float" office:value="-0.3097" calcext:value-type="float">
            <text:p>-0.3097</text:p>
          </table:table-cell>
          <table:table-cell office:value-type="float" office:value="0.4035" calcext:value-type="float">
            <text:p>0.4035</text:p>
          </table:table-cell>
          <table:table-cell office:value-type="float" office:value="-1.0983" calcext:value-type="float">
            <text:p>-1.098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0.6247" calcext:value-type="float">
            <text:p>-0.6247</text:p>
          </table:table-cell>
          <table:table-cell office:value-type="float" office:value="-0.3097" calcext:value-type="float">
            <text:p>-0.3097</text:p>
          </table:table-cell>
          <table:table-cell office:value-type="float" office:value="0.4035" calcext:value-type="float">
            <text:p>0.4035</text:p>
          </table:table-cell>
          <table:table-cell office:value-type="float" office:value="-1.0983" calcext:value-type="float">
            <text:p>-1.0983</text:p>
          </table:table-cell>
          <table:table-cell office:value-type="float" office:value="10.2849" calcext:value-type="float">
            <text:p>10.2849</text:p>
          </table:table-cell>
          <table:table-cell office:value-type="float" office:value="0.2849" calcext:value-type="float">
            <text:p>0.2849</text:p>
          </table:table-cell>
          <table:table-cell office:value-type="float" office:value="-0.5887" calcext:value-type="float">
            <text:p>-0.5887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5523" calcext:value-type="float">
            <text:p>-0.5523</text:p>
          </table:table-cell>
          <table:table-cell office:value-type="float" office:value="-0.8133" calcext:value-type="float">
            <text:p>-0.813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0.5887" calcext:value-type="float">
            <text:p>-0.5887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5523" calcext:value-type="float">
            <text:p>-0.5523</text:p>
          </table:table-cell>
          <table:table-cell office:value-type="float" office:value="-0.8133" calcext:value-type="float">
            <text:p>-0.8133</text:p>
          </table:table-cell>
          <table:table-cell office:value-type="float" office:value="10.8496" calcext:value-type="float">
            <text:p>10.8496</text:p>
          </table:table-cell>
          <table:table-cell office:value-type="float" office:value="0.8496" calcext:value-type="float">
            <text:p>0.8496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0.659" calcext:value-type="float">
            <text:p>0.659</text:p>
          </table:table-cell>
          <table:table-cell office:value-type="float" office:value="-0.9408" calcext:value-type="float">
            <text:p>-0.9408</text:p>
          </table:table-cell>
          <table:table-cell office:value-type="float" office:value="0.0363" calcext:value-type="float">
            <text:p>0.036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0.659" calcext:value-type="float">
            <text:p>0.659</text:p>
          </table:table-cell>
          <table:table-cell office:value-type="float" office:value="-0.9408" calcext:value-type="float">
            <text:p>-0.9408</text:p>
          </table:table-cell>
          <table:table-cell office:value-type="float" office:value="0.0363" calcext:value-type="float">
            <text:p>0.0363</text:p>
          </table:table-cell>
          <table:table-cell office:value-type="float" office:value="11.0212" calcext:value-type="float">
            <text:p>11.0212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2998" calcext:value-type="float">
            <text:p>0.2998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0574" calcext:value-type="float">
            <text:p>1.057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2998" calcext:value-type="float">
            <text:p>0.2998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0574" calcext:value-type="float">
            <text:p>1.0574</text:p>
          </table:table-cell>
          <table:table-cell office:value-type="float" office:value="9.6298" calcext:value-type="float">
            <text:p>9.6298</text:p>
          </table:table-cell>
          <table:table-cell office:value-type="float" office:value="-0.3702" calcext:value-type="float">
            <text:p>-0.3702</text:p>
          </table:table-cell>
          <table:table-cell office:value-type="float" office:value="0.5142" calcext:value-type="float">
            <text:p>0.5142</text:p>
          </table:table-cell>
          <table:table-cell office:value-type="float" office:value="-0.2908" calcext:value-type="float">
            <text:p>-0.2908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6872" calcext:value-type="float">
            <text:p>0.687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5142" calcext:value-type="float">
            <text:p>0.5142</text:p>
          </table:table-cell>
          <table:table-cell office:value-type="float" office:value="-0.2908" calcext:value-type="float">
            <text:p>-0.2908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6872" calcext:value-type="float">
            <text:p>0.6872</text:p>
          </table:table-cell>
          <table:table-cell office:value-type="float" office:value="9.415" calcext:value-type="float">
            <text:p>9.415</text:p>
          </table:table-cell>
          <table:table-cell office:value-type="float" office:value="-0.585" calcext:value-type="float">
            <text:p>-0.585</text:p>
          </table:table-cell>
          <table:table-cell office:value-type="float" office:value="0.0595" calcext:value-type="float">
            <text:p>0.0595</text:p>
          </table:table-cell>
          <table:table-cell office:value-type="float" office:value="-0.5492" calcext:value-type="float">
            <text:p>-0.5492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1023" calcext:value-type="float">
            <text:p>0.102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595" calcext:value-type="float">
            <text:p>0.0595</text:p>
          </table:table-cell>
          <table:table-cell office:value-type="float" office:value="-0.5492" calcext:value-type="float">
            <text:p>-0.5492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1023" calcext:value-type="float">
            <text:p>0.1023</text:p>
          </table:table-cell>
          <table:table-cell office:value-type="float" office:value="9.035" calcext:value-type="float">
            <text:p>9.035</text:p>
          </table:table-cell>
          <table:table-cell office:value-type="float" office:value="-0.965" calcext:value-type="float">
            <text:p>-0.965</text:p>
          </table:table-cell>
          <table:table-cell office:value-type="float" office:value="-0.3912" calcext:value-type="float">
            <text:p>-0.3912</text:p>
          </table:table-cell>
          <table:table-cell office:value-type="float" office:value="-0.2773" calcext:value-type="float">
            <text:p>-0.2773</text:p>
          </table:table-cell>
          <table:table-cell office:value-type="float" office:value="0.4929" calcext:value-type="float">
            <text:p>0.4929</text:p>
          </table:table-cell>
          <table:table-cell office:value-type="float" office:value="-0.8627" calcext:value-type="float">
            <text:p>-0.862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-0.3912" calcext:value-type="float">
            <text:p>-0.3912</text:p>
          </table:table-cell>
          <table:table-cell office:value-type="float" office:value="-0.2773" calcext:value-type="float">
            <text:p>-0.2773</text:p>
          </table:table-cell>
          <table:table-cell office:value-type="float" office:value="0.4929" calcext:value-type="float">
            <text:p>0.4929</text:p>
          </table:table-cell>
          <table:table-cell office:value-type="float" office:value="-0.8627" calcext:value-type="float">
            <text:p>-0.8627</text:p>
          </table:table-cell>
          <table:table-cell office:value-type="float" office:value="10.0669" calcext:value-type="float">
            <text:p>10.0669</text:p>
          </table:table-cell>
          <table:table-cell office:value-type="float" office:value="0.0669" calcext:value-type="float">
            <text:p>0.0669</text:p>
          </table:table-cell>
          <table:table-cell office:value-type="float" office:value="-0.4295" calcext:value-type="float">
            <text:p>-0.4295</text:p>
          </table:table-cell>
          <table:table-cell office:value-type="float" office:value="0.2172" calcext:value-type="float">
            <text:p>0.2172</text:p>
          </table:table-cell>
          <table:table-cell office:value-type="float" office:value="-0.3364" calcext:value-type="float">
            <text:p>-0.3364</text:p>
          </table:table-cell>
          <table:table-cell office:value-type="float" office:value="-0.7959" calcext:value-type="float">
            <text:p>-0.795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-0.4295" calcext:value-type="float">
            <text:p>-0.4295</text:p>
          </table:table-cell>
          <table:table-cell office:value-type="float" office:value="0.2172" calcext:value-type="float">
            <text:p>0.2172</text:p>
          </table:table-cell>
          <table:table-cell office:value-type="float" office:value="-0.3364" calcext:value-type="float">
            <text:p>-0.3364</text:p>
          </table:table-cell>
          <table:table-cell office:value-type="float" office:value="-0.7959" calcext:value-type="float">
            <text:p>-0.7959</text:p>
          </table:table-cell>
          <table:table-cell office:value-type="float" office:value="10.7433" calcext:value-type="float">
            <text:p>10.7433</text:p>
          </table:table-cell>
          <table:table-cell office:value-type="float" office:value="0.7433" calcext:value-type="float">
            <text:p>0.7433</text:p>
          </table:table-cell>
          <table:table-cell office:value-type="float" office:value="-0.07" calcext:value-type="float">
            <text:p>-0.07</text:p>
          </table:table-cell>
          <table:table-cell office:value-type="float" office:value="0.4503" calcext:value-type="float">
            <text:p>0.4503</text:p>
          </table:table-cell>
          <table:table-cell office:value-type="float" office:value="-0.7606" calcext:value-type="float">
            <text:p>-0.7606</text:p>
          </table:table-cell>
          <table:table-cell office:value-type="float" office:value="-0.0526" calcext:value-type="float">
            <text:p>-0.052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-0.07" calcext:value-type="float">
            <text:p>-0.07</text:p>
          </table:table-cell>
          <table:table-cell office:value-type="float" office:value="0.4503" calcext:value-type="float">
            <text:p>0.4503</text:p>
          </table:table-cell>
          <table:table-cell office:value-type="float" office:value="-0.7606" calcext:value-type="float">
            <text:p>-0.7606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10.7567" calcext:value-type="float">
            <text:p>10.7567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2414" calcext:value-type="float">
            <text:p>0.2414</text:p>
          </table:table-cell>
          <table:table-cell office:value-type="float" office:value="-0.4349" calcext:value-type="float">
            <text:p>-0.4349</text:p>
          </table:table-cell>
          <table:table-cell office:value-type="float" office:value="0.7041" calcext:value-type="float">
            <text:p>0.704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2414" calcext:value-type="float">
            <text:p>0.2414</text:p>
          </table:table-cell>
          <table:table-cell office:value-type="float" office:value="-0.4349" calcext:value-type="float">
            <text:p>-0.4349</text:p>
          </table:table-cell>
          <table:table-cell office:value-type="float" office:value="0.7041" calcext:value-type="float">
            <text:p>0.7041</text:p>
          </table:table-cell>
          <table:table-cell office:value-type="float" office:value="10.1208" calcext:value-type="float">
            <text:p>10.120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557" calcext:value-type="float">
            <text:p>0.3557</text:p>
          </table:table-cell>
          <table:table-cell office:value-type="float" office:value="-0.1612" calcext:value-type="float">
            <text:p>-0.1612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8249" calcext:value-type="float">
            <text:p>0.824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3557" calcext:value-type="float">
            <text:p>0.3557</text:p>
          </table:table-cell>
          <table:table-cell office:value-type="float" office:value="-0.1612" calcext:value-type="float">
            <text:p>-0.1612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8249" calcext:value-type="float">
            <text:p>0.8249</text:p>
          </table:table-cell>
          <table:table-cell office:value-type="float" office:value="9.2178" calcext:value-type="float">
            <text:p>9.2178</text:p>
          </table:table-cell>
          <table:table-cell office:value-type="float" office:value="-0.7822" calcext:value-type="float">
            <text:p>-0.7822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3585" calcext:value-type="float">
            <text:p>-0.3585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0427" calcext:value-type="float">
            <text:p>0.042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3585" calcext:value-type="float">
            <text:p>-0.3585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0427" calcext:value-type="float">
            <text:p>0.0427</text:p>
          </table:table-cell>
          <table:table-cell office:value-type="float" office:value="9.3416" calcext:value-type="float">
            <text:p>9.3416</text:p>
          </table:table-cell>
          <table:table-cell office:value-type="float" office:value="-0.6584" calcext:value-type="float">
            <text:p>-0.6584</text:p>
          </table:table-cell>
          <table:table-cell office:value-type="float" office:value="-0.2262" calcext:value-type="float">
            <text:p>-0.2262</text:p>
          </table:table-cell>
          <table:table-cell office:value-type="float" office:value="-0.1972" calcext:value-type="float">
            <text:p>-0.1972</text:p>
          </table:table-cell>
          <table:table-cell office:value-type="float" office:value="0.477" calcext:value-type="float">
            <text:p>0.477</text:p>
          </table:table-cell>
          <table:table-cell office:value-type="float" office:value="-0.6156" calcext:value-type="float">
            <text:p>-0.615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0.2262" calcext:value-type="float">
            <text:p>-0.2262</text:p>
          </table:table-cell>
          <table:table-cell office:value-type="float" office:value="-0.1972" calcext:value-type="float">
            <text:p>-0.1972</text:p>
          </table:table-cell>
          <table:table-cell office:value-type="float" office:value="0.477" calcext:value-type="float">
            <text:p>0.477</text:p>
          </table:table-cell>
          <table:table-cell office:value-type="float" office:value="-0.6156" calcext:value-type="float">
            <text:p>-0.6156</text:p>
          </table:table-cell>
          <table:table-cell office:value-type="float" office:value="9.9115" calcext:value-type="float">
            <text:p>9.9115</text:p>
          </table:table-cell>
          <table:table-cell office:value-type="float" office:value="-0.0885" calcext:value-type="float">
            <text:p>-0.0885</text:p>
          </table:table-cell>
          <table:table-cell office:value-type="float" office:value="-0.2719" calcext:value-type="float">
            <text:p>-0.2719</text:p>
          </table:table-cell>
          <table:table-cell office:value-type="float" office:value="0.1208" calcext:value-type="float">
            <text:p>0.1208</text:p>
          </table:table-cell>
          <table:table-cell office:value-type="float" office:value="-0.1829" calcext:value-type="float">
            <text:p>-0.1829</text:p>
          </table:table-cell>
          <table:table-cell office:value-type="float" office:value="-0.7041" calcext:value-type="float">
            <text:p>-0.704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0.2719" calcext:value-type="float">
            <text:p>-0.2719</text:p>
          </table:table-cell>
          <table:table-cell office:value-type="float" office:value="0.1208" calcext:value-type="float">
            <text:p>0.1208</text:p>
          </table:table-cell>
          <table:table-cell office:value-type="float" office:value="-0.1829" calcext:value-type="float">
            <text:p>-0.1829</text:p>
          </table:table-cell>
          <table:table-cell office:value-type="float" office:value="-0.7041" calcext:value-type="float">
            <text:p>-0.7041</text:p>
          </table:table-cell>
          <table:table-cell office:value-type="float" office:value="10.6041" calcext:value-type="float">
            <text:p>10.6041</text:p>
          </table:table-cell>
          <table:table-cell office:value-type="float" office:value="0.6041" calcext:value-type="float">
            <text:p>0.6041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0.2783" calcext:value-type="float">
            <text:p>0.2783</text:p>
          </table:table-cell>
          <table:table-cell office:value-type="float" office:value="-0.5849" calcext:value-type="float">
            <text:p>-0.5849</text:p>
          </table:table-cell>
          <table:table-cell office:value-type="float" office:value="-0.1" calcext:value-type="float">
            <text:p>-0.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0.2783" calcext:value-type="float">
            <text:p>0.2783</text:p>
          </table:table-cell>
          <table:table-cell office:value-type="float" office:value="-0.5849" calcext:value-type="float">
            <text:p>-0.5849</text:p>
          </table:table-cell>
          <table:table-cell office:value-type="float" office:value="-0.1" calcext:value-type="float">
            <text:p>-0.1</text:p>
          </table:table-cell>
          <table:table-cell office:value-type="float" office:value="10.5365" calcext:value-type="float">
            <text:p>10.5365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1523" calcext:value-type="float">
            <text:p>0.1523</text:p>
          </table:table-cell>
          <table:table-cell office:value-type="float" office:value="-0.4167" calcext:value-type="float">
            <text:p>-0.4167</text:p>
          </table:table-cell>
          <table:table-cell office:value-type="float" office:value="0.4364" calcext:value-type="float">
            <text:p>0.436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1523" calcext:value-type="float">
            <text:p>0.1523</text:p>
          </table:table-cell>
          <table:table-cell office:value-type="float" office:value="-0.4167" calcext:value-type="float">
            <text:p>-0.4167</text:p>
          </table:table-cell>
          <table:table-cell office:value-type="float" office:value="0.4364" calcext:value-type="float">
            <text:p>0.4364</text:p>
          </table:table-cell>
          <table:table-cell office:value-type="float" office:value="10.2202" calcext:value-type="float">
            <text:p>10.2202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2086" calcext:value-type="float">
            <text:p>0.2086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6567" calcext:value-type="float">
            <text:p>0.656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2086" calcext:value-type="float">
            <text:p>0.2086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6567" calcext:value-type="float">
            <text:p>0.6567</text:p>
          </table:table-cell>
          <table:table-cell office:value-type="float" office:value="9.4327" calcext:value-type="float">
            <text:p>9.4327</text:p>
          </table:table-cell>
          <table:table-cell office:value-type="float" office:value="-0.5673" calcext:value-type="float">
            <text:p>-0.5673</text:p>
          </table:table-cell>
          <table:table-cell office:value-type="float" office:value="0.0407" calcext:value-type="float">
            <text:p>0.0407</text:p>
          </table:table-cell>
          <table:table-cell office:value-type="float" office:value="-0.2171" calcext:value-type="float">
            <text:p>-0.2171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0894" calcext:value-type="float">
            <text:p>0.089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0407" calcext:value-type="float">
            <text:p>0.0407</text:p>
          </table:table-cell>
          <table:table-cell office:value-type="float" office:value="-0.2171" calcext:value-type="float">
            <text:p>-0.2171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0894" calcext:value-type="float">
            <text:p>0.0894</text:p>
          </table:table-cell>
          <table:table-cell office:value-type="float" office:value="9.5171" calcext:value-type="float">
            <text:p>9.5171</text:p>
          </table:table-cell>
          <table:table-cell office:value-type="float" office:value="-0.4829" calcext:value-type="float">
            <text:p>-0.4829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111" calcext:value-type="float">
            <text:p>-0.1111</text:p>
          </table:table-cell>
          <table:table-cell office:value-type="float" office:value="0.3509" calcext:value-type="float">
            <text:p>0.3509</text:p>
          </table:table-cell>
          <table:table-cell office:value-type="float" office:value="-0.3935" calcext:value-type="float">
            <text:p>-0.39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111" calcext:value-type="float">
            <text:p>-0.1111</text:p>
          </table:table-cell>
          <table:table-cell office:value-type="float" office:value="0.3509" calcext:value-type="float">
            <text:p>0.3509</text:p>
          </table:table-cell>
          <table:table-cell office:value-type="float" office:value="-0.3935" calcext:value-type="float">
            <text:p>-0.3935</text:p>
          </table:table-cell>
          <table:table-cell office:value-type="float" office:value="9.8447" calcext:value-type="float">
            <text:p>9.8447</text:p>
          </table:table-cell>
          <table:table-cell office:value-type="float" office:value="-0.1553" calcext:value-type="float">
            <text:p>-0.1553</text:p>
          </table:table-cell>
          <table:table-cell office:value-type="float" office:value="-0.1557" calcext:value-type="float">
            <text:p>-0.1557</text:p>
          </table:table-cell>
          <table:table-cell office:value-type="float" office:value="0.0832" calcext:value-type="float">
            <text:p>0.0832</text:p>
          </table:table-cell>
          <table:table-cell office:value-type="float" office:value="-0.1202" calcext:value-type="float">
            <text:p>-0.1202</text:p>
          </table:table-cell>
          <table:table-cell office:value-type="float" office:value="-0.5487" calcext:value-type="float">
            <text:p>-0.548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0.1557" calcext:value-type="float">
            <text:p>-0.1557</text:p>
          </table:table-cell>
          <table:table-cell office:value-type="float" office:value="0.0832" calcext:value-type="float">
            <text:p>0.0832</text:p>
          </table:table-cell>
          <table:table-cell office:value-type="float" office:value="-0.1202" calcext:value-type="float">
            <text:p>-0.1202</text:p>
          </table:table-cell>
          <table:table-cell office:value-type="float" office:value="-0.5487" calcext:value-type="float">
            <text:p>-0.5487</text:p>
          </table:table-cell>
          <table:table-cell office:value-type="float" office:value="10.4431" calcext:value-type="float">
            <text:p>10.4431</text:p>
          </table:table-cell>
          <table:table-cell office:value-type="float" office:value="0.4431" calcext:value-type="float">
            <text:p>0.4431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1654" calcext:value-type="float">
            <text:p>0.1654</text:p>
          </table:table-cell>
          <table:table-cell office:value-type="float" office:value="-0.4474" calcext:value-type="float">
            <text:p>-0.4474</text:p>
          </table:table-cell>
          <table:table-cell office:value-type="float" office:value="-0.1056" calcext:value-type="float">
            <text:p>-0.105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1654" calcext:value-type="float">
            <text:p>0.1654</text:p>
          </table:table-cell>
          <table:table-cell office:value-type="float" office:value="-0.4474" calcext:value-type="float">
            <text:p>-0.4474</text:p>
          </table:table-cell>
          <table:table-cell office:value-type="float" office:value="-0.1056" calcext:value-type="float">
            <text:p>-0.1056</text:p>
          </table:table-cell>
          <table:table-cell office:value-type="float" office:value="10.4061" calcext:value-type="float">
            <text:p>10.4061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728" calcext:value-type="float">
            <text:p>0.0728</text:p>
          </table:table-cell>
          <table:table-cell office:value-type="float" office:value="-0.3499" calcext:value-type="float">
            <text:p>-0.3499</text:p>
          </table:table-cell>
          <table:table-cell office:value-type="float" office:value="0.3005" calcext:value-type="float">
            <text:p>0.300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728" calcext:value-type="float">
            <text:p>0.0728</text:p>
          </table:table-cell>
          <table:table-cell office:value-type="float" office:value="-0.3499" calcext:value-type="float">
            <text:p>-0.3499</text:p>
          </table:table-cell>
          <table:table-cell office:value-type="float" office:value="0.3005" calcext:value-type="float">
            <text:p>0.3005</text:p>
          </table:table-cell>
          <table:table-cell office:value-type="float" office:value="10.1388" calcext:value-type="float">
            <text:p>10.1388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055" calcext:value-type="float">
            <text:p>0.1055</text:p>
          </table:table-cell>
          <table:table-cell office:value-type="float" office:value="-0.0773" calcext:value-type="float">
            <text:p>-0.0773</text:p>
          </table:table-cell>
          <table:table-cell office:value-type="float" office:value="0.02" calcext:value-type="float">
            <text:p>0.02</text:p>
          </table:table-cell>
          <table:table-cell office:value-type="float" office:value="0.4393" calcext:value-type="float">
            <text:p>0.439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1055" calcext:value-type="float">
            <text:p>0.1055</text:p>
          </table:table-cell>
          <table:table-cell office:value-type="float" office:value="-0.0773" calcext:value-type="float">
            <text:p>-0.0773</text:p>
          </table:table-cell>
          <table:table-cell office:value-type="float" office:value="0.02" calcext:value-type="float">
            <text:p>0.02</text:p>
          </table:table-cell>
          <table:table-cell office:value-type="float" office:value="0.4393" calcext:value-type="float">
            <text:p>0.4393</text:p>
          </table:table-cell>
          <table:table-cell office:value-type="float" office:value="9.6767" calcext:value-type="float">
            <text:p>9.6767</text:p>
          </table:table-cell>
          <table:table-cell office:value-type="float" office:value="-0.3233" calcext:value-type="float">
            <text:p>-0.323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284" calcext:value-type="float">
            <text:p>-0.1284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116" calcext:value-type="float">
            <text:p>0.11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284" calcext:value-type="float">
            <text:p>-0.1284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116" calcext:value-type="float">
            <text:p>0.116</text:p>
          </table:table-cell>
          <table:table-cell office:value-type="float" office:value="9.6025" calcext:value-type="float">
            <text:p>9.6025</text:p>
          </table:table-cell>
          <table:table-cell office:value-type="float" office:value="-0.3975" calcext:value-type="float">
            <text:p>-0.3975</text:p>
          </table:table-cell>
          <table:table-cell office:value-type="float" office:value="-0.0964" calcext:value-type="float">
            <text:p>-0.0964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0.2149" calcext:value-type="float">
            <text:p>0.2149</text:p>
          </table:table-cell>
          <table:table-cell office:value-type="float" office:value="-0.2815" calcext:value-type="float">
            <text:p>-0.281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0.0964" calcext:value-type="float">
            <text:p>-0.0964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0.2149" calcext:value-type="float">
            <text:p>0.2149</text:p>
          </table:table-cell>
          <table:table-cell office:value-type="float" office:value="-0.2815" calcext:value-type="float">
            <text:p>-0.2815</text:p>
          </table:table-cell>
          <table:table-cell office:value-type="float" office:value="9.8846" calcext:value-type="float">
            <text:p>9.8846</text:p>
          </table:table-cell>
          <table:table-cell office:value-type="float" office:value="-0.1154" calcext:value-type="float">
            <text:p>-0.1154</text:p>
          </table:table-cell>
          <table:table-cell office:value-type="float" office:value="-0.0805" calcext:value-type="float">
            <text:p>-0.0805</text:p>
          </table:table-cell>
          <table:table-cell office:value-type="float" office:value="0.0746" calcext:value-type="float">
            <text:p>0.0746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-0.397" calcext:value-type="float">
            <text:p>-0.39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-0.0805" calcext:value-type="float">
            <text:p>-0.0805</text:p>
          </table:table-cell>
          <table:table-cell office:value-type="float" office:value="0.0746" calcext:value-type="float">
            <text:p>0.0746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-0.397" calcext:value-type="float">
            <text:p>-0.397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973" calcext:value-type="float">
            <text:p>0.0973</text:p>
          </table:table-cell>
          <table:table-cell office:value-type="float" office:value="-0.3549" calcext:value-type="float">
            <text:p>-0.3549</text:p>
          </table:table-cell>
          <table:table-cell office:value-type="float" office:value="-0.0643" calcext:value-type="float">
            <text:p>-0.064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973" calcext:value-type="float">
            <text:p>0.0973</text:p>
          </table:table-cell>
          <table:table-cell office:value-type="float" office:value="-0.3549" calcext:value-type="float">
            <text:p>-0.3549</text:p>
          </table:table-cell>
          <table:table-cell office:value-type="float" office:value="-0.0643" calcext:value-type="float">
            <text:p>-0.0643</text:p>
          </table:table-cell>
          <table:table-cell office:value-type="float" office:value="10.3242" calcext:value-type="float">
            <text:p>10.3242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148" calcext:value-type="float">
            <text:p>0.0148</text:p>
          </table:table-cell>
          <table:table-cell office:value-type="float" office:value="-0.2571" calcext:value-type="float">
            <text:p>-0.2571</text:p>
          </table:table-cell>
          <table:table-cell office:value-type="float" office:value="0.2599" calcext:value-type="float">
            <text:p>0.259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148" calcext:value-type="float">
            <text:p>0.0148</text:p>
          </table:table-cell>
          <table:table-cell office:value-type="float" office:value="-0.2571" calcext:value-type="float">
            <text:p>-0.2571</text:p>
          </table:table-cell>
          <table:table-cell office:value-type="float" office:value="0.2599" calcext:value-type="float">
            <text:p>0.2599</text:p>
          </table:table-cell>
          <table:table-cell office:value-type="float" office:value="10.0252" calcext:value-type="float">
            <text:p>10.0252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18" calcext:value-type="float">
            <text:p>0.0418</text:p>
          </table:table-cell>
          <table:table-cell office:value-type="float" office:value="-0.0727" calcext:value-type="float">
            <text:p>-0.0727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2852" calcext:value-type="float">
            <text:p>0.285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0418" calcext:value-type="float">
            <text:p>0.0418</text:p>
          </table:table-cell>
          <table:table-cell office:value-type="float" office:value="-0.0727" calcext:value-type="float">
            <text:p>-0.0727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2852" calcext:value-type="float">
            <text:p>0.2852</text:p>
          </table:table-cell>
          <table:table-cell office:value-type="float" office:value="9.7151" calcext:value-type="float">
            <text:p>9.7151</text:p>
          </table:table-cell>
          <table:table-cell office:value-type="float" office:value="-0.2849" calcext:value-type="float">
            <text:p>-0.2849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0002" calcext:value-type="float">
            <text:p>0.000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0002" calcext:value-type="float">
            <text:p>0.0002</text:p>
          </table:table-cell>
          <table:table-cell office:value-type="float" office:value="9.7523" calcext:value-type="float">
            <text:p>9.7523</text:p>
          </table:table-cell>
          <table:table-cell office:value-type="float" office:value="-0.2477" calcext:value-type="float">
            <text:p>-0.2477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346" calcext:value-type="float">
            <text:p>0.0346</text:p>
          </table:table-cell>
          <table:table-cell office:value-type="float" office:value="-0.2474" calcext:value-type="float">
            <text:p>-0.247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346" calcext:value-type="float">
            <text:p>0.034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9.9867" calcext:value-type="float">
            <text:p>9.9867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2195" calcext:value-type="float">
            <text:p>-0.2195</text:p>
          </table:table-cell>
          <table:table-cell office:value-type="float" office:value="-0.2608" calcext:value-type="float">
            <text:p>-0.260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2195" calcext:value-type="float">
            <text:p>-0.2195</text:p>
          </table:table-cell>
          <table:table-cell office:value-type="float" office:value="-0.2608" calcext:value-type="float">
            <text:p>-0.2608</text:p>
          </table:table-cell>
          <table:table-cell office:value-type="float" office:value="10.2739" calcext:value-type="float">
            <text:p>10.2739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92" calcext:value-type="float">
            <text:p>0.0492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0131" calcext:value-type="float">
            <text:p>0.013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92" calcext:value-type="float">
            <text:p>0.0492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0131" calcext:value-type="float">
            <text:p>0.0131</text:p>
          </table:table-cell>
          <table:table-cell office:value-type="float" office:value="10.232" calcext:value-type="float">
            <text:p>10.232</text:p>
          </table:table-cell>
          <table:table-cell office:value-type="float" office:value="0.232" calcext:value-type="float">
            <text:p>0.232</text:p>
          </table:table-cell>
          <table:table-cell office:value-type="float" office:value="0.0388" calcext:value-type="float">
            <text:p>0.038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2143" calcext:value-type="float">
            <text:p>-0.2143</text:p>
          </table:table-cell>
          <table:table-cell office:value-type="float" office:value="0.2451" calcext:value-type="float">
            <text:p>0.245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0388" calcext:value-type="float">
            <text:p>0.038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2143" calcext:value-type="float">
            <text:p>-0.2143</text:p>
          </table:table-cell>
          <table:table-cell office:value-type="float" office:value="0.2451" calcext:value-type="float">
            <text:p>0.2451</text:p>
          </table:table-cell>
          <table:table-cell office:value-type="float" office:value="9.9282" calcext:value-type="float">
            <text:p>9.9282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1733" calcext:value-type="float">
            <text:p>0.173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1733" calcext:value-type="float">
            <text:p>0.1733</text:p>
          </table:table-cell>
          <table:table-cell office:value-type="float" office:value="9.7578" calcext:value-type="float">
            <text:p>9.7578</text:p>
          </table:table-cell>
          <table:table-cell office:value-type="float" office:value="-0.2422" calcext:value-type="float">
            <text:p>-0.2422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0.0471" calcext:value-type="float">
            <text:p>0.0471</text:p>
          </table:table-cell>
          <table:table-cell office:value-type="float" office:value="-0.0689" calcext:value-type="float">
            <text:p>-0.068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0.0471" calcext:value-type="float">
            <text:p>0.0471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9.8535" calcext:value-type="float">
            <text:p>9.8535</text:p>
          </table:table-cell>
          <table:table-cell office:value-type="float" office:value="-0.1465" calcext:value-type="float">
            <text:p>-0.1465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951" calcext:value-type="float">
            <text:p>-0.0951</text:p>
          </table:table-cell>
          <table:table-cell office:value-type="float" office:value="-0.2154" calcext:value-type="float">
            <text:p>-0.215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951" calcext:value-type="float">
            <text:p>-0.0951</text:p>
          </table:table-cell>
          <table:table-cell office:value-type="float" office:value="-0.2154" calcext:value-type="float">
            <text:p>-0.2154</text:p>
          </table:table-cell>
          <table:table-cell office:value-type="float" office:value="10.0878" calcext:value-type="float">
            <text:p>10.0878</text:p>
          </table:table-cell>
          <table:table-cell office:value-type="float" office:value="0.0878" calcext:value-type="float">
            <text:p>0.0878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0524" calcext:value-type="float">
            <text:p>0.0524</text:p>
          </table:table-cell>
          <table:table-cell office:value-type="float" office:value="-0.2666" calcext:value-type="float">
            <text:p>-0.2666</text:p>
          </table:table-cell>
          <table:table-cell office:value-type="float" office:value="-0.1277" calcext:value-type="float">
            <text:p>-0.127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0524" calcext:value-type="float">
            <text:p>0.0524</text:p>
          </table:table-cell>
          <table:table-cell office:value-type="float" office:value="-0.2666" calcext:value-type="float">
            <text:p>-0.2666</text:p>
          </table:table-cell>
          <table:table-cell office:value-type="float" office:value="-0.1277" calcext:value-type="float">
            <text:p>-0.1277</text:p>
          </table:table-cell>
          <table:table-cell office:value-type="float" office:value="10.242" calcext:value-type="float">
            <text:p>10.242</text:p>
          </table:table-cell>
          <table:table-cell office:value-type="float" office:value="0.242" calcext:value-type="float">
            <text:p>0.242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2732" calcext:value-type="float">
            <text:p>-0.2732</text:p>
          </table:table-cell>
          <table:table-cell office:value-type="float" office:value="0.1144" calcext:value-type="float">
            <text:p>0.114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2732" calcext:value-type="float">
            <text:p>-0.2732</text:p>
          </table:table-cell>
          <table:table-cell office:value-type="float" office:value="0.1144" calcext:value-type="float">
            <text:p>0.1144</text:p>
          </table:table-cell>
          <table:table-cell office:value-type="float" office:value="10.0819" calcext:value-type="float">
            <text:p>10.0819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-0.1179" calcext:value-type="float">
            <text:p>-0.1179</text:p>
          </table:table-cell>
          <table:table-cell office:value-type="float" office:value="0.1963" calcext:value-type="float">
            <text:p>0.196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-0.1179" calcext:value-type="float">
            <text:p>-0.1179</text:p>
          </table:table-cell>
          <table:table-cell office:value-type="float" office:value="0.1963" calcext:value-type="float">
            <text:p>0.1963</text:p>
          </table:table-cell>
          <table:table-cell office:value-type="float" office:value="9.8608" calcext:value-type="float">
            <text:p>9.8608</text:p>
          </table:table-cell>
          <table:table-cell office:value-type="float" office:value="-0.1392" calcext:value-type="float">
            <text:p>-0.139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571" calcext:value-type="float">
            <text:p>0.057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571" calcext:value-type="float">
            <text:p>0.0571</text:p>
          </table:table-cell>
          <table:table-cell office:value-type="float" office:value="9.8159" calcext:value-type="float">
            <text:p>9.8159</text:p>
          </table:table-cell>
          <table:table-cell office:value-type="float" office:value="-0.1841" calcext:value-type="float">
            <text:p>-0.1841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127" calcext:value-type="float">
            <text:p>-0.12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127" calcext:value-type="float">
            <text:p>-0.127</text:p>
          </table:table-cell>
          <table:table-cell office:value-type="float" office:value="9.9599" calcext:value-type="float">
            <text:p>9.9599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0.0392" calcext:value-type="float">
            <text:p>0.0392</text:p>
          </table:table-cell>
          <table:table-cell office:value-type="float" office:value="-0.1731" calcext:value-type="float">
            <text:p>-0.1731</text:p>
          </table:table-cell>
          <table:table-cell office:value-type="float" office:value="-0.1671" calcext:value-type="float">
            <text:p>-0.167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0.0392" calcext:value-type="float">
            <text:p>0.0392</text:p>
          </table:table-cell>
          <table:table-cell office:value-type="float" office:value="-0.1731" calcext:value-type="float">
            <text:p>-0.1731</text:p>
          </table:table-cell>
          <table:table-cell office:value-type="float" office:value="-0.1671" calcext:value-type="float">
            <text:p>-0.1671</text:p>
          </table:table-cell>
          <table:table-cell office:value-type="float" office:value="10.1545" calcext:value-type="float">
            <text:p>10.154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307" calcext:value-type="float">
            <text:p>0.0307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0126" calcext:value-type="float">
            <text:p>-0.012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307" calcext:value-type="float">
            <text:p>0.0307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10.1615" calcext:value-type="float">
            <text:p>10.161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1948" calcext:value-type="float">
            <text:p>-0.1948</text:p>
          </table:table-cell>
          <table:table-cell office:value-type="float" office:value="0.1489" calcext:value-type="float">
            <text:p>0.148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1948" calcext:value-type="float">
            <text:p>-0.1948</text:p>
          </table:table-cell>
          <table:table-cell office:value-type="float" office:value="0.1489" calcext:value-type="float">
            <text:p>0.1489</text:p>
          </table:table-cell>
          <table:table-cell office:value-type="float" office:value="9.9805" calcext:value-type="float">
            <text:p>9.9805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0.1294" calcext:value-type="float">
            <text:p>0.129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0.1294" calcext:value-type="float">
            <text:p>0.1294</text:p>
          </table:table-cell>
          <table:table-cell office:value-type="float" office:value="9.8402" calcext:value-type="float">
            <text:p>9.8402</text:p>
          </table:table-cell>
          <table:table-cell office:value-type="float" office:value="-0.1598" calcext:value-type="float">
            <text:p>-0.1598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-0.0304" calcext:value-type="float">
            <text:p>-0.030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9.8872" calcext:value-type="float">
            <text:p>9.8872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432" calcext:value-type="float">
            <text:p>-0.143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432" calcext:value-type="float">
            <text:p>-0.1432</text:p>
          </table:table-cell>
          <table:table-cell office:value-type="float" office:value="10.0463" calcext:value-type="float">
            <text:p>10.0463</text:p>
          </table:table-cell>
          <table:table-cell office:value-type="float" office:value="0.0463" calcext:value-type="float">
            <text:p>0.0463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034" calcext:value-type="float">
            <text:p>0.034</text:p>
          </table:table-cell>
          <table:table-cell office:value-type="float" office:value="-0.2131" calcext:value-type="float">
            <text:p>-0.2131</text:p>
          </table:table-cell>
          <table:table-cell office:value-type="float" office:value="-0.0969" calcext:value-type="float">
            <text:p>-0.096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034" calcext:value-type="float">
            <text:p>0.034</text:p>
          </table:table-cell>
          <table:table-cell office:value-type="float" office:value="-0.2131" calcext:value-type="float">
            <text:p>-0.2131</text:p>
          </table:table-cell>
          <table:table-cell office:value-type="float" office:value="-0.0969" calcext:value-type="float">
            <text:p>-0.0969</text:p>
          </table:table-cell>
          <table:table-cell office:value-type="float" office:value="10.1634" calcext:value-type="float">
            <text:p>10.1634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2283" calcext:value-type="float">
            <text:p>-0.2283</text:p>
          </table:table-cell>
          <table:table-cell office:value-type="float" office:value="0.0665" calcext:value-type="float">
            <text:p>0.066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2283" calcext:value-type="float">
            <text:p>-0.2283</text:p>
          </table:table-cell>
          <table:table-cell office:value-type="float" office:value="0.0665" calcext:value-type="float">
            <text:p>0.0665</text:p>
          </table:table-cell>
          <table:table-cell office:value-type="float" office:value="10.0666" calcext:value-type="float">
            <text:p>10.0666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-0.1285" calcext:value-type="float">
            <text:p>-0.1285</text:p>
          </table:table-cell>
          <table:table-cell office:value-type="float" office:value="0.1331" calcext:value-type="float">
            <text:p>0.133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-0.1285" calcext:value-type="float">
            <text:p>-0.1285</text:p>
          </table:table-cell>
          <table:table-cell office:value-type="float" office:value="0.1331" calcext:value-type="float">
            <text:p>0.1331</text:p>
          </table:table-cell>
          <table:table-cell office:value-type="float" office:value="9.9142" calcext:value-type="float">
            <text:p>9.9142</text:p>
          </table:table-cell>
          <table:table-cell office:value-type="float" office:value="-0.0858" calcext:value-type="float">
            <text:p>-0.0858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0473" calcext:value-type="float">
            <text:p>0.047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0473" calcext:value-type="float">
            <text:p>0.0473</text:p>
          </table:table-cell>
          <table:table-cell office:value-type="float" office:value="9.8642" calcext:value-type="float">
            <text:p>9.8642</text:p>
          </table:table-cell>
          <table:table-cell office:value-type="float" office:value="-0.1358" calcext:value-type="float">
            <text:p>-0.1358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886" calcext:value-type="float">
            <text:p>-0.088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886" calcext:value-type="float">
            <text:p>-0.0886</text:p>
          </table:table-cell>
          <table:table-cell office:value-type="float" office:value="9.9681" calcext:value-type="float">
            <text:p>9.9681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279" calcext:value-type="float">
            <text:p>0.0279</text:p>
          </table:table-cell>
          <table:table-cell office:value-type="float" office:value="-0.1635" calcext:value-type="float">
            <text:p>-0.1635</text:p>
          </table:table-cell>
          <table:table-cell office:value-type="float" office:value="-0.1204" calcext:value-type="float">
            <text:p>-0.120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279" calcext:value-type="float">
            <text:p>0.0279</text:p>
          </table:table-cell>
          <table:table-cell office:value-type="float" office:value="-0.1635" calcext:value-type="float">
            <text:p>-0.1635</text:p>
          </table:table-cell>
          <table:table-cell office:value-type="float" office:value="-0.1204" calcext:value-type="float">
            <text:p>-0.1204</text:p>
          </table:table-cell>
          <table:table-cell office:value-type="float" office:value="10.1126" calcext:value-type="float">
            <text:p>10.1126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06" calcext:value-type="float">
            <text:p>0.0206</text:p>
          </table:table-cell>
          <table:table-cell office:value-type="float" office:value="-0.2276" calcext:value-type="float">
            <text:p>-0.2276</text:p>
          </table:table-cell>
          <table:table-cell office:value-type="float" office:value="-0.0079" calcext:value-type="float">
            <text:p>-0.007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06" calcext:value-type="float">
            <text:p>0.0206</text:p>
          </table:table-cell>
          <table:table-cell office:value-type="float" office:value="-0.2276" calcext:value-type="float">
            <text:p>-0.2276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10.1143" calcext:value-type="float">
            <text:p>10.1143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1783" calcext:value-type="float">
            <text:p>-0.1783</text:p>
          </table:table-cell>
          <table:table-cell office:value-type="float" office:value="0.1064" calcext:value-type="float">
            <text:p>0.106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1783" calcext:value-type="float">
            <text:p>-0.1783</text:p>
          </table:table-cell>
          <table:table-cell office:value-type="float" office:value="0.1064" calcext:value-type="float">
            <text:p>0.1064</text:p>
          </table:table-cell>
          <table:table-cell office:value-type="float" office:value="9.9836" calcext:value-type="float">
            <text:p>9.9836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01" calcext:value-type="float">
            <text:p>-0.0801</text:p>
          </table:table-cell>
          <table:table-cell office:value-type="float" office:value="0.09" calcext:value-type="float">
            <text:p>0.0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01" calcext:value-type="float">
            <text:p>-0.0801</text:p>
          </table:table-cell>
          <table:table-cell office:value-type="float" office:value="0.09" calcext:value-type="float">
            <text:p>0.09</text:p>
          </table:table-cell>
          <table:table-cell office:value-type="float" office:value="9.8867" calcext:value-type="float">
            <text:p>9.8867</text:p>
          </table:table-cell>
          <table:table-cell office:value-type="float" office:value="-0.1133" calcext:value-type="float">
            <text:p>-0.1133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-0.0233" calcext:value-type="float">
            <text:p>-0.023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9.9163" calcext:value-type="float">
            <text:p>9.9163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107" calcext:value-type="float">
            <text:p>-0.10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107" calcext:value-type="float">
            <text:p>-0.107</text:p>
          </table:table-cell>
          <table:table-cell office:value-type="float" office:value="10.0408" calcext:value-type="float">
            <text:p>10.0408</text:p>
          </table:table-cell>
          <table:table-cell office:value-type="float" office:value="0.0408" calcext:value-type="float">
            <text:p>0.0408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1986" calcext:value-type="float">
            <text:p>-0.1986</text:p>
          </table:table-cell>
          <table:table-cell office:value-type="float" office:value="-0.0662" calcext:value-type="float">
            <text:p>-0.066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1986" calcext:value-type="float">
            <text:p>-0.1986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10.1191" calcext:value-type="float">
            <text:p>10.1191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2052" calcext:value-type="float">
            <text:p>-0.2052</text:p>
          </table:table-cell>
          <table:table-cell office:value-type="float" office:value="0.053" calcext:value-type="float">
            <text:p>0.05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2052" calcext:value-type="float">
            <text:p>-0.2052</text:p>
          </table:table-cell>
          <table:table-cell office:value-type="float" office:value="0.053" calcext:value-type="float">
            <text:p>0.053</text:p>
          </table:table-cell>
          <table:table-cell office:value-type="float" office:value="10.0427" calcext:value-type="float">
            <text:p>10.0427</text:p>
          </table:table-cell>
          <table:table-cell office:value-type="float" office:value="0.0427" calcext:value-type="float">
            <text:p>0.0427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1308" calcext:value-type="float">
            <text:p>-0.1308</text:p>
          </table:table-cell>
          <table:table-cell office:value-type="float" office:value="0.0957" calcext:value-type="float">
            <text:p>0.095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1308" calcext:value-type="float">
            <text:p>-0.1308</text:p>
          </table:table-cell>
          <table:table-cell office:value-type="float" office:value="0.0957" calcext:value-type="float">
            <text:p>0.0957</text:p>
          </table:table-cell>
          <table:table-cell office:value-type="float" office:value="9.9348" calcext:value-type="float">
            <text:p>9.9348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0.0305" calcext:value-type="float">
            <text:p>0.030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0.0305" calcext:value-type="float">
            <text:p>0.0305</text:p>
          </table:table-cell>
          <table:table-cell office:value-type="float" office:value="9.9027" calcext:value-type="float">
            <text:p>9.9027</text:p>
          </table:table-cell>
          <table:table-cell office:value-type="float" office:value="-0.0973" calcext:value-type="float">
            <text:p>-0.0973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859" calcext:value-type="float">
            <text:p>-0.0859</text:p>
          </table:table-cell>
          <table:table-cell office:value-type="float" office:value="-0.0668" calcext:value-type="float">
            <text:p>-0.066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859" calcext:value-type="float">
            <text:p>-0.0859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9.9804" calcext:value-type="float">
            <text:p>9.9804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206" calcext:value-type="float">
            <text:p>0.0206</text:p>
          </table:table-cell>
          <table:table-cell office:value-type="float" office:value="-0.1626" calcext:value-type="float">
            <text:p>-0.1626</text:p>
          </table:table-cell>
          <table:table-cell office:value-type="float" office:value="-0.0864" calcext:value-type="float">
            <text:p>-0.086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206" calcext:value-type="float">
            <text:p>0.0206</text:p>
          </table:table-cell>
          <table:table-cell office:value-type="float" office:value="-0.1626" calcext:value-type="float">
            <text:p>-0.1626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10.0856" calcext:value-type="float">
            <text:p>10.0856</text:p>
          </table:table-cell>
          <table:table-cell office:value-type="float" office:value="0.0856" calcext:value-type="float">
            <text:p>0.0856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2062" calcext:value-type="float">
            <text:p>-0.2062</text:p>
          </table:table-cell>
          <table:table-cell office:value-type="float" office:value="-0.0008" calcext:value-type="float">
            <text:p>-0.000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2062" calcext:value-type="float">
            <text:p>-0.206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0.0801" calcext:value-type="float">
            <text:p>10.0801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-0.1669" calcext:value-type="float">
            <text:p>-0.1669</text:p>
          </table:table-cell>
          <table:table-cell office:value-type="float" office:value="0.0793" calcext:value-type="float">
            <text:p>0.079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-0.1669" calcext:value-type="float">
            <text:p>-0.1669</text:p>
          </table:table-cell>
          <table:table-cell office:value-type="float" office:value="0.0793" calcext:value-type="float">
            <text:p>0.0793</text:p>
          </table:table-cell>
          <table:table-cell office:value-type="float" office:value="9.9836" calcext:value-type="float">
            <text:p>9.9836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0.063" calcext:value-type="float">
            <text:p>0.06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0.063" calcext:value-type="float">
            <text:p>0.063</text:p>
          </table:table-cell>
          <table:table-cell office:value-type="float" office:value="9.9159" calcext:value-type="float">
            <text:p>9.9159</text:p>
          </table:table-cell>
          <table:table-cell office:value-type="float" office:value="-0.0841" calcext:value-type="float">
            <text:p>-0.0841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-0.0212" calcext:value-type="float">
            <text:p>-0.021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9.9425" calcext:value-type="float">
            <text:p>9.9425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1247" calcext:value-type="float">
            <text:p>-0.1247</text:p>
          </table:table-cell>
          <table:table-cell office:value-type="float" office:value="-0.0787" calcext:value-type="float">
            <text:p>-0.078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1247" calcext:value-type="float">
            <text:p>-0.1247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10.0343" calcext:value-type="float">
            <text:p>10.0343</text:p>
          </table:table-cell>
          <table:table-cell office:value-type="float" office:value="0.0343" calcext:value-type="float">
            <text:p>0.0343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173" calcext:value-type="float">
            <text:p>0.0173</text:p>
          </table:table-cell>
          <table:table-cell office:value-type="float" office:value="-0.1862" calcext:value-type="float">
            <text:p>-0.1862</text:p>
          </table:table-cell>
          <table:table-cell office:value-type="float" office:value="-0.0444" calcext:value-type="float">
            <text:p>-0.044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173" calcext:value-type="float">
            <text:p>0.0173</text:p>
          </table:table-cell>
          <table:table-cell office:value-type="float" office:value="-0.1862" calcext:value-type="float">
            <text:p>-0.1862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10.0864" calcext:value-type="float">
            <text:p>10.0864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874" calcext:value-type="float">
            <text:p>-0.1874</text:p>
          </table:table-cell>
          <table:table-cell office:value-type="float" office:value="0.042" calcext:value-type="float">
            <text:p>0.04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874" calcext:value-type="float">
            <text:p>-0.1874</text:p>
          </table:table-cell>
          <table:table-cell office:value-type="float" office:value="0.042" calcext:value-type="float">
            <text:p>0.042</text:p>
          </table:table-cell>
          <table:table-cell office:value-type="float" office:value="10.0271" calcext:value-type="float">
            <text:p>10.0271</text:p>
          </table:table-cell>
          <table:table-cell office:value-type="float" office:value="0.0271" calcext:value-type="float">
            <text:p>0.027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1318" calcext:value-type="float">
            <text:p>-0.1318</text:p>
          </table:table-cell>
          <table:table-cell office:value-type="float" office:value="0.0691" calcext:value-type="float">
            <text:p>0.069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1318" calcext:value-type="float">
            <text:p>-0.1318</text:p>
          </table:table-cell>
          <table:table-cell office:value-type="float" office:value="0.0691" calcext:value-type="float">
            <text:p>0.0691</text:p>
          </table:table-cell>
          <table:table-cell office:value-type="float" office:value="9.9496" calcext:value-type="float">
            <text:p>9.9496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0.0187" calcext:value-type="float">
            <text:p>0.0187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0.0187" calcext:value-type="float">
            <text:p>0.0187</text:p>
          </table:table-cell>
          <table:table-cell office:value-type="float" office:value="9.9299" calcext:value-type="float">
            <text:p>9.9299</text:p>
          </table:table-cell>
          <table:table-cell office:value-type="float" office:value="-0.0701" calcext:value-type="float">
            <text:p>-0.0701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1042" calcext:value-type="float">
            <text:p>-0.1042</text:p>
          </table:table-cell>
          <table:table-cell office:value-type="float" office:value="-0.0514" calcext:value-type="float">
            <text:p>-0.051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1042" calcext:value-type="float">
            <text:p>-0.1042</text:p>
          </table:table-cell>
          <table:table-cell office:value-type="float" office:value="-0.0514" calcext:value-type="float">
            <text:p>-0.0514</text:p>
          </table:table-cell>
          <table:table-cell office:value-type="float" office:value="9.9896" calcext:value-type="float">
            <text:p>9.9896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-0.0618" calcext:value-type="float">
            <text:p>-0.061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10.0647" calcext:value-type="float">
            <text:p>10.0647</text:p>
          </table:table-cell>
          <table:table-cell office:value-type="float" office:value="0.0647" calcext:value-type="float">
            <text:p>0.0647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902" calcext:value-type="float">
            <text:p>-0.1902</text:p>
          </table:table-cell>
          <table:table-cell office:value-type="float" office:value="0.0029" calcext:value-type="float">
            <text:p>0.0029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902" calcext:value-type="float">
            <text:p>-0.1902</text:p>
          </table:table-cell>
          <table:table-cell office:value-type="float" office:value="0.0029" calcext:value-type="float">
            <text:p>0.0029</text:p>
          </table:table-cell>
          <table:table-cell office:value-type="float" office:value="10.0562" calcext:value-type="float">
            <text:p>10.0562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1592" calcext:value-type="float">
            <text:p>-0.1592</text:p>
          </table:table-cell>
          <table:table-cell office:value-type="float" office:value="0.0592" calcext:value-type="float">
            <text:p>0.059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1592" calcext:value-type="float">
            <text:p>-0.1592</text:p>
          </table:table-cell>
          <table:table-cell office:value-type="float" office:value="0.0592" calcext:value-type="float">
            <text:p>0.0592</text:p>
          </table:table-cell>
          <table:table-cell office:value-type="float" office:value="9.9852" calcext:value-type="float">
            <text:p>9.9852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0.0443" calcext:value-type="float">
            <text:p>0.044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0.0443" calcext:value-type="float">
            <text:p>0.0443</text:p>
          </table:table-cell>
          <table:table-cell office:value-type="float" office:value="9.9373" calcext:value-type="float">
            <text:p>9.9373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944" calcext:value-type="float">
            <text:p>-0.0944</text:p>
          </table:table-cell>
          <table:table-cell office:value-type="float" office:value="-0.0184" calcext:value-type="float">
            <text:p>-0.0184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944" calcext:value-type="float">
            <text:p>-0.0944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9.9602" calcext:value-type="float">
            <text:p>9.9602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327" calcext:value-type="float">
            <text:p>-0.1327</text:p>
          </table:table-cell>
          <table:table-cell office:value-type="float" office:value="-0.0582" calcext:value-type="float">
            <text:p>-0.0582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327" calcext:value-type="float">
            <text:p>-0.1327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0.028" calcext:value-type="float">
            <text:p>10.028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-0.0301" calcext:value-type="float">
            <text:p>-0.030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10.0631" calcext:value-type="float">
            <text:p>10.0631</text:p>
          </table:table-cell>
          <table:table-cell office:value-type="float" office:value="0.0631" calcext:value-type="float">
            <text:p>0.0631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1754" calcext:value-type="float">
            <text:p>-0.1754</text:p>
          </table:table-cell>
          <table:table-cell office:value-type="float" office:value="0.033" calcext:value-type="float">
            <text:p>0.03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1754" calcext:value-type="float">
            <text:p>-0.1754</text:p>
          </table:table-cell>
          <table:table-cell office:value-type="float" office:value="0.033" calcext:value-type="float">
            <text:p>0.033</text:p>
          </table:table-cell>
          <table:table-cell office:value-type="float" office:value="10.0178" calcext:value-type="float">
            <text:p>10.0178</text:p>
          </table:table-cell>
          <table:table-cell office:value-type="float" office:value="0.0178" calcext:value-type="float">
            <text:p>0.0178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1335" calcext:value-type="float">
            <text:p>-0.1335</text:p>
          </table:table-cell>
          <table:table-cell office:value-type="float" office:value="0.0508" calcext:value-type="float">
            <text:p>0.0508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1335" calcext:value-type="float">
            <text:p>-0.1335</text:p>
          </table:table-cell>
          <table:table-cell office:value-type="float" office:value="0.0508" calcext:value-type="float">
            <text:p>0.0508</text:p>
          </table:table-cell>
          <table:table-cell office:value-type="float" office:value="9.9607" calcext:value-type="float">
            <text:p>9.9607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0.0115" calcext:value-type="float">
            <text:p>0.011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0.0115" calcext:value-type="float">
            <text:p>0.0115</text:p>
          </table:table-cell>
          <table:table-cell office:value-type="float" office:value="9.9489" calcext:value-type="float">
            <text:p>9.9489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1164" calcext:value-type="float">
            <text:p>-0.1164</text:p>
          </table:table-cell>
          <table:table-cell office:value-type="float" office:value="-0.0396" calcext:value-type="float">
            <text:p>-0.039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1164" calcext:value-type="float">
            <text:p>-0.1164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9.995" calcext:value-type="float">
            <text:p>9.99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85" calcext:value-type="float">
            <text:p>-0.1585</text:p>
          </table:table-cell>
          <table:table-cell office:value-type="float" office:value="-0.0446" calcext:value-type="float">
            <text:p>-0.0446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85" calcext:value-type="float">
            <text:p>-0.1585</text:p>
          </table:table-cell>
          <table:table-cell office:value-type="float" office:value="-0.0446" calcext:value-type="float">
            <text:p>-0.0446</text:p>
          </table:table-cell>
          <table:table-cell office:value-type="float" office:value="10.0489" calcext:value-type="float">
            <text:p>10.0489</text:p>
          </table:table-cell>
          <table:table-cell office:value-type="float" office:value="0.0489" calcext:value-type="float">
            <text:p>0.0489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0.0043" calcext:value-type="float">
            <text:p>0.004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1786" calcext:value-type="float">
            <text:p>-0.1786</text:p>
          </table:table-cell>
          <table:table-cell office:value-type="float" office:value="0.0043" calcext:value-type="float">
            <text:p>0.0043</text:p>
          </table:table-cell>
          <table:table-cell office:value-type="float" office:value="10.0398" calcext:value-type="float">
            <text:p>10.0398</text:p>
          </table:table-cell>
          <table:table-cell office:value-type="float" office:value="0.0398" calcext:value-type="float">
            <text:p>0.0398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1543" calcext:value-type="float">
            <text:p>-0.1543</text:p>
          </table:table-cell>
          <table:table-cell office:value-type="float" office:value="0.0441" calcext:value-type="float">
            <text:p>0.0441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1543" calcext:value-type="float">
            <text:p>-0.1543</text:p>
          </table:table-cell>
          <table:table-cell office:value-type="float" office:value="0.0441" calcext:value-type="float">
            <text:p>0.0441</text:p>
          </table:table-cell>
          <table:table-cell office:value-type="float" office:value="9.9874" calcext:value-type="float">
            <text:p>9.9874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65" calcext:value-type="float">
            <text:p>-0.1165</text:p>
          </table:table-cell>
          <table:table-cell office:value-type="float" office:value="0.0315" calcext:value-type="float">
            <text:p>0.031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65" calcext:value-type="float">
            <text:p>-0.1165</text:p>
          </table:table-cell>
          <table:table-cell office:value-type="float" office:value="0.0315" calcext:value-type="float">
            <text:p>0.0315</text:p>
          </table:table-cell>
          <table:table-cell office:value-type="float" office:value="9.953" calcext:value-type="float">
            <text:p>9.95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1085" calcext:value-type="float">
            <text:p>-0.1085</text:p>
          </table:table-cell>
          <table:table-cell office:value-type="float" office:value="-0.0155" calcext:value-type="float">
            <text:p>-0.015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1085" calcext:value-type="float">
            <text:p>-0.1085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9.9722" calcext:value-type="float">
            <text:p>9.9722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1378" calcext:value-type="float">
            <text:p>-0.1378</text:p>
          </table:table-cell>
          <table:table-cell office:value-type="float" office:value="-0.0433" calcext:value-type="float">
            <text:p>-0.0433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1378" calcext:value-type="float">
            <text:p>-0.1378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10.0226" calcext:value-type="float">
            <text:p>10.0226</text:p>
          </table:table-cell>
          <table:table-cell office:value-type="float" office:value="0.0226" calcext:value-type="float">
            <text:p>0.0226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-0.0207" calcext:value-type="float">
            <text:p>-0.020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17" calcext:value-type="float">
            <text:p>0.617</text:p>
          </table:table-cell>
          <table:table-cell office:value-type="float" office:value="-0.6092" calcext:value-type="float">
            <text:p>-0.6092</text:p>
          </table:table-cell>
          <table:table-cell office:value-type="float" office:value="-0.3816" calcext:value-type="float">
            <text:p>-0.3816</text:p>
          </table:table-cell>
          <table:table-cell office:value-type="float" office:value="0.5661" calcext:value-type="float">
            <text:p>0.5661</text:p>
          </table:table-cell>
          <table:table-cell office:value-type="float" office:value="9.9999" calcext:value-type="float">
            <text:p>9.9999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1917" calcext:value-type="float">
            <text:p>-0.1917</text:p>
          </table:table-cell>
          <table:table-cell office:value-type="float" office:value="-0.8779" calcext:value-type="float">
            <text:p>-0.8779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566" calcext:value-type="float">
            <text:p>0.56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1917" calcext:value-type="float">
            <text:p>-0.1917</text:p>
          </table:table-cell>
          <table:table-cell office:value-type="float" office:value="-0.8779" calcext:value-type="float">
            <text:p>-0.8779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566" calcext:value-type="float">
            <text:p>0.566</text:p>
          </table:table-cell>
          <table:table-cell office:value-type="float" office:value="8.9818" calcext:value-type="float">
            <text:p>8.9818</text:p>
          </table:table-cell>
          <table:table-cell office:value-type="float" office:value="-1.0182" calcext:value-type="float">
            <text:p>-1.0182</text:p>
          </table:table-cell>
          <table:table-cell office:value-type="float" office:value="-0.8308" calcext:value-type="float">
            <text:p>-0.8308</text:p>
          </table:table-cell>
          <table:table-cell office:value-type="float" office:value="-0.2995" calcext:value-type="float">
            <text:p>-0.2995</text:p>
          </table:table-cell>
          <table:table-cell office:value-type="float" office:value="0.2413" calcext:value-type="float">
            <text:p>0.2413</text:p>
          </table:table-cell>
          <table:table-cell office:value-type="float" office:value="-0.4522" calcext:value-type="float">
            <text:p>-0.452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8308" calcext:value-type="float">
            <text:p>-0.8308</text:p>
          </table:table-cell>
          <table:table-cell office:value-type="float" office:value="-0.2995" calcext:value-type="float">
            <text:p>-0.2995</text:p>
          </table:table-cell>
          <table:table-cell office:value-type="float" office:value="0.2413" calcext:value-type="float">
            <text:p>0.2413</text:p>
          </table:table-cell>
          <table:table-cell office:value-type="float" office:value="-0.4522" calcext:value-type="float">
            <text:p>-0.4522</text:p>
          </table:table-cell>
          <table:table-cell office:value-type="float" office:value="9.347" calcext:value-type="float">
            <text:p>9.347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6948" calcext:value-type="float">
            <text:p>-0.6948</text:p>
          </table:table-cell>
          <table:table-cell office:value-type="float" office:value="0.5526" calcext:value-type="float">
            <text:p>0.5526</text:p>
          </table:table-cell>
          <table:table-cell office:value-type="float" office:value="-0.5374" calcext:value-type="float">
            <text:p>-0.5374</text:p>
          </table:table-cell>
          <table:table-cell office:value-type="float" office:value="-1.1052" calcext:value-type="float">
            <text:p>-1.105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0.6948" calcext:value-type="float">
            <text:p>-0.6948</text:p>
          </table:table-cell>
          <table:table-cell office:value-type="float" office:value="0.5526" calcext:value-type="float">
            <text:p>0.5526</text:p>
          </table:table-cell>
          <table:table-cell office:value-type="float" office:value="-0.5374" calcext:value-type="float">
            <text:p>-0.5374</text:p>
          </table:table-cell>
          <table:table-cell office:value-type="float" office:value="-1.1052" calcext:value-type="float">
            <text:p>-1.1052</text:p>
          </table:table-cell>
          <table:table-cell office:value-type="float" office:value="11.1783" calcext:value-type="float">
            <text:p>11.1783</text:p>
          </table:table-cell>
          <table:table-cell office:value-type="float" office:value="1.1783" calcext:value-type="float">
            <text:p>1.1783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8383" calcext:value-type="float">
            <text:p>0.8383</text:p>
          </table:table-cell>
          <table:table-cell office:value-type="float" office:value="-1.0535" calcext:value-type="float">
            <text:p>-1.0535</text:p>
          </table:table-cell>
          <table:table-cell office:value-type="float" office:value="0.0731" calcext:value-type="float">
            <text:p>0.0731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8383" calcext:value-type="float">
            <text:p>0.8383</text:p>
          </table:table-cell>
          <table:table-cell office:value-type="float" office:value="-1.0535" calcext:value-type="float">
            <text:p>-1.0535</text:p>
          </table:table-cell>
          <table:table-cell office:value-type="float" office:value="0.0731" calcext:value-type="float">
            <text:p>0.0731</text:p>
          </table:table-cell>
          <table:table-cell office:value-type="float" office:value="11.2829" calcext:value-type="float">
            <text:p>11.2829</text:p>
          </table:table-cell>
          <table:table-cell office:value-type="float" office:value="1.2829" calcext:value-type="float">
            <text:p>1.2829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3217" calcext:value-type="float">
            <text:p>0.3217</text:p>
          </table:table-cell>
          <table:table-cell office:value-type="float" office:value="-0.3389" calcext:value-type="float">
            <text:p>-0.3389</text:p>
          </table:table-cell>
          <table:table-cell office:value-type="float" office:value="1.356" calcext:value-type="float">
            <text:p>1.35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3217" calcext:value-type="float">
            <text:p>0.3217</text:p>
          </table:table-cell>
          <table:table-cell office:value-type="float" office:value="-0.3389" calcext:value-type="float">
            <text:p>-0.3389</text:p>
          </table:table-cell>
          <table:table-cell office:value-type="float" office:value="1.356" calcext:value-type="float">
            <text:p>1.356</text:p>
          </table:table-cell>
          <table:table-cell office:value-type="float" office:value="9.1312" calcext:value-type="float">
            <text:p>9.1312</text:p>
          </table:table-cell>
          <table:table-cell office:value-type="float" office:value="-0.8688" calcext:value-type="float">
            <text:p>-0.8688</text:p>
          </table:table-cell>
          <table:table-cell office:value-type="float" office:value="0.6393" calcext:value-type="float">
            <text:p>0.6393</text:p>
          </table:table-cell>
          <table:table-cell office:value-type="float" office:value="-0.4346" calcext:value-type="float">
            <text:p>-0.4346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4873" calcext:value-type="float">
            <text:p>0.487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393" calcext:value-type="float">
            <text:p>0.6393</text:p>
          </table:table-cell>
          <table:table-cell office:value-type="float" office:value="-0.4346" calcext:value-type="float">
            <text:p>-0.4346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4873" calcext:value-type="float">
            <text:p>0.4873</text:p>
          </table:table-cell>
          <table:table-cell office:value-type="float" office:value="9.6639" calcext:value-type="float">
            <text:p>9.6639</text:p>
          </table:table-cell>
          <table:table-cell office:value-type="float" office:value="-0.3361" calcext:value-type="float">
            <text:p>-0.3361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7231" calcext:value-type="float">
            <text:p>-0.7231</text:p>
          </table:table-cell>
          <table:table-cell office:value-type="float" office:value="0.902" calcext:value-type="float">
            <text:p>0.902</text:p>
          </table:table-cell>
          <table:table-cell office:value-type="float" office:value="0.1512" calcext:value-type="float">
            <text:p>0.151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7231" calcext:value-type="float">
            <text:p>-0.7231</text:p>
          </table:table-cell>
          <table:table-cell office:value-type="float" office:value="0.902" calcext:value-type="float">
            <text:p>0.902</text:p>
          </table:table-cell>
          <table:table-cell office:value-type="float" office:value="0.1512" calcext:value-type="float">
            <text:p>0.1512</text:p>
          </table:table-cell>
          <table:table-cell office:value-type="float" office:value="8.8216" calcext:value-type="float">
            <text:p>8.8216</text:p>
          </table:table-cell>
          <table:table-cell office:value-type="float" office:value="-1.1784" calcext:value-type="float">
            <text:p>-1.1784</text:p>
          </table:table-cell>
          <table:table-cell office:value-type="float" office:value="-0.5631" calcext:value-type="float">
            <text:p>-0.5631</text:p>
          </table:table-cell>
          <table:table-cell office:value-type="float" office:value="-0.3274" calcext:value-type="float">
            <text:p>-0.3274</text:p>
          </table:table-cell>
          <table:table-cell office:value-type="float" office:value="0.464" calcext:value-type="float">
            <text:p>0.464</text:p>
          </table:table-cell>
          <table:table-cell office:value-type="float" office:value="-1.0272" calcext:value-type="float">
            <text:p>-1.027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0.5631" calcext:value-type="float">
            <text:p>-0.5631</text:p>
          </table:table-cell>
          <table:table-cell office:value-type="float" office:value="-0.3274" calcext:value-type="float">
            <text:p>-0.3274</text:p>
          </table:table-cell>
          <table:table-cell office:value-type="float" office:value="0.464" calcext:value-type="float">
            <text:p>0.464</text:p>
          </table:table-cell>
          <table:table-cell office:value-type="float" office:value="-1.0272" calcext:value-type="float">
            <text:p>-1.0272</text:p>
          </table:table-cell>
          <table:table-cell office:value-type="float" office:value="10.1859" calcext:value-type="float">
            <text:p>10.1859</text:p>
          </table:table-cell>
          <table:table-cell office:value-type="float" office:value="0.1859" calcext:value-type="float">
            <text:p>0.1859</text:p>
          </table:table-cell>
          <table:table-cell office:value-type="float" office:value="-0.5672" calcext:value-type="float">
            <text:p>-0.5672</text:p>
          </table:table-cell>
          <table:table-cell office:value-type="float" office:value="0.3322" calcext:value-type="float">
            <text:p>0.3322</text:p>
          </table:table-cell>
          <table:table-cell office:value-type="float" office:value="-0.4703" calcext:value-type="float">
            <text:p>-0.4703</text:p>
          </table:table-cell>
          <table:table-cell office:value-type="float" office:value="-0.8413" calcext:value-type="float">
            <text:p>-0.841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0.5672" calcext:value-type="float">
            <text:p>-0.5672</text:p>
          </table:table-cell>
          <table:table-cell office:value-type="float" office:value="0.3322" calcext:value-type="float">
            <text:p>0.3322</text:p>
          </table:table-cell>
          <table:table-cell office:value-type="float" office:value="-0.4703" calcext:value-type="float">
            <text:p>-0.4703</text:p>
          </table:table-cell>
          <table:table-cell office:value-type="float" office:value="-0.8413" calcext:value-type="float">
            <text:p>-0.8413</text:p>
          </table:table-cell>
          <table:table-cell office:value-type="float" office:value="10.8308" calcext:value-type="float">
            <text:p>10.8308</text:p>
          </table:table-cell>
          <table:table-cell office:value-type="float" office:value="0.8308" calcext:value-type="float">
            <text:p>0.8308</text:p>
          </table:table-cell>
          <table:table-cell office:value-type="float" office:value="-0.0539" calcext:value-type="float">
            <text:p>-0.0539</text:p>
          </table:table-cell>
          <table:table-cell office:value-type="float" office:value="0.6172" calcext:value-type="float">
            <text:p>0.6172</text:p>
          </table:table-cell>
          <table:table-cell office:value-type="float" office:value="-0.8962" calcext:value-type="float">
            <text:p>-0.8962</text:p>
          </table:table-cell>
          <table:table-cell office:value-type="float" office:value="-0.0105" calcext:value-type="float">
            <text:p>-0.010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0.0539" calcext:value-type="float">
            <text:p>-0.0539</text:p>
          </table:table-cell>
          <table:table-cell office:value-type="float" office:value="0.6172" calcext:value-type="float">
            <text:p>0.6172</text:p>
          </table:table-cell>
          <table:table-cell office:value-type="float" office:value="-0.8962" calcext:value-type="float">
            <text:p>-0.8962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10.9598" calcext:value-type="float">
            <text:p>10.9598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3077" calcext:value-type="float">
            <text:p>0.3077</text:p>
          </table:table-cell>
          <table:table-cell office:value-type="float" office:value="-0.4268" calcext:value-type="float">
            <text:p>-0.4268</text:p>
          </table:table-cell>
          <table:table-cell office:value-type="float" office:value="0.9493" calcext:value-type="float">
            <text:p>0.949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3077" calcext:value-type="float">
            <text:p>0.3077</text:p>
          </table:table-cell>
          <table:table-cell office:value-type="float" office:value="-0.4268" calcext:value-type="float">
            <text:p>-0.4268</text:p>
          </table:table-cell>
          <table:table-cell office:value-type="float" office:value="0.9493" calcext:value-type="float">
            <text:p>0.9493</text:p>
          </table:table-cell>
          <table:table-cell office:value-type="float" office:value="9.7886" calcext:value-type="float">
            <text:p>9.7886</text:p>
          </table:table-cell>
          <table:table-cell office:value-type="float" office:value="-0.2114" calcext:value-type="float">
            <text:p>-0.2114</text:p>
          </table:table-cell>
          <table:table-cell office:value-type="float" office:value="0.4911" calcext:value-type="float">
            <text:p>0.4911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7379" calcext:value-type="float">
            <text:p>0.737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4911" calcext:value-type="float">
            <text:p>0.4911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7379" calcext:value-type="float">
            <text:p>0.7379</text:p>
          </table:table-cell>
          <table:table-cell office:value-type="float" office:value="9.3887" calcext:value-type="float">
            <text:p>9.3887</text:p>
          </table:table-cell>
          <table:table-cell office:value-type="float" office:value="-0.6113" calcext:value-type="float">
            <text:p>-0.6113</text:p>
          </table:table-cell>
          <table:table-cell office:value-type="float" office:value="0.0823" calcext:value-type="float">
            <text:p>0.0823</text:p>
          </table:table-cell>
          <table:table-cell office:value-type="float" office:value="-0.5105" calcext:value-type="float">
            <text:p>-0.5105</text:p>
          </table:table-cell>
          <table:table-cell office:value-type="float" office:value="0.849" calcext:value-type="float">
            <text:p>0.849</text:p>
          </table:table-cell>
          <table:table-cell office:value-type="float" office:value="0.1266" calcext:value-type="float">
            <text:p>0.126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823" calcext:value-type="float">
            <text:p>0.0823</text:p>
          </table:table-cell>
          <table:table-cell office:value-type="float" office:value="-0.5105" calcext:value-type="float">
            <text:p>-0.5105</text:p>
          </table:table-cell>
          <table:table-cell office:value-type="float" office:value="0.849" calcext:value-type="float">
            <text:p>0.849</text:p>
          </table:table-cell>
          <table:table-cell office:value-type="float" office:value="0.1266" calcext:value-type="float">
            <text:p>0.1266</text:p>
          </table:table-cell>
          <table:table-cell office:value-type="float" office:value="9.1043" calcext:value-type="float">
            <text:p>9.1043</text:p>
          </table:table-cell>
          <table:table-cell office:value-type="float" office:value="-0.8957" calcext:value-type="float">
            <text:p>-0.8957</text:p>
          </table:table-cell>
          <table:table-cell office:value-type="float" office:value="-0.3471" calcext:value-type="float">
            <text:p>-0.3471</text:p>
          </table:table-cell>
          <table:table-cell office:value-type="float" office:value="-0.2772" calcext:value-type="float">
            <text:p>-0.2772</text:p>
          </table:table-cell>
          <table:table-cell office:value-type="float" office:value="0.5277" calcext:value-type="float">
            <text:p>0.5277</text:p>
          </table:table-cell>
          <table:table-cell office:value-type="float" office:value="-0.7691" calcext:value-type="float">
            <text:p>-0.769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0.3471" calcext:value-type="float">
            <text:p>-0.3471</text:p>
          </table:table-cell>
          <table:table-cell office:value-type="float" office:value="-0.2772" calcext:value-type="float">
            <text:p>-0.2772</text:p>
          </table:table-cell>
          <table:table-cell office:value-type="float" office:value="0.5277" calcext:value-type="float">
            <text:p>0.5277</text:p>
          </table:table-cell>
          <table:table-cell office:value-type="float" office:value="-0.7691" calcext:value-type="float">
            <text:p>-0.7691</text:p>
          </table:table-cell>
          <table:table-cell office:value-type="float" office:value="9.9429" calcext:value-type="float">
            <text:p>9.9429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-0.4035" calcext:value-type="float">
            <text:p>-0.4035</text:p>
          </table:table-cell>
          <table:table-cell office:value-type="float" office:value="0.183" calcext:value-type="float">
            <text:p>0.183</text:p>
          </table:table-cell>
          <table:table-cell office:value-type="float" office:value="-0.2699" calcext:value-type="float">
            <text:p>-0.2699</text:p>
          </table:table-cell>
          <table:table-cell office:value-type="float" office:value="-0.8262" calcext:value-type="float">
            <text:p>-0.826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0.4035" calcext:value-type="float">
            <text:p>-0.4035</text:p>
          </table:table-cell>
          <table:table-cell office:value-type="float" office:value="0.183" calcext:value-type="float">
            <text:p>0.183</text:p>
          </table:table-cell>
          <table:table-cell office:value-type="float" office:value="-0.2699" calcext:value-type="float">
            <text:p>-0.2699</text:p>
          </table:table-cell>
          <table:table-cell office:value-type="float" office:value="-0.8262" calcext:value-type="float">
            <text:p>-0.8262</text:p>
          </table:table-cell>
          <table:table-cell office:value-type="float" office:value="10.7527" calcext:value-type="float">
            <text:p>10.7527</text:p>
          </table:table-cell>
          <table:table-cell office:value-type="float" office:value="0.7527" calcext:value-type="float">
            <text:p>0.7527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4154" calcext:value-type="float">
            <text:p>0.4154</text:p>
          </table:table-cell>
          <table:table-cell office:value-type="float" office:value="-0.7198" calcext:value-type="float">
            <text:p>-0.7198</text:p>
          </table:table-cell>
          <table:table-cell office:value-type="float" office:value="-0.0736" calcext:value-type="float">
            <text:p>-0.073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4154" calcext:value-type="float">
            <text:p>0.4154</text:p>
          </table:table-cell>
          <table:table-cell office:value-type="float" office:value="-0.7198" calcext:value-type="float">
            <text:p>-0.7198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10.6966" calcext:value-type="float">
            <text:p>10.6966</text:p>
          </table:table-cell>
          <table:table-cell office:value-type="float" office:value="0.6966" calcext:value-type="float">
            <text:p>0.6966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2357" calcext:value-type="float">
            <text:p>0.2357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623" calcext:value-type="float">
            <text:p>0.62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2357" calcext:value-type="float">
            <text:p>0.2357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623" calcext:value-type="float">
            <text:p>0.623</text:p>
          </table:table-cell>
          <table:table-cell office:value-type="float" office:value="10.1976" calcext:value-type="float">
            <text:p>10.1976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3314" calcext:value-type="float">
            <text:p>0.3314</text:p>
          </table:table-cell>
          <table:table-cell office:value-type="float" office:value="-0.1363" calcext:value-type="float">
            <text:p>-0.1363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8206" calcext:value-type="float">
            <text:p>0.820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3314" calcext:value-type="float">
            <text:p>0.3314</text:p>
          </table:table-cell>
          <table:table-cell office:value-type="float" office:value="-0.1363" calcext:value-type="float">
            <text:p>-0.1363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8206" calcext:value-type="float">
            <text:p>0.8206</text:p>
          </table:table-cell>
          <table:table-cell office:value-type="float" office:value="9.2447" calcext:value-type="float">
            <text:p>9.2447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0.0825" calcext:value-type="float">
            <text:p>0.0825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0653" calcext:value-type="float">
            <text:p>0.065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825" calcext:value-type="float">
            <text:p>0.0825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0653" calcext:value-type="float">
            <text:p>0.0653</text:p>
          </table:table-cell>
          <table:table-cell office:value-type="float" office:value="9.3799" calcext:value-type="float">
            <text:p>9.3799</text:p>
          </table:table-cell>
          <table:table-cell office:value-type="float" office:value="-0.6201" calcext:value-type="float">
            <text:p>-0.6201</text:p>
          </table:table-cell>
          <table:table-cell office:value-type="float" office:value="-0.2002" calcext:value-type="float">
            <text:p>-0.2002</text:p>
          </table:table-cell>
          <table:table-cell office:value-type="float" office:value="-0.1892" calcext:value-type="float">
            <text:p>-0.1892</text:p>
          </table:table-cell>
          <table:table-cell office:value-type="float" office:value="0.475" calcext:value-type="float">
            <text:p>0.475</text:p>
          </table:table-cell>
          <table:table-cell office:value-type="float" office:value="-0.5548" calcext:value-type="float">
            <text:p>-0.554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0.2002" calcext:value-type="float">
            <text:p>-0.2002</text:p>
          </table:table-cell>
          <table:table-cell office:value-type="float" office:value="-0.1892" calcext:value-type="float">
            <text:p>-0.1892</text:p>
          </table:table-cell>
          <table:table-cell office:value-type="float" office:value="0.475" calcext:value-type="float">
            <text:p>0.475</text:p>
          </table:table-cell>
          <table:table-cell office:value-type="float" office:value="-0.5548" calcext:value-type="float">
            <text:p>-0.5548</text:p>
          </table:table-cell>
          <table:table-cell office:value-type="float" office:value="9.8594" calcext:value-type="float">
            <text:p>9.8594</text:p>
          </table:table-cell>
          <table:table-cell office:value-type="float" office:value="-0.1406" calcext:value-type="float">
            <text:p>-0.1406</text:p>
          </table:table-cell>
          <table:table-cell office:value-type="float" office:value="-0.2507" calcext:value-type="float">
            <text:p>-0.2507</text:p>
          </table:table-cell>
          <table:table-cell office:value-type="float" office:value="0.1031" calcext:value-type="float">
            <text:p>0.103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6954" calcext:value-type="float">
            <text:p>-0.695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0.2507" calcext:value-type="float">
            <text:p>-0.2507</text:p>
          </table:table-cell>
          <table:table-cell office:value-type="float" office:value="0.1031" calcext:value-type="float">
            <text:p>0.103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6954" calcext:value-type="float">
            <text:p>-0.6954</text:p>
          </table:table-cell>
          <table:table-cell office:value-type="float" office:value="10.581" calcext:value-type="float">
            <text:p>10.581</text:p>
          </table:table-cell>
          <table:table-cell office:value-type="float" office:value="0.581" calcext:value-type="float">
            <text:p>0.581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2535" calcext:value-type="float">
            <text:p>0.2535</text:p>
          </table:table-cell>
          <table:table-cell office:value-type="float" office:value="-0.5549" calcext:value-type="float">
            <text:p>-0.5549</text:p>
          </table:table-cell>
          <table:table-cell office:value-type="float" office:value="-0.1144" calcext:value-type="float">
            <text:p>-0.114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2535" calcext:value-type="float">
            <text:p>0.2535</text:p>
          </table:table-cell>
          <table:table-cell office:value-type="float" office:value="-0.5549" calcext:value-type="float">
            <text:p>-0.5549</text:p>
          </table:table-cell>
          <table:table-cell office:value-type="float" office:value="-0.1144" calcext:value-type="float">
            <text:p>-0.1144</text:p>
          </table:table-cell>
          <table:table-cell office:value-type="float" office:value="10.4977" calcext:value-type="float">
            <text:p>10.4977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1429" calcext:value-type="float">
            <text:p>0.1429</text:p>
          </table:table-cell>
          <table:table-cell office:value-type="float" office:value="-0.4204" calcext:value-type="float">
            <text:p>-0.4204</text:p>
          </table:table-cell>
          <table:table-cell office:value-type="float" office:value="0.3833" calcext:value-type="float">
            <text:p>0.383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1429" calcext:value-type="float">
            <text:p>0.1429</text:p>
          </table:table-cell>
          <table:table-cell office:value-type="float" office:value="-0.4204" calcext:value-type="float">
            <text:p>-0.4204</text:p>
          </table:table-cell>
          <table:table-cell office:value-type="float" office:value="0.3833" calcext:value-type="float">
            <text:p>0.3833</text:p>
          </table:table-cell>
          <table:table-cell office:value-type="float" office:value="10.2345" calcext:value-type="float">
            <text:p>10.234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1889" calcext:value-type="float">
            <text:p>0.1889</text:p>
          </table:table-cell>
          <table:table-cell office:value-type="float" office:value="-0.0862" calcext:value-type="float">
            <text:p>-0.0862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6178" calcext:value-type="float">
            <text:p>0.617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1889" calcext:value-type="float">
            <text:p>0.1889</text:p>
          </table:table-cell>
          <table:table-cell office:value-type="float" office:value="-0.0862" calcext:value-type="float">
            <text:p>-0.0862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6178" calcext:value-type="float">
            <text:p>0.6178</text:p>
          </table:table-cell>
          <table:table-cell office:value-type="float" office:value="9.5119" calcext:value-type="float">
            <text:p>9.5119</text:p>
          </table:table-cell>
          <table:table-cell office:value-type="float" office:value="-0.4881" calcext:value-type="float">
            <text:p>-0.4881</text:p>
          </table:table-cell>
          <table:table-cell office:value-type="float" office:value="0.0376" calcext:value-type="float">
            <text:p>0.0376</text:p>
          </table:table-cell>
          <table:table-cell office:value-type="float" office:value="-0.1982" calcext:value-type="float">
            <text:p>-0.1982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1298" calcext:value-type="float">
            <text:p>0.129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-0.1982" calcext:value-type="float">
            <text:p>-0.1982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1298" calcext:value-type="float">
            <text:p>0.1298</text:p>
          </table:table-cell>
          <table:table-cell office:value-type="float" office:value="9.5173" calcext:value-type="float">
            <text:p>9.5173</text:p>
          </table:table-cell>
          <table:table-cell office:value-type="float" office:value="-0.4827" calcext:value-type="float">
            <text:p>-0.4827</text:p>
          </table:table-cell>
          <table:table-cell office:value-type="float" office:value="-0.1256" calcext:value-type="float">
            <text:p>-0.1256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3423" calcext:value-type="float">
            <text:p>0.3423</text:p>
          </table:table-cell>
          <table:table-cell office:value-type="float" office:value="-0.353" calcext:value-type="float">
            <text:p>-0.35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0.1256" calcext:value-type="float">
            <text:p>-0.1256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3423" calcext:value-type="float">
            <text:p>0.3423</text:p>
          </table:table-cell>
          <table:table-cell office:value-type="float" office:value="-0.353" calcext:value-type="float">
            <text:p>-0.353</text:p>
          </table:table-cell>
          <table:table-cell office:value-type="float" office:value="9.8267" calcext:value-type="float">
            <text:p>9.8267</text:p>
          </table:table-cell>
          <table:table-cell office:value-type="float" office:value="-0.1733" calcext:value-type="float">
            <text:p>-0.1733</text:p>
          </table:table-cell>
          <table:table-cell office:value-type="float" office:value="-0.1416" calcext:value-type="float">
            <text:p>-0.1416</text:p>
          </table:table-cell>
          <table:table-cell office:value-type="float" office:value="0.077" calcext:value-type="float">
            <text:p>0.077</text:p>
          </table:table-cell>
          <table:table-cell office:value-type="float" office:value="-0.0973" calcext:value-type="float">
            <text:p>-0.0973</text:p>
          </table:table-cell>
          <table:table-cell office:value-type="float" office:value="-0.5263" calcext:value-type="float">
            <text:p>-0.526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-0.1416" calcext:value-type="float">
            <text:p>-0.1416</text:p>
          </table:table-cell>
          <table:table-cell office:value-type="float" office:value="0.077" calcext:value-type="float">
            <text:p>0.077</text:p>
          </table:table-cell>
          <table:table-cell office:value-type="float" office:value="-0.0973" calcext:value-type="float">
            <text:p>-0.0973</text:p>
          </table:table-cell>
          <table:table-cell office:value-type="float" office:value="-0.5263" calcext:value-type="float">
            <text:p>-0.5263</text:p>
          </table:table-cell>
          <table:table-cell office:value-type="float" office:value="10.4125" calcext:value-type="float">
            <text:p>10.41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152" calcext:value-type="float">
            <text:p>0.152</text:p>
          </table:table-cell>
          <table:table-cell office:value-type="float" office:value="-0.4174" calcext:value-type="float">
            <text:p>-0.4174</text:p>
          </table:table-cell>
          <table:table-cell office:value-type="float" office:value="-0.1138" calcext:value-type="float">
            <text:p>-0.113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152" calcext:value-type="float">
            <text:p>0.152</text:p>
          </table:table-cell>
          <table:table-cell office:value-type="float" office:value="-0.4174" calcext:value-type="float">
            <text:p>-0.4174</text:p>
          </table:table-cell>
          <table:table-cell office:value-type="float" office:value="-0.1138" calcext:value-type="float">
            <text:p>-0.1138</text:p>
          </table:table-cell>
          <table:table-cell office:value-type="float" office:value="10.3918" calcext:value-type="float">
            <text:p>10.3918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5" calcext:value-type="float">
            <text:p>0.065</text:p>
          </table:table-cell>
          <table:table-cell office:value-type="float" office:value="-0.3352" calcext:value-type="float">
            <text:p>-0.3352</text:p>
          </table:table-cell>
          <table:table-cell office:value-type="float" office:value="0.278" calcext:value-type="float">
            <text:p>0.27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5" calcext:value-type="float">
            <text:p>0.065</text:p>
          </table:table-cell>
          <table:table-cell office:value-type="float" office:value="-0.3352" calcext:value-type="float">
            <text:p>-0.3352</text:p>
          </table:table-cell>
          <table:table-cell office:value-type="float" office:value="0.278" calcext:value-type="float">
            <text:p>0.278</text:p>
          </table:table-cell>
          <table:table-cell office:value-type="float" office:value="10.1338" calcext:value-type="float">
            <text:p>10.1338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4118" calcext:value-type="float">
            <text:p>0.411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4118" calcext:value-type="float">
            <text:p>0.4118</text:p>
          </table:table-cell>
          <table:table-cell office:value-type="float" office:value="9.6916" calcext:value-type="float">
            <text:p>9.6916</text:p>
          </table:table-cell>
          <table:table-cell office:value-type="float" office:value="-0.3084" calcext:value-type="float">
            <text:p>-0.3084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1185" calcext:value-type="float">
            <text:p>-0.1185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1034" calcext:value-type="float">
            <text:p>0.103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1185" calcext:value-type="float">
            <text:p>-0.1185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1034" calcext:value-type="float">
            <text:p>0.1034</text:p>
          </table:table-cell>
          <table:table-cell office:value-type="float" office:value="9.6308" calcext:value-type="float">
            <text:p>9.6308</text:p>
          </table:table-cell>
          <table:table-cell office:value-type="float" office:value="-0.3692" calcext:value-type="float">
            <text:p>-0.3692</text:p>
          </table:table-cell>
          <table:table-cell office:value-type="float" office:value="-0.0913" calcext:value-type="float">
            <text:p>-0.0913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0.1861" calcext:value-type="float">
            <text:p>0.1861</text:p>
          </table:table-cell>
          <table:table-cell office:value-type="float" office:value="-0.2658" calcext:value-type="float">
            <text:p>-0.265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-0.0913" calcext:value-type="float">
            <text:p>-0.0913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0.1861" calcext:value-type="float">
            <text:p>0.1861</text:p>
          </table:table-cell>
          <table:table-cell office:value-type="float" office:value="-0.2658" calcext:value-type="float">
            <text:p>-0.2658</text:p>
          </table:table-cell>
          <table:table-cell office:value-type="float" office:value="9.888" calcext:value-type="float">
            <text:p>9.888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742" calcext:value-type="float">
            <text:p>-0.0742</text:p>
          </table:table-cell>
          <table:table-cell office:value-type="float" office:value="0.0709" calcext:value-type="float">
            <text:p>0.0709</text:p>
          </table:table-cell>
          <table:table-cell office:value-type="float" office:value="-0.1358" calcext:value-type="float">
            <text:p>-0.1358</text:p>
          </table:table-cell>
          <table:table-cell office:value-type="float" office:value="-0.3778" calcext:value-type="float">
            <text:p>-0.377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-0.0742" calcext:value-type="float">
            <text:p>-0.0742</text:p>
          </table:table-cell>
          <table:table-cell office:value-type="float" office:value="0.0709" calcext:value-type="float">
            <text:p>0.0709</text:p>
          </table:table-cell>
          <table:table-cell office:value-type="float" office:value="-0.1358" calcext:value-type="float">
            <text:p>-0.1358</text:p>
          </table:table-cell>
          <table:table-cell office:value-type="float" office:value="-0.3778" calcext:value-type="float">
            <text:p>-0.3778</text:p>
          </table:table-cell>
          <table:table-cell office:value-type="float" office:value="10.3224" calcext:value-type="float">
            <text:p>10.3224</text:p>
          </table:table-cell>
          <table:table-cell office:value-type="float" office:value="0.3224" calcext:value-type="float">
            <text:p>0.3224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3524" calcext:value-type="float">
            <text:p>-0.3524</text:p>
          </table:table-cell>
          <table:table-cell office:value-type="float" office:value="-0.0555" calcext:value-type="float">
            <text:p>-0.055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3524" calcext:value-type="float">
            <text:p>-0.3524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10.3084" calcext:value-type="float">
            <text:p>10.3084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2537" calcext:value-type="float">
            <text:p>-0.2537</text:p>
          </table:table-cell>
          <table:table-cell office:value-type="float" office:value="0.2529" calcext:value-type="float">
            <text:p>0.252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2537" calcext:value-type="float">
            <text:p>-0.2537</text:p>
          </table:table-cell>
          <table:table-cell office:value-type="float" office:value="0.2529" calcext:value-type="float">
            <text:p>0.2529</text:p>
          </table:table-cell>
          <table:table-cell office:value-type="float" office:value="10.015" calcext:value-type="float">
            <text:p>10.0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46" calcext:value-type="float">
            <text:p>0.0346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2679" calcext:value-type="float">
            <text:p>0.267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0346" calcext:value-type="float">
            <text:p>0.0346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2679" calcext:value-type="float">
            <text:p>0.2679</text:p>
          </table:table-cell>
          <table:table-cell office:value-type="float" office:value="9.727" calcext:value-type="float">
            <text:p>9.727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0.1382" calcext:value-type="float">
            <text:p>0.1382</text:p>
          </table:table-cell>
          <table:table-cell office:value-type="float" office:value="-0.0051" calcext:value-type="float">
            <text:p>-0.005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0.1382" calcext:value-type="float">
            <text:p>0.1382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9.7682" calcext:value-type="float">
            <text:p>9.7682</text:p>
          </table:table-cell>
          <table:table-cell office:value-type="float" office:value="-0.2318" calcext:value-type="float">
            <text:p>-0.2318</text:p>
          </table:table-cell>
          <table:table-cell office:value-type="float" office:value="-0.0698" calcext:value-type="float">
            <text:p>-0.069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72" calcext:value-type="float">
            <text:p>0.0172</text:p>
          </table:table-cell>
          <table:table-cell office:value-type="float" office:value="-0.2368" calcext:value-type="float">
            <text:p>-0.236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0.0698" calcext:value-type="float">
            <text:p>-0.069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72" calcext:value-type="float">
            <text:p>0.0172</text:p>
          </table:table-cell>
          <table:table-cell office:value-type="float" office:value="-0.2368" calcext:value-type="float">
            <text:p>-0.2368</text:p>
          </table:table-cell>
          <table:table-cell office:value-type="float" office:value="9.9902" calcext:value-type="float">
            <text:p>9.9902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0.0624" calcext:value-type="float">
            <text:p>0.0624</text:p>
          </table:table-cell>
          <table:table-cell office:value-type="float" office:value="-0.2246" calcext:value-type="float">
            <text:p>-0.2246</text:p>
          </table:table-cell>
          <table:table-cell office:value-type="float" office:value="-0.2467" calcext:value-type="float">
            <text:p>-0.246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0.0624" calcext:value-type="float">
            <text:p>0.0624</text:p>
          </table:table-cell>
          <table:table-cell office:value-type="float" office:value="-0.2246" calcext:value-type="float">
            <text:p>-0.2246</text:p>
          </table:table-cell>
          <table:table-cell office:value-type="float" office:value="-0.2467" calcext:value-type="float">
            <text:p>-0.2467</text:p>
          </table:table-cell>
          <table:table-cell office:value-type="float" office:value="10.2637" calcext:value-type="float">
            <text:p>10.2637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3394" calcext:value-type="float">
            <text:p>-0.3394</text:p>
          </table:table-cell>
          <table:table-cell office:value-type="float" office:value="0.017" calcext:value-type="float">
            <text:p>0.01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3394" calcext:value-type="float">
            <text:p>-0.3394</text:p>
          </table:table-cell>
          <table:table-cell office:value-type="float" office:value="0.017" calcext:value-type="float">
            <text:p>0.017</text:p>
          </table:table-cell>
          <table:table-cell office:value-type="float" office:value="10.2208" calcext:value-type="float">
            <text:p>10.2208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0337" calcext:value-type="float">
            <text:p>0.0337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2378" calcext:value-type="float">
            <text:p>0.237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0337" calcext:value-type="float">
            <text:p>0.0337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2378" calcext:value-type="float">
            <text:p>0.2378</text:p>
          </table:table-cell>
          <table:table-cell office:value-type="float" office:value="9.9231" calcext:value-type="float">
            <text:p>9.9231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0.1609" calcext:value-type="float">
            <text:p>0.160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0.1609" calcext:value-type="float">
            <text:p>0.1609</text:p>
          </table:table-cell>
          <table:table-cell office:value-type="float" office:value="9.7663" calcext:value-type="float">
            <text:p>9.7663</text:p>
          </table:table-cell>
          <table:table-cell office:value-type="float" office:value="-0.2337" calcext:value-type="float">
            <text:p>-0.2337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0314" calcext:value-type="float">
            <text:p>0.0314</text:p>
          </table:table-cell>
          <table:table-cell office:value-type="float" office:value="-0.0728" calcext:value-type="float">
            <text:p>-0.072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0314" calcext:value-type="float">
            <text:p>0.0314</text:p>
          </table:table-cell>
          <table:table-cell office:value-type="float" office:value="-0.0728" calcext:value-type="float">
            <text:p>-0.0728</text:p>
          </table:table-cell>
          <table:table-cell office:value-type="float" office:value="9.8663" calcext:value-type="float">
            <text:p>9.8663</text:p>
          </table:table-cell>
          <table:table-cell office:value-type="float" office:value="-0.1337" calcext:value-type="float">
            <text:p>-0.1337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0.0328" calcext:value-type="float">
            <text:p>0.0328</text:p>
          </table:table-cell>
          <table:table-cell office:value-type="float" office:value="-0.1083" calcext:value-type="float">
            <text:p>-0.1083</text:p>
          </table:table-cell>
          <table:table-cell office:value-type="float" office:value="-0.2065" calcext:value-type="float">
            <text:p>-0.206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0.0328" calcext:value-type="float">
            <text:p>0.0328</text:p>
          </table:table-cell>
          <table:table-cell office:value-type="float" office:value="-0.1083" calcext:value-type="float">
            <text:p>-0.1083</text:p>
          </table:table-cell>
          <table:table-cell office:value-type="float" office:value="-0.2065" calcext:value-type="float">
            <text:p>-0.2065</text:p>
          </table:table-cell>
          <table:table-cell office:value-type="float" office:value="10.0954" calcext:value-type="float">
            <text:p>10.0954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497" calcext:value-type="float">
            <text:p>0.0497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1111" calcext:value-type="float">
            <text:p>-0.111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497" calcext:value-type="float">
            <text:p>0.0497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1111" calcext:value-type="float">
            <text:p>-0.1111</text:p>
          </table:table-cell>
          <table:table-cell office:value-type="float" office:value="10.232" calcext:value-type="float">
            <text:p>10.232</text:p>
          </table:table-cell>
          <table:table-cell office:value-type="float" office:value="0.232" calcext:value-type="float">
            <text:p>0.232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2621" calcext:value-type="float">
            <text:p>-0.2621</text:p>
          </table:table-cell>
          <table:table-cell office:value-type="float" office:value="0.1209" calcext:value-type="float">
            <text:p>0.120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2621" calcext:value-type="float">
            <text:p>-0.2621</text:p>
          </table:table-cell>
          <table:table-cell office:value-type="float" office:value="0.1209" calcext:value-type="float">
            <text:p>0.1209</text:p>
          </table:table-cell>
          <table:table-cell office:value-type="float" office:value="10.0663" calcext:value-type="float">
            <text:p>10.066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872" calcext:value-type="float">
            <text:p>0.187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872" calcext:value-type="float">
            <text:p>0.1872</text:p>
          </table:table-cell>
          <table:table-cell office:value-type="float" office:value="9.8569" calcext:value-type="float">
            <text:p>9.8569</text:p>
          </table:table-cell>
          <table:table-cell office:value-type="float" office:value="-0.1431" calcext:value-type="float">
            <text:p>-0.1431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441" calcext:value-type="float">
            <text:p>0.044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441" calcext:value-type="float">
            <text:p>0.0441</text:p>
          </table:table-cell>
          <table:table-cell office:value-type="float" office:value="9.825" calcext:value-type="float">
            <text:p>9.825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0.0036" calcext:value-type="float">
            <text:p>0.0036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-0.1308" calcext:value-type="float">
            <text:p>-0.130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0.0036" calcext:value-type="float">
            <text:p>0.0036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-0.1308" calcext:value-type="float">
            <text:p>-0.1308</text:p>
          </table:table-cell>
          <table:table-cell office:value-type="float" office:value="9.9723" calcext:value-type="float">
            <text:p>9.9723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1804" calcext:value-type="float">
            <text:p>-0.1804</text:p>
          </table:table-cell>
          <table:table-cell office:value-type="float" office:value="-0.1586" calcext:value-type="float">
            <text:p>-0.158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1804" calcext:value-type="float">
            <text:p>-0.1804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10.1584" calcext:value-type="float">
            <text:p>10.1584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276" calcext:value-type="float">
            <text:p>0.0276</text:p>
          </table:table-cell>
          <table:table-cell office:value-type="float" office:value="-0.2598" calcext:value-type="float">
            <text:p>-0.2598</text:p>
          </table:table-cell>
          <table:table-cell office:value-type="float" office:value="-0.0002" calcext:value-type="float">
            <text:p>-0.000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276" calcext:value-type="float">
            <text:p>0.0276</text:p>
          </table:table-cell>
          <table:table-cell office:value-type="float" office:value="-0.2598" calcext:value-type="float">
            <text:p>-0.2598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10.1489" calcext:value-type="float">
            <text:p>10.1489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0169" calcext:value-type="float">
            <text:p>0.016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1855" calcext:value-type="float">
            <text:p>-0.1855</text:p>
          </table:table-cell>
          <table:table-cell office:value-type="float" office:value="0.1488" calcext:value-type="float">
            <text:p>0.148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.0169" calcext:value-type="float">
            <text:p>0.016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1855" calcext:value-type="float">
            <text:p>-0.1855</text:p>
          </table:table-cell>
          <table:table-cell office:value-type="float" office:value="0.1488" calcext:value-type="float">
            <text:p>0.1488</text:p>
          </table:table-cell>
          <table:table-cell office:value-type="float" office:value="9.9697" calcext:value-type="float">
            <text:p>9.9697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0.1184" calcext:value-type="float">
            <text:p>0.118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0.1184" calcext:value-type="float">
            <text:p>0.1184</text:p>
          </table:table-cell>
          <table:table-cell office:value-type="float" office:value="9.8432" calcext:value-type="float">
            <text:p>9.8432</text:p>
          </table:table-cell>
          <table:table-cell office:value-type="float" office:value="-0.1568" calcext:value-type="float">
            <text:p>-0.1568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0.0384" calcext:value-type="float">
            <text:p>-0.038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9.8973" calcext:value-type="float">
            <text:p>9.8973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218" calcext:value-type="float">
            <text:p>0.0218</text:p>
          </table:table-cell>
          <table:table-cell office:value-type="float" office:value="-0.1016" calcext:value-type="float">
            <text:p>-0.1016</text:p>
          </table:table-cell>
          <table:table-cell office:value-type="float" office:value="-0.1411" calcext:value-type="float">
            <text:p>-0.141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218" calcext:value-type="float">
            <text:p>0.0218</text:p>
          </table:table-cell>
          <table:table-cell office:value-type="float" office:value="-0.1016" calcext:value-type="float">
            <text:p>-0.1016</text:p>
          </table:table-cell>
          <table:table-cell office:value-type="float" office:value="-0.1411" calcext:value-type="float">
            <text:p>-0.1411</text:p>
          </table:table-cell>
          <table:table-cell office:value-type="float" office:value="10.0557" calcext:value-type="float">
            <text:p>10.0557</text:p>
          </table:table-cell>
          <table:table-cell office:value-type="float" office:value="0.0557" calcext:value-type="float">
            <text:p>0.055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324" calcext:value-type="float">
            <text:p>0.0324</text:p>
          </table:table-cell>
          <table:table-cell office:value-type="float" office:value="-0.2149" calcext:value-type="float">
            <text:p>-0.2149</text:p>
          </table:table-cell>
          <table:table-cell office:value-type="float" office:value="-0.0854" calcext:value-type="float">
            <text:p>-0.085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324" calcext:value-type="float">
            <text:p>0.0324</text:p>
          </table:table-cell>
          <table:table-cell office:value-type="float" office:value="-0.2149" calcext:value-type="float">
            <text:p>-0.2149</text:p>
          </table:table-cell>
          <table:table-cell office:value-type="float" office:value="-0.0854" calcext:value-type="float">
            <text:p>-0.0854</text:p>
          </table:table-cell>
          <table:table-cell office:value-type="float" office:value="10.1583" calcext:value-type="float">
            <text:p>10.1583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2211" calcext:value-type="float">
            <text:p>-0.2211</text:p>
          </table:table-cell>
          <table:table-cell office:value-type="float" office:value="0.0729" calcext:value-type="float">
            <text:p>0.072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2211" calcext:value-type="float">
            <text:p>-0.2211</text:p>
          </table:table-cell>
          <table:table-cell office:value-type="float" office:value="0.0729" calcext:value-type="float">
            <text:p>0.0729</text:p>
          </table:table-cell>
          <table:table-cell office:value-type="float" office:value="10.0538" calcext:value-type="float">
            <text:p>10.0538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1213" calcext:value-type="float">
            <text:p>-0.1213</text:p>
          </table:table-cell>
          <table:table-cell office:value-type="float" office:value="0.1267" calcext:value-type="float">
            <text:p>0.126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1213" calcext:value-type="float">
            <text:p>-0.1213</text:p>
          </table:table-cell>
          <table:table-cell office:value-type="float" office:value="0.1267" calcext:value-type="float">
            <text:p>0.1267</text:p>
          </table:table-cell>
          <table:table-cell office:value-type="float" office:value="9.9106" calcext:value-type="float">
            <text:p>9.9106</text:p>
          </table:table-cell>
          <table:table-cell office:value-type="float" office:value="-0.0894" calcext:value-type="float">
            <text:p>-0.0894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374" calcext:value-type="float">
            <text:p>0.037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374" calcext:value-type="float">
            <text:p>0.0374</text:p>
          </table:table-cell>
          <table:table-cell office:value-type="float" office:value="9.8703" calcext:value-type="float">
            <text:p>9.8703</text:p>
          </table:table-cell>
          <table:table-cell office:value-type="float" office:value="-0.1297" calcext:value-type="float">
            <text:p>-0.1297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036" calcext:value-type="float">
            <text:p>0.0036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-0.0924" calcext:value-type="float">
            <text:p>-0.092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036" calcext:value-type="float">
            <text:p>0.0036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-0.0924" calcext:value-type="float">
            <text:p>-0.0924</text:p>
          </table:table-cell>
          <table:table-cell office:value-type="float" office:value="9.9773" calcext:value-type="float">
            <text:p>9.9773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0.0278" calcext:value-type="float">
            <text:p>0.0278</text:p>
          </table:table-cell>
          <table:table-cell office:value-type="float" office:value="-0.1705" calcext:value-type="float">
            <text:p>-0.1705</text:p>
          </table:table-cell>
          <table:table-cell office:value-type="float" office:value="-0.1151" calcext:value-type="float">
            <text:p>-0.115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0.0278" calcext:value-type="float">
            <text:p>0.0278</text:p>
          </table:table-cell>
          <table:table-cell office:value-type="float" office:value="-0.1705" calcext:value-type="float">
            <text:p>-0.1705</text:p>
          </table:table-cell>
          <table:table-cell office:value-type="float" office:value="-0.1151" calcext:value-type="float">
            <text:p>-0.1151</text:p>
          </table:table-cell>
          <table:table-cell office:value-type="float" office:value="10.1167" calcext:value-type="float">
            <text:p>10.1167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86" calcext:value-type="float">
            <text:p>0.0186</text:p>
          </table:table-cell>
          <table:table-cell office:value-type="float" office:value="-0.2272" calcext:value-type="float">
            <text:p>-0.2272</text:p>
          </table:table-cell>
          <table:table-cell office:value-type="float" office:value="0.0016" calcext:value-type="float">
            <text:p>0.001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86" calcext:value-type="float">
            <text:p>0.0186</text:p>
          </table:table-cell>
          <table:table-cell office:value-type="float" office:value="-0.2272" calcext:value-type="float">
            <text:p>-0.2272</text:p>
          </table:table-cell>
          <table:table-cell office:value-type="float" office:value="0.0016" calcext:value-type="float">
            <text:p>0.0016</text:p>
          </table:table-cell>
          <table:table-cell office:value-type="float" office:value="10.106" calcext:value-type="float">
            <text:p>10.10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1727" calcext:value-type="float">
            <text:p>-0.1727</text:p>
          </table:table-cell>
          <table:table-cell office:value-type="float" office:value="0.1076" calcext:value-type="float">
            <text:p>0.107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1727" calcext:value-type="float">
            <text:p>-0.1727</text:p>
          </table:table-cell>
          <table:table-cell office:value-type="float" office:value="0.1076" calcext:value-type="float">
            <text:p>0.1076</text:p>
          </table:table-cell>
          <table:table-cell office:value-type="float" office:value="9.9756" calcext:value-type="float">
            <text:p>9.9756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0773" calcext:value-type="float">
            <text:p>-0.0773</text:p>
          </table:table-cell>
          <table:table-cell office:value-type="float" office:value="0.0832" calcext:value-type="float">
            <text:p>0.083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0773" calcext:value-type="float">
            <text:p>-0.0773</text:p>
          </table:table-cell>
          <table:table-cell office:value-type="float" office:value="0.0832" calcext:value-type="float">
            <text:p>0.0832</text:p>
          </table:table-cell>
          <table:table-cell office:value-type="float" office:value="9.8868" calcext:value-type="float">
            <text:p>9.8868</text:p>
          </table:table-cell>
          <table:table-cell office:value-type="float" office:value="-0.1132" calcext:value-type="float">
            <text:p>-0.1132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-0.03" calcext:value-type="float">
            <text:p>-0.0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-0.03" calcext:value-type="float">
            <text:p>-0.03</text:p>
          </table:table-cell>
          <table:table-cell office:value-type="float" office:value="9.9243" calcext:value-type="float">
            <text:p>9.9243</text:p>
          </table:table-cell>
          <table:table-cell office:value-type="float" office:value="-0.0757" calcext:value-type="float">
            <text:p>-0.0757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0167" calcext:value-type="float">
            <text:p>0.0167</text:p>
          </table:table-cell>
          <table:table-cell office:value-type="float" office:value="-0.1185" calcext:value-type="float">
            <text:p>-0.1185</text:p>
          </table:table-cell>
          <table:table-cell office:value-type="float" office:value="-0.1057" calcext:value-type="float">
            <text:p>-0.105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0167" calcext:value-type="float">
            <text:p>0.0167</text:p>
          </table:table-cell>
          <table:table-cell office:value-type="float" office:value="-0.1185" calcext:value-type="float">
            <text:p>-0.1185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10.0481" calcext:value-type="float">
            <text:p>10.0481</text:p>
          </table:table-cell>
          <table:table-cell office:value-type="float" office:value="0.0481" calcext:value-type="float">
            <text:p>0.0481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.023" calcext:value-type="float">
            <text:p>0.023</text:p>
          </table:table-cell>
          <table:table-cell office:value-type="float" office:value="-0.2002" calcext:value-type="float">
            <text:p>-0.2002</text:p>
          </table:table-cell>
          <table:table-cell office:value-type="float" office:value="-0.0576" calcext:value-type="float">
            <text:p>-0.057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.023" calcext:value-type="float">
            <text:p>0.023</text:p>
          </table:table-cell>
          <table:table-cell office:value-type="float" office:value="-0.2002" calcext:value-type="float">
            <text:p>-0.2002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10.1153" calcext:value-type="float">
            <text:p>10.1153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2001" calcext:value-type="float">
            <text:p>-0.2001</text:p>
          </table:table-cell>
          <table:table-cell office:value-type="float" office:value="0.0577" calcext:value-type="float">
            <text:p>0.057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2001" calcext:value-type="float">
            <text:p>-0.2001</text:p>
          </table:table-cell>
          <table:table-cell office:value-type="float" office:value="0.0577" calcext:value-type="float">
            <text:p>0.0577</text:p>
          </table:table-cell>
          <table:table-cell office:value-type="float" office:value="10.0338" calcext:value-type="float">
            <text:p>10.0338</text:p>
          </table:table-cell>
          <table:table-cell office:value-type="float" office:value="0.0338" calcext:value-type="float">
            <text:p>0.0338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1255" calcext:value-type="float">
            <text:p>-0.1255</text:p>
          </table:table-cell>
          <table:table-cell office:value-type="float" office:value="0.0915" calcext:value-type="float">
            <text:p>0.091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1255" calcext:value-type="float">
            <text:p>-0.1255</text:p>
          </table:table-cell>
          <table:table-cell office:value-type="float" office:value="0.0915" calcext:value-type="float">
            <text:p>0.0915</text:p>
          </table:table-cell>
          <table:table-cell office:value-type="float" office:value="9.9315" calcext:value-type="float">
            <text:p>9.9315</text:p>
          </table:table-cell>
          <table:table-cell office:value-type="float" office:value="-0.0685" calcext:value-type="float">
            <text:p>-0.0685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682" calcext:value-type="float">
            <text:p>-0.0682</text:p>
          </table:table-cell>
          <table:table-cell office:value-type="float" office:value="0.023" calcext:value-type="float">
            <text:p>0.02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682" calcext:value-type="float">
            <text:p>-0.0682</text:p>
          </table:table-cell>
          <table:table-cell office:value-type="float" office:value="0.023" calcext:value-type="float">
            <text:p>0.023</text:p>
          </table:table-cell>
          <table:table-cell office:value-type="float" office:value="9.9074" calcext:value-type="float">
            <text:p>9.9074</text:p>
          </table:table-cell>
          <table:table-cell office:value-type="float" office:value="-0.0926" calcext:value-type="float">
            <text:p>-0.092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915" calcext:value-type="float">
            <text:p>-0.0915</text:p>
          </table:table-cell>
          <table:table-cell office:value-type="float" office:value="-0.0696" calcext:value-type="float">
            <text:p>-0.069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915" calcext:value-type="float">
            <text:p>-0.091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9.9879" calcext:value-type="float">
            <text:p>9.9879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672" calcext:value-type="float">
            <text:p>-0.1672</text:p>
          </table:table-cell>
          <table:table-cell office:value-type="float" office:value="-0.0818" calcext:value-type="float">
            <text:p>-0.081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672" calcext:value-type="float">
            <text:p>-0.1672</text:p>
          </table:table-cell>
          <table:table-cell office:value-type="float" office:value="-0.0818" calcext:value-type="float">
            <text:p>-0.0818</text:p>
          </table:table-cell>
          <table:table-cell office:value-type="float" office:value="10.0877" calcext:value-type="float">
            <text:p>10.0877</text:p>
          </table:table-cell>
          <table:table-cell office:value-type="float" office:value="0.0877" calcext:value-type="float">
            <text:p>0.087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2051" calcext:value-type="float">
            <text:p>-0.2051</text:p>
          </table:table-cell>
          <table:table-cell office:value-type="float" office:value="0.0059" calcext:value-type="float">
            <text:p>0.005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2051" calcext:value-type="float">
            <text:p>-0.2051</text:p>
          </table:table-cell>
          <table:table-cell office:value-type="float" office:value="0.0059" calcext:value-type="float">
            <text:p>0.0059</text:p>
          </table:table-cell>
          <table:table-cell office:value-type="float" office:value="10.0736" calcext:value-type="float">
            <text:p>10.0736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1624" calcext:value-type="float">
            <text:p>-0.1624</text:p>
          </table:table-cell>
          <table:table-cell office:value-type="float" office:value="0.0795" calcext:value-type="float">
            <text:p>0.079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1624" calcext:value-type="float">
            <text:p>-0.1624</text:p>
          </table:table-cell>
          <table:table-cell office:value-type="float" office:value="0.0795" calcext:value-type="float">
            <text:p>0.0795</text:p>
          </table:table-cell>
          <table:table-cell office:value-type="float" office:value="9.9781" calcext:value-type="float">
            <text:p>9.978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-0.0938" calcext:value-type="float">
            <text:p>-0.0938</text:p>
          </table:table-cell>
          <table:table-cell office:value-type="float" office:value="0.0577" calcext:value-type="float">
            <text:p>0.057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-0.0938" calcext:value-type="float">
            <text:p>-0.0938</text:p>
          </table:table-cell>
          <table:table-cell office:value-type="float" office:value="0.0577" calcext:value-type="float">
            <text:p>0.0577</text:p>
          </table:table-cell>
          <table:table-cell office:value-type="float" office:value="9.9164" calcext:value-type="float">
            <text:p>9.9164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-0.0259" calcext:value-type="float">
            <text:p>-0.025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9.9485" calcext:value-type="float">
            <text:p>9.9485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1296" calcext:value-type="float">
            <text:p>-0.1296</text:p>
          </table:table-cell>
          <table:table-cell office:value-type="float" office:value="-0.0774" calcext:value-type="float">
            <text:p>-0.077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1296" calcext:value-type="float">
            <text:p>-0.1296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10.0394" calcext:value-type="float">
            <text:p>10.0394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-0.038" calcext:value-type="float">
            <text:p>-0.03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-0.038" calcext:value-type="float">
            <text:p>-0.038</text:p>
          </table:table-cell>
          <table:table-cell office:value-type="float" office:value="10.0833" calcext:value-type="float">
            <text:p>10.0833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1837" calcext:value-type="float">
            <text:p>-0.1837</text:p>
          </table:table-cell>
          <table:table-cell office:value-type="float" office:value="0.0452" calcext:value-type="float">
            <text:p>0.045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1837" calcext:value-type="float">
            <text:p>-0.1837</text:p>
          </table:table-cell>
          <table:table-cell office:value-type="float" office:value="0.0452" calcext:value-type="float">
            <text:p>0.0452</text:p>
          </table:table-cell>
          <table:table-cell office:value-type="float" office:value="10.0212" calcext:value-type="float">
            <text:p>10.0212</text:p>
          </table:table-cell>
          <table:table-cell office:value-type="float" office:value="0.0212" calcext:value-type="float">
            <text:p>0.0212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0.0665" calcext:value-type="float">
            <text:p>0.066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0.0665" calcext:value-type="float">
            <text:p>0.0665</text:p>
          </table:table-cell>
          <table:table-cell office:value-type="float" office:value="9.947" calcext:value-type="float">
            <text:p>9.947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0.0134" calcext:value-type="float">
            <text:p>0.013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0.0134" calcext:value-type="float">
            <text:p>0.0134</text:p>
          </table:table-cell>
          <table:table-cell office:value-type="float" office:value="9.9333" calcext:value-type="float">
            <text:p>9.9333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1079" calcext:value-type="float">
            <text:p>-0.1079</text:p>
          </table:table-cell>
          <table:table-cell office:value-type="float" office:value="-0.0533" calcext:value-type="float">
            <text:p>-0.053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1079" calcext:value-type="float">
            <text:p>-0.1079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9.995" calcext:value-type="float">
            <text:p>9.99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1637" calcext:value-type="float">
            <text:p>-0.1637</text:p>
          </table:table-cell>
          <table:table-cell office:value-type="float" office:value="-0.0583" calcext:value-type="float">
            <text:p>-0.058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1637" calcext:value-type="float">
            <text:p>-0.1637</text:p>
          </table:table-cell>
          <table:table-cell office:value-type="float" office:value="-0.0583" calcext:value-type="float">
            <text:p>-0.0583</text:p>
          </table:table-cell>
          <table:table-cell office:value-type="float" office:value="10.0659" calcext:value-type="float">
            <text:p>10.0659</text:p>
          </table:table-cell>
          <table:table-cell office:value-type="float" office:value="0.0659" calcext:value-type="float">
            <text:p>0.065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0076" calcext:value-type="float">
            <text:p>0.007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0076" calcext:value-type="float">
            <text:p>0.0076</text:p>
          </table:table-cell>
          <table:table-cell office:value-type="float" office:value="10.0513" calcext:value-type="float">
            <text:p>10.0513</text:p>
          </table:table-cell>
          <table:table-cell office:value-type="float" office:value="0.0513" calcext:value-type="float">
            <text:p>0.0513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1558" calcext:value-type="float">
            <text:p>-0.1558</text:p>
          </table:table-cell>
          <table:table-cell office:value-type="float" office:value="0.0589" calcext:value-type="float">
            <text:p>0.058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1558" calcext:value-type="float">
            <text:p>-0.1558</text:p>
          </table:table-cell>
          <table:table-cell office:value-type="float" office:value="0.0589" calcext:value-type="float">
            <text:p>0.0589</text:p>
          </table:table-cell>
          <table:table-cell office:value-type="float" office:value="9.9813" calcext:value-type="float">
            <text:p>9.9813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1062" calcext:value-type="float">
            <text:p>-0.1062</text:p>
          </table:table-cell>
          <table:table-cell office:value-type="float" office:value="0.0402" calcext:value-type="float">
            <text:p>0.0402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1062" calcext:value-type="float">
            <text:p>-0.1062</text:p>
          </table:table-cell>
          <table:table-cell office:value-type="float" office:value="0.0402" calcext:value-type="float">
            <text:p>0.0402</text:p>
          </table:table-cell>
          <table:table-cell office:value-type="float" office:value="9.938" calcext:value-type="float">
            <text:p>9.938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218" calcext:value-type="float">
            <text:p>-0.021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9.9648" calcext:value-type="float">
            <text:p>9.9648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0101" calcext:value-type="float">
            <text:p>0.0101</text:p>
          </table:table-cell>
          <table:table-cell office:value-type="float" office:value="-0.1365" calcext:value-type="float">
            <text:p>-0.1365</text:p>
          </table:table-cell>
          <table:table-cell office:value-type="float" office:value="-0.0571" calcext:value-type="float">
            <text:p>-0.0571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0101" calcext:value-type="float">
            <text:p>0.0101</text:p>
          </table:table-cell>
          <table:table-cell office:value-type="float" office:value="-0.1365" calcext:value-type="float">
            <text:p>-0.1365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0.0317" calcext:value-type="float">
            <text:p>10.0317</text:p>
          </table:table-cell>
          <table:table-cell office:value-type="float" office:value="0.0317" calcext:value-type="float">
            <text:p>0.0317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0118" calcext:value-type="float">
            <text:p>0.0118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-0.0253" calcext:value-type="float">
            <text:p>-0.0253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0118" calcext:value-type="float">
            <text:p>0.0118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10.0607" calcext:value-type="float">
            <text:p>10.0607</text:p>
          </table:table-cell>
          <table:table-cell office:value-type="float" office:value="0.0607" calcext:value-type="float">
            <text:p>0.060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54" calcext:value-type="float">
            <text:p>0.035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54" calcext:value-type="float">
            <text:p>0.0354</text:p>
          </table:table-cell>
          <table:table-cell office:value-type="float" office:value="10.0134" calcext:value-type="float">
            <text:p>10.0134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-0.1306" calcext:value-type="float">
            <text:p>-0.1306</text:p>
          </table:table-cell>
          <table:table-cell office:value-type="float" office:value="0.0488" calcext:value-type="float">
            <text:p>0.048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-0.1306" calcext:value-type="float">
            <text:p>-0.1306</text:p>
          </table:table-cell>
          <table:table-cell office:value-type="float" office:value="0.0488" calcext:value-type="float">
            <text:p>0.0488</text:p>
          </table:table-cell>
          <table:table-cell office:value-type="float" office:value="9.9588" calcext:value-type="float">
            <text:p>9.9588</text:p>
          </table:table-cell>
          <table:table-cell office:value-type="float" office:value="-0.0412" calcext:value-type="float">
            <text:p>-0.0412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-0.1024" calcext:value-type="float">
            <text:p>-0.1024</text:p>
          </table:table-cell>
          <table:table-cell office:value-type="float" office:value="0.0076" calcext:value-type="float">
            <text:p>0.0076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-0.1024" calcext:value-type="float">
            <text:p>-0.1024</text:p>
          </table:table-cell>
          <table:table-cell office:value-type="float" office:value="0.0076" calcext:value-type="float">
            <text:p>0.0076</text:p>
          </table:table-cell>
          <table:table-cell office:value-type="float" office:value="9.9516" calcext:value-type="float">
            <text:p>9.9516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1191" calcext:value-type="float">
            <text:p>-0.1191</text:p>
          </table:table-cell>
          <table:table-cell office:value-type="float" office:value="-0.0409" calcext:value-type="float">
            <text:p>-0.040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1191" calcext:value-type="float">
            <text:p>-0.1191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9.999" calcext:value-type="float">
            <text:p>9.99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605" calcext:value-type="float">
            <text:p>-0.1605</text:p>
          </table:table-cell>
          <table:table-cell office:value-type="float" office:value="-0.0419" calcext:value-type="float">
            <text:p>-0.0419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605" calcext:value-type="float">
            <text:p>-0.1605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10.0496" calcext:value-type="float">
            <text:p>10.049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1776" calcext:value-type="float">
            <text:p>-0.1776</text:p>
          </table:table-cell>
          <table:table-cell office:value-type="float" office:value="0.0077" calcext:value-type="float">
            <text:p>0.0077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1776" calcext:value-type="float">
            <text:p>-0.1776</text:p>
          </table:table-cell>
          <table:table-cell office:value-type="float" office:value="0.0077" calcext:value-type="float">
            <text:p>0.0077</text:p>
          </table:table-cell>
          <table:table-cell office:value-type="float" office:value="10.0361" calcext:value-type="float">
            <text:p>10.0361</text:p>
          </table:table-cell>
          <table:table-cell office:value-type="float" office:value="0.0361" calcext:value-type="float">
            <text:p>0.0361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1518" calcext:value-type="float">
            <text:p>-0.1518</text:p>
          </table:table-cell>
          <table:table-cell office:value-type="float" office:value="0.0438" calcext:value-type="float">
            <text:p>0.043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1518" calcext:value-type="float">
            <text:p>-0.1518</text:p>
          </table:table-cell>
          <table:table-cell office:value-type="float" office:value="0.0438" calcext:value-type="float">
            <text:p>0.0438</text:p>
          </table:table-cell>
          <table:table-cell office:value-type="float" office:value="9.9845" calcext:value-type="float">
            <text:p>9.9845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1157" calcext:value-type="float">
            <text:p>-0.1157</text:p>
          </table:table-cell>
          <table:table-cell office:value-type="float" office:value="0.0284" calcext:value-type="float">
            <text:p>0.028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1157" calcext:value-type="float">
            <text:p>-0.1157</text:p>
          </table:table-cell>
          <table:table-cell office:value-type="float" office:value="0.0284" calcext:value-type="float">
            <text:p>0.0284</text:p>
          </table:table-cell>
          <table:table-cell office:value-type="float" office:value="9.9537" calcext:value-type="float">
            <text:p>9.9537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-0.1105" calcext:value-type="float">
            <text:p>-0.1105</text:p>
          </table:table-cell>
          <table:table-cell office:value-type="float" office:value="-0.018" calcext:value-type="float">
            <text:p>-0.018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-0.1105" calcext:value-type="float">
            <text:p>-0.1105</text:p>
          </table:table-cell>
          <table:table-cell office:value-type="float" office:value="-0.018" calcext:value-type="float">
            <text:p>-0.018</text:p>
          </table:table-cell>
          <table:table-cell office:value-type="float" office:value="9.9756" calcext:value-type="float">
            <text:p>9.9756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1407" calcext:value-type="float">
            <text:p>-0.1407</text:p>
          </table:table-cell>
          <table:table-cell office:value-type="float" office:value="-0.0424" calcext:value-type="float">
            <text:p>-0.0424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1407" calcext:value-type="float">
            <text:p>-0.1407</text:p>
          </table:table-cell>
          <table:table-cell office:value-type="float" office:value="-0.0424" calcext:value-type="float">
            <text:p>-0.0424</text:p>
          </table:table-cell>
          <table:table-cell office:value-type="float" office:value="10.0252" calcext:value-type="float">
            <text:p>10.0252</text:p>
          </table:table-cell>
          <table:table-cell office:value-type="float" office:value="0.0252" calcext:value-type="float">
            <text:p>0.0252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86" calcext:value-type="float">
            <text:p>0.0086</text:p>
          </table:table-cell>
          <table:table-cell office:value-type="float" office:value="-0.1704" calcext:value-type="float">
            <text:p>-0.1704</text:p>
          </table:table-cell>
          <table:table-cell office:value-type="float" office:value="-0.0171" calcext:value-type="float">
            <text:p>-0.017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048" calcext:value-type="float">
            <text:p>0.6048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3259" calcext:value-type="float">
            <text:p>-0.3259</text:p>
          </table:table-cell>
          <table:table-cell office:value-type="float" office:value="0.5034" calcext:value-type="float">
            <text:p>0.5034</text:p>
          </table:table-cell>
          <table:table-cell office:value-type="float" office:value="10.0495" calcext:value-type="float">
            <text:p>10.0495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2437" calcext:value-type="float">
            <text:p>-0.2437</text:p>
          </table:table-cell>
          <table:table-cell office:value-type="float" office:value="-0.8935" calcext:value-type="float">
            <text:p>-0.893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53" calcext:value-type="float">
            <text:p>0.55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2437" calcext:value-type="float">
            <text:p>-0.2437</text:p>
          </table:table-cell>
          <table:table-cell office:value-type="float" office:value="-0.8935" calcext:value-type="float">
            <text:p>-0.893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53" calcext:value-type="float">
            <text:p>0.553</text:p>
          </table:table-cell>
          <table:table-cell office:value-type="float" office:value="9.0469" calcext:value-type="float">
            <text:p>9.0469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-0.8711" calcext:value-type="float">
            <text:p>-0.8711</text:p>
          </table:table-cell>
          <table:table-cell office:value-type="float" office:value="-0.2625" calcext:value-type="float">
            <text:p>-0.2625</text:p>
          </table:table-cell>
          <table:table-cell office:value-type="float" office:value="0.2787" calcext:value-type="float">
            <text:p>0.2787</text:p>
          </table:table-cell>
          <table:table-cell office:value-type="float" office:value="-0.4001" calcext:value-type="float">
            <text:p>-0.400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8711" calcext:value-type="float">
            <text:p>-0.8711</text:p>
          </table:table-cell>
          <table:table-cell office:value-type="float" office:value="-0.2625" calcext:value-type="float">
            <text:p>-0.2625</text:p>
          </table:table-cell>
          <table:table-cell office:value-type="float" office:value="0.2787" calcext:value-type="float">
            <text:p>0.2787</text:p>
          </table:table-cell>
          <table:table-cell office:value-type="float" office:value="-0.4001" calcext:value-type="float">
            <text:p>-0.4001</text:p>
          </table:table-cell>
          <table:table-cell office:value-type="float" office:value="9.2127" calcext:value-type="float">
            <text:p>9.2127</text:p>
          </table:table-cell>
          <table:table-cell office:value-type="float" office:value="-0.7873" calcext:value-type="float">
            <text:p>-0.7873</text:p>
          </table:table-cell>
          <table:table-cell office:value-type="float" office:value="-0.6834" calcext:value-type="float">
            <text:p>-0.6834</text:p>
          </table:table-cell>
          <table:table-cell office:value-type="float" office:value="0.6093" calcext:value-type="float">
            <text:p>0.6093</text:p>
          </table:table-cell>
          <table:table-cell office:value-type="float" office:value="-0.515" calcext:value-type="float">
            <text:p>-0.515</text:p>
          </table:table-cell>
          <table:table-cell office:value-type="float" office:value="-1.1874" calcext:value-type="float">
            <text:p>-1.187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0.6834" calcext:value-type="float">
            <text:p>-0.6834</text:p>
          </table:table-cell>
          <table:table-cell office:value-type="float" office:value="0.6093" calcext:value-type="float">
            <text:p>0.6093</text:p>
          </table:table-cell>
          <table:table-cell office:value-type="float" office:value="-0.515" calcext:value-type="float">
            <text:p>-0.515</text:p>
          </table:table-cell>
          <table:table-cell office:value-type="float" office:value="-1.1874" calcext:value-type="float">
            <text:p>-1.1874</text:p>
          </table:table-cell>
          <table:table-cell office:value-type="float" office:value="11.2729" calcext:value-type="float">
            <text:p>11.2729</text:p>
          </table:table-cell>
          <table:table-cell office:value-type="float" office:value="1.2729" calcext:value-type="float">
            <text:p>1.2729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8614" calcext:value-type="float">
            <text:p>0.8614</text:p>
          </table:table-cell>
          <table:table-cell office:value-type="float" office:value="-1.066" calcext:value-type="float">
            <text:p>-1.066</text:p>
          </table:table-cell>
          <table:table-cell office:value-type="float" office:value="0.0854" calcext:value-type="float">
            <text:p>0.085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8614" calcext:value-type="float">
            <text:p>0.8614</text:p>
          </table:table-cell>
          <table:table-cell office:value-type="float" office:value="-1.066" calcext:value-type="float">
            <text:p>-1.066</text:p>
          </table:table-cell>
          <table:table-cell office:value-type="float" office:value="0.0854" calcext:value-type="float">
            <text:p>0.0854</text:p>
          </table:table-cell>
          <table:table-cell office:value-type="float" office:value="11.3622" calcext:value-type="float">
            <text:p>11.3622</text:p>
          </table:table-cell>
          <table:table-cell office:value-type="float" office:value="1.3622" calcext:value-type="float">
            <text:p>1.3622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2878" calcext:value-type="float">
            <text:p>0.2878</text:p>
          </table:table-cell>
          <table:table-cell office:value-type="float" office:value="-0.2995" calcext:value-type="float">
            <text:p>-0.2995</text:p>
          </table:table-cell>
          <table:table-cell office:value-type="float" office:value="1.4476" calcext:value-type="float">
            <text:p>1.4476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2878" calcext:value-type="float">
            <text:p>0.2878</text:p>
          </table:table-cell>
          <table:table-cell office:value-type="float" office:value="-0.2995" calcext:value-type="float">
            <text:p>-0.2995</text:p>
          </table:table-cell>
          <table:table-cell office:value-type="float" office:value="1.4476" calcext:value-type="float">
            <text:p>1.4476</text:p>
          </table:table-cell>
          <table:table-cell office:value-type="float" office:value="8.9805" calcext:value-type="float">
            <text:p>8.9805</text:p>
          </table:table-cell>
          <table:table-cell office:value-type="float" office:value="-1.0195" calcext:value-type="float">
            <text:p>-1.0195</text:p>
          </table:table-cell>
          <table:table-cell office:value-type="float" office:value="0.6392" calcext:value-type="float">
            <text:p>0.6392</text:p>
          </table:table-cell>
          <table:table-cell office:value-type="float" office:value="-0.4906" calcext:value-type="float">
            <text:p>-0.4906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4281" calcext:value-type="float">
            <text:p>0.428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392" calcext:value-type="float">
            <text:p>0.6392</text:p>
          </table:table-cell>
          <table:table-cell office:value-type="float" office:value="-0.4906" calcext:value-type="float">
            <text:p>-0.4906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4281" calcext:value-type="float">
            <text:p>0.4281</text:p>
          </table:table-cell>
          <table:table-cell office:value-type="float" office:value="9.6673" calcext:value-type="float">
            <text:p>9.6673</text:p>
          </table:table-cell>
          <table:table-cell office:value-type="float" office:value="-0.3327" calcext:value-type="float">
            <text:p>-0.3327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-0.7489" calcext:value-type="float">
            <text:p>-0.748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0954" calcext:value-type="float">
            <text:p>0.095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-0.7489" calcext:value-type="float">
            <text:p>-0.748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0954" calcext:value-type="float">
            <text:p>0.0954</text:p>
          </table:table-cell>
          <table:table-cell office:value-type="float" office:value="8.8143" calcext:value-type="float">
            <text:p>8.8143</text:p>
          </table:table-cell>
          <table:table-cell office:value-type="float" office:value="-1.1857" calcext:value-type="float">
            <text:p>-1.1857</text:p>
          </table:table-cell>
          <table:table-cell office:value-type="float" office:value="-0.6098" calcext:value-type="float">
            <text:p>-0.6098</text:p>
          </table:table-cell>
          <table:table-cell office:value-type="float" office:value="-0.3038" calcext:value-type="float">
            <text:p>-0.3038</text:p>
          </table:table-cell>
          <table:table-cell office:value-type="float" office:value="0.4026" calcext:value-type="float">
            <text:p>0.4026</text:p>
          </table:table-cell>
          <table:table-cell office:value-type="float" office:value="-1.0903" calcext:value-type="float">
            <text:p>-1.090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0.6098" calcext:value-type="float">
            <text:p>-0.6098</text:p>
          </table:table-cell>
          <table:table-cell office:value-type="float" office:value="-0.3038" calcext:value-type="float">
            <text:p>-0.3038</text:p>
          </table:table-cell>
          <table:table-cell office:value-type="float" office:value="0.4026" calcext:value-type="float">
            <text:p>0.4026</text:p>
          </table:table-cell>
          <table:table-cell office:value-type="float" office:value="-1.0903" calcext:value-type="float">
            <text:p>-1.0903</text:p>
          </table:table-cell>
          <table:table-cell office:value-type="float" office:value="10.2865" calcext:value-type="float">
            <text:p>10.2865</text:p>
          </table:table-cell>
          <table:table-cell office:value-type="float" office:value="0.2865" calcext:value-type="float">
            <text:p>0.2865</text:p>
          </table:table-cell>
          <table:table-cell office:value-type="float" office:value="-0.5757" calcext:value-type="float">
            <text:p>-0.5757</text:p>
          </table:table-cell>
          <table:table-cell office:value-type="float" office:value="0.3792" calcext:value-type="float">
            <text:p>0.3792</text:p>
          </table:table-cell>
          <table:table-cell office:value-type="float" office:value="-0.5445" calcext:value-type="float">
            <text:p>-0.5445</text:p>
          </table:table-cell>
          <table:table-cell office:value-type="float" office:value="-0.8038" calcext:value-type="float">
            <text:p>-0.803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0.5757" calcext:value-type="float">
            <text:p>-0.5757</text:p>
          </table:table-cell>
          <table:table-cell office:value-type="float" office:value="0.3792" calcext:value-type="float">
            <text:p>0.3792</text:p>
          </table:table-cell>
          <table:table-cell office:value-type="float" office:value="-0.5445" calcext:value-type="float">
            <text:p>-0.5445</text:p>
          </table:table-cell>
          <table:table-cell office:value-type="float" office:value="-0.8038" calcext:value-type="float">
            <text:p>-0.8038</text:p>
          </table:table-cell>
          <table:table-cell office:value-type="float" office:value="10.8381" calcext:value-type="float">
            <text:p>10.8381</text:p>
          </table:table-cell>
          <table:table-cell office:value-type="float" office:value="0.8381" calcext:value-type="float">
            <text:p>0.838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0.6437" calcext:value-type="float">
            <text:p>0.6437</text:p>
          </table:table-cell>
          <table:table-cell office:value-type="float" office:value="-0.9293" calcext:value-type="float">
            <text:p>-0.9293</text:p>
          </table:table-cell>
          <table:table-cell office:value-type="float" office:value="0.0343" calcext:value-type="float">
            <text:p>0.034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0.6437" calcext:value-type="float">
            <text:p>0.6437</text:p>
          </table:table-cell>
          <table:table-cell office:value-type="float" office:value="-0.9293" calcext:value-type="float">
            <text:p>-0.9293</text:p>
          </table:table-cell>
          <table:table-cell office:value-type="float" office:value="0.0343" calcext:value-type="float">
            <text:p>0.0343</text:p>
          </table:table-cell>
          <table:table-cell office:value-type="float" office:value="11.0059" calcext:value-type="float">
            <text:p>11.0059</text:p>
          </table:table-cell>
          <table:table-cell office:value-type="float" office:value="1.0059" calcext:value-type="float">
            <text:p>1.0059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2928" calcext:value-type="float">
            <text:p>0.2928</text:p>
          </table:table-cell>
          <table:table-cell office:value-type="float" office:value="-0.3921" calcext:value-type="float">
            <text:p>-0.3921</text:p>
          </table:table-cell>
          <table:table-cell office:value-type="float" office:value="1.0401" calcext:value-type="float">
            <text:p>1.040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2928" calcext:value-type="float">
            <text:p>0.2928</text:p>
          </table:table-cell>
          <table:table-cell office:value-type="float" office:value="-0.3921" calcext:value-type="float">
            <text:p>-0.3921</text:p>
          </table:table-cell>
          <table:table-cell office:value-type="float" office:value="1.0401" calcext:value-type="float">
            <text:p>1.0401</text:p>
          </table:table-cell>
          <table:table-cell office:value-type="float" office:value="9.6482" calcext:value-type="float">
            <text:p>9.6482</text:p>
          </table:table-cell>
          <table:table-cell office:value-type="float" office:value="-0.3518" calcext:value-type="float">
            <text:p>-0.3518</text:p>
          </table:table-cell>
          <table:table-cell office:value-type="float" office:value="0.5014" calcext:value-type="float">
            <text:p>0.5014</text:p>
          </table:table-cell>
          <table:table-cell office:value-type="float" office:value="-0.2838" calcext:value-type="float">
            <text:p>-0.2838</text:p>
          </table:table-cell>
          <table:table-cell office:value-type="float" office:value="0.4722" calcext:value-type="float">
            <text:p>0.4722</text:p>
          </table:table-cell>
          <table:table-cell office:value-type="float" office:value="0.6883" calcext:value-type="float">
            <text:p>0.688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5014" calcext:value-type="float">
            <text:p>0.5014</text:p>
          </table:table-cell>
          <table:table-cell office:value-type="float" office:value="-0.2838" calcext:value-type="float">
            <text:p>-0.2838</text:p>
          </table:table-cell>
          <table:table-cell office:value-type="float" office:value="0.4722" calcext:value-type="float">
            <text:p>0.4722</text:p>
          </table:table-cell>
          <table:table-cell office:value-type="float" office:value="0.6883" calcext:value-type="float">
            <text:p>0.6883</text:p>
          </table:table-cell>
          <table:table-cell office:value-type="float" office:value="9.4065" calcext:value-type="float">
            <text:p>9.4065</text:p>
          </table:table-cell>
          <table:table-cell office:value-type="float" office:value="-0.5935" calcext:value-type="float">
            <text:p>-0.59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-0.5352" calcext:value-type="float">
            <text:p>-0.5352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0949" calcext:value-type="float">
            <text:p>0.094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0582" calcext:value-type="float">
            <text:p>0.0582</text:p>
          </table:table-cell>
          <table:table-cell office:value-type="float" office:value="-0.5352" calcext:value-type="float">
            <text:p>-0.5352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0949" calcext:value-type="float">
            <text:p>0.0949</text:p>
          </table:table-cell>
          <table:table-cell office:value-type="float" office:value="9.0559" calcext:value-type="float">
            <text:p>9.0559</text:p>
          </table:table-cell>
          <table:table-cell office:value-type="float" office:value="-0.9441" calcext:value-type="float">
            <text:p>-0.9441</text:p>
          </table:table-cell>
          <table:table-cell office:value-type="float" office:value="-0.3805" calcext:value-type="float">
            <text:p>-0.3805</text:p>
          </table:table-cell>
          <table:table-cell office:value-type="float" office:value="-0.2693" calcext:value-type="float">
            <text:p>-0.2693</text:p>
          </table:table-cell>
          <table:table-cell office:value-type="float" office:value="0.4866" calcext:value-type="float">
            <text:p>0.4866</text:p>
          </table:table-cell>
          <table:table-cell office:value-type="float" office:value="-0.8493" calcext:value-type="float">
            <text:p>-0.849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0.3805" calcext:value-type="float">
            <text:p>-0.3805</text:p>
          </table:table-cell>
          <table:table-cell office:value-type="float" office:value="-0.2693" calcext:value-type="float">
            <text:p>-0.2693</text:p>
          </table:table-cell>
          <table:table-cell office:value-type="float" office:value="0.4866" calcext:value-type="float">
            <text:p>0.4866</text:p>
          </table:table-cell>
          <table:table-cell office:value-type="float" office:value="-0.8493" calcext:value-type="float">
            <text:p>-0.8493</text:p>
          </table:table-cell>
          <table:table-cell office:value-type="float" office:value="10.0617" calcext:value-type="float">
            <text:p>10.0617</text:p>
          </table:table-cell>
          <table:table-cell office:value-type="float" office:value="0.0617" calcext:value-type="float">
            <text:p>0.0617</text:p>
          </table:table-cell>
          <table:table-cell office:value-type="float" office:value="-0.4173" calcext:value-type="float">
            <text:p>-0.4173</text:p>
          </table:table-cell>
          <table:table-cell office:value-type="float" office:value="0.2121" calcext:value-type="float">
            <text:p>0.2121</text:p>
          </table:table-cell>
          <table:table-cell office:value-type="float" office:value="-0.3318" calcext:value-type="float">
            <text:p>-0.3318</text:p>
          </table:table-cell>
          <table:table-cell office:value-type="float" office:value="-0.7875" calcext:value-type="float">
            <text:p>-0.787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0.4173" calcext:value-type="float">
            <text:p>-0.4173</text:p>
          </table:table-cell>
          <table:table-cell office:value-type="float" office:value="0.2121" calcext:value-type="float">
            <text:p>0.2121</text:p>
          </table:table-cell>
          <table:table-cell office:value-type="float" office:value="-0.3318" calcext:value-type="float">
            <text:p>-0.3318</text:p>
          </table:table-cell>
          <table:table-cell office:value-type="float" office:value="-0.7875" calcext:value-type="float">
            <text:p>-0.7875</text:p>
          </table:table-cell>
          <table:table-cell office:value-type="float" office:value="10.7372" calcext:value-type="float">
            <text:p>10.7372</text:p>
          </table:table-cell>
          <table:table-cell office:value-type="float" office:value="0.7372" calcext:value-type="float">
            <text:p>0.7372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4376" calcext:value-type="float">
            <text:p>0.4376</text:p>
          </table:table-cell>
          <table:table-cell office:value-type="float" office:value="-0.7507" calcext:value-type="float">
            <text:p>-0.7507</text:p>
          </table:table-cell>
          <table:table-cell office:value-type="float" office:value="-0.0503" calcext:value-type="float">
            <text:p>-0.050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4376" calcext:value-type="float">
            <text:p>0.4376</text:p>
          </table:table-cell>
          <table:table-cell office:value-type="float" office:value="-0.7507" calcext:value-type="float">
            <text:p>-0.7507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10.7423" calcext:value-type="float">
            <text:p>10.7423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2332" calcext:value-type="float">
            <text:p>0.2332</text:p>
          </table:table-cell>
          <table:table-cell office:value-type="float" office:value="-0.4299" calcext:value-type="float">
            <text:p>-0.4299</text:p>
          </table:table-cell>
          <table:table-cell office:value-type="float" office:value="0.6919" calcext:value-type="float">
            <text:p>0.691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2332" calcext:value-type="float">
            <text:p>0.2332</text:p>
          </table:table-cell>
          <table:table-cell office:value-type="float" office:value="-0.4299" calcext:value-type="float">
            <text:p>-0.4299</text:p>
          </table:table-cell>
          <table:table-cell office:value-type="float" office:value="0.6919" calcext:value-type="float">
            <text:p>0.6919</text:p>
          </table:table-cell>
          <table:table-cell office:value-type="float" office:value="10.1296" calcext:value-type="float">
            <text:p>10.1296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3442" calcext:value-type="float">
            <text:p>0.3442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8216" calcext:value-type="float">
            <text:p>0.821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3442" calcext:value-type="float">
            <text:p>0.3442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8216" calcext:value-type="float">
            <text:p>0.8216</text:p>
          </table:table-cell>
          <table:table-cell office:value-type="float" office:value="9.2116" calcext:value-type="float">
            <text:p>9.2116</text:p>
          </table:table-cell>
          <table:table-cell office:value-type="float" office:value="-0.7884" calcext:value-type="float">
            <text:p>-0.7884</text:p>
          </table:table-cell>
          <table:table-cell office:value-type="float" office:value="0.0736" calcext:value-type="float">
            <text:p>0.0736</text:p>
          </table:table-cell>
          <table:table-cell office:value-type="float" office:value="-0.3472" calcext:value-type="float">
            <text:p>-0.3472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331" calcext:value-type="float">
            <text:p>0.033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736" calcext:value-type="float">
            <text:p>0.0736</text:p>
          </table:table-cell>
          <table:table-cell office:value-type="float" office:value="-0.3472" calcext:value-type="float">
            <text:p>-0.3472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331" calcext:value-type="float">
            <text:p>0.0331</text:p>
          </table:table-cell>
          <table:table-cell office:value-type="float" office:value="9.3592" calcext:value-type="float">
            <text:p>9.3592</text:p>
          </table:table-cell>
          <table:table-cell office:value-type="float" office:value="-0.6408" calcext:value-type="float">
            <text:p>-0.6408</text:p>
          </table:table-cell>
          <table:table-cell office:value-type="float" office:value="-0.2191" calcext:value-type="float">
            <text:p>-0.2191</text:p>
          </table:table-cell>
          <table:table-cell office:value-type="float" office:value="-0.1888" calcext:value-type="float">
            <text:p>-0.1888</text:p>
          </table:table-cell>
          <table:table-cell office:value-type="float" office:value="0.467" calcext:value-type="float">
            <text:p>0.467</text:p>
          </table:table-cell>
          <table:table-cell office:value-type="float" office:value="-0.6076" calcext:value-type="float">
            <text:p>-0.607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0.2191" calcext:value-type="float">
            <text:p>-0.2191</text:p>
          </table:table-cell>
          <table:table-cell office:value-type="float" office:value="-0.1888" calcext:value-type="float">
            <text:p>-0.1888</text:p>
          </table:table-cell>
          <table:table-cell office:value-type="float" office:value="0.467" calcext:value-type="float">
            <text:p>0.467</text:p>
          </table:table-cell>
          <table:table-cell office:value-type="float" office:value="-0.6076" calcext:value-type="float">
            <text:p>-0.6076</text:p>
          </table:table-cell>
          <table:table-cell office:value-type="float" office:value="9.919" calcext:value-type="float">
            <text:p>9.919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2614" calcext:value-type="float">
            <text:p>-0.2614</text:p>
          </table:table-cell>
          <table:table-cell office:value-type="float" office:value="0.1185" calcext:value-type="float">
            <text:p>0.1185</text:p>
          </table:table-cell>
          <table:table-cell office:value-type="float" office:value="-0.1811" calcext:value-type="float">
            <text:p>-0.1811</text:p>
          </table:table-cell>
          <table:table-cell office:value-type="float" office:value="-0.6886" calcext:value-type="float">
            <text:p>-0.688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0.2614" calcext:value-type="float">
            <text:p>-0.2614</text:p>
          </table:table-cell>
          <table:table-cell office:value-type="float" office:value="0.1185" calcext:value-type="float">
            <text:p>0.1185</text:p>
          </table:table-cell>
          <table:table-cell office:value-type="float" office:value="-0.1811" calcext:value-type="float">
            <text:p>-0.1811</text:p>
          </table:table-cell>
          <table:table-cell office:value-type="float" office:value="-0.6886" calcext:value-type="float">
            <text:p>-0.6886</text:p>
          </table:table-cell>
          <table:table-cell office:value-type="float" office:value="10.5899" calcext:value-type="float">
            <text:p>10.5899</text:p>
          </table:table-cell>
          <table:table-cell office:value-type="float" office:value="0.5899" calcext:value-type="float">
            <text:p>0.5899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0.2684" calcext:value-type="float">
            <text:p>0.2684</text:p>
          </table:table-cell>
          <table:table-cell office:value-type="float" office:value="-0.5748" calcext:value-type="float">
            <text:p>-0.5748</text:p>
          </table:table-cell>
          <table:table-cell office:value-type="float" office:value="-0.0987" calcext:value-type="float">
            <text:p>-0.098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0.2684" calcext:value-type="float">
            <text:p>0.2684</text:p>
          </table:table-cell>
          <table:table-cell office:value-type="float" office:value="-0.5748" calcext:value-type="float">
            <text:p>-0.5748</text:p>
          </table:table-cell>
          <table:table-cell office:value-type="float" office:value="-0.0987" calcext:value-type="float">
            <text:p>-0.0987</text:p>
          </table:table-cell>
          <table:table-cell office:value-type="float" office:value="10.5246" calcext:value-type="float">
            <text:p>10.5246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445" calcext:value-type="float">
            <text:p>0.1445</text:p>
          </table:table-cell>
          <table:table-cell office:value-type="float" office:value="-0.4113" calcext:value-type="float">
            <text:p>-0.4113</text:p>
          </table:table-cell>
          <table:table-cell office:value-type="float" office:value="0.4258" calcext:value-type="float">
            <text:p>0.425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445" calcext:value-type="float">
            <text:p>0.1445</text:p>
          </table:table-cell>
          <table:table-cell office:value-type="float" office:value="-0.4113" calcext:value-type="float">
            <text:p>-0.4113</text:p>
          </table:table-cell>
          <table:table-cell office:value-type="float" office:value="0.4258" calcext:value-type="float">
            <text:p>0.4258</text:p>
          </table:table-cell>
          <table:table-cell office:value-type="float" office:value="10.2117" calcext:value-type="float">
            <text:p>10.2117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199" calcext:value-type="float">
            <text:p>0.199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6375" calcext:value-type="float">
            <text:p>0.637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199" calcext:value-type="float">
            <text:p>0.199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6375" calcext:value-type="float">
            <text:p>0.6375</text:p>
          </table:table-cell>
          <table:table-cell office:value-type="float" office:value="9.4552" calcext:value-type="float">
            <text:p>9.4552</text:p>
          </table:table-cell>
          <table:table-cell office:value-type="float" office:value="-0.5448" calcext:value-type="float">
            <text:p>-0.5448</text:p>
          </table:table-cell>
          <table:table-cell office:value-type="float" office:value="0.0358" calcext:value-type="float">
            <text:p>0.0358</text:p>
          </table:table-cell>
          <table:table-cell office:value-type="float" office:value="-0.2093" calcext:value-type="float">
            <text:p>-0.2093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0927" calcext:value-type="float">
            <text:p>0.092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358" calcext:value-type="float">
            <text:p>0.0358</text:p>
          </table:table-cell>
          <table:table-cell office:value-type="float" office:value="-0.2093" calcext:value-type="float">
            <text:p>-0.2093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0927" calcext:value-type="float">
            <text:p>0.0927</text:p>
          </table:table-cell>
          <table:table-cell office:value-type="float" office:value="9.5218" calcext:value-type="float">
            <text:p>9.5218</text:p>
          </table:table-cell>
          <table:table-cell office:value-type="float" office:value="-0.4782" calcext:value-type="float">
            <text:p>-0.4782</text:p>
          </table:table-cell>
          <table:table-cell office:value-type="float" office:value="-0.1348" calcext:value-type="float">
            <text:p>-0.1348</text:p>
          </table:table-cell>
          <table:table-cell office:value-type="float" office:value="-0.1041" calcext:value-type="float">
            <text:p>-0.1041</text:p>
          </table:table-cell>
          <table:table-cell office:value-type="float" office:value="0.3392" calcext:value-type="float">
            <text:p>0.3392</text:p>
          </table:table-cell>
          <table:table-cell office:value-type="float" office:value="-0.3855" calcext:value-type="float">
            <text:p>-0.385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-0.1348" calcext:value-type="float">
            <text:p>-0.1348</text:p>
          </table:table-cell>
          <table:table-cell office:value-type="float" office:value="-0.1041" calcext:value-type="float">
            <text:p>-0.1041</text:p>
          </table:table-cell>
          <table:table-cell office:value-type="float" office:value="0.3392" calcext:value-type="float">
            <text:p>0.3392</text:p>
          </table:table-cell>
          <table:table-cell office:value-type="float" office:value="-0.3855" calcext:value-type="float">
            <text:p>-0.3855</text:p>
          </table:table-cell>
          <table:table-cell office:value-type="float" office:value="9.852" calcext:value-type="float">
            <text:p>9.852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486" calcext:value-type="float">
            <text:p>-0.1486</text:p>
          </table:table-cell>
          <table:table-cell office:value-type="float" office:value="0.0833" calcext:value-type="float">
            <text:p>0.0833</text:p>
          </table:table-cell>
          <table:table-cell office:value-type="float" office:value="-0.1203" calcext:value-type="float">
            <text:p>-0.1203</text:p>
          </table:table-cell>
          <table:table-cell office:value-type="float" office:value="-0.5335" calcext:value-type="float">
            <text:p>-0.533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-0.1486" calcext:value-type="float">
            <text:p>-0.1486</text:p>
          </table:table-cell>
          <table:table-cell office:value-type="float" office:value="0.0833" calcext:value-type="float">
            <text:p>0.0833</text:p>
          </table:table-cell>
          <table:table-cell office:value-type="float" office:value="-0.1203" calcext:value-type="float">
            <text:p>-0.1203</text:p>
          </table:table-cell>
          <table:table-cell office:value-type="float" office:value="-0.5335" calcext:value-type="float">
            <text:p>-0.5335</text:p>
          </table:table-cell>
          <table:table-cell office:value-type="float" office:value="10.43" calcext:value-type="float">
            <text:p>10.43</text:p>
          </table:table-cell>
          <table:table-cell office:value-type="float" office:value="0.43" calcext:value-type="float">
            <text:p>0.43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0.1595" calcext:value-type="float">
            <text:p>0.1595</text:p>
          </table:table-cell>
          <table:table-cell office:value-type="float" office:value="-0.4388" calcext:value-type="float">
            <text:p>-0.4388</text:p>
          </table:table-cell>
          <table:table-cell office:value-type="float" office:value="-0.1035" calcext:value-type="float">
            <text:p>-0.103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0.1595" calcext:value-type="float">
            <text:p>0.1595</text:p>
          </table:table-cell>
          <table:table-cell office:value-type="float" office:value="-0.4388" calcext:value-type="float">
            <text:p>-0.4388</text:p>
          </table:table-cell>
          <table:table-cell office:value-type="float" office:value="-0.1035" calcext:value-type="float">
            <text:p>-0.1035</text:p>
          </table:table-cell>
          <table:table-cell office:value-type="float" office:value="10.4022" calcext:value-type="float">
            <text:p>10.4022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67" calcext:value-type="float">
            <text:p>0.067</text:p>
          </table:table-cell>
          <table:table-cell office:value-type="float" office:value="-0.3411" calcext:value-type="float">
            <text:p>-0.3411</text:p>
          </table:table-cell>
          <table:table-cell office:value-type="float" office:value="0.2988" calcext:value-type="float">
            <text:p>0.29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67" calcext:value-type="float">
            <text:p>0.067</text:p>
          </table:table-cell>
          <table:table-cell office:value-type="float" office:value="-0.3411" calcext:value-type="float">
            <text:p>-0.3411</text:p>
          </table:table-cell>
          <table:table-cell office:value-type="float" office:value="0.2988" calcext:value-type="float">
            <text:p>0.2988</text:p>
          </table:table-cell>
          <table:table-cell office:value-type="float" office:value="10.1273" calcext:value-type="float">
            <text:p>10.1273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997" calcext:value-type="float">
            <text:p>0.0997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4261" calcext:value-type="float">
            <text:p>0.426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997" calcext:value-type="float">
            <text:p>0.0997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4261" calcext:value-type="float">
            <text:p>0.4261</text:p>
          </table:table-cell>
          <table:table-cell office:value-type="float" office:value="9.6774" calcext:value-type="float">
            <text:p>9.6774</text:p>
          </table:table-cell>
          <table:table-cell office:value-type="float" office:value="-0.3226" calcext:value-type="float">
            <text:p>-0.3226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1237" calcext:value-type="float">
            <text:p>-0.1237</text:p>
          </table:table-cell>
          <table:table-cell office:value-type="float" office:value="0.286" calcext:value-type="float">
            <text:p>0.286</text:p>
          </table:table-cell>
          <table:table-cell office:value-type="float" office:value="0.1035" calcext:value-type="float">
            <text:p>0.103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1237" calcext:value-type="float">
            <text:p>-0.1237</text:p>
          </table:table-cell>
          <table:table-cell office:value-type="float" office:value="0.286" calcext:value-type="float">
            <text:p>0.286</text:p>
          </table:table-cell>
          <table:table-cell office:value-type="float" office:value="0.1035" calcext:value-type="float">
            <text:p>0.1035</text:p>
          </table:table-cell>
          <table:table-cell office:value-type="float" office:value="9.6165" calcext:value-type="float">
            <text:p>9.6165</text:p>
          </table:table-cell>
          <table:table-cell office:value-type="float" office:value="-0.3835" calcext:value-type="float">
            <text:p>-0.383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0.1978" calcext:value-type="float">
            <text:p>0.1978</text:p>
          </table:table-cell>
          <table:table-cell office:value-type="float" office:value="-0.28" calcext:value-type="float">
            <text:p>-0.2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0.1978" calcext:value-type="float">
            <text:p>0.1978</text:p>
          </table:table-cell>
          <table:table-cell office:value-type="float" office:value="-0.28" calcext:value-type="float">
            <text:p>-0.28</text:p>
          </table:table-cell>
          <table:table-cell office:value-type="float" office:value="9.8958" calcext:value-type="float">
            <text:p>9.8958</text:p>
          </table:table-cell>
          <table:table-cell office:value-type="float" office:value="-0.1042" calcext:value-type="float">
            <text:p>-0.1042</text:p>
          </table:table-cell>
          <table:table-cell office:value-type="float" office:value="-0.0766" calcext:value-type="float">
            <text:p>-0.0766</text:p>
          </table:table-cell>
          <table:table-cell office:value-type="float" office:value="0.0745" calcext:value-type="float">
            <text:p>0.0745</text:p>
          </table:table-cell>
          <table:table-cell office:value-type="float" office:value="-0.1343" calcext:value-type="float">
            <text:p>-0.1343</text:p>
          </table:table-cell>
          <table:table-cell office:value-type="float" office:value="-0.3842" calcext:value-type="float">
            <text:p>-0.384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0.0766" calcext:value-type="float">
            <text:p>-0.0766</text:p>
          </table:table-cell>
          <table:table-cell office:value-type="float" office:value="0.0745" calcext:value-type="float">
            <text:p>0.0745</text:p>
          </table:table-cell>
          <table:table-cell office:value-type="float" office:value="-0.1343" calcext:value-type="float">
            <text:p>-0.1343</text:p>
          </table:table-cell>
          <table:table-cell office:value-type="float" office:value="-0.3842" calcext:value-type="float">
            <text:p>-0.3842</text:p>
          </table:table-cell>
          <table:table-cell office:value-type="float" office:value="10.3282" calcext:value-type="float">
            <text:p>10.3282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931" calcext:value-type="float">
            <text:p>0.0931</text:p>
          </table:table-cell>
          <table:table-cell office:value-type="float" office:value="-0.3544" calcext:value-type="float">
            <text:p>-0.3544</text:p>
          </table:table-cell>
          <table:table-cell office:value-type="float" office:value="-0.056" calcext:value-type="float">
            <text:p>-0.05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931" calcext:value-type="float">
            <text:p>0.0931</text:p>
          </table:table-cell>
          <table:table-cell office:value-type="float" office:value="-0.3544" calcext:value-type="float">
            <text:p>-0.3544</text:p>
          </table:table-cell>
          <table:table-cell office:value-type="float" office:value="-0.056" calcext:value-type="float">
            <text:p>-0.056</text:p>
          </table:table-cell>
          <table:table-cell office:value-type="float" office:value="10.3169" calcext:value-type="float">
            <text:p>10.3169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2519" calcext:value-type="float">
            <text:p>-0.2519</text:p>
          </table:table-cell>
          <table:table-cell office:value-type="float" office:value="0.2609" calcext:value-type="float">
            <text:p>0.260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2519" calcext:value-type="float">
            <text:p>-0.2519</text:p>
          </table:table-cell>
          <table:table-cell office:value-type="float" office:value="0.2609" calcext:value-type="float">
            <text:p>0.2609</text:p>
          </table:table-cell>
          <table:table-cell office:value-type="float" office:value="10.0144" calcext:value-type="float">
            <text:p>10.014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376" calcext:value-type="float">
            <text:p>0.0376</text:p>
          </table:table-cell>
          <table:table-cell office:value-type="float" office:value="-0.0722" calcext:value-type="float">
            <text:p>-0.072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2753" calcext:value-type="float">
            <text:p>0.275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0376" calcext:value-type="float">
            <text:p>0.0376</text:p>
          </table:table-cell>
          <table:table-cell office:value-type="float" office:value="-0.0722" calcext:value-type="float">
            <text:p>-0.072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2753" calcext:value-type="float">
            <text:p>0.2753</text:p>
          </table:table-cell>
          <table:table-cell office:value-type="float" office:value="9.7168" calcext:value-type="float">
            <text:p>9.7168</text:p>
          </table:table-cell>
          <table:table-cell office:value-type="float" office:value="-0.2832" calcext:value-type="float">
            <text:p>-0.2832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1499" calcext:value-type="float">
            <text:p>0.1499</text:p>
          </table:table-cell>
          <table:table-cell office:value-type="float" office:value="-0.0079" calcext:value-type="float">
            <text:p>-0.007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1499" calcext:value-type="float">
            <text:p>0.1499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9.7613" calcext:value-type="float">
            <text:p>9.7613</text:p>
          </table:table-cell>
          <table:table-cell office:value-type="float" office:value="-0.2387" calcext:value-type="float">
            <text:p>-0.238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226" calcext:value-type="float">
            <text:p>0.0226</text:p>
          </table:table-cell>
          <table:table-cell office:value-type="float" office:value="-0.2466" calcext:value-type="float">
            <text:p>-0.246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226" calcext:value-type="float">
            <text:p>0.0226</text:p>
          </table:table-cell>
          <table:table-cell office:value-type="float" office:value="-0.2466" calcext:value-type="float">
            <text:p>-0.2466</text:p>
          </table:table-cell>
          <table:table-cell office:value-type="float" office:value="9.9973" calcext:value-type="float">
            <text:p>9.9973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0.0649" calcext:value-type="float">
            <text:p>0.0649</text:p>
          </table:table-cell>
          <table:table-cell office:value-type="float" office:value="-0.2253" calcext:value-type="float">
            <text:p>-0.2253</text:p>
          </table:table-cell>
          <table:table-cell office:value-type="float" office:value="-0.2493" calcext:value-type="float">
            <text:p>-0.249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0.0649" calcext:value-type="float">
            <text:p>0.0649</text:p>
          </table:table-cell>
          <table:table-cell office:value-type="float" office:value="-0.2253" calcext:value-type="float">
            <text:p>-0.2253</text:p>
          </table:table-cell>
          <table:table-cell office:value-type="float" office:value="-0.2493" calcext:value-type="float">
            <text:p>-0.2493</text:p>
          </table:table-cell>
          <table:table-cell office:value-type="float" office:value="10.266" calcext:value-type="float">
            <text:p>10.26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458" calcext:value-type="float">
            <text:p>0.0458</text:p>
          </table:table-cell>
          <table:table-cell office:value-type="float" office:value="-0.3416" calcext:value-type="float">
            <text:p>-0.3416</text:p>
          </table:table-cell>
          <table:table-cell office:value-type="float" office:value="0.0167" calcext:value-type="float">
            <text:p>0.016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458" calcext:value-type="float">
            <text:p>0.0458</text:p>
          </table:table-cell>
          <table:table-cell office:value-type="float" office:value="-0.3416" calcext:value-type="float">
            <text:p>-0.3416</text:p>
          </table:table-cell>
          <table:table-cell office:value-type="float" office:value="0.0167" calcext:value-type="float">
            <text:p>0.0167</text:p>
          </table:table-cell>
          <table:table-cell office:value-type="float" office:value="10.2264" calcext:value-type="float">
            <text:p>10.2264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0365" calcext:value-type="float">
            <text:p>0.0365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2116" calcext:value-type="float">
            <text:p>-0.2116</text:p>
          </table:table-cell>
          <table:table-cell office:value-type="float" office:value="0.2432" calcext:value-type="float">
            <text:p>0.243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.0365" calcext:value-type="float">
            <text:p>0.0365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2116" calcext:value-type="float">
            <text:p>-0.2116</text:p>
          </table:table-cell>
          <table:table-cell office:value-type="float" office:value="0.2432" calcext:value-type="float">
            <text:p>0.2432</text:p>
          </table:table-cell>
          <table:table-cell office:value-type="float" office:value="9.9227" calcext:value-type="float">
            <text:p>9.9227</text:p>
          </table:table-cell>
          <table:table-cell office:value-type="float" office:value="-0.0773" calcext:value-type="float">
            <text:p>-0.0773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601" calcext:value-type="float">
            <text:p>-0.0601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1659" calcext:value-type="float">
            <text:p>0.165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601" calcext:value-type="float">
            <text:p>-0.0601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1659" calcext:value-type="float">
            <text:p>0.1659</text:p>
          </table:table-cell>
          <table:table-cell office:value-type="float" office:value="9.7603" calcext:value-type="float">
            <text:p>9.7603</text:p>
          </table:table-cell>
          <table:table-cell office:value-type="float" office:value="-0.2397" calcext:value-type="float">
            <text:p>-0.2397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0739" calcext:value-type="float">
            <text:p>-0.073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0739" calcext:value-type="float">
            <text:p>-0.0739</text:p>
          </table:table-cell>
          <table:table-cell office:value-type="float" office:value="9.861" calcext:value-type="float">
            <text:p>9.861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0.0327" calcext:value-type="float">
            <text:p>0.0327</text:p>
          </table:table-cell>
          <table:table-cell office:value-type="float" office:value="-0.1045" calcext:value-type="float">
            <text:p>-0.1045</text:p>
          </table:table-cell>
          <table:table-cell office:value-type="float" office:value="-0.2128" calcext:value-type="float">
            <text:p>-0.212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0.0327" calcext:value-type="float">
            <text:p>0.0327</text:p>
          </table:table-cell>
          <table:table-cell office:value-type="float" office:value="-0.1045" calcext:value-type="float">
            <text:p>-0.1045</text:p>
          </table:table-cell>
          <table:table-cell office:value-type="float" office:value="-0.2128" calcext:value-type="float">
            <text:p>-0.2128</text:p>
          </table:table-cell>
          <table:table-cell office:value-type="float" office:value="10.0951" calcext:value-type="float">
            <text:p>10.0951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0514" calcext:value-type="float">
            <text:p>0.0514</text:p>
          </table:table-cell>
          <table:table-cell office:value-type="float" office:value="-0.2698" calcext:value-type="float">
            <text:p>-0.2698</text:p>
          </table:table-cell>
          <table:table-cell office:value-type="float" office:value="-0.1177" calcext:value-type="float">
            <text:p>-0.117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0514" calcext:value-type="float">
            <text:p>0.0514</text:p>
          </table:table-cell>
          <table:table-cell office:value-type="float" office:value="-0.2698" calcext:value-type="float">
            <text:p>-0.2698</text:p>
          </table:table-cell>
          <table:table-cell office:value-type="float" office:value="-0.1177" calcext:value-type="float">
            <text:p>-0.1177</text:p>
          </table:table-cell>
          <table:table-cell office:value-type="float" office:value="10.2389" calcext:value-type="float">
            <text:p>10.2389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2681" calcext:value-type="float">
            <text:p>-0.2681</text:p>
          </table:table-cell>
          <table:table-cell office:value-type="float" office:value="0.1211" calcext:value-type="float">
            <text:p>0.121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2681" calcext:value-type="float">
            <text:p>-0.2681</text:p>
          </table:table-cell>
          <table:table-cell office:value-type="float" office:value="0.1211" calcext:value-type="float">
            <text:p>0.1211</text:p>
          </table:table-cell>
          <table:table-cell office:value-type="float" office:value="10.0715" calcext:value-type="float">
            <text:p>10.0715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-0.1112" calcext:value-type="float">
            <text:p>-0.1112</text:p>
          </table:table-cell>
          <table:table-cell office:value-type="float" office:value="0.1927" calcext:value-type="float">
            <text:p>0.192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-0.1112" calcext:value-type="float">
            <text:p>-0.1112</text:p>
          </table:table-cell>
          <table:table-cell office:value-type="float" office:value="0.1927" calcext:value-type="float">
            <text:p>0.1927</text:p>
          </table:table-cell>
          <table:table-cell office:value-type="float" office:value="9.8561" calcext:value-type="float">
            <text:p>9.8561</text:p>
          </table:table-cell>
          <table:table-cell office:value-type="float" office:value="-0.1439" calcext:value-type="float">
            <text:p>-0.1439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-0.0407" calcext:value-type="float">
            <text:p>-0.040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487" calcext:value-type="float">
            <text:p>0.048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-0.0407" calcext:value-type="float">
            <text:p>-0.040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487" calcext:value-type="float">
            <text:p>0.0487</text:p>
          </table:table-cell>
          <table:table-cell office:value-type="float" office:value="9.8203" calcext:value-type="float">
            <text:p>9.8203</text:p>
          </table:table-cell>
          <table:table-cell office:value-type="float" office:value="-0.1797" calcext:value-type="float">
            <text:p>-0.1797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131" calcext:value-type="float">
            <text:p>-0.13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131" calcext:value-type="float">
            <text:p>-0.131</text:p>
          </table:table-cell>
          <table:table-cell office:value-type="float" office:value="9.9678" calcext:value-type="float">
            <text:p>9.9678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0.0395" calcext:value-type="float">
            <text:p>0.0395</text:p>
          </table:table-cell>
          <table:table-cell office:value-type="float" office:value="-0.1787" calcext:value-type="float">
            <text:p>-0.1787</text:p>
          </table:table-cell>
          <table:table-cell office:value-type="float" office:value="-0.1632" calcext:value-type="float">
            <text:p>-0.163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0.0395" calcext:value-type="float">
            <text:p>0.0395</text:p>
          </table:table-cell>
          <table:table-cell office:value-type="float" office:value="-0.1787" calcext:value-type="float">
            <text:p>-0.1787</text:p>
          </table:table-cell>
          <table:table-cell office:value-type="float" office:value="-0.1632" calcext:value-type="float">
            <text:p>-0.1632</text:p>
          </table:table-cell>
          <table:table-cell office:value-type="float" office:value="10.1589" calcext:value-type="float">
            <text:p>10.1589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91" calcext:value-type="float">
            <text:p>0.0291</text:p>
          </table:table-cell>
          <table:table-cell office:value-type="float" office:value="-0.2625" calcext:value-type="float">
            <text:p>-0.2625</text:p>
          </table:table-cell>
          <table:table-cell office:value-type="float" office:value="-0.0043" calcext:value-type="float">
            <text:p>-0.004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91" calcext:value-type="float">
            <text:p>0.0291</text:p>
          </table:table-cell>
          <table:table-cell office:value-type="float" office:value="-0.2625" calcext:value-type="float">
            <text:p>-0.262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10.155" calcext:value-type="float">
            <text:p>10.155</text:p>
          </table:table-cell>
          <table:table-cell office:value-type="float" office:value="0.155" calcext:value-type="float">
            <text:p>0.155</text:p>
          </table:table-cell>
          <table:table-cell office:value-type="float" office:value="0.0179" calcext:value-type="float">
            <text:p>0.0179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1893" calcext:value-type="float">
            <text:p>-0.1893</text:p>
          </table:table-cell>
          <table:table-cell office:value-type="float" office:value="0.1506" calcext:value-type="float">
            <text:p>0.150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0179" calcext:value-type="float">
            <text:p>0.0179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1893" calcext:value-type="float">
            <text:p>-0.1893</text:p>
          </table:table-cell>
          <table:table-cell office:value-type="float" office:value="0.1506" calcext:value-type="float">
            <text:p>0.1506</text:p>
          </table:table-cell>
          <table:table-cell office:value-type="float" office:value="9.9728" calcext:value-type="float">
            <text:p>9.9728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0.1235" calcext:value-type="float">
            <text:p>0.123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0.1235" calcext:value-type="float">
            <text:p>0.1235</text:p>
          </table:table-cell>
          <table:table-cell office:value-type="float" office:value="9.8404" calcext:value-type="float">
            <text:p>9.8404</text:p>
          </table:table-cell>
          <table:table-cell office:value-type="float" office:value="-0.1596" calcext:value-type="float">
            <text:p>-0.1596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-0.0362" calcext:value-type="float">
            <text:p>-0.036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9.8929" calcext:value-type="float">
            <text:p>9.8929</text:p>
          </table:table-cell>
          <table:table-cell office:value-type="float" office:value="-0.1071" calcext:value-type="float">
            <text:p>-0.1071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983" calcext:value-type="float">
            <text:p>-0.0983</text:p>
          </table:table-cell>
          <table:table-cell office:value-type="float" office:value="-0.1432" calcext:value-type="float">
            <text:p>-0.143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983" calcext:value-type="float">
            <text:p>-0.0983</text:p>
          </table:table-cell>
          <table:table-cell office:value-type="float" office:value="-0.1432" calcext:value-type="float">
            <text:p>-0.1432</text:p>
          </table:table-cell>
          <table:table-cell office:value-type="float" office:value="10.0528" calcext:value-type="float">
            <text:p>10.0528</text:p>
          </table:table-cell>
          <table:table-cell office:value-type="float" office:value="0.0528" calcext:value-type="float">
            <text:p>0.0528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33" calcext:value-type="float">
            <text:p>0.0333</text:p>
          </table:table-cell>
          <table:table-cell office:value-type="float" office:value="-0.2152" calcext:value-type="float">
            <text:p>-0.2152</text:p>
          </table:table-cell>
          <table:table-cell office:value-type="float" office:value="-0.0904" calcext:value-type="float">
            <text:p>-0.090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33" calcext:value-type="float">
            <text:p>0.0333</text:p>
          </table:table-cell>
          <table:table-cell office:value-type="float" office:value="-0.2152" calcext:value-type="float">
            <text:p>-0.2152</text:p>
          </table:table-cell>
          <table:table-cell office:value-type="float" office:value="-0.0904" calcext:value-type="float">
            <text:p>-0.0904</text:p>
          </table:table-cell>
          <table:table-cell office:value-type="float" office:value="10.1618" calcext:value-type="float">
            <text:p>10.161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2247" calcext:value-type="float">
            <text:p>-0.2247</text:p>
          </table:table-cell>
          <table:table-cell office:value-type="float" office:value="0.0714" calcext:value-type="float">
            <text:p>0.071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2247" calcext:value-type="float">
            <text:p>-0.2247</text:p>
          </table:table-cell>
          <table:table-cell office:value-type="float" office:value="0.0714" calcext:value-type="float">
            <text:p>0.0714</text:p>
          </table:table-cell>
          <table:table-cell office:value-type="float" office:value="10.0591" calcext:value-type="float">
            <text:p>10.0591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1238" calcext:value-type="float">
            <text:p>-0.1238</text:p>
          </table:table-cell>
          <table:table-cell office:value-type="float" office:value="0.1305" calcext:value-type="float">
            <text:p>0.130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1238" calcext:value-type="float">
            <text:p>-0.1238</text:p>
          </table:table-cell>
          <table:table-cell office:value-type="float" office:value="0.1305" calcext:value-type="float">
            <text:p>0.1305</text:p>
          </table:table-cell>
          <table:table-cell office:value-type="float" office:value="9.9109" calcext:value-type="float">
            <text:p>9.9109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0.0413" calcext:value-type="float">
            <text:p>0.041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9.8668" calcext:value-type="float">
            <text:p>9.8668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631" calcext:value-type="float">
            <text:p>-0.0631</text:p>
          </table:table-cell>
          <table:table-cell office:value-type="float" office:value="-0.0919" calcext:value-type="float">
            <text:p>-0.091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631" calcext:value-type="float">
            <text:p>-0.0631</text:p>
          </table:table-cell>
          <table:table-cell office:value-type="float" office:value="-0.0919" calcext:value-type="float">
            <text:p>-0.0919</text:p>
          </table:table-cell>
          <table:table-cell office:value-type="float" office:value="9.9738" calcext:value-type="float">
            <text:p>9.9738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281" calcext:value-type="float">
            <text:p>0.0281</text:p>
          </table:table-cell>
          <table:table-cell office:value-type="float" office:value="-0.1681" calcext:value-type="float">
            <text:p>-0.1681</text:p>
          </table:table-cell>
          <table:table-cell office:value-type="float" office:value="-0.118" calcext:value-type="float">
            <text:p>-0.11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281" calcext:value-type="float">
            <text:p>0.0281</text:p>
          </table:table-cell>
          <table:table-cell office:value-type="float" office:value="-0.1681" calcext:value-type="float">
            <text:p>-0.1681</text:p>
          </table:table-cell>
          <table:table-cell office:value-type="float" office:value="-0.118" calcext:value-type="float">
            <text:p>-0.118</text:p>
          </table:table-cell>
          <table:table-cell office:value-type="float" office:value="10.1161" calcext:value-type="float">
            <text:p>10.116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0019" calcext:value-type="float">
            <text:p>-0.001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10.11" calcext:value-type="float">
            <text:p>10.11</text:p>
          </table:table-cell>
          <table:table-cell office:value-type="float" office:value="0.11" calcext:value-type="float">
            <text:p>0.11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749" calcext:value-type="float">
            <text:p>-0.1749</text:p>
          </table:table-cell>
          <table:table-cell office:value-type="float" office:value="0.1081" calcext:value-type="float">
            <text:p>0.108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749" calcext:value-type="float">
            <text:p>-0.1749</text:p>
          </table:table-cell>
          <table:table-cell office:value-type="float" office:value="0.1081" calcext:value-type="float">
            <text:p>0.1081</text:p>
          </table:table-cell>
          <table:table-cell office:value-type="float" office:value="9.9784" calcext:value-type="float">
            <text:p>9.9784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-0.0777" calcext:value-type="float">
            <text:p>-0.0777</text:p>
          </table:table-cell>
          <table:table-cell office:value-type="float" office:value="0.0864" calcext:value-type="float">
            <text:p>0.086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-0.0777" calcext:value-type="float">
            <text:p>-0.0777</text:p>
          </table:table-cell>
          <table:table-cell office:value-type="float" office:value="0.0864" calcext:value-type="float">
            <text:p>0.0864</text:p>
          </table:table-cell>
          <table:table-cell office:value-type="float" office:value="9.8857" calcext:value-type="float">
            <text:p>9.8857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0.0278" calcext:value-type="float">
            <text:p>-0.027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9.9206" calcext:value-type="float">
            <text:p>9.9206</text:p>
          </table:table-cell>
          <table:table-cell office:value-type="float" office:value="-0.0794" calcext:value-type="float">
            <text:p>-0.0794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1158" calcext:value-type="float">
            <text:p>-0.1158</text:p>
          </table:table-cell>
          <table:table-cell office:value-type="float" office:value="-0.1072" calcext:value-type="float">
            <text:p>-0.107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1158" calcext:value-type="float">
            <text:p>-0.1158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10.0458" calcext:value-type="float">
            <text:p>10.0458</text:p>
          </table:table-cell>
          <table:table-cell office:value-type="float" office:value="0.0458" calcext:value-type="float">
            <text:p>0.0458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236" calcext:value-type="float">
            <text:p>0.0236</text:p>
          </table:table-cell>
          <table:table-cell office:value-type="float" office:value="-0.2001" calcext:value-type="float">
            <text:p>-0.2001</text:p>
          </table:table-cell>
          <table:table-cell office:value-type="float" office:value="-0.0613" calcext:value-type="float">
            <text:p>-0.061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236" calcext:value-type="float">
            <text:p>0.0236</text:p>
          </table:table-cell>
          <table:table-cell office:value-type="float" office:value="-0.2001" calcext:value-type="float">
            <text:p>-0.2001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10.1178" calcext:value-type="float">
            <text:p>10.1178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2025" calcext:value-type="float">
            <text:p>-0.2025</text:p>
          </table:table-cell>
          <table:table-cell office:value-type="float" office:value="0.0565" calcext:value-type="float">
            <text:p>0.056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2025" calcext:value-type="float">
            <text:p>-0.2025</text:p>
          </table:table-cell>
          <table:table-cell office:value-type="float" office:value="0.0565" calcext:value-type="float">
            <text:p>0.0565</text:p>
          </table:table-cell>
          <table:table-cell office:value-type="float" office:value="10.0372" calcext:value-type="float">
            <text:p>10.0372</text:p>
          </table:table-cell>
          <table:table-cell office:value-type="float" office:value="0.0372" calcext:value-type="float">
            <text:p>0.037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1274" calcext:value-type="float">
            <text:p>-0.1274</text:p>
          </table:table-cell>
          <table:table-cell office:value-type="float" office:value="0.0936" calcext:value-type="float">
            <text:p>0.093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1274" calcext:value-type="float">
            <text:p>-0.1274</text:p>
          </table:table-cell>
          <table:table-cell office:value-type="float" office:value="0.0936" calcext:value-type="float">
            <text:p>0.0936</text:p>
          </table:table-cell>
          <table:table-cell office:value-type="float" office:value="9.9324" calcext:value-type="float">
            <text:p>9.9324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0.026" calcext:value-type="float">
            <text:p>0.02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0.026" calcext:value-type="float">
            <text:p>0.026</text:p>
          </table:table-cell>
          <table:table-cell office:value-type="float" office:value="9.9049" calcext:value-type="float">
            <text:p>9.9049</text:p>
          </table:table-cell>
          <table:table-cell office:value-type="float" office:value="-0.0951" calcext:value-type="float">
            <text:p>-0.0951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-0.0691" calcext:value-type="float">
            <text:p>-0.069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9.9849" calcext:value-type="float">
            <text:p>9.9849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207" calcext:value-type="float">
            <text:p>0.0207</text:p>
          </table:table-cell>
          <table:table-cell office:value-type="float" office:value="-0.1658" calcext:value-type="float">
            <text:p>-0.1658</text:p>
          </table:table-cell>
          <table:table-cell office:value-type="float" office:value="-0.0841" calcext:value-type="float">
            <text:p>-0.084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207" calcext:value-type="float">
            <text:p>0.0207</text:p>
          </table:table-cell>
          <table:table-cell office:value-type="float" office:value="-0.1658" calcext:value-type="float">
            <text:p>-0.1658</text:p>
          </table:table-cell>
          <table:table-cell office:value-type="float" office:value="-0.0841" calcext:value-type="float">
            <text:p>-0.0841</text:p>
          </table:table-cell>
          <table:table-cell office:value-type="float" office:value="10.0877" calcext:value-type="float">
            <text:p>10.0877</text:p>
          </table:table-cell>
          <table:table-cell office:value-type="float" office:value="0.0877" calcext:value-type="float">
            <text:p>0.087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2061" calcext:value-type="float">
            <text:p>-0.2061</text:p>
          </table:table-cell>
          <table:table-cell office:value-type="float" office:value="0.0035" calcext:value-type="float">
            <text:p>0.003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2061" calcext:value-type="float">
            <text:p>-0.2061</text:p>
          </table:table-cell>
          <table:table-cell office:value-type="float" office:value="0.0035" calcext:value-type="float">
            <text:p>0.0035</text:p>
          </table:table-cell>
          <table:table-cell office:value-type="float" office:value="10.0767" calcext:value-type="float">
            <text:p>10.0767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-0.1643" calcext:value-type="float">
            <text:p>-0.1643</text:p>
          </table:table-cell>
          <table:table-cell office:value-type="float" office:value="0.0802" calcext:value-type="float">
            <text:p>0.080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-0.1643" calcext:value-type="float">
            <text:p>-0.1643</text:p>
          </table:table-cell>
          <table:table-cell office:value-type="float" office:value="0.0802" calcext:value-type="float">
            <text:p>0.0802</text:p>
          </table:table-cell>
          <table:table-cell office:value-type="float" office:value="9.98" calcext:value-type="float">
            <text:p>9.9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941" calcext:value-type="float">
            <text:p>-0.0941</text:p>
          </table:table-cell>
          <table:table-cell office:value-type="float" office:value="0.0602" calcext:value-type="float">
            <text:p>0.060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941" calcext:value-type="float">
            <text:p>-0.0941</text:p>
          </table:table-cell>
          <table:table-cell office:value-type="float" office:value="0.0602" calcext:value-type="float">
            <text:p>0.0602</text:p>
          </table:table-cell>
          <table:table-cell office:value-type="float" office:value="9.9155" calcext:value-type="float">
            <text:p>9.9155</text:p>
          </table:table-cell>
          <table:table-cell office:value-type="float" office:value="-0.0845" calcext:value-type="float">
            <text:p>-0.0845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761" calcext:value-type="float">
            <text:p>-0.0761</text:p>
          </table:table-cell>
          <table:table-cell office:value-type="float" office:value="-0.0243" calcext:value-type="float">
            <text:p>-0.024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761" calcext:value-type="float">
            <text:p>-0.0761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9.9458" calcext:value-type="float">
            <text:p>9.9458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1275" calcext:value-type="float">
            <text:p>-0.1275</text:p>
          </table:table-cell>
          <table:table-cell office:value-type="float" office:value="-0.0785" calcext:value-type="float">
            <text:p>-0.078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1275" calcext:value-type="float">
            <text:p>-0.1275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10.0377" calcext:value-type="float">
            <text:p>10.0377</text:p>
          </table:table-cell>
          <table:table-cell office:value-type="float" office:value="0.0377" calcext:value-type="float">
            <text:p>0.0377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69" calcext:value-type="float">
            <text:p>0.0169</text:p>
          </table:table-cell>
          <table:table-cell office:value-type="float" office:value="-0.1871" calcext:value-type="float">
            <text:p>-0.1871</text:p>
          </table:table-cell>
          <table:table-cell office:value-type="float" office:value="-0.0408" calcext:value-type="float">
            <text:p>-0.040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69" calcext:value-type="float">
            <text:p>0.0169</text:p>
          </table:table-cell>
          <table:table-cell office:value-type="float" office:value="-0.1871" calcext:value-type="float">
            <text:p>-0.1871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10.0851" calcext:value-type="float">
            <text:p>10.0851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1854" calcext:value-type="float">
            <text:p>-0.1854</text:p>
          </table:table-cell>
          <table:table-cell office:value-type="float" office:value="0.0443" calcext:value-type="float">
            <text:p>0.044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1854" calcext:value-type="float">
            <text:p>-0.1854</text:p>
          </table:table-cell>
          <table:table-cell office:value-type="float" office:value="0.0443" calcext:value-type="float">
            <text:p>0.0443</text:p>
          </table:table-cell>
          <table:table-cell office:value-type="float" office:value="10.0236" calcext:value-type="float">
            <text:p>10.0236</text:p>
          </table:table-cell>
          <table:table-cell office:value-type="float" office:value="0.0236" calcext:value-type="float">
            <text:p>0.023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1292" calcext:value-type="float">
            <text:p>-0.1292</text:p>
          </table:table-cell>
          <table:table-cell office:value-type="float" office:value="0.068" calcext:value-type="float">
            <text:p>0.06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1292" calcext:value-type="float">
            <text:p>-0.1292</text:p>
          </table:table-cell>
          <table:table-cell office:value-type="float" office:value="0.068" calcext:value-type="float">
            <text:p>0.068</text:p>
          </table:table-cell>
          <table:table-cell office:value-type="float" office:value="9.9476" calcext:value-type="float">
            <text:p>9.9476</text:p>
          </table:table-cell>
          <table:table-cell office:value-type="float" office:value="-0.0524" calcext:value-type="float">
            <text:p>-0.0524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0.0156" calcext:value-type="float">
            <text:p>0.0156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0.0156" calcext:value-type="float">
            <text:p>0.0156</text:p>
          </table:table-cell>
          <table:table-cell office:value-type="float" office:value="9.9315" calcext:value-type="float">
            <text:p>9.9315</text:p>
          </table:table-cell>
          <table:table-cell office:value-type="float" office:value="-0.0685" calcext:value-type="float">
            <text:p>-0.0685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1062" calcext:value-type="float">
            <text:p>-0.1062</text:p>
          </table:table-cell>
          <table:table-cell office:value-type="float" office:value="-0.053" calcext:value-type="float">
            <text:p>-0.05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1062" calcext:value-type="float">
            <text:p>-0.1062</text:p>
          </table:table-cell>
          <table:table-cell office:value-type="float" office:value="-0.053" calcext:value-type="float">
            <text:p>-0.053</text:p>
          </table:table-cell>
          <table:table-cell office:value-type="float" office:value="9.9929" calcext:value-type="float">
            <text:p>9.9929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0.0154" calcext:value-type="float">
            <text:p>0.0154</text:p>
          </table:table-cell>
          <table:table-cell office:value-type="float" office:value="-0.1627" calcext:value-type="float">
            <text:p>-0.1627</text:p>
          </table:table-cell>
          <table:table-cell office:value-type="float" office:value="-0.0601" calcext:value-type="float">
            <text:p>-0.060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0.0154" calcext:value-type="float">
            <text:p>0.0154</text:p>
          </table:table-cell>
          <table:table-cell office:value-type="float" office:value="-0.1627" calcext:value-type="float">
            <text:p>-0.1627</text:p>
          </table:table-cell>
          <table:table-cell office:value-type="float" office:value="-0.0601" calcext:value-type="float">
            <text:p>-0.0601</text:p>
          </table:table-cell>
          <table:table-cell office:value-type="float" office:value="10.0659" calcext:value-type="float">
            <text:p>10.0659</text:p>
          </table:table-cell>
          <table:table-cell office:value-type="float" office:value="0.0659" calcext:value-type="float">
            <text:p>0.0659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1898" calcext:value-type="float">
            <text:p>-0.1898</text:p>
          </table:table-cell>
          <table:table-cell office:value-type="float" office:value="0.0059" calcext:value-type="float">
            <text:p>0.005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1898" calcext:value-type="float">
            <text:p>-0.1898</text:p>
          </table:table-cell>
          <table:table-cell office:value-type="float" office:value="0.0059" calcext:value-type="float">
            <text:p>0.0059</text:p>
          </table:table-cell>
          <table:table-cell office:value-type="float" office:value="10.0536" calcext:value-type="float">
            <text:p>10.0536</text:p>
          </table:table-cell>
          <table:table-cell office:value-type="float" office:value="0.0536" calcext:value-type="float">
            <text:p>0.0536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1571" calcext:value-type="float">
            <text:p>-0.1571</text:p>
          </table:table-cell>
          <table:table-cell office:value-type="float" office:value="0.0595" calcext:value-type="float">
            <text:p>0.059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1571" calcext:value-type="float">
            <text:p>-0.1571</text:p>
          </table:table-cell>
          <table:table-cell office:value-type="float" office:value="0.0595" calcext:value-type="float">
            <text:p>0.0595</text:p>
          </table:table-cell>
          <table:table-cell office:value-type="float" office:value="9.9826" calcext:value-type="float">
            <text:p>9.9826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1064" calcext:value-type="float">
            <text:p>-0.1064</text:p>
          </table:table-cell>
          <table:table-cell office:value-type="float" office:value="0.0421" calcext:value-type="float">
            <text:p>0.042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1064" calcext:value-type="float">
            <text:p>-0.1064</text:p>
          </table:table-cell>
          <table:table-cell office:value-type="float" office:value="0.0421" calcext:value-type="float">
            <text:p>0.0421</text:p>
          </table:table-cell>
          <table:table-cell office:value-type="float" office:value="9.9372" calcext:value-type="float">
            <text:p>9.9372</text:p>
          </table:table-cell>
          <table:table-cell office:value-type="float" office:value="-0.0628" calcext:value-type="float">
            <text:p>-0.0628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207" calcext:value-type="float">
            <text:p>-0.020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9.9628" calcext:value-type="float">
            <text:p>9.9628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01" calcext:value-type="float">
            <text:p>0.01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579" calcext:value-type="float">
            <text:p>-0.057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01" calcext:value-type="float">
            <text:p>0.01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10.0306" calcext:value-type="float">
            <text:p>10.0306</text:p>
          </table:table-cell>
          <table:table-cell office:value-type="float" office:value="0.0306" calcext:value-type="float">
            <text:p>0.0306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22" calcext:value-type="float">
            <text:p>0.0122</text:p>
          </table:table-cell>
          <table:table-cell office:value-type="float" office:value="-0.1776" calcext:value-type="float">
            <text:p>-0.1776</text:p>
          </table:table-cell>
          <table:table-cell office:value-type="float" office:value="-0.0273" calcext:value-type="float">
            <text:p>-0.027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22" calcext:value-type="float">
            <text:p>0.0122</text:p>
          </table:table-cell>
          <table:table-cell office:value-type="float" office:value="-0.1776" calcext:value-type="float">
            <text:p>-0.1776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10.0621" calcext:value-type="float">
            <text:p>10.0621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0.0347" calcext:value-type="float">
            <text:p>0.034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0.0347" calcext:value-type="float">
            <text:p>0.0347</text:p>
          </table:table-cell>
          <table:table-cell office:value-type="float" office:value="10.0152" calcext:value-type="float">
            <text:p>10.0152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-0.1316" calcext:value-type="float">
            <text:p>-0.1316</text:p>
          </table:table-cell>
          <table:table-cell office:value-type="float" office:value="0.0499" calcext:value-type="float">
            <text:p>0.0499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-0.1316" calcext:value-type="float">
            <text:p>-0.1316</text:p>
          </table:table-cell>
          <table:table-cell office:value-type="float" office:value="0.0499" calcext:value-type="float">
            <text:p>0.0499</text:p>
          </table:table-cell>
          <table:table-cell office:value-type="float" office:value="9.9592" calcext:value-type="float">
            <text:p>9.9592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0091" calcext:value-type="float">
            <text:p>0.009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0091" calcext:value-type="float">
            <text:p>0.0091</text:p>
          </table:table-cell>
          <table:table-cell office:value-type="float" office:value="9.9502" calcext:value-type="float">
            <text:p>9.9502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0031" calcext:value-type="float">
            <text:p>0.0031</text:p>
          </table:table-cell>
          <table:table-cell office:value-type="float" office:value="-0.1179" calcext:value-type="float">
            <text:p>-0.1179</text:p>
          </table:table-cell>
          <table:table-cell office:value-type="float" office:value="-0.0407" calcext:value-type="float">
            <text:p>-0.0407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0031" calcext:value-type="float">
            <text:p>0.0031</text:p>
          </table:table-cell>
          <table:table-cell office:value-type="float" office:value="-0.1179" calcext:value-type="float">
            <text:p>-0.1179</text:p>
          </table:table-cell>
          <table:table-cell office:value-type="float" office:value="-0.0407" calcext:value-type="float">
            <text:p>-0.0407</text:p>
          </table:table-cell>
          <table:table-cell office:value-type="float" office:value="9.9975" calcext:value-type="float">
            <text:p>9.997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98" calcext:value-type="float">
            <text:p>-0.1598</text:p>
          </table:table-cell>
          <table:table-cell office:value-type="float" office:value="-0.0432" calcext:value-type="float">
            <text:p>-0.0432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598" calcext:value-type="float">
            <text:p>-0.1598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10.0497" calcext:value-type="float">
            <text:p>10.049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1782" calcext:value-type="float">
            <text:p>-0.1782</text:p>
          </table:table-cell>
          <table:table-cell office:value-type="float" office:value="0.0065" calcext:value-type="float">
            <text:p>0.0065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1782" calcext:value-type="float">
            <text:p>-0.1782</text:p>
          </table:table-cell>
          <table:table-cell office:value-type="float" office:value="0.0065" calcext:value-type="float">
            <text:p>0.0065</text:p>
          </table:table-cell>
          <table:table-cell office:value-type="float" office:value="10.0378" calcext:value-type="float">
            <text:p>10.0378</text:p>
          </table:table-cell>
          <table:table-cell office:value-type="float" office:value="0.0378" calcext:value-type="float">
            <text:p>0.0378</text:p>
          </table:table-cell>
          <table:table-cell table:number-columns-repeated="2" office:value-type="float" office:value="-0.0062" calcext:value-type="float">
            <text:p>-0.0062</text:p>
          </table:table-cell>
          <table:table-cell office:value-type="float" office:value="-0.1528" calcext:value-type="float">
            <text:p>-0.1528</text:p>
          </table:table-cell>
          <table:table-cell office:value-type="float" office:value="0.0443" calcext:value-type="float">
            <text:p>0.044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-0.0062" calcext:value-type="float">
            <text:p>-0.0062</text:p>
          </table:table-cell>
          <table:table-cell office:value-type="float" office:value="-0.1528" calcext:value-type="float">
            <text:p>-0.1528</text:p>
          </table:table-cell>
          <table:table-cell office:value-type="float" office:value="0.0443" calcext:value-type="float">
            <text:p>0.0443</text:p>
          </table:table-cell>
          <table:table-cell office:value-type="float" office:value="9.9855" calcext:value-type="float">
            <text:p>9.9855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158" calcext:value-type="float">
            <text:p>-0.1158</text:p>
          </table:table-cell>
          <table:table-cell office:value-type="float" office:value="0.0298" calcext:value-type="float">
            <text:p>0.029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158" calcext:value-type="float">
            <text:p>-0.1158</text:p>
          </table:table-cell>
          <table:table-cell office:value-type="float" office:value="0.0298" calcext:value-type="float">
            <text:p>0.0298</text:p>
          </table:table-cell>
          <table:table-cell office:value-type="float" office:value="9.9531" calcext:value-type="float">
            <text:p>9.9531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1095" calcext:value-type="float">
            <text:p>-0.1095</text:p>
          </table:table-cell>
          <table:table-cell office:value-type="float" office:value="-0.0171" calcext:value-type="float">
            <text:p>-0.0171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1095" calcext:value-type="float">
            <text:p>-0.1095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9.9741" calcext:value-type="float">
            <text:p>9.9741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1395" calcext:value-type="float">
            <text:p>-0.1395</text:p>
          </table:table-cell>
          <table:table-cell office:value-type="float" office:value="-0.043" calcext:value-type="float">
            <text:p>-0.043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1395" calcext:value-type="float">
            <text:p>-0.1395</text:p>
          </table:table-cell>
          <table:table-cell office:value-type="float" office:value="-0.043" calcext:value-type="float">
            <text:p>-0.043</text:p>
          </table:table-cell>
          <table:table-cell office:value-type="float" office:value="10.0244" calcext:value-type="float">
            <text:p>10.0244</text:p>
          </table:table-cell>
          <table:table-cell office:value-type="float" office:value="0.0244" calcext:value-type="float">
            <text:p>0.0244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1704" calcext:value-type="float">
            <text:p>-0.1704</text:p>
          </table:table-cell>
          <table:table-cell office:value-type="float" office:value="-0.0186" calcext:value-type="float">
            <text:p>-0.018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04" calcext:value-type="float">
            <text:p>0.6704</text:p>
          </table:table-cell>
          <table:table-cell office:value-type="float" office:value="-0.6488" calcext:value-type="float">
            <text:p>-0.6488</text:p>
          </table:table-cell>
          <table:table-cell office:value-type="float" office:value="-0.3789" calcext:value-type="float">
            <text:p>-0.3789</text:p>
          </table:table-cell>
          <table:table-cell office:value-type="float" office:value="0.5652" calcext:value-type="float">
            <text:p>0.5652</text:p>
          </table:table-cell>
          <table:table-cell office:value-type="float" office:value="10.0305" calcext:value-type="float">
            <text:p>10.0305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1961" calcext:value-type="float">
            <text:p>-0.1961</text:p>
          </table:table-cell>
          <table:table-cell office:value-type="float" office:value="-0.9439" calcext:value-type="float">
            <text:p>-0.9439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5957" calcext:value-type="float">
            <text:p>0.595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1961" calcext:value-type="float">
            <text:p>-0.1961</text:p>
          </table:table-cell>
          <table:table-cell office:value-type="float" office:value="-0.9439" calcext:value-type="float">
            <text:p>-0.9439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5957" calcext:value-type="float">
            <text:p>0.5957</text:p>
          </table:table-cell>
          <table:table-cell office:value-type="float" office:value="9.0092" calcext:value-type="float">
            <text:p>9.0092</text:p>
          </table:table-cell>
          <table:table-cell office:value-type="float" office:value="-0.9908" calcext:value-type="float">
            <text:p>-0.9908</text:p>
          </table:table-cell>
          <table:table-cell office:value-type="float" office:value="-0.8876" calcext:value-type="float">
            <text:p>-0.8876</text:p>
          </table:table-cell>
          <table:table-cell office:value-type="float" office:value="-0.3298" calcext:value-type="float">
            <text:p>-0.3298</text:p>
          </table:table-cell>
          <table:table-cell office:value-type="float" office:value="0.3018" calcext:value-type="float">
            <text:p>0.3018</text:p>
          </table:table-cell>
          <table:table-cell office:value-type="float" office:value="-0.3951" calcext:value-type="float">
            <text:p>-0.395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8876" calcext:value-type="float">
            <text:p>-0.8876</text:p>
          </table:table-cell>
          <table:table-cell office:value-type="float" office:value="-0.3298" calcext:value-type="float">
            <text:p>-0.3298</text:p>
          </table:table-cell>
          <table:table-cell office:value-type="float" office:value="0.3018" calcext:value-type="float">
            <text:p>0.3018</text:p>
          </table:table-cell>
          <table:table-cell office:value-type="float" office:value="-0.3951" calcext:value-type="float">
            <text:p>-0.3951</text:p>
          </table:table-cell>
          <table:table-cell office:value-type="float" office:value="9.2122" calcext:value-type="float">
            <text:p>9.2122</text:p>
          </table:table-cell>
          <table:table-cell office:value-type="float" office:value="-0.7878" calcext:value-type="float">
            <text:p>-0.7878</text:p>
          </table:table-cell>
          <table:table-cell office:value-type="float" office:value="-0.7479" calcext:value-type="float">
            <text:p>-0.7479</text:p>
          </table:table-cell>
          <table:table-cell office:value-type="float" office:value="0.5888" calcext:value-type="float">
            <text:p>0.5888</text:p>
          </table:table-cell>
          <table:table-cell office:value-type="float" office:value="-0.4873" calcext:value-type="float">
            <text:p>-0.4873</text:p>
          </table:table-cell>
          <table:table-cell office:value-type="float" office:value="-1.1829" calcext:value-type="float">
            <text:p>-1.182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7479" calcext:value-type="float">
            <text:p>-0.7479</text:p>
          </table:table-cell>
          <table:table-cell office:value-type="float" office:value="0.5888" calcext:value-type="float">
            <text:p>0.5888</text:p>
          </table:table-cell>
          <table:table-cell office:value-type="float" office:value="-0.4873" calcext:value-type="float">
            <text:p>-0.4873</text:p>
          </table:table-cell>
          <table:table-cell office:value-type="float" office:value="-1.1829" calcext:value-type="float">
            <text:p>-1.1829</text:p>
          </table:table-cell>
          <table:table-cell office:value-type="float" office:value="11.206" calcext:value-type="float">
            <text:p>11.206</text:p>
          </table:table-cell>
          <table:table-cell office:value-type="float" office:value="1.206" calcext:value-type="float">
            <text:p>1.206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9066" calcext:value-type="float">
            <text:p>0.9066</text:p>
          </table:table-cell>
          <table:table-cell office:value-type="float" office:value="-1.0672" calcext:value-type="float">
            <text:p>-1.0672</text:p>
          </table:table-cell>
          <table:table-cell office:value-type="float" office:value="0.023" calcext:value-type="float">
            <text:p>0.02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9066" calcext:value-type="float">
            <text:p>0.9066</text:p>
          </table:table-cell>
          <table:table-cell office:value-type="float" office:value="-1.0672" calcext:value-type="float">
            <text:p>-1.0672</text:p>
          </table:table-cell>
          <table:table-cell office:value-type="float" office:value="0.023" calcext:value-type="float">
            <text:p>0.023</text:p>
          </table:table-cell>
          <table:table-cell office:value-type="float" office:value="11.3708" calcext:value-type="float">
            <text:p>11.3708</text:p>
          </table:table-cell>
          <table:table-cell office:value-type="float" office:value="1.3708" calcext:value-type="float">
            <text:p>1.3708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3548" calcext:value-type="float">
            <text:p>0.3548</text:p>
          </table:table-cell>
          <table:table-cell office:value-type="float" office:value="-0.3588" calcext:value-type="float">
            <text:p>-0.3588</text:p>
          </table:table-cell>
          <table:table-cell office:value-type="float" office:value="1.3938" calcext:value-type="float">
            <text:p>1.393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3548" calcext:value-type="float">
            <text:p>0.3548</text:p>
          </table:table-cell>
          <table:table-cell office:value-type="float" office:value="-0.3588" calcext:value-type="float">
            <text:p>-0.3588</text:p>
          </table:table-cell>
          <table:table-cell office:value-type="float" office:value="1.3938" calcext:value-type="float">
            <text:p>1.3938</text:p>
          </table:table-cell>
          <table:table-cell office:value-type="float" office:value="9.103" calcext:value-type="float">
            <text:p>9.103</text:p>
          </table:table-cell>
          <table:table-cell office:value-type="float" office:value="-0.897" calcext:value-type="float">
            <text:p>-0.897</text:p>
          </table:table-cell>
          <table:table-cell office:value-type="float" office:value="0.698" calcext:value-type="float">
            <text:p>0.698</text:p>
          </table:table-cell>
          <table:table-cell office:value-type="float" office:value="-0.4675" calcext:value-type="float">
            <text:p>-0.4675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4969" calcext:value-type="float">
            <text:p>0.4969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698" calcext:value-type="float">
            <text:p>0.698</text:p>
          </table:table-cell>
          <table:table-cell office:value-type="float" office:value="-0.4675" calcext:value-type="float">
            <text:p>-0.4675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4969" calcext:value-type="float">
            <text:p>0.4969</text:p>
          </table:table-cell>
          <table:table-cell office:value-type="float" office:value="9.6886" calcext:value-type="float">
            <text:p>9.6886</text:p>
          </table:table-cell>
          <table:table-cell office:value-type="float" office:value="-0.3114" calcext:value-type="float">
            <text:p>-0.3114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7898" calcext:value-type="float">
            <text:p>-0.7898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1855" calcext:value-type="float">
            <text:p>0.185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7898" calcext:value-type="float">
            <text:p>-0.7898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1855" calcext:value-type="float">
            <text:p>0.1855</text:p>
          </table:table-cell>
          <table:table-cell office:value-type="float" office:value="8.7275" calcext:value-type="float">
            <text:p>8.7275</text:p>
          </table:table-cell>
          <table:table-cell office:value-type="float" office:value="-1.2725" calcext:value-type="float">
            <text:p>-1.2725</text:p>
          </table:table-cell>
          <table:table-cell office:value-type="float" office:value="-0.6156" calcext:value-type="float">
            <text:p>-0.6156</text:p>
          </table:table-cell>
          <table:table-cell office:value-type="float" office:value="-0.3652" calcext:value-type="float">
            <text:p>-0.3652</text:p>
          </table:table-cell>
          <table:table-cell office:value-type="float" office:value="0.4769" calcext:value-type="float">
            <text:p>0.4769</text:p>
          </table:table-cell>
          <table:table-cell office:value-type="float" office:value="-1.087" calcext:value-type="float">
            <text:p>-1.08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0.6156" calcext:value-type="float">
            <text:p>-0.6156</text:p>
          </table:table-cell>
          <table:table-cell office:value-type="float" office:value="-0.3652" calcext:value-type="float">
            <text:p>-0.3652</text:p>
          </table:table-cell>
          <table:table-cell office:value-type="float" office:value="0.4769" calcext:value-type="float">
            <text:p>0.4769</text:p>
          </table:table-cell>
          <table:table-cell office:value-type="float" office:value="-1.087" calcext:value-type="float">
            <text:p>-1.087</text:p>
          </table:table-cell>
          <table:table-cell office:value-type="float" office:value="10.2076" calcext:value-type="float">
            <text:p>10.2076</text:p>
          </table:table-cell>
          <table:table-cell office:value-type="float" office:value="0.2076" calcext:value-type="float">
            <text:p>0.2076</text:p>
          </table:table-cell>
          <table:table-cell office:value-type="float" office:value="-0.6272" calcext:value-type="float">
            <text:p>-0.6272</text:p>
          </table:table-cell>
          <table:table-cell office:value-type="float" office:value="0.3569" calcext:value-type="float">
            <text:p>0.3569</text:p>
          </table:table-cell>
          <table:table-cell office:value-type="float" office:value="-0.5063" calcext:value-type="float">
            <text:p>-0.5063</text:p>
          </table:table-cell>
          <table:table-cell office:value-type="float" office:value="-0.8795" calcext:value-type="float">
            <text:p>-0.879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0.6272" calcext:value-type="float">
            <text:p>-0.6272</text:p>
          </table:table-cell>
          <table:table-cell office:value-type="float" office:value="0.3569" calcext:value-type="float">
            <text:p>0.3569</text:p>
          </table:table-cell>
          <table:table-cell office:value-type="float" office:value="-0.5063" calcext:value-type="float">
            <text:p>-0.5063</text:p>
          </table:table-cell>
          <table:table-cell office:value-type="float" office:value="-0.8795" calcext:value-type="float">
            <text:p>-0.8795</text:p>
          </table:table-cell>
          <table:table-cell office:value-type="float" office:value="10.8662" calcext:value-type="float">
            <text:p>10.8662</text:p>
          </table:table-cell>
          <table:table-cell office:value-type="float" office:value="0.8662" calcext:value-type="float">
            <text:p>0.8662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678" calcext:value-type="float">
            <text:p>0.678</text:p>
          </table:table-cell>
          <table:table-cell office:value-type="float" office:value="-0.9527" calcext:value-type="float">
            <text:p>-0.9527</text:p>
          </table:table-cell>
          <table:table-cell office:value-type="float" office:value="-0.0133" calcext:value-type="float">
            <text:p>-0.013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678" calcext:value-type="float">
            <text:p>0.678</text:p>
          </table:table-cell>
          <table:table-cell office:value-type="float" office:value="-0.9527" calcext:value-type="float">
            <text:p>-0.9527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11.0145" calcext:value-type="float">
            <text:p>11.0145</text:p>
          </table:table-cell>
          <table:table-cell office:value-type="float" office:value="1.0145" calcext:value-type="float">
            <text:p>1.014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3475" calcext:value-type="float">
            <text:p>0.3475</text:p>
          </table:table-cell>
          <table:table-cell office:value-type="float" office:value="-0.4588" calcext:value-type="float">
            <text:p>-0.4588</text:p>
          </table:table-cell>
          <table:table-cell office:value-type="float" office:value="1.0012" calcext:value-type="float">
            <text:p>1.001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3475" calcext:value-type="float">
            <text:p>0.3475</text:p>
          </table:table-cell>
          <table:table-cell office:value-type="float" office:value="-0.4588" calcext:value-type="float">
            <text:p>-0.4588</text:p>
          </table:table-cell>
          <table:table-cell office:value-type="float" office:value="1.0012" calcext:value-type="float">
            <text:p>1.0012</text:p>
          </table:table-cell>
          <table:table-cell office:value-type="float" office:value="9.7457" calcext:value-type="float">
            <text:p>9.7457</text:p>
          </table:table-cell>
          <table:table-cell office:value-type="float" office:value="-0.2543" calcext:value-type="float">
            <text:p>-0.2543</text:p>
          </table:table-cell>
          <table:table-cell office:value-type="float" office:value="0.5458" calcext:value-type="float">
            <text:p>0.5458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7469" calcext:value-type="float">
            <text:p>0.746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5458" calcext:value-type="float">
            <text:p>0.5458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7469" calcext:value-type="float">
            <text:p>0.7469</text:p>
          </table:table-cell>
          <table:table-cell office:value-type="float" office:value="9.4261" calcext:value-type="float">
            <text:p>9.4261</text:p>
          </table:table-cell>
          <table:table-cell office:value-type="float" office:value="-0.5739" calcext:value-type="float">
            <text:p>-0.5739</text:p>
          </table:table-cell>
          <table:table-cell office:value-type="float" office:value="0.0986" calcext:value-type="float">
            <text:p>0.0986</text:p>
          </table:table-cell>
          <table:table-cell office:value-type="float" office:value="-0.5651" calcext:value-type="float">
            <text:p>-0.565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173" calcext:value-type="float">
            <text:p>0.17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986" calcext:value-type="float">
            <text:p>0.0986</text:p>
          </table:table-cell>
          <table:table-cell office:value-type="float" office:value="-0.5651" calcext:value-type="float">
            <text:p>-0.565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173" calcext:value-type="float">
            <text:p>0.173</text:p>
          </table:table-cell>
          <table:table-cell office:value-type="float" office:value="9.0312" calcext:value-type="float">
            <text:p>9.0312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-0.3828" calcext:value-type="float">
            <text:p>-0.3828</text:p>
          </table:table-cell>
          <table:table-cell office:value-type="float" office:value="-0.3183" calcext:value-type="float">
            <text:p>-0.3183</text:p>
          </table:table-cell>
          <table:table-cell office:value-type="float" office:value="0.5638" calcext:value-type="float">
            <text:p>0.5638</text:p>
          </table:table-cell>
          <table:table-cell office:value-type="float" office:value="-0.7958" calcext:value-type="float">
            <text:p>-0.795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0.3828" calcext:value-type="float">
            <text:p>-0.3828</text:p>
          </table:table-cell>
          <table:table-cell office:value-type="float" office:value="-0.3183" calcext:value-type="float">
            <text:p>-0.3183</text:p>
          </table:table-cell>
          <table:table-cell office:value-type="float" office:value="0.5638" calcext:value-type="float">
            <text:p>0.5638</text:p>
          </table:table-cell>
          <table:table-cell office:value-type="float" office:value="-0.7958" calcext:value-type="float">
            <text:p>-0.7958</text:p>
          </table:table-cell>
          <table:table-cell office:value-type="float" office:value="9.9201" calcext:value-type="float">
            <text:p>9.9201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1937" calcext:value-type="float">
            <text:p>0.1937</text:p>
          </table:table-cell>
          <table:table-cell office:value-type="float" office:value="-0.2719" calcext:value-type="float">
            <text:p>-0.2719</text:p>
          </table:table-cell>
          <table:table-cell office:value-type="float" office:value="-0.8757" calcext:value-type="float">
            <text:p>-0.875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1937" calcext:value-type="float">
            <text:p>0.1937</text:p>
          </table:table-cell>
          <table:table-cell office:value-type="float" office:value="-0.2719" calcext:value-type="float">
            <text:p>-0.2719</text:p>
          </table:table-cell>
          <table:table-cell office:value-type="float" office:value="-0.8757" calcext:value-type="float">
            <text:p>-0.8757</text:p>
          </table:table-cell>
          <table:table-cell office:value-type="float" office:value="10.779" calcext:value-type="float">
            <text:p>10.779</text:p>
          </table:table-cell>
          <table:table-cell office:value-type="float" office:value="0.779" calcext:value-type="float">
            <text:p>0.779</text:p>
          </table:table-cell>
          <table:table-cell office:value-type="float" office:value="-0.1018" calcext:value-type="float">
            <text:p>-0.1018</text:p>
          </table:table-cell>
          <table:table-cell office:value-type="float" office:value="0.4651" calcext:value-type="float">
            <text:p>0.4651</text:p>
          </table:table-cell>
          <table:table-cell office:value-type="float" office:value="-0.7581" calcext:value-type="float">
            <text:p>-0.7581</text:p>
          </table:table-cell>
          <table:table-cell office:value-type="float" office:value="-0.0967" calcext:value-type="float">
            <text:p>-0.096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0.1018" calcext:value-type="float">
            <text:p>-0.1018</text:p>
          </table:table-cell>
          <table:table-cell office:value-type="float" office:value="0.4651" calcext:value-type="float">
            <text:p>0.4651</text:p>
          </table:table-cell>
          <table:table-cell office:value-type="float" office:value="-0.7581" calcext:value-type="float">
            <text:p>-0.7581</text:p>
          </table:table-cell>
          <table:table-cell office:value-type="float" office:value="-0.0967" calcext:value-type="float">
            <text:p>-0.0967</text:p>
          </table:table-cell>
          <table:table-cell office:value-type="float" office:value="10.7472" calcext:value-type="float">
            <text:p>10.747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2761" calcext:value-type="float">
            <text:p>0.2761</text:p>
          </table:table-cell>
          <table:table-cell office:value-type="float" office:value="-0.4813" calcext:value-type="float">
            <text:p>-0.4813</text:p>
          </table:table-cell>
          <table:table-cell office:value-type="float" office:value="0.6505" calcext:value-type="float">
            <text:p>0.650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2761" calcext:value-type="float">
            <text:p>0.2761</text:p>
          </table:table-cell>
          <table:table-cell office:value-type="float" office:value="-0.4813" calcext:value-type="float">
            <text:p>-0.4813</text:p>
          </table:table-cell>
          <table:table-cell office:value-type="float" office:value="0.6505" calcext:value-type="float">
            <text:p>0.6505</text:p>
          </table:table-cell>
          <table:table-cell office:value-type="float" office:value="10.2326" calcext:value-type="float">
            <text:p>10.2326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3798" calcext:value-type="float">
            <text:p>0.3798</text:p>
          </table:table-cell>
          <table:table-cell office:value-type="float" office:value="-0.1418" calcext:value-type="float">
            <text:p>-0.1418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8831" calcext:value-type="float">
            <text:p>0.883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3798" calcext:value-type="float">
            <text:p>0.3798</text:p>
          </table:table-cell>
          <table:table-cell office:value-type="float" office:value="-0.1418" calcext:value-type="float">
            <text:p>-0.1418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8831" calcext:value-type="float">
            <text:p>0.8831</text:p>
          </table:table-cell>
          <table:table-cell office:value-type="float" office:value="9.2163" calcext:value-type="float">
            <text:p>9.2163</text:p>
          </table:table-cell>
          <table:table-cell office:value-type="float" office:value="-0.7837" calcext:value-type="float">
            <text:p>-0.7837</text:p>
          </table:table-cell>
          <table:table-cell office:value-type="float" office:value="0.105" calcext:value-type="float">
            <text:p>0.105</text:p>
          </table:table-cell>
          <table:table-cell office:value-type="float" office:value="-0.3718" calcext:value-type="float">
            <text:p>-0.3718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0994" calcext:value-type="float">
            <text:p>0.099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105" calcext:value-type="float">
            <text:p>0.105</text:p>
          </table:table-cell>
          <table:table-cell office:value-type="float" office:value="-0.3718" calcext:value-type="float">
            <text:p>-0.3718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0994" calcext:value-type="float">
            <text:p>0.0994</text:p>
          </table:table-cell>
          <table:table-cell office:value-type="float" office:value="9.3199" calcext:value-type="float">
            <text:p>9.3199</text:p>
          </table:table-cell>
          <table:table-cell office:value-type="float" office:value="-0.6801" calcext:value-type="float">
            <text:p>-0.6801</text:p>
          </table:table-cell>
          <table:table-cell office:value-type="float" office:value="-0.2214" calcext:value-type="float">
            <text:p>-0.2214</text:p>
          </table:table-cell>
          <table:table-cell office:value-type="float" office:value="-0.2265" calcext:value-type="float">
            <text:p>-0.2265</text:p>
          </table:table-cell>
          <table:table-cell office:value-type="float" office:value="0.5361" calcext:value-type="float">
            <text:p>0.5361</text:p>
          </table:table-cell>
          <table:table-cell office:value-type="float" office:value="-0.5807" calcext:value-type="float">
            <text:p>-0.580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-0.2214" calcext:value-type="float">
            <text:p>-0.2214</text:p>
          </table:table-cell>
          <table:table-cell office:value-type="float" office:value="-0.2265" calcext:value-type="float">
            <text:p>-0.2265</text:p>
          </table:table-cell>
          <table:table-cell office:value-type="float" office:value="0.5361" calcext:value-type="float">
            <text:p>0.5361</text:p>
          </table:table-cell>
          <table:table-cell office:value-type="float" office:value="-0.5807" calcext:value-type="float">
            <text:p>-0.5807</text:p>
          </table:table-cell>
          <table:table-cell office:value-type="float" office:value="9.8163" calcext:value-type="float">
            <text:p>9.8163</text:p>
          </table:table-cell>
          <table:table-cell office:value-type="float" office:value="-0.1837" calcext:value-type="float">
            <text:p>-0.1837</text:p>
          </table:table-cell>
          <table:table-cell office:value-type="float" office:value="-0.2911" calcext:value-type="float">
            <text:p>-0.2911</text:p>
          </table:table-cell>
          <table:table-cell office:value-type="float" office:value="0.1055" calcext:value-type="float">
            <text:p>0.1055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-0.7644" calcext:value-type="float">
            <text:p>-0.764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-0.2911" calcext:value-type="float">
            <text:p>-0.2911</text:p>
          </table:table-cell>
          <table:table-cell office:value-type="float" office:value="0.1055" calcext:value-type="float">
            <text:p>0.1055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-0.7644" calcext:value-type="float">
            <text:p>-0.7644</text:p>
          </table:table-cell>
          <table:table-cell office:value-type="float" office:value="10.6341" calcext:value-type="float">
            <text:p>10.6341</text:p>
          </table:table-cell>
          <table:table-cell office:value-type="float" office:value="0.6341" calcext:value-type="float">
            <text:p>0.6341</text:p>
          </table:table-cell>
          <table:table-cell office:value-type="float" office:value="-0.0801" calcext:value-type="float">
            <text:p>-0.0801</text:p>
          </table:table-cell>
          <table:table-cell office:value-type="float" office:value="0.29" calcext:value-type="float">
            <text:p>0.29</text:p>
          </table:table-cell>
          <table:table-cell office:value-type="float" office:value="-0.5837" calcext:value-type="float">
            <text:p>-0.5837</text:p>
          </table:table-cell>
          <table:table-cell office:value-type="float" office:value="-0.1303" calcext:value-type="float">
            <text:p>-0.130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-0.0801" calcext:value-type="float">
            <text:p>-0.0801</text:p>
          </table:table-cell>
          <table:table-cell office:value-type="float" office:value="0.29" calcext:value-type="float">
            <text:p>0.29</text:p>
          </table:table-cell>
          <table:table-cell office:value-type="float" office:value="-0.5837" calcext:value-type="float">
            <text:p>-0.5837</text:p>
          </table:table-cell>
          <table:table-cell office:value-type="float" office:value="-0.1303" calcext:value-type="float">
            <text:p>-0.1303</text:p>
          </table:table-cell>
          <table:table-cell office:value-type="float" office:value="10.5358" calcext:value-type="float">
            <text:p>10.5358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1768" calcext:value-type="float">
            <text:p>0.1768</text:p>
          </table:table-cell>
          <table:table-cell office:value-type="float" office:value="-0.4461" calcext:value-type="float">
            <text:p>-0.4461</text:p>
          </table:table-cell>
          <table:table-cell office:value-type="float" office:value="0.4055" calcext:value-type="float">
            <text:p>0.405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1768" calcext:value-type="float">
            <text:p>0.1768</text:p>
          </table:table-cell>
          <table:table-cell office:value-type="float" office:value="-0.4461" calcext:value-type="float">
            <text:p>-0.4461</text:p>
          </table:table-cell>
          <table:table-cell office:value-type="float" office:value="0.4055" calcext:value-type="float">
            <text:p>0.4055</text:p>
          </table:table-cell>
          <table:table-cell office:value-type="float" office:value="10.2867" calcext:value-type="float">
            <text:p>10.2867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266" calcext:value-type="float">
            <text:p>0.2266</text:p>
          </table:table-cell>
          <table:table-cell office:value-type="float" office:value="-0.0854" calcext:value-type="float">
            <text:p>-0.0854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6922" calcext:value-type="float">
            <text:p>0.692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2266" calcext:value-type="float">
            <text:p>0.2266</text:p>
          </table:table-cell>
          <table:table-cell office:value-type="float" office:value="-0.0854" calcext:value-type="float">
            <text:p>-0.0854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6922" calcext:value-type="float">
            <text:p>0.6922</text:p>
          </table:table-cell>
          <table:table-cell office:value-type="float" office:value="9.4392" calcext:value-type="float">
            <text:p>9.4392</text:p>
          </table:table-cell>
          <table:table-cell office:value-type="float" office:value="-0.5608" calcext:value-type="float">
            <text:p>-0.5608</text:p>
          </table:table-cell>
          <table:table-cell office:value-type="float" office:value="0.0601" calcext:value-type="float">
            <text:p>0.0601</text:p>
          </table:table-cell>
          <table:table-cell office:value-type="float" office:value="-0.2276" calcext:value-type="float">
            <text:p>-0.2276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1314" calcext:value-type="float">
            <text:p>0.131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0601" calcext:value-type="float">
            <text:p>0.0601</text:p>
          </table:table-cell>
          <table:table-cell office:value-type="float" office:value="-0.2276" calcext:value-type="float">
            <text:p>-0.2276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1314" calcext:value-type="float">
            <text:p>0.1314</text:p>
          </table:table-cell>
          <table:table-cell office:value-type="float" office:value="9.4916" calcext:value-type="float">
            <text:p>9.4916</text:p>
          </table:table-cell>
          <table:table-cell office:value-type="float" office:value="-0.5084" calcext:value-type="float">
            <text:p>-0.5084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3918" calcext:value-type="float">
            <text:p>0.3918</text:p>
          </table:table-cell>
          <table:table-cell office:value-type="float" office:value="-0.377" calcext:value-type="float">
            <text:p>-0.37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3918" calcext:value-type="float">
            <text:p>0.3918</text:p>
          </table:table-cell>
          <table:table-cell office:value-type="float" office:value="-0.377" calcext:value-type="float">
            <text:p>-0.377</text:p>
          </table:table-cell>
          <table:table-cell office:value-type="float" office:value="9.7909" calcext:value-type="float">
            <text:p>9.7909</text:p>
          </table:table-cell>
          <table:table-cell office:value-type="float" office:value="-0.2091" calcext:value-type="float">
            <text:p>-0.2091</text:p>
          </table:table-cell>
          <table:table-cell office:value-type="float" office:value="-0.17" calcext:value-type="float">
            <text:p>-0.17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898" calcext:value-type="float">
            <text:p>-0.0898</text:p>
          </table:table-cell>
          <table:table-cell office:value-type="float" office:value="-0.5861" calcext:value-type="float">
            <text:p>-0.586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-0.17" calcext:value-type="float">
            <text:p>-0.17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898" calcext:value-type="float">
            <text:p>-0.0898</text:p>
          </table:table-cell>
          <table:table-cell office:value-type="float" office:value="-0.5861" calcext:value-type="float">
            <text:p>-0.5861</text:p>
          </table:table-cell>
          <table:table-cell office:value-type="float" office:value="10.4573" calcext:value-type="float">
            <text:p>10.4573</text:p>
          </table:table-cell>
          <table:table-cell office:value-type="float" office:value="0.4573" calcext:value-type="float">
            <text:p>0.4573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1744" calcext:value-type="float">
            <text:p>0.1744</text:p>
          </table:table-cell>
          <table:table-cell office:value-type="float" office:value="-0.4473" calcext:value-type="float">
            <text:p>-0.4473</text:p>
          </table:table-cell>
          <table:table-cell office:value-type="float" office:value="-0.1288" calcext:value-type="float">
            <text:p>-0.128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1744" calcext:value-type="float">
            <text:p>0.1744</text:p>
          </table:table-cell>
          <table:table-cell office:value-type="float" office:value="-0.4473" calcext:value-type="float">
            <text:p>-0.4473</text:p>
          </table:table-cell>
          <table:table-cell office:value-type="float" office:value="-0.1288" calcext:value-type="float">
            <text:p>-0.1288</text:p>
          </table:table-cell>
          <table:table-cell office:value-type="float" office:value="10.4047" calcext:value-type="float">
            <text:p>10.4047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904" calcext:value-type="float">
            <text:p>0.0904</text:p>
          </table:table-cell>
          <table:table-cell office:value-type="float" office:value="-0.3738" calcext:value-type="float">
            <text:p>-0.3738</text:p>
          </table:table-cell>
          <table:table-cell office:value-type="float" office:value="0.2759" calcext:value-type="float">
            <text:p>0.275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904" calcext:value-type="float">
            <text:p>0.0904</text:p>
          </table:table-cell>
          <table:table-cell office:value-type="float" office:value="-0.3738" calcext:value-type="float">
            <text:p>-0.3738</text:p>
          </table:table-cell>
          <table:table-cell office:value-type="float" office:value="0.2759" calcext:value-type="float">
            <text:p>0.2759</text:p>
          </table:table-cell>
          <table:table-cell office:value-type="float" office:value="10.1894" calcext:value-type="float">
            <text:p>10.1894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1187" calcext:value-type="float">
            <text:p>0.1187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4653" calcext:value-type="float">
            <text:p>0.465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1187" calcext:value-type="float">
            <text:p>0.1187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4653" calcext:value-type="float">
            <text:p>0.4653</text:p>
          </table:table-cell>
          <table:table-cell office:value-type="float" office:value="9.6939" calcext:value-type="float">
            <text:p>9.6939</text:p>
          </table:table-cell>
          <table:table-cell office:value-type="float" office:value="-0.3061" calcext:value-type="float">
            <text:p>-0.3061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1367" calcext:value-type="float">
            <text:p>-0.1367</text:p>
          </table:table-cell>
          <table:table-cell office:value-type="float" office:value="0.309" calcext:value-type="float">
            <text:p>0.309</text:p>
          </table:table-cell>
          <table:table-cell office:value-type="float" office:value="0.1592" calcext:value-type="float">
            <text:p>0.159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1367" calcext:value-type="float">
            <text:p>-0.1367</text:p>
          </table:table-cell>
          <table:table-cell office:value-type="float" office:value="0.309" calcext:value-type="float">
            <text:p>0.309</text:p>
          </table:table-cell>
          <table:table-cell office:value-type="float" office:value="0.1592" calcext:value-type="float">
            <text:p>0.1592</text:p>
          </table:table-cell>
          <table:table-cell office:value-type="float" office:value="9.5744" calcext:value-type="float">
            <text:p>9.5744</text:p>
          </table:table-cell>
          <table:table-cell office:value-type="float" office:value="-0.4256" calcext:value-type="float">
            <text:p>-0.4256</text:p>
          </table:table-cell>
          <table:table-cell office:value-type="float" office:value="-0.0954" calcext:value-type="float">
            <text:p>-0.0954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2554" calcext:value-type="float">
            <text:p>0.2554</text:p>
          </table:table-cell>
          <table:table-cell office:value-type="float" office:value="-0.2664" calcext:value-type="float">
            <text:p>-0.266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-0.0954" calcext:value-type="float">
            <text:p>-0.0954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2554" calcext:value-type="float">
            <text:p>0.2554</text:p>
          </table:table-cell>
          <table:table-cell office:value-type="float" office:value="-0.2664" calcext:value-type="float">
            <text:p>-0.2664</text:p>
          </table:table-cell>
          <table:table-cell office:value-type="float" office:value="9.8366" calcext:value-type="float">
            <text:p>9.8366</text:p>
          </table:table-cell>
          <table:table-cell office:value-type="float" office:value="-0.1634" calcext:value-type="float">
            <text:p>-0.1634</text:p>
          </table:table-cell>
          <table:table-cell office:value-type="float" office:value="-0.0904" calcext:value-type="float">
            <text:p>-0.0904</text:p>
          </table:table-cell>
          <table:table-cell office:value-type="float" office:value="0.0691" calcext:value-type="float">
            <text:p>0.0691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-0.4298" calcext:value-type="float">
            <text:p>-0.429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-0.0904" calcext:value-type="float">
            <text:p>-0.0904</text:p>
          </table:table-cell>
          <table:table-cell office:value-type="float" office:value="0.0691" calcext:value-type="float">
            <text:p>0.0691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-0.4298" calcext:value-type="float">
            <text:p>-0.4298</text:p>
          </table:table-cell>
          <table:table-cell office:value-type="float" office:value="10.3432" calcext:value-type="float">
            <text:p>10.3432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52" calcext:value-type="float">
            <text:p>0.1052</text:p>
          </table:table-cell>
          <table:table-cell office:value-type="float" office:value="-0.3509" calcext:value-type="float">
            <text:p>-0.3509</text:p>
          </table:table-cell>
          <table:table-cell office:value-type="float" office:value="-0.0866" calcext:value-type="float">
            <text:p>-0.086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52" calcext:value-type="float">
            <text:p>0.1052</text:p>
          </table:table-cell>
          <table:table-cell office:value-type="float" office:value="-0.3509" calcext:value-type="float">
            <text:p>-0.3509</text:p>
          </table:table-cell>
          <table:table-cell office:value-type="float" office:value="-0.0866" calcext:value-type="float">
            <text:p>-0.0866</text:p>
          </table:table-cell>
          <table:table-cell office:value-type="float" office:value="10.3298" calcext:value-type="float">
            <text:p>10.3298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267" calcext:value-type="float">
            <text:p>0.0267</text:p>
          </table:table-cell>
          <table:table-cell office:value-type="float" office:value="-0.2727" calcext:value-type="float">
            <text:p>-0.2727</text:p>
          </table:table-cell>
          <table:table-cell office:value-type="float" office:value="0.2431" calcext:value-type="float">
            <text:p>0.243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267" calcext:value-type="float">
            <text:p>0.0267</text:p>
          </table:table-cell>
          <table:table-cell office:value-type="float" office:value="-0.2727" calcext:value-type="float">
            <text:p>-0.2727</text:p>
          </table:table-cell>
          <table:table-cell office:value-type="float" office:value="0.2431" calcext:value-type="float">
            <text:p>0.2431</text:p>
          </table:table-cell>
          <table:table-cell office:value-type="float" office:value="10.0626" calcext:value-type="float">
            <text:p>10.0626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058" calcext:value-type="float">
            <text:p>0.305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058" calcext:value-type="float">
            <text:p>0.3058</text:p>
          </table:table-cell>
          <table:table-cell office:value-type="float" office:value="9.7262" calcext:value-type="float">
            <text:p>9.7262</text:p>
          </table:table-cell>
          <table:table-cell office:value-type="float" office:value="-0.2738" calcext:value-type="float">
            <text:p>-0.2738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0319" calcext:value-type="float">
            <text:p>0.031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0319" calcext:value-type="float">
            <text:p>0.0319</text:p>
          </table:table-cell>
          <table:table-cell office:value-type="float" office:value="9.7335" calcext:value-type="float">
            <text:p>9.7335</text:p>
          </table:table-cell>
          <table:table-cell office:value-type="float" office:value="-0.2665" calcext:value-type="float">
            <text:p>-0.2665</text:p>
          </table:table-cell>
          <table:table-cell office:value-type="float" office:value="-0.0754" calcext:value-type="float">
            <text:p>-0.0754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693" calcext:value-type="float">
            <text:p>0.0693</text:p>
          </table:table-cell>
          <table:table-cell office:value-type="float" office:value="-0.2345" calcext:value-type="float">
            <text:p>-0.234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-0.0754" calcext:value-type="float">
            <text:p>-0.0754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693" calcext:value-type="float">
            <text:p>0.0693</text:p>
          </table:table-cell>
          <table:table-cell office:value-type="float" office:value="-0.2345" calcext:value-type="float">
            <text:p>-0.2345</text:p>
          </table:table-cell>
          <table:table-cell office:value-type="float" office:value="9.943" calcext:value-type="float">
            <text:p>9.943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0.0642" calcext:value-type="float">
            <text:p>0.0642</text:p>
          </table:table-cell>
          <table:table-cell office:value-type="float" office:value="-0.1938" calcext:value-type="float">
            <text:p>-0.1938</text:p>
          </table:table-cell>
          <table:table-cell office:value-type="float" office:value="-0.2915" calcext:value-type="float">
            <text:p>-0.291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0.0642" calcext:value-type="float">
            <text:p>0.0642</text:p>
          </table:table-cell>
          <table:table-cell office:value-type="float" office:value="-0.1938" calcext:value-type="float">
            <text:p>-0.1938</text:p>
          </table:table-cell>
          <table:table-cell office:value-type="float" office:value="-0.2915" calcext:value-type="float">
            <text:p>-0.2915</text:p>
          </table:table-cell>
          <table:table-cell office:value-type="float" office:value="10.2838" calcext:value-type="float">
            <text:p>10.2838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567" calcext:value-type="float">
            <text:p>0.0567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-0.0078" calcext:value-type="float">
            <text:p>-0.007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567" calcext:value-type="float">
            <text:p>0.0567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10.2486" calcext:value-type="float">
            <text:p>10.2486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0426" calcext:value-type="float">
            <text:p>0.042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2269" calcext:value-type="float">
            <text:p>-0.2269</text:p>
          </table:table-cell>
          <table:table-cell office:value-type="float" office:value="0.2408" calcext:value-type="float">
            <text:p>0.240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.0426" calcext:value-type="float">
            <text:p>0.042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2269" calcext:value-type="float">
            <text:p>-0.2269</text:p>
          </table:table-cell>
          <table:table-cell office:value-type="float" office:value="0.2408" calcext:value-type="float">
            <text:p>0.2408</text:p>
          </table:table-cell>
          <table:table-cell office:value-type="float" office:value="9.9524" calcext:value-type="float">
            <text:p>9.9524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932" calcext:value-type="float">
            <text:p>0.193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932" calcext:value-type="float">
            <text:p>0.1932</text:p>
          </table:table-cell>
          <table:table-cell office:value-type="float" office:value="9.7575" calcext:value-type="float">
            <text:p>9.7575</text:p>
          </table:table-cell>
          <table:table-cell office:value-type="float" office:value="-0.2425" calcext:value-type="float">
            <text:p>-0.2425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493" calcext:value-type="float">
            <text:p>-0.049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9.8353" calcext:value-type="float">
            <text:p>9.8353</text:p>
          </table:table-cell>
          <table:table-cell office:value-type="float" office:value="-0.1647" calcext:value-type="float">
            <text:p>-0.1647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0.0248" calcext:value-type="float">
            <text:p>0.0248</text:p>
          </table:table-cell>
          <table:table-cell office:value-type="float" office:value="-0.0697" calcext:value-type="float">
            <text:p>-0.0697</text:p>
          </table:table-cell>
          <table:table-cell office:value-type="float" office:value="-0.214" calcext:value-type="float">
            <text:p>-0.21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0.0248" calcext:value-type="float">
            <text:p>0.0248</text:p>
          </table:table-cell>
          <table:table-cell office:value-type="float" office:value="-0.0697" calcext:value-type="float">
            <text:p>-0.0697</text:p>
          </table:table-cell>
          <table:table-cell office:value-type="float" office:value="-0.214" calcext:value-type="float">
            <text:p>-0.214</text:p>
          </table:table-cell>
          <table:table-cell office:value-type="float" office:value="10.0619" calcext:value-type="float">
            <text:p>10.0619</text:p>
          </table:table-cell>
          <table:table-cell office:value-type="float" office:value="0.0619" calcext:value-type="float">
            <text:p>0.0619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0.0535" calcext:value-type="float">
            <text:p>0.053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-0.1521" calcext:value-type="float">
            <text:p>-0.152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0.0535" calcext:value-type="float">
            <text:p>0.053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-0.1521" calcext:value-type="float">
            <text:p>-0.1521</text:p>
          </table:table-cell>
          <table:table-cell office:value-type="float" office:value="10.2409" calcext:value-type="float">
            <text:p>10.2409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2845" calcext:value-type="float">
            <text:p>-0.2845</text:p>
          </table:table-cell>
          <table:table-cell office:value-type="float" office:value="0.0887" calcext:value-type="float">
            <text:p>0.088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2845" calcext:value-type="float">
            <text:p>-0.2845</text:p>
          </table:table-cell>
          <table:table-cell office:value-type="float" office:value="0.0887" calcext:value-type="float">
            <text:p>0.0887</text:p>
          </table:table-cell>
          <table:table-cell office:value-type="float" office:value="10.1121" calcext:value-type="float">
            <text:p>10.1121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-0.1397" calcext:value-type="float">
            <text:p>-0.1397</text:p>
          </table:table-cell>
          <table:table-cell office:value-type="float" office:value="0.2008" calcext:value-type="float">
            <text:p>0.200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-0.1397" calcext:value-type="float">
            <text:p>-0.1397</text:p>
          </table:table-cell>
          <table:table-cell office:value-type="float" office:value="0.2008" calcext:value-type="float">
            <text:p>0.2008</text:p>
          </table:table-cell>
          <table:table-cell office:value-type="float" office:value="9.8801" calcext:value-type="float">
            <text:p>9.8801</text:p>
          </table:table-cell>
          <table:table-cell office:value-type="float" office:value="-0.1199" calcext:value-type="float">
            <text:p>-0.1199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809" calcext:value-type="float">
            <text:p>0.080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809" calcext:value-type="float">
            <text:p>0.0809</text:p>
          </table:table-cell>
          <table:table-cell office:value-type="float" office:value="9.8077" calcext:value-type="float">
            <text:p>9.8077</text:p>
          </table:table-cell>
          <table:table-cell office:value-type="float" office:value="-0.1923" calcext:value-type="float">
            <text:p>-0.1923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1114" calcext:value-type="float">
            <text:p>-0.111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9.9381" calcext:value-type="float">
            <text:p>9.9381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0.0372" calcext:value-type="float">
            <text:p>0.0372</text:p>
          </table:table-cell>
          <table:table-cell office:value-type="float" office:value="-0.1563" calcext:value-type="float">
            <text:p>-0.1563</text:p>
          </table:table-cell>
          <table:table-cell office:value-type="float" office:value="-0.1732" calcext:value-type="float">
            <text:p>-0.173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0.0372" calcext:value-type="float">
            <text:p>0.0372</text:p>
          </table:table-cell>
          <table:table-cell office:value-type="float" office:value="-0.1563" calcext:value-type="float">
            <text:p>-0.1563</text:p>
          </table:table-cell>
          <table:table-cell office:value-type="float" office:value="-0.1732" calcext:value-type="float">
            <text:p>-0.1732</text:p>
          </table:table-cell>
          <table:table-cell office:value-type="float" office:value="10.1373" calcext:value-type="float">
            <text:p>10.1373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345" calcext:value-type="float">
            <text:p>0.0345</text:p>
          </table:table-cell>
          <table:table-cell office:value-type="float" office:value="-0.2609" calcext:value-type="float">
            <text:p>-0.2609</text:p>
          </table:table-cell>
          <table:table-cell office:value-type="float" office:value="-0.0359" calcext:value-type="float">
            <text:p>-0.035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345" calcext:value-type="float">
            <text:p>0.0345</text:p>
          </table:table-cell>
          <table:table-cell office:value-type="float" office:value="-0.2609" calcext:value-type="float">
            <text:p>-0.2609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10.1757" calcext:value-type="float">
            <text:p>10.1757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2089" calcext:value-type="float">
            <text:p>-0.2089</text:p>
          </table:table-cell>
          <table:table-cell office:value-type="float" office:value="0.1398" calcext:value-type="float">
            <text:p>0.139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2089" calcext:value-type="float">
            <text:p>-0.2089</text:p>
          </table:table-cell>
          <table:table-cell office:value-type="float" office:value="0.1398" calcext:value-type="float">
            <text:p>0.1398</text:p>
          </table:table-cell>
          <table:table-cell office:value-type="float" office:value="10.0017" calcext:value-type="float">
            <text:p>10.0017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-0.0683" calcext:value-type="float">
            <text:p>-0.0683</text:p>
          </table:table-cell>
          <table:table-cell office:value-type="float" office:value="0.1415" calcext:value-type="float">
            <text:p>0.141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-0.0683" calcext:value-type="float">
            <text:p>-0.0683</text:p>
          </table:table-cell>
          <table:table-cell office:value-type="float" office:value="0.1415" calcext:value-type="float">
            <text:p>0.1415</text:p>
          </table:table-cell>
          <table:table-cell office:value-type="float" office:value="9.8459" calcext:value-type="float">
            <text:p>9.8459</text:p>
          </table:table-cell>
          <table:table-cell office:value-type="float" office:value="-0.1541" calcext:value-type="float">
            <text:p>-0.1541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-0.0126" calcext:value-type="float">
            <text:p>-0.012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9.8736" calcext:value-type="float">
            <text:p>9.8736</text:p>
          </table:table-cell>
          <table:table-cell office:value-type="float" office:value="-0.1264" calcext:value-type="float">
            <text:p>-0.1264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0797" calcext:value-type="float">
            <text:p>-0.0797</text:p>
          </table:table-cell>
          <table:table-cell office:value-type="float" office:value="-0.139" calcext:value-type="float">
            <text:p>-0.13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0797" calcext:value-type="float">
            <text:p>-0.0797</text:p>
          </table:table-cell>
          <table:table-cell office:value-type="float" office:value="-0.139" calcext:value-type="float">
            <text:p>-0.139</text:p>
          </table:table-cell>
          <table:table-cell office:value-type="float" office:value="10.0278" calcext:value-type="float">
            <text:p>10.0278</text:p>
          </table:table-cell>
          <table:table-cell office:value-type="float" office:value="0.0278" calcext:value-type="float">
            <text:p>0.0278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347" calcext:value-type="float">
            <text:p>0.0347</text:p>
          </table:table-cell>
          <table:table-cell office:value-type="float" office:value="-0.2048" calcext:value-type="float">
            <text:p>-0.2048</text:p>
          </table:table-cell>
          <table:table-cell office:value-type="float" office:value="-0.1112" calcext:value-type="float">
            <text:p>-0.111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347" calcext:value-type="float">
            <text:p>0.0347</text:p>
          </table:table-cell>
          <table:table-cell office:value-type="float" office:value="-0.2048" calcext:value-type="float">
            <text:p>-0.2048</text:p>
          </table:table-cell>
          <table:table-cell office:value-type="float" office:value="-0.1112" calcext:value-type="float">
            <text:p>-0.1112</text:p>
          </table:table-cell>
          <table:table-cell office:value-type="float" office:value="10.1617" calcext:value-type="float">
            <text:p>10.1617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351" calcext:value-type="float">
            <text:p>-0.2351</text:p>
          </table:table-cell>
          <table:table-cell office:value-type="float" office:value="0.0505" calcext:value-type="float">
            <text:p>0.050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351" calcext:value-type="float">
            <text:p>-0.2351</text:p>
          </table:table-cell>
          <table:table-cell office:value-type="float" office:value="0.0505" calcext:value-type="float">
            <text:p>0.0505</text:p>
          </table:table-cell>
          <table:table-cell office:value-type="float" office:value="10.0854" calcext:value-type="float">
            <text:p>10.0854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-0.1419" calcext:value-type="float">
            <text:p>-0.1419</text:p>
          </table:table-cell>
          <table:table-cell office:value-type="float" office:value="0.1359" calcext:value-type="float">
            <text:p>0.135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-0.1419" calcext:value-type="float">
            <text:p>-0.1419</text:p>
          </table:table-cell>
          <table:table-cell office:value-type="float" office:value="0.1359" calcext:value-type="float">
            <text:p>0.1359</text:p>
          </table:table-cell>
          <table:table-cell office:value-type="float" office:value="9.9273" calcext:value-type="float">
            <text:p>9.9273</text:p>
          </table:table-cell>
          <table:table-cell office:value-type="float" office:value="-0.0727" calcext:value-type="float">
            <text:p>-0.0727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0.0632" calcext:value-type="float">
            <text:p>0.063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0.0632" calcext:value-type="float">
            <text:p>0.0632</text:p>
          </table:table-cell>
          <table:table-cell office:value-type="float" office:value="9.8604" calcext:value-type="float">
            <text:p>9.8604</text:p>
          </table:table-cell>
          <table:table-cell office:value-type="float" office:value="-0.1396" calcext:value-type="float">
            <text:p>-0.1396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-0.0764" calcext:value-type="float">
            <text:p>-0.076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9.9521" calcext:value-type="float">
            <text:p>9.9521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265" calcext:value-type="float">
            <text:p>0.0265</text:p>
          </table:table-cell>
          <table:table-cell office:value-type="float" office:value="-0.1493" calcext:value-type="float">
            <text:p>-0.1493</text:p>
          </table:table-cell>
          <table:table-cell office:value-type="float" office:value="-0.1243" calcext:value-type="float">
            <text:p>-0.124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265" calcext:value-type="float">
            <text:p>0.0265</text:p>
          </table:table-cell>
          <table:table-cell office:value-type="float" office:value="-0.1493" calcext:value-type="float">
            <text:p>-0.1493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10.0992" calcext:value-type="float">
            <text:p>10.0992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232" calcext:value-type="float">
            <text:p>0.0232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0251" calcext:value-type="float">
            <text:p>-0.0251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232" calcext:value-type="float">
            <text:p>0.0232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10.1235" calcext:value-type="float">
            <text:p>10.1235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1874" calcext:value-type="float">
            <text:p>-0.1874</text:p>
          </table:table-cell>
          <table:table-cell office:value-type="float" office:value="0.0984" calcext:value-type="float">
            <text:p>0.098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1874" calcext:value-type="float">
            <text:p>-0.1874</text:p>
          </table:table-cell>
          <table:table-cell office:value-type="float" office:value="0.0984" calcext:value-type="float">
            <text:p>0.0984</text:p>
          </table:table-cell>
          <table:table-cell office:value-type="float" office:value="9.9991" calcext:value-type="float">
            <text:p>9.999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-0.0894" calcext:value-type="float">
            <text:p>-0.0894</text:p>
          </table:table-cell>
          <table:table-cell office:value-type="float" office:value="0.0975" calcext:value-type="float">
            <text:p>0.097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-0.0894" calcext:value-type="float">
            <text:p>-0.0894</text:p>
          </table:table-cell>
          <table:table-cell office:value-type="float" office:value="0.0975" calcext:value-type="float">
            <text:p>0.0975</text:p>
          </table:table-cell>
          <table:table-cell office:value-type="float" office:value="9.8927" calcext:value-type="float">
            <text:p>9.8927</text:p>
          </table:table-cell>
          <table:table-cell office:value-type="float" office:value="-0.1073" calcext:value-type="float">
            <text:p>-0.1073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-0.0098" calcext:value-type="float">
            <text:p>-0.009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9.9064" calcext:value-type="float">
            <text:p>9.9064</text:p>
          </table:table-cell>
          <table:table-cell office:value-type="float" office:value="-0.0936" calcext:value-type="float">
            <text:p>-0.0936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-0.1034" calcext:value-type="float">
            <text:p>-0.103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-0.1034" calcext:value-type="float">
            <text:p>-0.1034</text:p>
          </table:table-cell>
          <table:table-cell office:value-type="float" office:value="10.0254" calcext:value-type="float">
            <text:p>10.0254</text:p>
          </table:table-cell>
          <table:table-cell office:value-type="float" office:value="0.0254" calcext:value-type="float">
            <text:p>0.0254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248" calcext:value-type="float">
            <text:p>0.0248</text:p>
          </table:table-cell>
          <table:table-cell office:value-type="float" office:value="-0.1929" calcext:value-type="float">
            <text:p>-0.1929</text:p>
          </table:table-cell>
          <table:table-cell office:value-type="float" office:value="-0.078" calcext:value-type="float">
            <text:p>-0.07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248" calcext:value-type="float">
            <text:p>0.0248</text:p>
          </table:table-cell>
          <table:table-cell office:value-type="float" office:value="-0.1929" calcext:value-type="float">
            <text:p>-0.1929</text:p>
          </table:table-cell>
          <table:table-cell office:value-type="float" office:value="-0.078" calcext:value-type="float">
            <text:p>-0.078</text:p>
          </table:table-cell>
          <table:table-cell office:value-type="float" office:value="10.1195" calcext:value-type="float">
            <text:p>10.1195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2111" calcext:value-type="float">
            <text:p>-0.2111</text:p>
          </table:table-cell>
          <table:table-cell office:value-type="float" office:value="0.0415" calcext:value-type="float">
            <text:p>0.041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2111" calcext:value-type="float">
            <text:p>-0.2111</text:p>
          </table:table-cell>
          <table:table-cell office:value-type="float" office:value="0.0415" calcext:value-type="float">
            <text:p>0.0415</text:p>
          </table:table-cell>
          <table:table-cell office:value-type="float" office:value="10.0572" calcext:value-type="float">
            <text:p>10.0572</text:p>
          </table:table-cell>
          <table:table-cell office:value-type="float" office:value="0.0572" calcext:value-type="float">
            <text:p>0.0572</text:p>
          </table:table-cell>
          <table:table-cell office:value-type="float" office:value="-0" calcext:value-type="float">
            <text:p>0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0.141" calcext:value-type="float">
            <text:p>-0.141</text:p>
          </table:table-cell>
          <table:table-cell office:value-type="float" office:value="0.0988" calcext:value-type="float">
            <text:p>0.098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-0" calcext:value-type="float">
            <text:p>0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0.141" calcext:value-type="float">
            <text:p>-0.141</text:p>
          </table:table-cell>
          <table:table-cell office:value-type="float" office:value="0.0988" calcext:value-type="float">
            <text:p>0.0988</text:p>
          </table:table-cell>
          <table:table-cell office:value-type="float" office:value="9.9437" calcext:value-type="float">
            <text:p>9.9437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703" calcext:value-type="float">
            <text:p>-0.0703</text:p>
          </table:table-cell>
          <table:table-cell office:value-type="float" office:value="0.0425" calcext:value-type="float">
            <text:p>0.042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703" calcext:value-type="float">
            <text:p>-0.0703</text:p>
          </table:table-cell>
          <table:table-cell office:value-type="float" office:value="0.0425" calcext:value-type="float">
            <text:p>0.0425</text:p>
          </table:table-cell>
          <table:table-cell office:value-type="float" office:value="9.899" calcext:value-type="float">
            <text:p>9.899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783" calcext:value-type="float">
            <text:p>-0.0783</text:p>
          </table:table-cell>
          <table:table-cell office:value-type="float" office:value="-0.0585" calcext:value-type="float">
            <text:p>-0.058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783" calcext:value-type="float">
            <text:p>-0.0783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9.968" calcext:value-type="float">
            <text:p>9.968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1528" calcext:value-type="float">
            <text:p>-0.1528</text:p>
          </table:table-cell>
          <table:table-cell office:value-type="float" office:value="-0.0905" calcext:value-type="float">
            <text:p>-0.090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1528" calcext:value-type="float">
            <text:p>-0.1528</text:p>
          </table:table-cell>
          <table:table-cell office:value-type="float" office:value="-0.0905" calcext:value-type="float">
            <text:p>-0.0905</text:p>
          </table:table-cell>
          <table:table-cell office:value-type="float" office:value="10.0773" calcext:value-type="float">
            <text:p>10.0773</text:p>
          </table:table-cell>
          <table:table-cell office:value-type="float" office:value="0.0773" calcext:value-type="float">
            <text:p>0.0773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16" calcext:value-type="float">
            <text:p>0.016</text:p>
          </table:table-cell>
          <table:table-cell office:value-type="float" office:value="-0.2047" calcext:value-type="float">
            <text:p>-0.2047</text:p>
          </table:table-cell>
          <table:table-cell office:value-type="float" office:value="-0.0132" calcext:value-type="float">
            <text:p>-0.013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16" calcext:value-type="float">
            <text:p>0.016</text:p>
          </table:table-cell>
          <table:table-cell office:value-type="float" office:value="-0.2047" calcext:value-type="float">
            <text:p>-0.2047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10.0878" calcext:value-type="float">
            <text:p>10.0878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0.0746" calcext:value-type="float">
            <text:p>0.074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0.0746" calcext:value-type="float">
            <text:p>0.0746</text:p>
          </table:table-cell>
          <table:table-cell office:value-type="float" office:value="9.9946" calcext:value-type="float">
            <text:p>9.9946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692" calcext:value-type="float">
            <text:p>0.069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692" calcext:value-type="float">
            <text:p>0.0692</text:p>
          </table:table-cell>
          <table:table-cell office:value-type="float" office:value="9.9192" calcext:value-type="float">
            <text:p>9.9192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-0.0116" calcext:value-type="float">
            <text:p>-0.011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9.9348" calcext:value-type="float">
            <text:p>9.9348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1174" calcext:value-type="float">
            <text:p>-0.1174</text:p>
          </table:table-cell>
          <table:table-cell office:value-type="float" office:value="-0.0768" calcext:value-type="float">
            <text:p>-0.076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1174" calcext:value-type="float">
            <text:p>-0.1174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10.0235" calcext:value-type="float">
            <text:p>10.0235</text:p>
          </table:table-cell>
          <table:table-cell office:value-type="float" office:value="0.0235" calcext:value-type="float">
            <text:p>0.0235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825" calcext:value-type="float">
            <text:p>-0.1825</text:p>
          </table:table-cell>
          <table:table-cell office:value-type="float" office:value="-0.0533" calcext:value-type="float">
            <text:p>-0.053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825" calcext:value-type="float">
            <text:p>-0.1825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10.0876" calcext:value-type="float">
            <text:p>10.0876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0343" calcext:value-type="float">
            <text:p>0.034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0343" calcext:value-type="float">
            <text:p>0.0343</text:p>
          </table:table-cell>
          <table:table-cell office:value-type="float" office:value="10.0372" calcext:value-type="float">
            <text:p>10.0372</text:p>
          </table:table-cell>
          <table:table-cell office:value-type="float" office:value="0.0372" calcext:value-type="float">
            <text:p>0.0372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1391" calcext:value-type="float">
            <text:p>-0.1391</text:p>
          </table:table-cell>
          <table:table-cell office:value-type="float" office:value="0.0715" calcext:value-type="float">
            <text:p>0.071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1391" calcext:value-type="float">
            <text:p>-0.1391</text:p>
          </table:table-cell>
          <table:table-cell office:value-type="float" office:value="0.0715" calcext:value-type="float">
            <text:p>0.0715</text:p>
          </table:table-cell>
          <table:table-cell office:value-type="float" office:value="9.9559" calcext:value-type="float">
            <text:p>9.9559</text:p>
          </table:table-cell>
          <table:table-cell office:value-type="float" office:value="-0.0441" calcext:value-type="float">
            <text:p>-0.0441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0.0274" calcext:value-type="float">
            <text:p>0.027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0.0274" calcext:value-type="float">
            <text:p>0.0274</text:p>
          </table:table-cell>
          <table:table-cell office:value-type="float" office:value="9.9268" calcext:value-type="float">
            <text:p>9.926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988" calcext:value-type="float">
            <text:p>-0.0988</text:p>
          </table:table-cell>
          <table:table-cell office:value-type="float" office:value="-0.0458" calcext:value-type="float">
            <text:p>-0.045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988" calcext:value-type="float">
            <text:p>-0.0988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9.9806" calcext:value-type="float">
            <text:p>9.9806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1543" calcext:value-type="float">
            <text:p>-0.1543</text:p>
          </table:table-cell>
          <table:table-cell office:value-type="float" office:value="-0.0652" calcext:value-type="float">
            <text:p>-0.065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1543" calcext:value-type="float">
            <text:p>-0.1543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10.0594" calcext:value-type="float">
            <text:p>10.0594</text:p>
          </table:table-cell>
          <table:table-cell office:value-type="float" office:value="0.0594" calcext:value-type="float">
            <text:p>0.0594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1898" calcext:value-type="float">
            <text:p>-0.1898</text:p>
          </table:table-cell>
          <table:table-cell office:value-type="float" office:value="-0.0058" calcext:value-type="float">
            <text:p>-0.0058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1898" calcext:value-type="float">
            <text:p>-0.1898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10.0622" calcext:value-type="float">
            <text:p>10.0622</text:p>
          </table:table-cell>
          <table:table-cell office:value-type="float" office:value="0.0622" calcext:value-type="float">
            <text:p>0.062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1645" calcext:value-type="float">
            <text:p>-0.1645</text:p>
          </table:table-cell>
          <table:table-cell office:value-type="float" office:value="0.0564" calcext:value-type="float">
            <text:p>0.056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1645" calcext:value-type="float">
            <text:p>-0.1645</text:p>
          </table:table-cell>
          <table:table-cell office:value-type="float" office:value="0.0564" calcext:value-type="float">
            <text:p>0.0564</text:p>
          </table:table-cell>
          <table:table-cell office:value-type="float" office:value="9.9929" calcext:value-type="float">
            <text:p>9.9929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0493" calcext:value-type="float">
            <text:p>0.049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0493" calcext:value-type="float">
            <text:p>0.0493</text:p>
          </table:table-cell>
          <table:table-cell office:value-type="float" office:value="9.9391" calcext:value-type="float">
            <text:p>9.9391</text:p>
          </table:table-cell>
          <table:table-cell office:value-type="float" office:value="-0.0609" calcext:value-type="float">
            <text:p>-0.0609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-0.0115" calcext:value-type="float">
            <text:p>-0.0115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9.9542" calcext:value-type="float">
            <text:p>9.9542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1271" calcext:value-type="float">
            <text:p>-0.1271</text:p>
          </table:table-cell>
          <table:table-cell office:value-type="float" office:value="-0.0574" calcext:value-type="float">
            <text:p>-0.057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1271" calcext:value-type="float">
            <text:p>-0.1271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10.0204" calcext:value-type="float">
            <text:p>10.0204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1743" calcext:value-type="float">
            <text:p>-0.1743</text:p>
          </table:table-cell>
          <table:table-cell office:value-type="float" office:value="-0.037" calcext:value-type="float">
            <text:p>-0.037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1743" calcext:value-type="float">
            <text:p>-0.1743</text:p>
          </table:table-cell>
          <table:table-cell office:value-type="float" office:value="-0.037" calcext:value-type="float">
            <text:p>-0.037</text:p>
          </table:table-cell>
          <table:table-cell office:value-type="float" office:value="10.0645" calcext:value-type="float">
            <text:p>10.0645</text:p>
          </table:table-cell>
          <table:table-cell office:value-type="float" office:value="0.0645" calcext:value-type="float">
            <text:p>0.06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1789" calcext:value-type="float">
            <text:p>-0.1789</text:p>
          </table:table-cell>
          <table:table-cell office:value-type="float" office:value="0.0276" calcext:value-type="float">
            <text:p>0.027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1789" calcext:value-type="float">
            <text:p>-0.1789</text:p>
          </table:table-cell>
          <table:table-cell office:value-type="float" office:value="0.0276" calcext:value-type="float">
            <text:p>0.0276</text:p>
          </table:table-cell>
          <table:table-cell office:value-type="float" office:value="10.0246" calcext:value-type="float">
            <text:p>10.0246</text:p>
          </table:table-cell>
          <table:table-cell office:value-type="float" office:value="0.0246" calcext:value-type="float">
            <text:p>0.0246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0522" calcext:value-type="float">
            <text:p>0.052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0522" calcext:value-type="float">
            <text:p>0.0522</text:p>
          </table:table-cell>
          <table:table-cell office:value-type="float" office:value="9.9657" calcext:value-type="float">
            <text:p>9.9657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179" calcext:value-type="float">
            <text:p>0.017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179" calcext:value-type="float">
            <text:p>0.0179</text:p>
          </table:table-cell>
          <table:table-cell office:value-type="float" office:value="9.9466" calcext:value-type="float">
            <text:p>9.9466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-0.0356" calcext:value-type="float">
            <text:p>-0.035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9.9883" calcext:value-type="float">
            <text:p>9.9883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42" calcext:value-type="float">
            <text:p>-0.1542</text:p>
          </table:table-cell>
          <table:table-cell office:value-type="float" office:value="-0.0472" calcext:value-type="float">
            <text:p>-0.0472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42" calcext:value-type="float">
            <text:p>-0.1542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10.0453" calcext:value-type="float">
            <text:p>10.0453</text:p>
          </table:table-cell>
          <table:table-cell office:value-type="float" office:value="0.0453" calcext:value-type="float">
            <text:p>0.0453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1788" calcext:value-type="float">
            <text:p>-0.1788</text:p>
          </table:table-cell>
          <table:table-cell office:value-type="float" office:value="-0.0019" calcext:value-type="float">
            <text:p>-0.0019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1788" calcext:value-type="float">
            <text:p>-0.1788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10.0445" calcext:value-type="float">
            <text:p>10.0445</text:p>
          </table:table-cell>
          <table:table-cell office:value-type="float" office:value="0.0445" calcext:value-type="float">
            <text:p>0.0445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0426" calcext:value-type="float">
            <text:p>0.042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0426" calcext:value-type="float">
            <text:p>0.0426</text:p>
          </table:table-cell>
          <table:table-cell office:value-type="float" office:value="9.993" calcext:value-type="float">
            <text:p>9.993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93" calcext:value-type="float">
            <text:p>-0.1193</text:p>
          </table:table-cell>
          <table:table-cell office:value-type="float" office:value="0.0356" calcext:value-type="float">
            <text:p>0.0356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1193" calcext:value-type="float">
            <text:p>-0.1193</text:p>
          </table:table-cell>
          <table:table-cell office:value-type="float" office:value="0.0356" calcext:value-type="float">
            <text:p>0.0356</text:p>
          </table:table-cell>
          <table:table-cell office:value-type="float" office:value="9.954" calcext:value-type="float">
            <text:p>9.954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1067" calcext:value-type="float">
            <text:p>-0.1067</text:p>
          </table:table-cell>
          <table:table-cell office:value-type="float" office:value="-0.0104" calcext:value-type="float">
            <text:p>-0.0104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1067" calcext:value-type="float">
            <text:p>-0.1067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9.9674" calcext:value-type="float">
            <text:p>9.9674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1334" calcext:value-type="float">
            <text:p>-0.1334</text:p>
          </table:table-cell>
          <table:table-cell office:value-type="float" office:value="-0.043" calcext:value-type="float">
            <text:p>-0.043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1334" calcext:value-type="float">
            <text:p>-0.1334</text:p>
          </table:table-cell>
          <table:table-cell office:value-type="float" office:value="-0.043" calcext:value-type="float">
            <text:p>-0.043</text:p>
          </table:table-cell>
          <table:table-cell office:value-type="float" office:value="10.0169" calcext:value-type="float">
            <text:p>10.0169</text:p>
          </table:table-cell>
          <table:table-cell office:value-type="float" office:value="0.0169" calcext:value-type="float">
            <text:p>0.016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1679" calcext:value-type="float">
            <text:p>-0.1679</text:p>
          </table:table-cell>
          <table:table-cell office:value-type="float" office:value="-0.0261" calcext:value-type="float">
            <text:p>-0.026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6093" calcext:value-type="float">
            <text:p>-0.6093</text:p>
          </table:table-cell>
          <table:table-cell office:value-type="float" office:value="-0.3684" calcext:value-type="float">
            <text:p>-0.3684</text:p>
          </table:table-cell>
          <table:table-cell office:value-type="float" office:value="0.5337" calcext:value-type="float">
            <text:p>0.5337</text:p>
          </table:table-cell>
          <table:table-cell office:value-type="float" office:value="10.0468" calcext:value-type="float">
            <text:p>10.0468</text:p>
          </table:table-cell>
          <table:table-cell office:value-type="float" office:value="0.0468" calcext:value-type="float">
            <text:p>0.0468</text:p>
          </table:table-cell>
          <table:table-cell office:value-type="float" office:value="-0.1976" calcext:value-type="float">
            <text:p>-0.1976</text:p>
          </table:table-cell>
          <table:table-cell office:value-type="float" office:value="-0.8672" calcext:value-type="float">
            <text:p>-0.8672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5806" calcext:value-type="float">
            <text:p>0.580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0.1976" calcext:value-type="float">
            <text:p>-0.1976</text:p>
          </table:table-cell>
          <table:table-cell office:value-type="float" office:value="-0.8672" calcext:value-type="float">
            <text:p>-0.8672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5806" calcext:value-type="float">
            <text:p>0.5806</text:p>
          </table:table-cell>
          <table:table-cell office:value-type="float" office:value="8.927" calcext:value-type="float">
            <text:p>8.927</text:p>
          </table:table-cell>
          <table:table-cell office:value-type="float" office:value="-1.073" calcext:value-type="float">
            <text:p>-1.073</text:p>
          </table:table-cell>
          <table:table-cell office:value-type="float" office:value="-0.8247" calcext:value-type="float">
            <text:p>-0.8247</text:p>
          </table:table-cell>
          <table:table-cell office:value-type="float" office:value="-0.2886" calcext:value-type="float">
            <text:p>-0.2886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4924" calcext:value-type="float">
            <text:p>-0.492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8247" calcext:value-type="float">
            <text:p>-0.8247</text:p>
          </table:table-cell>
          <table:table-cell office:value-type="float" office:value="-0.2886" calcext:value-type="float">
            <text:p>-0.2886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4924" calcext:value-type="float">
            <text:p>-0.4924</text:p>
          </table:table-cell>
          <table:table-cell office:value-type="float" office:value="9.4211" calcext:value-type="float">
            <text:p>9.4211</text:p>
          </table:table-cell>
          <table:table-cell office:value-type="float" office:value="-0.5789" calcext:value-type="float">
            <text:p>-0.5789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0.5528" calcext:value-type="float">
            <text:p>0.5528</text:p>
          </table:table-cell>
          <table:table-cell office:value-type="float" office:value="-0.5491" calcext:value-type="float">
            <text:p>-0.5491</text:p>
          </table:table-cell>
          <table:table-cell office:value-type="float" office:value="-1.0713" calcext:value-type="float">
            <text:p>-1.071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0.5528" calcext:value-type="float">
            <text:p>0.5528</text:p>
          </table:table-cell>
          <table:table-cell office:value-type="float" office:value="-0.5491" calcext:value-type="float">
            <text:p>-0.5491</text:p>
          </table:table-cell>
          <table:table-cell office:value-type="float" office:value="-1.0713" calcext:value-type="float">
            <text:p>-1.0713</text:p>
          </table:table-cell>
          <table:table-cell office:value-type="float" office:value="11.1583" calcext:value-type="float">
            <text:p>11.1583</text:p>
          </table:table-cell>
          <table:table-cell office:value-type="float" office:value="1.1583" calcext:value-type="float">
            <text:p>1.1583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8276" calcext:value-type="float">
            <text:p>0.8276</text:p>
          </table:table-cell>
          <table:table-cell office:value-type="float" office:value="-1.0412" calcext:value-type="float">
            <text:p>-1.0412</text:p>
          </table:table-cell>
          <table:table-cell office:value-type="float" office:value="0.087" calcext:value-type="float">
            <text:p>0.08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8276" calcext:value-type="float">
            <text:p>0.8276</text:p>
          </table:table-cell>
          <table:table-cell office:value-type="float" office:value="-1.0412" calcext:value-type="float">
            <text:p>-1.0412</text:p>
          </table:table-cell>
          <table:table-cell office:value-type="float" office:value="0.087" calcext:value-type="float">
            <text:p>0.087</text:p>
          </table:table-cell>
          <table:table-cell office:value-type="float" office:value="11.2617" calcext:value-type="float">
            <text:p>11.2617</text:p>
          </table:table-cell>
          <table:table-cell office:value-type="float" office:value="1.2617" calcext:value-type="float">
            <text:p>1.2617</text:p>
          </table:table-cell>
          <table:table-cell office:value-type="float" office:value="0.6867" calcext:value-type="float">
            <text:p>0.6867</text:p>
          </table:table-cell>
          <table:table-cell office:value-type="float" office:value="0.3116" calcext:value-type="float">
            <text:p>0.3116</text:p>
          </table:table-cell>
          <table:table-cell office:value-type="float" office:value="-0.3234" calcext:value-type="float">
            <text:p>-0.3234</text:p>
          </table:table-cell>
          <table:table-cell office:value-type="float" office:value="1.3487" calcext:value-type="float">
            <text:p>1.348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867" calcext:value-type="float">
            <text:p>0.6867</text:p>
          </table:table-cell>
          <table:table-cell office:value-type="float" office:value="0.3116" calcext:value-type="float">
            <text:p>0.3116</text:p>
          </table:table-cell>
          <table:table-cell office:value-type="float" office:value="-0.3234" calcext:value-type="float">
            <text:p>-0.3234</text:p>
          </table:table-cell>
          <table:table-cell office:value-type="float" office:value="1.3487" calcext:value-type="float">
            <text:p>1.3487</text:p>
          </table:table-cell>
          <table:table-cell office:value-type="float" office:value="9.1303" calcext:value-type="float">
            <text:p>9.1303</text:p>
          </table:table-cell>
          <table:table-cell office:value-type="float" office:value="-0.8697" calcext:value-type="float">
            <text:p>-0.8697</text:p>
          </table:table-cell>
          <table:table-cell office:value-type="float" office:value="0.6287" calcext:value-type="float">
            <text:p>0.6287</text:p>
          </table:table-cell>
          <table:table-cell office:value-type="float" office:value="-0.4346" calcext:value-type="float">
            <text:p>-0.4346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479" calcext:value-type="float">
            <text:p>0.47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287" calcext:value-type="float">
            <text:p>0.6287</text:p>
          </table:table-cell>
          <table:table-cell office:value-type="float" office:value="-0.4346" calcext:value-type="float">
            <text:p>-0.4346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479" calcext:value-type="float">
            <text:p>0.479</text:p>
          </table:table-cell>
          <table:table-cell office:value-type="float" office:value="9.6587" calcext:value-type="float">
            <text:p>9.6587</text:p>
          </table:table-cell>
          <table:table-cell office:value-type="float" office:value="-0.3413" calcext:value-type="float">
            <text:p>-0.341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7136" calcext:value-type="float">
            <text:p>-0.7136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1377" calcext:value-type="float">
            <text:p>0.1377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-0.7136" calcext:value-type="float">
            <text:p>-0.7136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1377" calcext:value-type="float">
            <text:p>0.1377</text:p>
          </table:table-cell>
          <table:table-cell office:value-type="float" office:value="8.843" calcext:value-type="float">
            <text:p>8.843</text:p>
          </table:table-cell>
          <table:table-cell office:value-type="float" office:value="-1.157" calcext:value-type="float">
            <text:p>-1.157</text:p>
          </table:table-cell>
          <table:table-cell office:value-type="float" office:value="-0.5583" calcext:value-type="float">
            <text:p>-0.5583</text:p>
          </table:table-cell>
          <table:table-cell office:value-type="float" office:value="-0.3179" calcext:value-type="float">
            <text:p>-0.3179</text:p>
          </table:table-cell>
          <table:table-cell office:value-type="float" office:value="0.458" calcext:value-type="float">
            <text:p>0.458</text:p>
          </table:table-cell>
          <table:table-cell office:value-type="float" office:value="-1.0193" calcext:value-type="float">
            <text:p>-1.019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0.5583" calcext:value-type="float">
            <text:p>-0.5583</text:p>
          </table:table-cell>
          <table:table-cell office:value-type="float" office:value="-0.3179" calcext:value-type="float">
            <text:p>-0.3179</text:p>
          </table:table-cell>
          <table:table-cell office:value-type="float" office:value="0.458" calcext:value-type="float">
            <text:p>0.458</text:p>
          </table:table-cell>
          <table:table-cell office:value-type="float" office:value="-1.0193" calcext:value-type="float">
            <text:p>-1.0193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0.1858" calcext:value-type="float">
            <text:p>0.1858</text:p>
          </table:table-cell>
          <table:table-cell office:value-type="float" office:value="-0.5568" calcext:value-type="float">
            <text:p>-0.5568</text:p>
          </table:table-cell>
          <table:table-cell office:value-type="float" office:value="0.3328" calcext:value-type="float">
            <text:p>0.3328</text:p>
          </table:table-cell>
          <table:table-cell office:value-type="float" office:value="-0.4684" calcext:value-type="float">
            <text:p>-0.4684</text:p>
          </table:table-cell>
          <table:table-cell office:value-type="float" office:value="-0.8335" calcext:value-type="float">
            <text:p>-0.833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0.5568" calcext:value-type="float">
            <text:p>-0.5568</text:p>
          </table:table-cell>
          <table:table-cell office:value-type="float" office:value="0.3328" calcext:value-type="float">
            <text:p>0.3328</text:p>
          </table:table-cell>
          <table:table-cell office:value-type="float" office:value="-0.4684" calcext:value-type="float">
            <text:p>-0.4684</text:p>
          </table:table-cell>
          <table:table-cell office:value-type="float" office:value="-0.8335" calcext:value-type="float">
            <text:p>-0.8335</text:p>
          </table:table-cell>
          <table:table-cell office:value-type="float" office:value="10.8285" calcext:value-type="float">
            <text:p>10.8285</text:p>
          </table:table-cell>
          <table:table-cell office:value-type="float" office:value="0.8285" calcext:value-type="float">
            <text:p>0.8285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.6089" calcext:value-type="float">
            <text:p>0.6089</text:p>
          </table:table-cell>
          <table:table-cell office:value-type="float" office:value="-0.8876" calcext:value-type="float">
            <text:p>-0.8876</text:p>
          </table:table-cell>
          <table:table-cell office:value-type="float" office:value="-0.005" calcext:value-type="float">
            <text:p>-0.00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.6089" calcext:value-type="float">
            <text:p>0.6089</text:p>
          </table:table-cell>
          <table:table-cell office:value-type="float" office:value="-0.8876" calcext:value-type="float">
            <text:p>-0.8876</text:p>
          </table:table-cell>
          <table:table-cell office:value-type="float" office:value="-0.005" calcext:value-type="float">
            <text:p>-0.005</text:p>
          </table:table-cell>
          <table:table-cell office:value-type="float" office:value="10.9538" calcext:value-type="float">
            <text:p>10.9538</text:p>
          </table:table-cell>
          <table:table-cell office:value-type="float" office:value="0.9538" calcext:value-type="float">
            <text:p>0.9538</text:p>
          </table:table-cell>
          <table:table-cell office:value-type="float" office:value="0.448" calcext:value-type="float">
            <text:p>0.448</text:p>
          </table:table-cell>
          <table:table-cell office:value-type="float" office:value="0.2987" calcext:value-type="float">
            <text:p>0.2987</text:p>
          </table:table-cell>
          <table:table-cell office:value-type="float" office:value="-0.4157" calcext:value-type="float">
            <text:p>-0.4157</text:p>
          </table:table-cell>
          <table:table-cell office:value-type="float" office:value="0.9488" calcext:value-type="float">
            <text:p>0.948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448" calcext:value-type="float">
            <text:p>0.448</text:p>
          </table:table-cell>
          <table:table-cell office:value-type="float" office:value="0.2987" calcext:value-type="float">
            <text:p>0.2987</text:p>
          </table:table-cell>
          <table:table-cell office:value-type="float" office:value="-0.4157" calcext:value-type="float">
            <text:p>-0.4157</text:p>
          </table:table-cell>
          <table:table-cell office:value-type="float" office:value="0.9488" calcext:value-type="float">
            <text:p>0.9488</text:p>
          </table:table-cell>
          <table:table-cell office:value-type="float" office:value="9.7808" calcext:value-type="float">
            <text:p>9.7808</text:p>
          </table:table-cell>
          <table:table-cell office:value-type="float" office:value="-0.2192" calcext:value-type="float">
            <text:p>-0.2192</text:p>
          </table:table-cell>
          <table:table-cell office:value-type="float" office:value="0.4823" calcext:value-type="float">
            <text:p>0.4823</text:p>
          </table:table-cell>
          <table:table-cell office:value-type="float" office:value="-0.2473" calcext:value-type="float">
            <text:p>-0.2473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7296" calcext:value-type="float">
            <text:p>0.729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4823" calcext:value-type="float">
            <text:p>0.4823</text:p>
          </table:table-cell>
          <table:table-cell office:value-type="float" office:value="-0.2473" calcext:value-type="float">
            <text:p>-0.2473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7296" calcext:value-type="float">
            <text:p>0.7296</text:p>
          </table:table-cell>
          <table:table-cell office:value-type="float" office:value="9.3843" calcext:value-type="float">
            <text:p>9.3843</text:p>
          </table:table-cell>
          <table:table-cell office:value-type="float" office:value="-0.6157" calcext:value-type="float">
            <text:p>-0.6157</text:p>
          </table:table-cell>
          <table:table-cell office:value-type="float" office:value="0.0767" calcext:value-type="float">
            <text:p>0.0767</text:p>
          </table:table-cell>
          <table:table-cell office:value-type="float" office:value="-0.5033" calcext:value-type="float">
            <text:p>-0.5033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1139" calcext:value-type="float">
            <text:p>0.113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767" calcext:value-type="float">
            <text:p>0.0767</text:p>
          </table:table-cell>
          <table:table-cell office:value-type="float" office:value="-0.5033" calcext:value-type="float">
            <text:p>-0.5033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1139" calcext:value-type="float">
            <text:p>0.1139</text:p>
          </table:table-cell>
          <table:table-cell office:value-type="float" office:value="9.1129" calcext:value-type="float">
            <text:p>9.1129</text:p>
          </table:table-cell>
          <table:table-cell office:value-type="float" office:value="-0.8871" calcext:value-type="float">
            <text:p>-0.8871</text:p>
          </table:table-cell>
          <table:table-cell office:value-type="float" office:value="-0.3444" calcext:value-type="float">
            <text:p>-0.3444</text:p>
          </table:table-cell>
          <table:table-cell office:value-type="float" office:value="-0.2689" calcext:value-type="float">
            <text:p>-0.2689</text:p>
          </table:table-cell>
          <table:table-cell office:value-type="float" office:value="0.5157" calcext:value-type="float">
            <text:p>0.5157</text:p>
          </table:table-cell>
          <table:table-cell office:value-type="float" office:value="-0.7732" calcext:value-type="float">
            <text:p>-0.773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0.3444" calcext:value-type="float">
            <text:p>-0.3444</text:p>
          </table:table-cell>
          <table:table-cell office:value-type="float" office:value="-0.2689" calcext:value-type="float">
            <text:p>-0.2689</text:p>
          </table:table-cell>
          <table:table-cell office:value-type="float" office:value="0.5157" calcext:value-type="float">
            <text:p>0.5157</text:p>
          </table:table-cell>
          <table:table-cell office:value-type="float" office:value="-0.7732" calcext:value-type="float">
            <text:p>-0.7732</text:p>
          </table:table-cell>
          <table:table-cell office:value-type="float" office:value="9.9618" calcext:value-type="float">
            <text:p>9.9618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0.3956" calcext:value-type="float">
            <text:p>-0.3956</text:p>
          </table:table-cell>
          <table:table-cell office:value-type="float" office:value="0.1842" calcext:value-type="float">
            <text:p>0.1842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-0.8114" calcext:value-type="float">
            <text:p>-0.811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-0.3956" calcext:value-type="float">
            <text:p>-0.3956</text:p>
          </table:table-cell>
          <table:table-cell office:value-type="float" office:value="0.1842" calcext:value-type="float">
            <text:p>0.1842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-0.8114" calcext:value-type="float">
            <text:p>-0.8114</text:p>
          </table:table-cell>
          <table:table-cell office:value-type="float" office:value="10.7436" calcext:value-type="float">
            <text:p>10.7436</text:p>
          </table:table-cell>
          <table:table-cell office:value-type="float" office:value="0.7436" calcext:value-type="float">
            <text:p>0.7436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0.4089" calcext:value-type="float">
            <text:p>0.4089</text:p>
          </table:table-cell>
          <table:table-cell office:value-type="float" office:value="-0.7162" calcext:value-type="float">
            <text:p>-0.7162</text:p>
          </table:table-cell>
          <table:table-cell office:value-type="float" office:value="-0.0678" calcext:value-type="float">
            <text:p>-0.067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0.4089" calcext:value-type="float">
            <text:p>0.4089</text:p>
          </table:table-cell>
          <table:table-cell office:value-type="float" office:value="-0.7162" calcext:value-type="float">
            <text:p>-0.7162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10.6933" calcext:value-type="float">
            <text:p>10.6933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2282" calcext:value-type="float">
            <text:p>0.2282</text:p>
          </table:table-cell>
          <table:table-cell office:value-type="float" office:value="-0.4373" calcext:value-type="float">
            <text:p>-0.4373</text:p>
          </table:table-cell>
          <table:table-cell office:value-type="float" office:value="0.6255" calcext:value-type="float">
            <text:p>0.625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2282" calcext:value-type="float">
            <text:p>0.2282</text:p>
          </table:table-cell>
          <table:table-cell office:value-type="float" office:value="-0.4373" calcext:value-type="float">
            <text:p>-0.4373</text:p>
          </table:table-cell>
          <table:table-cell office:value-type="float" office:value="0.6255" calcext:value-type="float">
            <text:p>0.6255</text:p>
          </table:table-cell>
          <table:table-cell office:value-type="float" office:value="10.1852" calcext:value-type="float">
            <text:p>10.1852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3241" calcext:value-type="float">
            <text:p>0.3241</text:p>
          </table:table-cell>
          <table:table-cell office:value-type="float" office:value="-0.1376" calcext:value-type="float">
            <text:p>-0.1376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8107" calcext:value-type="float">
            <text:p>0.810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3241" calcext:value-type="float">
            <text:p>0.3241</text:p>
          </table:table-cell>
          <table:table-cell office:value-type="float" office:value="-0.1376" calcext:value-type="float">
            <text:p>-0.1376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8107" calcext:value-type="float">
            <text:p>0.8107</text:p>
          </table:table-cell>
          <table:table-cell office:value-type="float" office:value="9.2445" calcext:value-type="float">
            <text:p>9.2445</text:p>
          </table:table-cell>
          <table:table-cell office:value-type="float" office:value="-0.7555" calcext:value-type="float">
            <text:p>-0.7555</text:p>
          </table:table-cell>
          <table:table-cell office:value-type="float" office:value="0.0776" calcext:value-type="float">
            <text:p>0.0776</text:p>
          </table:table-cell>
          <table:table-cell office:value-type="float" office:value="-0.3232" calcext:value-type="float">
            <text:p>-0.3232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0552" calcext:value-type="float">
            <text:p>0.055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776" calcext:value-type="float">
            <text:p>0.0776</text:p>
          </table:table-cell>
          <table:table-cell office:value-type="float" office:value="-0.3232" calcext:value-type="float">
            <text:p>-0.3232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0552" calcext:value-type="float">
            <text:p>0.0552</text:p>
          </table:table-cell>
          <table:table-cell office:value-type="float" office:value="9.3896" calcext:value-type="float">
            <text:p>9.3896</text:p>
          </table:table-cell>
          <table:table-cell office:value-type="float" office:value="-0.6104" calcext:value-type="float">
            <text:p>-0.6104</text:p>
          </table:table-cell>
          <table:table-cell office:value-type="float" office:value="-0.1983" calcext:value-type="float">
            <text:p>-0.1983</text:p>
          </table:table-cell>
          <table:table-cell office:value-type="float" office:value="-0.1824" calcext:value-type="float">
            <text:p>-0.1824</text:p>
          </table:table-cell>
          <table:table-cell office:value-type="float" office:value="0.4638" calcext:value-type="float">
            <text:p>0.4638</text:p>
          </table:table-cell>
          <table:table-cell office:value-type="float" office:value="-0.5552" calcext:value-type="float">
            <text:p>-0.555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0.1983" calcext:value-type="float">
            <text:p>-0.1983</text:p>
          </table:table-cell>
          <table:table-cell office:value-type="float" office:value="-0.1824" calcext:value-type="float">
            <text:p>-0.1824</text:p>
          </table:table-cell>
          <table:table-cell office:value-type="float" office:value="0.4638" calcext:value-type="float">
            <text:p>0.4638</text:p>
          </table:table-cell>
          <table:table-cell office:value-type="float" office:value="-0.5552" calcext:value-type="float">
            <text:p>-0.5552</text:p>
          </table:table-cell>
          <table:table-cell office:value-type="float" office:value="9.8729" calcext:value-type="float">
            <text:p>9.8729</text:p>
          </table:table-cell>
          <table:table-cell office:value-type="float" office:value="-0.1271" calcext:value-type="float">
            <text:p>-0.1271</text:p>
          </table:table-cell>
          <table:table-cell office:value-type="float" office:value="-0.2445" calcext:value-type="float">
            <text:p>-0.2445</text:p>
          </table:table-cell>
          <table:table-cell office:value-type="float" office:value="0.1043" calcext:value-type="float">
            <text:p>0.1043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6823" calcext:value-type="float">
            <text:p>-0.682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0.2445" calcext:value-type="float">
            <text:p>-0.2445</text:p>
          </table:table-cell>
          <table:table-cell office:value-type="float" office:value="0.1043" calcext:value-type="float">
            <text:p>0.1043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6823" calcext:value-type="float">
            <text:p>-0.6823</text:p>
          </table:table-cell>
          <table:table-cell office:value-type="float" office:value="10.5727" calcext:value-type="float">
            <text:p>10.5727</text:p>
          </table:table-cell>
          <table:table-cell office:value-type="float" office:value="0.5727" calcext:value-type="float">
            <text:p>0.5727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0.2486" calcext:value-type="float">
            <text:p>0.2486</text:p>
          </table:table-cell>
          <table:table-cell office:value-type="float" office:value="-0.5509" calcext:value-type="float">
            <text:p>-0.5509</text:p>
          </table:table-cell>
          <table:table-cell office:value-type="float" office:value="-0.1096" calcext:value-type="float">
            <text:p>-0.109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0.2486" calcext:value-type="float">
            <text:p>0.2486</text:p>
          </table:table-cell>
          <table:table-cell office:value-type="float" office:value="-0.5509" calcext:value-type="float">
            <text:p>-0.5509</text:p>
          </table:table-cell>
          <table:table-cell office:value-type="float" office:value="-0.1096" calcext:value-type="float">
            <text:p>-0.1096</text:p>
          </table:table-cell>
          <table:table-cell office:value-type="float" office:value="10.4929" calcext:value-type="float">
            <text:p>10.4929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37" calcext:value-type="float">
            <text:p>0.137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3833" calcext:value-type="float">
            <text:p>0.383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37" calcext:value-type="float">
            <text:p>0.137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3833" calcext:value-type="float">
            <text:p>0.3833</text:p>
          </table:table-cell>
          <table:table-cell office:value-type="float" office:value="10.2231" calcext:value-type="float">
            <text:p>10.2231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1833" calcext:value-type="float">
            <text:p>0.1833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6064" calcext:value-type="float">
            <text:p>0.606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1833" calcext:value-type="float">
            <text:p>0.1833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6064" calcext:value-type="float">
            <text:p>0.6064</text:p>
          </table:table-cell>
          <table:table-cell office:value-type="float" office:value="9.5197" calcext:value-type="float">
            <text:p>9.5197</text:p>
          </table:table-cell>
          <table:table-cell office:value-type="float" office:value="-0.4803" calcext:value-type="float">
            <text:p>-0.4803</text:p>
          </table:table-cell>
          <table:table-cell office:value-type="float" office:value="0.0334" calcext:value-type="float">
            <text:p>0.0334</text:p>
          </table:table-cell>
          <table:table-cell office:value-type="float" office:value="-0.1941" calcext:value-type="float">
            <text:p>-0.1941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1261" calcext:value-type="float">
            <text:p>0.126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0334" calcext:value-type="float">
            <text:p>0.0334</text:p>
          </table:table-cell>
          <table:table-cell office:value-type="float" office:value="-0.1941" calcext:value-type="float">
            <text:p>-0.1941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1261" calcext:value-type="float">
            <text:p>0.1261</text:p>
          </table:table-cell>
          <table:table-cell office:value-type="float" office:value="9.5209" calcext:value-type="float">
            <text:p>9.5209</text:p>
          </table:table-cell>
          <table:table-cell office:value-type="float" office:value="-0.4791" calcext:value-type="float">
            <text:p>-0.4791</text:p>
          </table:table-cell>
          <table:table-cell office:value-type="float" office:value="-0.1249" calcext:value-type="float">
            <text:p>-0.1249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3336" calcext:value-type="float">
            <text:p>0.3336</text:p>
          </table:table-cell>
          <table:table-cell office:value-type="float" office:value="-0.353" calcext:value-type="float">
            <text:p>-0.35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-0.1249" calcext:value-type="float">
            <text:p>-0.1249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3336" calcext:value-type="float">
            <text:p>0.3336</text:p>
          </table:table-cell>
          <table:table-cell office:value-type="float" office:value="-0.353" calcext:value-type="float">
            <text:p>-0.353</text:p>
          </table:table-cell>
          <table:table-cell office:value-type="float" office:value="9.837" calcext:value-type="float">
            <text:p>9.837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372" calcext:value-type="float">
            <text:p>-0.1372</text:p>
          </table:table-cell>
          <table:table-cell office:value-type="float" office:value="0.0784" calcext:value-type="float">
            <text:p>0.0784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5161" calcext:value-type="float">
            <text:p>-0.516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-0.1372" calcext:value-type="float">
            <text:p>-0.1372</text:p>
          </table:table-cell>
          <table:table-cell office:value-type="float" office:value="0.0784" calcext:value-type="float">
            <text:p>0.0784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5161" calcext:value-type="float">
            <text:p>-0.5161</text:p>
          </table:table-cell>
          <table:table-cell office:value-type="float" office:value="10.4053" calcext:value-type="float">
            <text:p>10.4053</text:p>
          </table:table-cell>
          <table:table-cell office:value-type="float" office:value="0.4053" calcext:value-type="float">
            <text:p>0.405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1488" calcext:value-type="float">
            <text:p>0.1488</text:p>
          </table:table-cell>
          <table:table-cell office:value-type="float" office:value="-0.4144" calcext:value-type="float">
            <text:p>-0.4144</text:p>
          </table:table-cell>
          <table:table-cell office:value-type="float" office:value="-0.1108" calcext:value-type="float">
            <text:p>-0.110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1488" calcext:value-type="float">
            <text:p>0.1488</text:p>
          </table:table-cell>
          <table:table-cell office:value-type="float" office:value="-0.4144" calcext:value-type="float">
            <text:p>-0.4144</text:p>
          </table:table-cell>
          <table:table-cell office:value-type="float" office:value="-0.1108" calcext:value-type="float">
            <text:p>-0.1108</text:p>
          </table:table-cell>
          <table:table-cell office:value-type="float" office:value="10.3915" calcext:value-type="float">
            <text:p>10.3915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0606" calcext:value-type="float">
            <text:p>0.0606</text:p>
          </table:table-cell>
          <table:table-cell office:value-type="float" office:value="-0.3294" calcext:value-type="float">
            <text:p>-0.3294</text:p>
          </table:table-cell>
          <table:table-cell office:value-type="float" office:value="0.2807" calcext:value-type="float">
            <text:p>0.280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0606" calcext:value-type="float">
            <text:p>0.0606</text:p>
          </table:table-cell>
          <table:table-cell office:value-type="float" office:value="-0.3294" calcext:value-type="float">
            <text:p>-0.3294</text:p>
          </table:table-cell>
          <table:table-cell office:value-type="float" office:value="0.2807" calcext:value-type="float">
            <text:p>0.2807</text:p>
          </table:table-cell>
          <table:table-cell office:value-type="float" office:value="10.1234" calcext:value-type="float">
            <text:p>10.1234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913" calcext:value-type="float">
            <text:p>0.0913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3" calcext:value-type="float">
            <text:p>0.013</text:p>
          </table:table-cell>
          <table:table-cell office:value-type="float" office:value="0.4041" calcext:value-type="float">
            <text:p>0.404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913" calcext:value-type="float">
            <text:p>0.0913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3" calcext:value-type="float">
            <text:p>0.013</text:p>
          </table:table-cell>
          <table:table-cell office:value-type="float" office:value="0.4041" calcext:value-type="float">
            <text:p>0.4041</text:p>
          </table:table-cell>
          <table:table-cell office:value-type="float" office:value="9.6889" calcext:value-type="float">
            <text:p>9.6889</text:p>
          </table:table-cell>
          <table:table-cell office:value-type="float" office:value="-0.3111" calcext:value-type="float">
            <text:p>-0.3111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1159" calcext:value-type="float">
            <text:p>-0.1159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093" calcext:value-type="float">
            <text:p>0.09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1159" calcext:value-type="float">
            <text:p>-0.1159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093" calcext:value-type="float">
            <text:p>0.093</text:p>
          </table:table-cell>
          <table:table-cell office:value-type="float" office:value="9.6393" calcext:value-type="float">
            <text:p>9.6393</text:p>
          </table:table-cell>
          <table:table-cell office:value-type="float" office:value="-0.3607" calcext:value-type="float">
            <text:p>-0.3607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0.1742" calcext:value-type="float">
            <text:p>0.1742</text:p>
          </table:table-cell>
          <table:table-cell office:value-type="float" office:value="-0.2677" calcext:value-type="float">
            <text:p>-0.267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0.1742" calcext:value-type="float">
            <text:p>0.1742</text:p>
          </table:table-cell>
          <table:table-cell office:value-type="float" office:value="-0.2677" calcext:value-type="float">
            <text:p>-0.2677</text:p>
          </table:table-cell>
          <table:table-cell office:value-type="float" office:value="9.8988" calcext:value-type="float">
            <text:p>9.8988</text:p>
          </table:table-cell>
          <table:table-cell office:value-type="float" office:value="-0.1012" calcext:value-type="float">
            <text:p>-0.1012</text:p>
          </table:table-cell>
          <table:table-cell office:value-type="float" office:value="-0.0716" calcext:value-type="float">
            <text:p>-0.0716</text:p>
          </table:table-cell>
          <table:table-cell office:value-type="float" office:value="0.0717" calcext:value-type="float">
            <text:p>0.0717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3689" calcext:value-type="float">
            <text:p>-0.368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-0.0716" calcext:value-type="float">
            <text:p>-0.0716</text:p>
          </table:table-cell>
          <table:table-cell office:value-type="float" office:value="0.0717" calcext:value-type="float">
            <text:p>0.0717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3689" calcext:value-type="float">
            <text:p>-0.3689</text:p>
          </table:table-cell>
          <table:table-cell office:value-type="float" office:value="10.3202" calcext:value-type="float">
            <text:p>10.3202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866" calcext:value-type="float">
            <text:p>0.0866</text:p>
          </table:table-cell>
          <table:table-cell office:value-type="float" office:value="-0.3528" calcext:value-type="float">
            <text:p>-0.3528</text:p>
          </table:table-cell>
          <table:table-cell office:value-type="float" office:value="-0.0487" calcext:value-type="float">
            <text:p>-0.048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866" calcext:value-type="float">
            <text:p>0.0866</text:p>
          </table:table-cell>
          <table:table-cell office:value-type="float" office:value="-0.3528" calcext:value-type="float">
            <text:p>-0.3528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10.3042" calcext:value-type="float">
            <text:p>10.3042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2494" calcext:value-type="float">
            <text:p>-0.2494</text:p>
          </table:table-cell>
          <table:table-cell office:value-type="float" office:value="0.2555" calcext:value-type="float">
            <text:p>0.255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2494" calcext:value-type="float">
            <text:p>-0.2494</text:p>
          </table:table-cell>
          <table:table-cell office:value-type="float" office:value="0.2555" calcext:value-type="float">
            <text:p>0.2555</text:p>
          </table:table-cell>
          <table:table-cell office:value-type="float" office:value="10.0059" calcext:value-type="float">
            <text:p>10.0059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319" calcext:value-type="float">
            <text:p>0.0319</text:p>
          </table:table-cell>
          <table:table-cell office:value-type="float" office:value="-0.0694" calcext:value-type="float">
            <text:p>-0.0694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14" calcext:value-type="float">
            <text:p>0.261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0319" calcext:value-type="float">
            <text:p>0.0319</text:p>
          </table:table-cell>
          <table:table-cell office:value-type="float" office:value="-0.0694" calcext:value-type="float">
            <text:p>-0.0694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14" calcext:value-type="float">
            <text:p>0.2614</text:p>
          </table:table-cell>
          <table:table-cell office:value-type="float" office:value="9.7265" calcext:value-type="float">
            <text:p>9.7265</text:p>
          </table:table-cell>
          <table:table-cell office:value-type="float" office:value="-0.2735" calcext:value-type="float">
            <text:p>-0.2735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1337" calcext:value-type="float">
            <text:p>0.1337</text:p>
          </table:table-cell>
          <table:table-cell office:value-type="float" office:value="-0.0121" calcext:value-type="float">
            <text:p>-0.012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1337" calcext:value-type="float">
            <text:p>0.1337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9.774" calcext:value-type="float">
            <text:p>9.774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2382" calcext:value-type="float">
            <text:p>-0.238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2382" calcext:value-type="float">
            <text:p>-0.2382</text:p>
          </table:table-cell>
          <table:table-cell office:value-type="float" office:value="10.0002" calcext:value-type="float">
            <text:p>10.0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0623" calcext:value-type="float">
            <text:p>0.0623</text:p>
          </table:table-cell>
          <table:table-cell office:value-type="float" office:value="-0.2295" calcext:value-type="float">
            <text:p>-0.2295</text:p>
          </table:table-cell>
          <table:table-cell office:value-type="float" office:value="-0.238" calcext:value-type="float">
            <text:p>-0.23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0623" calcext:value-type="float">
            <text:p>0.0623</text:p>
          </table:table-cell>
          <table:table-cell office:value-type="float" office:value="-0.2295" calcext:value-type="float">
            <text:p>-0.2295</text:p>
          </table:table-cell>
          <table:table-cell office:value-type="float" office:value="-0.238" calcext:value-type="float">
            <text:p>-0.238</text:p>
          </table:table-cell>
          <table:table-cell office:value-type="float" office:value="10.2642" calcext:value-type="float">
            <text:p>10.2642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411" calcext:value-type="float">
            <text:p>0.0411</text:p>
          </table:table-cell>
          <table:table-cell office:value-type="float" office:value="-0.3354" calcext:value-type="float">
            <text:p>-0.3354</text:p>
          </table:table-cell>
          <table:table-cell office:value-type="float" office:value="0.0262" calcext:value-type="float">
            <text:p>0.026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411" calcext:value-type="float">
            <text:p>0.0411</text:p>
          </table:table-cell>
          <table:table-cell office:value-type="float" office:value="-0.3354" calcext:value-type="float">
            <text:p>-0.3354</text:p>
          </table:table-cell>
          <table:table-cell office:value-type="float" office:value="0.0262" calcext:value-type="float">
            <text:p>0.0262</text:p>
          </table:table-cell>
          <table:table-cell office:value-type="float" office:value="10.2099" calcext:value-type="float">
            <text:p>10.2099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0327" calcext:value-type="float">
            <text:p>0.0327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2043" calcext:value-type="float">
            <text:p>-0.2043</text:p>
          </table:table-cell>
          <table:table-cell office:value-type="float" office:value="0.2361" calcext:value-type="float">
            <text:p>0.236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.0327" calcext:value-type="float">
            <text:p>0.0327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2043" calcext:value-type="float">
            <text:p>-0.2043</text:p>
          </table:table-cell>
          <table:table-cell office:value-type="float" office:value="0.2361" calcext:value-type="float">
            <text:p>0.2361</text:p>
          </table:table-cell>
          <table:table-cell office:value-type="float" office:value="9.9171" calcext:value-type="float">
            <text:p>9.9171</text:p>
          </table:table-cell>
          <table:table-cell office:value-type="float" office:value="-0.0829" calcext:value-type="float">
            <text:p>-0.0829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1532" calcext:value-type="float">
            <text:p>0.153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1532" calcext:value-type="float">
            <text:p>0.1532</text:p>
          </table:table-cell>
          <table:table-cell office:value-type="float" office:value="9.7687" calcext:value-type="float">
            <text:p>9.7687</text:p>
          </table:table-cell>
          <table:table-cell office:value-type="float" office:value="-0.2313" calcext:value-type="float">
            <text:p>-0.2313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781" calcext:value-type="float">
            <text:p>-0.078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781" calcext:value-type="float">
            <text:p>-0.0781</text:p>
          </table:table-cell>
          <table:table-cell office:value-type="float" office:value="9.8731" calcext:value-type="float">
            <text:p>9.8731</text:p>
          </table:table-cell>
          <table:table-cell office:value-type="float" office:value="-0.1269" calcext:value-type="float">
            <text:p>-0.1269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337" calcext:value-type="float">
            <text:p>0.0337</text:p>
          </table:table-cell>
          <table:table-cell office:value-type="float" office:value="-0.1136" calcext:value-type="float">
            <text:p>-0.1136</text:p>
          </table:table-cell>
          <table:table-cell office:value-type="float" office:value="-0.205" calcext:value-type="float">
            <text:p>-0.20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337" calcext:value-type="float">
            <text:p>0.0337</text:p>
          </table:table-cell>
          <table:table-cell office:value-type="float" office:value="-0.1136" calcext:value-type="float">
            <text:p>-0.1136</text:p>
          </table:table-cell>
          <table:table-cell office:value-type="float" office:value="-0.205" calcext:value-type="float">
            <text:p>-0.205</text:p>
          </table:table-cell>
          <table:table-cell office:value-type="float" office:value="10.1004" calcext:value-type="float">
            <text:p>10.10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0486" calcext:value-type="float">
            <text:p>0.0486</text:p>
          </table:table-cell>
          <table:table-cell office:value-type="float" office:value="-0.2684" calcext:value-type="float">
            <text:p>-0.2684</text:p>
          </table:table-cell>
          <table:table-cell office:value-type="float" office:value="-0.1046" calcext:value-type="float">
            <text:p>-0.104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0486" calcext:value-type="float">
            <text:p>0.0486</text:p>
          </table:table-cell>
          <table:table-cell office:value-type="float" office:value="-0.2684" calcext:value-type="float">
            <text:p>-0.2684</text:p>
          </table:table-cell>
          <table:table-cell office:value-type="float" office:value="-0.1046" calcext:value-type="float">
            <text:p>-0.1046</text:p>
          </table:table-cell>
          <table:table-cell office:value-type="float" office:value="10.2291" calcext:value-type="float">
            <text:p>10.2291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2584" calcext:value-type="float">
            <text:p>-0.2584</text:p>
          </table:table-cell>
          <table:table-cell office:value-type="float" office:value="0.1245" calcext:value-type="float">
            <text:p>0.124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2584" calcext:value-type="float">
            <text:p>-0.2584</text:p>
          </table:table-cell>
          <table:table-cell office:value-type="float" office:value="0.1245" calcext:value-type="float">
            <text:p>0.1245</text:p>
          </table:table-cell>
          <table:table-cell office:value-type="float" office:value="10.0601" calcext:value-type="float">
            <text:p>10.060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101" calcext:value-type="float">
            <text:p>0.0101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0.1846" calcext:value-type="float">
            <text:p>0.184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0.0101" calcext:value-type="float">
            <text:p>0.0101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0.1846" calcext:value-type="float">
            <text:p>0.1846</text:p>
          </table:table-cell>
          <table:table-cell office:value-type="float" office:value="9.8539" calcext:value-type="float">
            <text:p>9.8539</text:p>
          </table:table-cell>
          <table:table-cell office:value-type="float" office:value="-0.1461" calcext:value-type="float">
            <text:p>-0.1461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385" calcext:value-type="float">
            <text:p>0.038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385" calcext:value-type="float">
            <text:p>0.0385</text:p>
          </table:table-cell>
          <table:table-cell office:value-type="float" office:value="9.8285" calcext:value-type="float">
            <text:p>9.8285</text:p>
          </table:table-cell>
          <table:table-cell office:value-type="float" office:value="-0.1715" calcext:value-type="float">
            <text:p>-0.1715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-0.133" calcext:value-type="float">
            <text:p>-0.13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-0.133" calcext:value-type="float">
            <text:p>-0.133</text:p>
          </table:table-cell>
          <table:table-cell office:value-type="float" office:value="9.9779" calcext:value-type="float">
            <text:p>9.9779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039" calcext:value-type="float">
            <text:p>0.039</text:p>
          </table:table-cell>
          <table:table-cell office:value-type="float" office:value="-0.1837" calcext:value-type="float">
            <text:p>-0.1837</text:p>
          </table:table-cell>
          <table:table-cell office:value-type="float" office:value="-0.1551" calcext:value-type="float">
            <text:p>-0.155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039" calcext:value-type="float">
            <text:p>0.039</text:p>
          </table:table-cell>
          <table:table-cell office:value-type="float" office:value="-0.1837" calcext:value-type="float">
            <text:p>-0.1837</text:p>
          </table:table-cell>
          <table:table-cell office:value-type="float" office:value="-0.1551" calcext:value-type="float">
            <text:p>-0.1551</text:p>
          </table:table-cell>
          <table:table-cell office:value-type="float" office:value="10.1607" calcext:value-type="float">
            <text:p>10.1607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62" calcext:value-type="float">
            <text:p>0.0262</text:p>
          </table:table-cell>
          <table:table-cell office:value-type="float" office:value="-0.2585" calcext:value-type="float">
            <text:p>-0.2585</text:p>
          </table:table-cell>
          <table:table-cell office:value-type="float" office:value="0.0056" calcext:value-type="float">
            <text:p>0.005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62" calcext:value-type="float">
            <text:p>0.0262</text:p>
          </table:table-cell>
          <table:table-cell office:value-type="float" office:value="-0.2585" calcext:value-type="float">
            <text:p>-0.2585</text:p>
          </table:table-cell>
          <table:table-cell office:value-type="float" office:value="0.0056" calcext:value-type="float">
            <text:p>0.0056</text:p>
          </table:table-cell>
          <table:table-cell office:value-type="float" office:value="10.1436" calcext:value-type="float">
            <text:p>10.1436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1811" calcext:value-type="float">
            <text:p>-0.1811</text:p>
          </table:table-cell>
          <table:table-cell office:value-type="float" office:value="0.1492" calcext:value-type="float">
            <text:p>0.149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1811" calcext:value-type="float">
            <text:p>-0.1811</text:p>
          </table:table-cell>
          <table:table-cell office:value-type="float" office:value="0.1492" calcext:value-type="float">
            <text:p>0.1492</text:p>
          </table:table-cell>
          <table:table-cell office:value-type="float" office:value="9.9645" calcext:value-type="float">
            <text:p>9.9645</text:p>
          </table:table-cell>
          <table:table-cell office:value-type="float" office:value="-0.0355" calcext:value-type="float">
            <text:p>-0.0355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0.1136" calcext:value-type="float">
            <text:p>0.113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0.1136" calcext:value-type="float">
            <text:p>0.1136</text:p>
          </table:table-cell>
          <table:table-cell office:value-type="float" office:value="9.8439" calcext:value-type="float">
            <text:p>9.8439</text:p>
          </table:table-cell>
          <table:table-cell office:value-type="float" office:value="-0.1561" calcext:value-type="float">
            <text:p>-0.1561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424" calcext:value-type="float">
            <text:p>-0.042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424" calcext:value-type="float">
            <text:p>-0.0424</text:p>
          </table:table-cell>
          <table:table-cell office:value-type="float" office:value="9.9017" calcext:value-type="float">
            <text:p>9.9017</text:p>
          </table:table-cell>
          <table:table-cell office:value-type="float" office:value="-0.0983" calcext:value-type="float">
            <text:p>-0.0983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0.0226" calcext:value-type="float">
            <text:p>0.0226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-0.1407" calcext:value-type="float">
            <text:p>-0.140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0.0226" calcext:value-type="float">
            <text:p>0.0226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-0.1407" calcext:value-type="float">
            <text:p>-0.1407</text:p>
          </table:table-cell>
          <table:table-cell office:value-type="float" office:value="10.0605" calcext:value-type="float">
            <text:p>10.0605</text:p>
          </table:table-cell>
          <table:table-cell office:value-type="float" office:value="0.0605" calcext:value-type="float">
            <text:p>0.0605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0.0319" calcext:value-type="float">
            <text:p>0.0319</text:p>
          </table:table-cell>
          <table:table-cell office:value-type="float" office:value="-0.2161" calcext:value-type="float">
            <text:p>-0.2161</text:p>
          </table:table-cell>
          <table:table-cell office:value-type="float" office:value="-0.0802" calcext:value-type="float">
            <text:p>-0.080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0.0319" calcext:value-type="float">
            <text:p>0.0319</text:p>
          </table:table-cell>
          <table:table-cell office:value-type="float" office:value="-0.2161" calcext:value-type="float">
            <text:p>-0.2161</text:p>
          </table:table-cell>
          <table:table-cell office:value-type="float" office:value="-0.0802" calcext:value-type="float">
            <text:p>-0.0802</text:p>
          </table:table-cell>
          <table:table-cell office:value-type="float" office:value="10.1564" calcext:value-type="float">
            <text:p>10.156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2181" calcext:value-type="float">
            <text:p>-0.2181</text:p>
          </table:table-cell>
          <table:table-cell office:value-type="float" office:value="0.0762" calcext:value-type="float">
            <text:p>0.076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2181" calcext:value-type="float">
            <text:p>-0.2181</text:p>
          </table:table-cell>
          <table:table-cell office:value-type="float" office:value="0.0762" calcext:value-type="float">
            <text:p>0.0762</text:p>
          </table:table-cell>
          <table:table-cell office:value-type="float" office:value="10.0482" calcext:value-type="float">
            <text:p>10.0482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1178" calcext:value-type="float">
            <text:p>-0.1178</text:p>
          </table:table-cell>
          <table:table-cell office:value-type="float" office:value="0.1244" calcext:value-type="float">
            <text:p>0.124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1178" calcext:value-type="float">
            <text:p>-0.1178</text:p>
          </table:table-cell>
          <table:table-cell office:value-type="float" office:value="0.1244" calcext:value-type="float">
            <text:p>0.1244</text:p>
          </table:table-cell>
          <table:table-cell office:value-type="float" office:value="9.9083" calcext:value-type="float">
            <text:p>9.9083</text:p>
          </table:table-cell>
          <table:table-cell office:value-type="float" office:value="-0.0917" calcext:value-type="float">
            <text:p>-0.0917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327" calcext:value-type="float">
            <text:p>0.032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327" calcext:value-type="float">
            <text:p>0.0327</text:p>
          </table:table-cell>
          <table:table-cell office:value-type="float" office:value="9.8729" calcext:value-type="float">
            <text:p>9.8729</text:p>
          </table:table-cell>
          <table:table-cell office:value-type="float" office:value="-0.1271" calcext:value-type="float">
            <text:p>-0.1271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0.0046" calcext:value-type="float">
            <text:p>0.0046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-0.0945" calcext:value-type="float">
            <text:p>-0.0945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0.0046" calcext:value-type="float">
            <text:p>0.0046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-0.0945" calcext:value-type="float">
            <text:p>-0.0945</text:p>
          </table:table-cell>
          <table:table-cell office:value-type="float" office:value="9.9816" calcext:value-type="float">
            <text:p>9.9816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0278" calcext:value-type="float">
            <text:p>0.0278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-0.1129" calcext:value-type="float">
            <text:p>-0.112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0278" calcext:value-type="float">
            <text:p>0.0278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-0.1129" calcext:value-type="float">
            <text:p>-0.1129</text:p>
          </table:table-cell>
          <table:table-cell office:value-type="float" office:value="10.1189" calcext:value-type="float">
            <text:p>10.1189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2273" calcext:value-type="float">
            <text:p>-0.2273</text:p>
          </table:table-cell>
          <table:table-cell office:value-type="float" office:value="0.006" calcext:value-type="float">
            <text:p>0.00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2273" calcext:value-type="float">
            <text:p>-0.2273</text:p>
          </table:table-cell>
          <table:table-cell office:value-type="float" office:value="0.006" calcext:value-type="float">
            <text:p>0.006</text:p>
          </table:table-cell>
          <table:table-cell office:value-type="float" office:value="10.1024" calcext:value-type="float">
            <text:p>10.1024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068" calcext:value-type="float">
            <text:p>0.0068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1084" calcext:value-type="float">
            <text:p>0.108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.0068" calcext:value-type="float">
            <text:p>0.0068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1084" calcext:value-type="float">
            <text:p>0.1084</text:p>
          </table:table-cell>
          <table:table-cell office:value-type="float" office:value="9.9719" calcext:value-type="float">
            <text:p>9.9719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-0.0758" calcext:value-type="float">
            <text:p>-0.0758</text:p>
          </table:table-cell>
          <table:table-cell office:value-type="float" office:value="0.0803" calcext:value-type="float">
            <text:p>0.080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-0.0758" calcext:value-type="float">
            <text:p>-0.0758</text:p>
          </table:table-cell>
          <table:table-cell office:value-type="float" office:value="0.0803" calcext:value-type="float">
            <text:p>0.0803</text:p>
          </table:table-cell>
          <table:table-cell office:value-type="float" office:value="9.8866" calcext:value-type="float">
            <text:p>9.8866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522" calcext:value-type="float">
            <text:p>-0.0522</text:p>
          </table:table-cell>
          <table:table-cell office:value-type="float" office:value="-0.0331" calcext:value-type="float">
            <text:p>-0.033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522" calcext:value-type="float">
            <text:p>-0.0522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9.9278" calcext:value-type="float">
            <text:p>9.9278</text:p>
          </table:table-cell>
          <table:table-cell office:value-type="float" office:value="-0.0722" calcext:value-type="float">
            <text:p>-0.0722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0172" calcext:value-type="float">
            <text:p>0.0172</text:p>
          </table:table-cell>
          <table:table-cell office:value-type="float" office:value="-0.1215" calcext:value-type="float">
            <text:p>-0.1215</text:p>
          </table:table-cell>
          <table:table-cell office:value-type="float" office:value="-0.1053" calcext:value-type="float">
            <text:p>-0.105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0172" calcext:value-type="float">
            <text:p>0.0172</text:p>
          </table:table-cell>
          <table:table-cell office:value-type="float" office:value="-0.1215" calcext:value-type="float">
            <text:p>-0.1215</text:p>
          </table:table-cell>
          <table:table-cell office:value-type="float" office:value="-0.1053" calcext:value-type="float">
            <text:p>-0.1053</text:p>
          </table:table-cell>
          <table:table-cell office:value-type="float" office:value="10.0516" calcext:value-type="float">
            <text:p>10.0516</text:p>
          </table:table-cell>
          <table:table-cell office:value-type="float" office:value="0.0516" calcext:value-type="float">
            <text:p>0.051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0537" calcext:value-type="float">
            <text:p>-0.053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10.1137" calcext:value-type="float">
            <text:p>10.1137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1978" calcext:value-type="float">
            <text:p>-0.1978</text:p>
          </table:table-cell>
          <table:table-cell office:value-type="float" office:value="0.06" calcext:value-type="float">
            <text:p>0.0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1978" calcext:value-type="float">
            <text:p>-0.1978</text:p>
          </table:table-cell>
          <table:table-cell office:value-type="float" office:value="0.06" calcext:value-type="float">
            <text:p>0.06</text:p>
          </table:table-cell>
          <table:table-cell office:value-type="float" office:value="10.0302" calcext:value-type="float">
            <text:p>10.0302</text:p>
          </table:table-cell>
          <table:table-cell office:value-type="float" office:value="0.0302" calcext:value-type="float">
            <text:p>0.03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1228" calcext:value-type="float">
            <text:p>-0.1228</text:p>
          </table:table-cell>
          <table:table-cell office:value-type="float" office:value="0.0902" calcext:value-type="float">
            <text:p>0.090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1228" calcext:value-type="float">
            <text:p>-0.1228</text:p>
          </table:table-cell>
          <table:table-cell office:value-type="float" office:value="0.0902" calcext:value-type="float">
            <text:p>0.0902</text:p>
          </table:table-cell>
          <table:table-cell office:value-type="float" office:value="9.9294" calcext:value-type="float">
            <text:p>9.9294</text:p>
          </table:table-cell>
          <table:table-cell office:value-type="float" office:value="-0.0706" calcext:value-type="float">
            <text:p>-0.0706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0.0679" calcext:value-type="float">
            <text:p>-0.0679</text:p>
          </table:table-cell>
          <table:table-cell office:value-type="float" office:value="0.0196" calcext:value-type="float">
            <text:p>0.019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0.0679" calcext:value-type="float">
            <text:p>-0.0679</text:p>
          </table:table-cell>
          <table:table-cell office:value-type="float" office:value="0.0196" calcext:value-type="float">
            <text:p>0.0196</text:p>
          </table:table-cell>
          <table:table-cell office:value-type="float" office:value="9.9092" calcext:value-type="float">
            <text:p>9.9092</text:p>
          </table:table-cell>
          <table:table-cell office:value-type="float" office:value="-0.0908" calcext:value-type="float">
            <text:p>-0.0908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0.0047" calcext:value-type="float">
            <text:p>0.0047</text:p>
          </table:table-cell>
          <table:table-cell office:value-type="float" office:value="-0.0937" calcext:value-type="float">
            <text:p>-0.0937</text:p>
          </table:table-cell>
          <table:table-cell office:value-type="float" office:value="-0.0712" calcext:value-type="float">
            <text:p>-0.071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0.0047" calcext:value-type="float">
            <text:p>0.0047</text:p>
          </table:table-cell>
          <table:table-cell office:value-type="float" office:value="-0.0937" calcext:value-type="float">
            <text:p>-0.0937</text:p>
          </table:table-cell>
          <table:table-cell office:value-type="float" office:value="-0.0712" calcext:value-type="float">
            <text:p>-0.0712</text:p>
          </table:table-cell>
          <table:table-cell office:value-type="float" office:value="9.9913" calcext:value-type="float">
            <text:p>9.9913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692" calcext:value-type="float">
            <text:p>-0.1692</text:p>
          </table:table-cell>
          <table:table-cell office:value-type="float" office:value="-0.0799" calcext:value-type="float">
            <text:p>-0.079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692" calcext:value-type="float">
            <text:p>-0.1692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10.089" calcext:value-type="float">
            <text:p>10.089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18" calcext:value-type="float">
            <text:p>0.0118</text:p>
          </table:table-cell>
          <table:table-cell office:value-type="float" office:value="-0.2046" calcext:value-type="float">
            <text:p>-0.2046</text:p>
          </table:table-cell>
          <table:table-cell office:value-type="float" office:value="0.0091" calcext:value-type="float">
            <text:p>0.009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18" calcext:value-type="float">
            <text:p>0.0118</text:p>
          </table:table-cell>
          <table:table-cell office:value-type="float" office:value="-0.2046" calcext:value-type="float">
            <text:p>-0.2046</text:p>
          </table:table-cell>
          <table:table-cell office:value-type="float" office:value="0.0091" calcext:value-type="float">
            <text:p>0.0091</text:p>
          </table:table-cell>
          <table:table-cell office:value-type="float" office:value="10.0707" calcext:value-type="float">
            <text:p>10.070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1602" calcext:value-type="float">
            <text:p>-0.1602</text:p>
          </table:table-cell>
          <table:table-cell office:value-type="float" office:value="0.0798" calcext:value-type="float">
            <text:p>0.079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1602" calcext:value-type="float">
            <text:p>-0.1602</text:p>
          </table:table-cell>
          <table:table-cell office:value-type="float" office:value="0.0798" calcext:value-type="float">
            <text:p>0.0798</text:p>
          </table:table-cell>
          <table:table-cell office:value-type="float" office:value="9.9755" calcext:value-type="float">
            <text:p>9.9755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0.0552" calcext:value-type="float">
            <text:p>0.055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0.0552" calcext:value-type="float">
            <text:p>0.0552</text:p>
          </table:table-cell>
          <table:table-cell office:value-type="float" office:value="9.9165" calcext:value-type="float">
            <text:p>9.9165</text:p>
          </table:table-cell>
          <table:table-cell office:value-type="float" office:value="-0.0835" calcext:value-type="float">
            <text:p>-0.0835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793" calcext:value-type="float">
            <text:p>-0.0793</text:p>
          </table:table-cell>
          <table:table-cell office:value-type="float" office:value="-0.0283" calcext:value-type="float">
            <text:p>-0.028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793" calcext:value-type="float">
            <text:p>-0.0793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9.9513" calcext:value-type="float">
            <text:p>9.9513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0133" calcext:value-type="float">
            <text:p>0.0133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771" calcext:value-type="float">
            <text:p>-0.077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0133" calcext:value-type="float">
            <text:p>0.0133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771" calcext:value-type="float">
            <text:p>-0.0771</text:p>
          </table:table-cell>
          <table:table-cell office:value-type="float" office:value="10.042" calcext:value-type="float">
            <text:p>10.042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0161" calcext:value-type="float">
            <text:p>0.0161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0351" calcext:value-type="float">
            <text:p>-0.035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0161" calcext:value-type="float">
            <text:p>0.0161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10.0821" calcext:value-type="float">
            <text:p>10.0821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" calcext:value-type="float">
            <text:p>0</text:p>
          </table:table-cell>
          <table:table-cell office:value-type="float" office:value="-0.1821" calcext:value-type="float">
            <text:p>-0.1821</text:p>
          </table:table-cell>
          <table:table-cell office:value-type="float" office:value="0.047" calcext:value-type="float">
            <text:p>0.04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" calcext:value-type="float">
            <text:p>0</text:p>
          </table:table-cell>
          <table:table-cell office:value-type="float" office:value="-0.1821" calcext:value-type="float">
            <text:p>-0.1821</text:p>
          </table:table-cell>
          <table:table-cell office:value-type="float" office:value="0.047" calcext:value-type="float">
            <text:p>0.047</text:p>
          </table:table-cell>
          <table:table-cell office:value-type="float" office:value="10.0184" calcext:value-type="float">
            <text:p>10.0184</text:p>
          </table:table-cell>
          <table:table-cell office:value-type="float" office:value="0.0184" calcext:value-type="float">
            <text:p>0.018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1259" calcext:value-type="float">
            <text:p>-0.1259</text:p>
          </table:table-cell>
          <table:table-cell office:value-type="float" office:value="0.0654" calcext:value-type="float">
            <text:p>0.065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1259" calcext:value-type="float">
            <text:p>-0.1259</text:p>
          </table:table-cell>
          <table:table-cell office:value-type="float" office:value="0.0654" calcext:value-type="float">
            <text:p>0.0654</text:p>
          </table:table-cell>
          <table:table-cell office:value-type="float" office:value="9.9455" calcext:value-type="float">
            <text:p>9.9455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877" calcext:value-type="float">
            <text:p>-0.0877</text:p>
          </table:table-cell>
          <table:table-cell office:value-type="float" office:value="0.0109" calcext:value-type="float">
            <text:p>0.010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877" calcext:value-type="float">
            <text:p>-0.0877</text:p>
          </table:table-cell>
          <table:table-cell office:value-type="float" office:value="0.0109" calcext:value-type="float">
            <text:p>0.0109</text:p>
          </table:table-cell>
          <table:table-cell office:value-type="float" office:value="9.9347" calcext:value-type="float">
            <text:p>9.9347</text:p>
          </table:table-cell>
          <table:table-cell office:value-type="float" office:value="-0.0653" calcext:value-type="float">
            <text:p>-0.0653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1095" calcext:value-type="float">
            <text:p>-0.1095</text:p>
          </table:table-cell>
          <table:table-cell office:value-type="float" office:value="-0.0544" calcext:value-type="float">
            <text:p>-0.054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1095" calcext:value-type="float">
            <text:p>-0.1095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9.9976" calcext:value-type="float">
            <text:p>9.9976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1651" calcext:value-type="float">
            <text:p>-0.1651</text:p>
          </table:table-cell>
          <table:table-cell office:value-type="float" office:value="-0.0569" calcext:value-type="float">
            <text:p>-0.056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1651" calcext:value-type="float">
            <text:p>-0.1651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10.0667" calcext:value-type="float">
            <text:p>10.0667</text:p>
          </table:table-cell>
          <table:table-cell office:value-type="float" office:value="0.0667" calcext:value-type="float">
            <text:p>0.0667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0.0099" calcext:value-type="float">
            <text:p>0.009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0.0099" calcext:value-type="float">
            <text:p>0.0099</text:p>
          </table:table-cell>
          <table:table-cell office:value-type="float" office:value="10.0491" calcext:value-type="float">
            <text:p>10.0491</text:p>
          </table:table-cell>
          <table:table-cell office:value-type="float" office:value="0.0491" calcext:value-type="float">
            <text:p>0.0491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1542" calcext:value-type="float">
            <text:p>-0.1542</text:p>
          </table:table-cell>
          <table:table-cell office:value-type="float" office:value="0.059" calcext:value-type="float">
            <text:p>0.059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1542" calcext:value-type="float">
            <text:p>-0.1542</text:p>
          </table:table-cell>
          <table:table-cell office:value-type="float" office:value="0.059" calcext:value-type="float">
            <text:p>0.059</text:p>
          </table:table-cell>
          <table:table-cell office:value-type="float" office:value="9.9793" calcext:value-type="float">
            <text:p>9.9793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1055" calcext:value-type="float">
            <text:p>-0.1055</text:p>
          </table:table-cell>
          <table:table-cell office:value-type="float" office:value="0.0383" calcext:value-type="float">
            <text:p>0.0383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1055" calcext:value-type="float">
            <text:p>-0.1055</text:p>
          </table:table-cell>
          <table:table-cell office:value-type="float" office:value="0.0383" calcext:value-type="float">
            <text:p>0.0383</text:p>
          </table:table-cell>
          <table:table-cell office:value-type="float" office:value="9.9381" calcext:value-type="float">
            <text:p>9.9381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981" calcext:value-type="float">
            <text:p>-0.0981</text:p>
          </table:table-cell>
          <table:table-cell office:value-type="float" office:value="-0.0236" calcext:value-type="float">
            <text:p>-0.023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981" calcext:value-type="float">
            <text:p>-0.0981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9.9669" calcext:value-type="float">
            <text:p>9.9669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1383" calcext:value-type="float">
            <text:p>-0.1383</text:p>
          </table:table-cell>
          <table:table-cell office:value-type="float" office:value="-0.0567" calcext:value-type="float">
            <text:p>-0.056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1383" calcext:value-type="float">
            <text:p>-0.1383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10.0336" calcext:value-type="float">
            <text:p>10.0336</text:p>
          </table:table-cell>
          <table:table-cell office:value-type="float" office:value="0.0336" calcext:value-type="float">
            <text:p>0.0336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782" calcext:value-type="float">
            <text:p>-0.1782</text:p>
          </table:table-cell>
          <table:table-cell office:value-type="float" office:value="-0.0231" calcext:value-type="float">
            <text:p>-0.0231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1782" calcext:value-type="float">
            <text:p>-0.1782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10.0597" calcext:value-type="float">
            <text:p>10.0597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1714" calcext:value-type="float">
            <text:p>-0.1714</text:p>
          </table:table-cell>
          <table:table-cell office:value-type="float" office:value="0.0366" calcext:value-type="float">
            <text:p>0.0366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1714" calcext:value-type="float">
            <text:p>-0.1714</text:p>
          </table:table-cell>
          <table:table-cell office:value-type="float" office:value="0.0366" calcext:value-type="float">
            <text:p>0.0366</text:p>
          </table:table-cell>
          <table:table-cell office:value-type="float" office:value="10.0113" calcext:value-type="float">
            <text:p>10.0113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1291" calcext:value-type="float">
            <text:p>-0.1291</text:p>
          </table:table-cell>
          <table:table-cell office:value-type="float" office:value="0.048" calcext:value-type="float">
            <text:p>0.04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1291" calcext:value-type="float">
            <text:p>-0.1291</text:p>
          </table:table-cell>
          <table:table-cell office:value-type="float" office:value="0.048" calcext:value-type="float">
            <text:p>0.048</text:p>
          </table:table-cell>
          <table:table-cell office:value-type="float" office:value="9.9577" calcext:value-type="float">
            <text:p>9.9577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0.0057" calcext:value-type="float">
            <text:p>0.005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0.0057" calcext:value-type="float">
            <text:p>0.0057</text:p>
          </table:table-cell>
          <table:table-cell office:value-type="float" office:value="9.9527" calcext:value-type="float">
            <text:p>9.9527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1203" calcext:value-type="float">
            <text:p>-0.1203</text:p>
          </table:table-cell>
          <table:table-cell office:value-type="float" office:value="-0.0417" calcext:value-type="float">
            <text:p>-0.041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1203" calcext:value-type="float">
            <text:p>-0.1203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10.0009" calcext:value-type="float">
            <text:p>1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615" calcext:value-type="float">
            <text:p>-0.1615</text:p>
          </table:table-cell>
          <table:table-cell office:value-type="float" office:value="-0.0408" calcext:value-type="float">
            <text:p>-0.040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615" calcext:value-type="float">
            <text:p>-0.1615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10.0502" calcext:value-type="float">
            <text:p>10.0502</text:p>
          </table:table-cell>
          <table:table-cell office:value-type="float" office:value="0.0502" calcext:value-type="float">
            <text:p>0.0502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1772" calcext:value-type="float">
            <text:p>-0.1772</text:p>
          </table:table-cell>
          <table:table-cell office:value-type="float" office:value="0.0094" calcext:value-type="float">
            <text:p>0.0094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1772" calcext:value-type="float">
            <text:p>-0.17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10.0345" calcext:value-type="float">
            <text:p>10.0345</text:p>
          </table:table-cell>
          <table:table-cell office:value-type="float" office:value="0.0345" calcext:value-type="float">
            <text:p>0.0345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-0.1506" calcext:value-type="float">
            <text:p>-0.1506</text:p>
          </table:table-cell>
          <table:table-cell office:value-type="float" office:value="0.0438" calcext:value-type="float">
            <text:p>0.0438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-0.1506" calcext:value-type="float">
            <text:p>-0.1506</text:p>
          </table:table-cell>
          <table:table-cell office:value-type="float" office:value="0.0438" calcext:value-type="float">
            <text:p>0.0438</text:p>
          </table:table-cell>
          <table:table-cell office:value-type="float" office:value="9.9831" calcext:value-type="float">
            <text:p>9.9831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1152" calcext:value-type="float">
            <text:p>-0.1152</text:p>
          </table:table-cell>
          <table:table-cell office:value-type="float" office:value="0.027" calcext:value-type="float">
            <text:p>0.027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1152" calcext:value-type="float">
            <text:p>-0.1152</text:p>
          </table:table-cell>
          <table:table-cell office:value-type="float" office:value="0.027" calcext:value-type="float">
            <text:p>0.027</text:p>
          </table:table-cell>
          <table:table-cell office:value-type="float" office:value="9.9538" calcext:value-type="float">
            <text:p>9.9538</text:p>
          </table:table-cell>
          <table:table-cell office:value-type="float" office:value="-0.0462" calcext:value-type="float">
            <text:p>-0.0462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-0.0192" calcext:value-type="float">
            <text:p>-0.019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9.9772" calcext:value-type="float">
            <text:p>9.9772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42" calcext:value-type="float">
            <text:p>-0.042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42" calcext:value-type="float">
            <text:p>-0.042</text:p>
          </table:table-cell>
          <table:table-cell office:value-type="float" office:value="10.0266" calcext:value-type="float">
            <text:p>10.0266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1707" calcext:value-type="float">
            <text:p>-0.1707</text:p>
          </table:table-cell>
          <table:table-cell office:value-type="float" office:value="-0.0154" calcext:value-type="float">
            <text:p>-0.015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-0.6652" calcext:value-type="float">
            <text:p>-0.6652</text:p>
          </table:table-cell>
          <table:table-cell office:value-type="float" office:value="-0.3611" calcext:value-type="float">
            <text:p>-0.3611</text:p>
          </table:table-cell>
          <table:table-cell office:value-type="float" office:value="0.564" calcext:value-type="float">
            <text:p>0.564</text:p>
          </table:table-cell>
          <table:table-cell office:value-type="float" office:value="9.9784" calcext:value-type="float">
            <text:p>9.9784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-0.2276" calcext:value-type="float">
            <text:p>-0.2276</text:p>
          </table:table-cell>
          <table:table-cell office:value-type="float" office:value="-0.9229" calcext:value-type="float">
            <text:p>-0.9229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5424" calcext:value-type="float">
            <text:p>0.542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0.2276" calcext:value-type="float">
            <text:p>-0.2276</text:p>
          </table:table-cell>
          <table:table-cell office:value-type="float" office:value="-0.9229" calcext:value-type="float">
            <text:p>-0.9229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5424" calcext:value-type="float">
            <text:p>0.5424</text:p>
          </table:table-cell>
          <table:table-cell office:value-type="float" office:value="9.1061" calcext:value-type="float">
            <text:p>9.1061</text:p>
          </table:table-cell>
          <table:table-cell office:value-type="float" office:value="-0.8939" calcext:value-type="float">
            <text:p>-0.8939</text:p>
          </table:table-cell>
          <table:table-cell office:value-type="float" office:value="-0.8877" calcext:value-type="float">
            <text:p>-0.8877</text:p>
          </table:table-cell>
          <table:table-cell office:value-type="float" office:value="-0.2926" calcext:value-type="float">
            <text:p>-0.2926</text:p>
          </table:table-cell>
          <table:table-cell office:value-type="float" office:value="0.2876" calcext:value-type="float">
            <text:p>0.2876</text:p>
          </table:table-cell>
          <table:table-cell office:value-type="float" office:value="-0.3514" calcext:value-type="float">
            <text:p>-0.351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877" calcext:value-type="float">
            <text:p>-0.8877</text:p>
          </table:table-cell>
          <table:table-cell office:value-type="float" office:value="-0.2926" calcext:value-type="float">
            <text:p>-0.2926</text:p>
          </table:table-cell>
          <table:table-cell office:value-type="float" office:value="0.2876" calcext:value-type="float">
            <text:p>0.2876</text:p>
          </table:table-cell>
          <table:table-cell office:value-type="float" office:value="-0.3514" calcext:value-type="float">
            <text:p>-0.3514</text:p>
          </table:table-cell>
          <table:table-cell office:value-type="float" office:value="9.1297" calcext:value-type="float">
            <text:p>9.1297</text:p>
          </table:table-cell>
          <table:table-cell office:value-type="float" office:value="-0.8703" calcext:value-type="float">
            <text:p>-0.8703</text:p>
          </table:table-cell>
          <table:table-cell office:value-type="float" office:value="-0.717" calcext:value-type="float">
            <text:p>-0.717</text:p>
          </table:table-cell>
          <table:table-cell office:value-type="float" office:value="0.6076" calcext:value-type="float">
            <text:p>0.6076</text:p>
          </table:table-cell>
          <table:table-cell office:value-type="float" office:value="-0.4989" calcext:value-type="float">
            <text:p>-0.4989</text:p>
          </table:table-cell>
          <table:table-cell office:value-type="float" office:value="-1.2217" calcext:value-type="float">
            <text:p>-1.221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717" calcext:value-type="float">
            <text:p>-0.717</text:p>
          </table:table-cell>
          <table:table-cell office:value-type="float" office:value="0.6076" calcext:value-type="float">
            <text:p>0.6076</text:p>
          </table:table-cell>
          <table:table-cell office:value-type="float" office:value="-0.4989" calcext:value-type="float">
            <text:p>-0.4989</text:p>
          </table:table-cell>
          <table:table-cell office:value-type="float" office:value="-1.2217" calcext:value-type="float">
            <text:p>-1.2217</text:p>
          </table:table-cell>
          <table:table-cell office:value-type="float" office:value="11.2761" calcext:value-type="float">
            <text:p>11.2761</text:p>
          </table:table-cell>
          <table:table-cell office:value-type="float" office:value="1.2761" calcext:value-type="float">
            <text:p>1.2761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8899" calcext:value-type="float">
            <text:p>0.8899</text:p>
          </table:table-cell>
          <table:table-cell office:value-type="float" office:value="-1.0826" calcext:value-type="float">
            <text:p>-1.0826</text:p>
          </table:table-cell>
          <table:table-cell office:value-type="float" office:value="0.0544" calcext:value-type="float">
            <text:p>0.054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8899" calcext:value-type="float">
            <text:p>0.8899</text:p>
          </table:table-cell>
          <table:table-cell office:value-type="float" office:value="-1.0826" calcext:value-type="float">
            <text:p>-1.0826</text:p>
          </table:table-cell>
          <table:table-cell office:value-type="float" office:value="0.0544" calcext:value-type="float">
            <text:p>0.0544</text:p>
          </table:table-cell>
          <table:table-cell office:value-type="float" office:value="11.3919" calcext:value-type="float">
            <text:p>11.3919</text:p>
          </table:table-cell>
          <table:table-cell office:value-type="float" office:value="1.3919" calcext:value-type="float">
            <text:p>1.3919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318" calcext:value-type="float">
            <text:p>0.318</text:p>
          </table:table-cell>
          <table:table-cell office:value-type="float" office:value="-0.3322" calcext:value-type="float">
            <text:p>-0.3322</text:p>
          </table:table-cell>
          <table:table-cell office:value-type="float" office:value="1.4463" calcext:value-type="float">
            <text:p>1.446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318" calcext:value-type="float">
            <text:p>0.318</text:p>
          </table:table-cell>
          <table:table-cell office:value-type="float" office:value="-0.3322" calcext:value-type="float">
            <text:p>-0.3322</text:p>
          </table:table-cell>
          <table:table-cell office:value-type="float" office:value="1.4463" calcext:value-type="float">
            <text:p>1.4463</text:p>
          </table:table-cell>
          <table:table-cell office:value-type="float" office:value="9.0089" calcext:value-type="float">
            <text:p>9.0089</text:p>
          </table:table-cell>
          <table:table-cell office:value-type="float" office:value="-0.9911" calcext:value-type="float">
            <text:p>-0.9911</text:p>
          </table:table-cell>
          <table:table-cell office:value-type="float" office:value="0.67" calcext:value-type="float">
            <text:p>0.67</text:p>
          </table:table-cell>
          <table:table-cell office:value-type="float" office:value="-0.4876" calcext:value-type="float">
            <text:p>-0.4876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552" calcext:value-type="float">
            <text:p>0.455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.67</text:p>
          </table:table-cell>
          <table:table-cell office:value-type="float" office:value="-0.4876" calcext:value-type="float">
            <text:p>-0.4876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552" calcext:value-type="float">
            <text:p>0.4552</text:p>
          </table:table-cell>
          <table:table-cell office:value-type="float" office:value="9.6811" calcext:value-type="float">
            <text:p>9.6811</text:p>
          </table:table-cell>
          <table:table-cell office:value-type="float" office:value="-0.3189" calcext:value-type="float">
            <text:p>-0.3189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7746" calcext:value-type="float">
            <text:p>-0.7746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1363" calcext:value-type="float">
            <text:p>0.136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7746" calcext:value-type="float">
            <text:p>-0.7746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1363" calcext:value-type="float">
            <text:p>0.1363</text:p>
          </table:table-cell>
          <table:table-cell office:value-type="float" office:value="8.764" calcext:value-type="float">
            <text:p>8.764</text:p>
          </table:table-cell>
          <table:table-cell office:value-type="float" office:value="-1.236" calcext:value-type="float">
            <text:p>-1.236</text:p>
          </table:table-cell>
          <table:table-cell office:value-type="float" office:value="-0.6206" calcext:value-type="float">
            <text:p>-0.6206</text:p>
          </table:table-cell>
          <table:table-cell office:value-type="float" office:value="-0.3321" calcext:value-type="float">
            <text:p>-0.3321</text:p>
          </table:table-cell>
          <table:table-cell office:value-type="float" office:value="0.4326" calcext:value-type="float">
            <text:p>0.4326</text:p>
          </table:table-cell>
          <table:table-cell office:value-type="float" office:value="-1.0997" calcext:value-type="float">
            <text:p>-1.0997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-0.6206" calcext:value-type="float">
            <text:p>-0.6206</text:p>
          </table:table-cell>
          <table:table-cell office:value-type="float" office:value="-0.3321" calcext:value-type="float">
            <text:p>-0.3321</text:p>
          </table:table-cell>
          <table:table-cell office:value-type="float" office:value="0.4326" calcext:value-type="float">
            <text:p>0.4326</text:p>
          </table:table-cell>
          <table:table-cell office:value-type="float" office:value="-1.0997" calcext:value-type="float">
            <text:p>-1.0997</text:p>
          </table:table-cell>
          <table:table-cell office:value-type="float" office:value="10.2623" calcext:value-type="float">
            <text:p>10.2623</text:p>
          </table:table-cell>
          <table:table-cell office:value-type="float" office:value="0.2623" calcext:value-type="float">
            <text:p>0.2623</text:p>
          </table:table-cell>
          <table:table-cell office:value-type="float" office:value="-0.6041" calcext:value-type="float">
            <text:p>-0.6041</text:p>
          </table:table-cell>
          <table:table-cell office:value-type="float" office:value="0.3754" calcext:value-type="float">
            <text:p>0.3754</text:p>
          </table:table-cell>
          <table:table-cell office:value-type="float" office:value="-0.5358" calcext:value-type="float">
            <text:p>-0.5358</text:p>
          </table:table-cell>
          <table:table-cell office:value-type="float" office:value="-0.8373" calcext:value-type="float">
            <text:p>-0.837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0.6041" calcext:value-type="float">
            <text:p>-0.6041</text:p>
          </table:table-cell>
          <table:table-cell office:value-type="float" office:value="0.3754" calcext:value-type="float">
            <text:p>0.3754</text:p>
          </table:table-cell>
          <table:table-cell office:value-type="float" office:value="-0.5358" calcext:value-type="float">
            <text:p>-0.5358</text:p>
          </table:table-cell>
          <table:table-cell office:value-type="float" office:value="-0.8373" calcext:value-type="float">
            <text:p>-0.8373</text:p>
          </table:table-cell>
          <table:table-cell office:value-type="float" office:value="10.8589" calcext:value-type="float">
            <text:p>10.8589</text:p>
          </table:table-cell>
          <table:table-cell office:value-type="float" office:value="0.8589" calcext:value-type="float">
            <text:p>0.8589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6662" calcext:value-type="float">
            <text:p>0.6662</text:p>
          </table:table-cell>
          <table:table-cell office:value-type="float" office:value="-0.9437" calcext:value-type="float">
            <text:p>-0.9437</text:p>
          </table:table-cell>
          <table:table-cell office:value-type="float" office:value="0.0216" calcext:value-type="float">
            <text:p>0.021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6662" calcext:value-type="float">
            <text:p>0.6662</text:p>
          </table:table-cell>
          <table:table-cell office:value-type="float" office:value="-0.9437" calcext:value-type="float">
            <text:p>-0.9437</text:p>
          </table:table-cell>
          <table:table-cell office:value-type="float" office:value="0.0216" calcext:value-type="float">
            <text:p>0.0216</text:p>
          </table:table-cell>
          <table:table-cell office:value-type="float" office:value="11.0099" calcext:value-type="float">
            <text:p>11.0099</text:p>
          </table:table-cell>
          <table:table-cell office:value-type="float" office:value="1.0099" calcext:value-type="float">
            <text:p>1.0099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3192" calcext:value-type="float">
            <text:p>0.3192</text:p>
          </table:table-cell>
          <table:table-cell office:value-type="float" office:value="-0.4172" calcext:value-type="float">
            <text:p>-0.4172</text:p>
          </table:table-cell>
          <table:table-cell office:value-type="float" office:value="1.0315" calcext:value-type="float">
            <text:p>1.031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3192" calcext:value-type="float">
            <text:p>0.3192</text:p>
          </table:table-cell>
          <table:table-cell office:value-type="float" office:value="-0.4172" calcext:value-type="float">
            <text:p>-0.4172</text:p>
          </table:table-cell>
          <table:table-cell office:value-type="float" office:value="1.0315" calcext:value-type="float">
            <text:p>1.0315</text:p>
          </table:table-cell>
          <table:table-cell office:value-type="float" office:value="9.6794" calcext:value-type="float">
            <text:p>9.6794</text:p>
          </table:table-cell>
          <table:table-cell office:value-type="float" office:value="-0.3206" calcext:value-type="float">
            <text:p>-0.3206</text:p>
          </table:table-cell>
          <table:table-cell office:value-type="float" office:value="0.5269" calcext:value-type="float">
            <text:p>0.5269</text:p>
          </table:table-cell>
          <table:table-cell office:value-type="float" office:value="-0.2784" calcext:value-type="float">
            <text:p>-0.2784</text:p>
          </table:table-cell>
          <table:table-cell office:value-type="float" office:value="0.454" calcext:value-type="float">
            <text:p>0.454</text:p>
          </table:table-cell>
          <table:table-cell office:value-type="float" office:value="0.7109" calcext:value-type="float">
            <text:p>0.710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5269" calcext:value-type="float">
            <text:p>0.5269</text:p>
          </table:table-cell>
          <table:table-cell office:value-type="float" office:value="-0.2784" calcext:value-type="float">
            <text:p>-0.2784</text:p>
          </table:table-cell>
          <table:table-cell office:value-type="float" office:value="0.454" calcext:value-type="float">
            <text:p>0.454</text:p>
          </table:table-cell>
          <table:table-cell office:value-type="float" office:value="0.7109" calcext:value-type="float">
            <text:p>0.7109</text:p>
          </table:table-cell>
          <table:table-cell office:value-type="float" office:value="9.4212" calcext:value-type="float">
            <text:p>9.4212</text:p>
          </table:table-cell>
          <table:table-cell office:value-type="float" office:value="-0.5788" calcext:value-type="float">
            <text:p>-0.5788</text:p>
          </table:table-cell>
          <table:table-cell office:value-type="float" office:value="0.0759" calcext:value-type="float">
            <text:p>0.0759</text:p>
          </table:table-cell>
          <table:table-cell office:value-type="float" office:value="-0.5551" calcext:value-type="float">
            <text:p>-0.5551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132" calcext:value-type="float">
            <text:p>0.13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759" calcext:value-type="float">
            <text:p>0.0759</text:p>
          </table:table-cell>
          <table:table-cell office:value-type="float" office:value="-0.5551" calcext:value-type="float">
            <text:p>-0.5551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132" calcext:value-type="float">
            <text:p>0.132</text:p>
          </table:table-cell>
          <table:table-cell office:value-type="float" office:value="9.0325" calcext:value-type="float">
            <text:p>9.0325</text:p>
          </table:table-cell>
          <table:table-cell office:value-type="float" office:value="-0.9675" calcext:value-type="float">
            <text:p>-0.9675</text:p>
          </table:table-cell>
          <table:table-cell office:value-type="float" office:value="-0.3869" calcext:value-type="float">
            <text:p>-0.3869</text:p>
          </table:table-cell>
          <table:table-cell office:value-type="float" office:value="-0.2939" calcext:value-type="float">
            <text:p>-0.2939</text:p>
          </table:table-cell>
          <table:table-cell office:value-type="float" office:value="0.5237" calcext:value-type="float">
            <text:p>0.5237</text:p>
          </table:table-cell>
          <table:table-cell office:value-type="float" office:value="-0.8354" calcext:value-type="float">
            <text:p>-0.835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0.3869" calcext:value-type="float">
            <text:p>-0.3869</text:p>
          </table:table-cell>
          <table:table-cell office:value-type="float" office:value="-0.2939" calcext:value-type="float">
            <text:p>-0.2939</text:p>
          </table:table-cell>
          <table:table-cell office:value-type="float" office:value="0.5237" calcext:value-type="float">
            <text:p>0.5237</text:p>
          </table:table-cell>
          <table:table-cell office:value-type="float" office:value="-0.8354" calcext:value-type="float">
            <text:p>-0.8354</text:p>
          </table:table-cell>
          <table:table-cell office:value-type="float" office:value="10.0063" calcext:value-type="float">
            <text:p>10.0063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4398" calcext:value-type="float">
            <text:p>-0.4398</text:p>
          </table:table-cell>
          <table:table-cell office:value-type="float" office:value="0.2071" calcext:value-type="float">
            <text:p>0.2071</text:p>
          </table:table-cell>
          <table:table-cell office:value-type="float" office:value="-0.3085" calcext:value-type="float">
            <text:p>-0.3085</text:p>
          </table:table-cell>
          <table:table-cell office:value-type="float" office:value="-0.8291" calcext:value-type="float">
            <text:p>-0.829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0.4398" calcext:value-type="float">
            <text:p>-0.4398</text:p>
          </table:table-cell>
          <table:table-cell office:value-type="float" office:value="0.2071" calcext:value-type="float">
            <text:p>0.2071</text:p>
          </table:table-cell>
          <table:table-cell office:value-type="float" office:value="-0.3085" calcext:value-type="float">
            <text:p>-0.3085</text:p>
          </table:table-cell>
          <table:table-cell office:value-type="float" office:value="-0.8291" calcext:value-type="float">
            <text:p>-0.8291</text:p>
          </table:table-cell>
          <table:table-cell office:value-type="float" office:value="10.7586" calcext:value-type="float">
            <text:p>10.7586</text:p>
          </table:table-cell>
          <table:table-cell office:value-type="float" office:value="0.7586" calcext:value-type="float">
            <text:p>0.758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4557" calcext:value-type="float">
            <text:p>0.4557</text:p>
          </table:table-cell>
          <table:table-cell office:value-type="float" office:value="-0.7584" calcext:value-type="float">
            <text:p>-0.7584</text:p>
          </table:table-cell>
          <table:table-cell office:value-type="float" office:value="-0.0705" calcext:value-type="float">
            <text:p>-0.070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4557" calcext:value-type="float">
            <text:p>0.4557</text:p>
          </table:table-cell>
          <table:table-cell office:value-type="float" office:value="-0.7584" calcext:value-type="float">
            <text:p>-0.758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0.7516" calcext:value-type="float">
            <text:p>10.7516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554" calcext:value-type="float">
            <text:p>0.2554</text:p>
          </table:table-cell>
          <table:table-cell office:value-type="float" office:value="-0.453" calcext:value-type="float">
            <text:p>-0.453</text:p>
          </table:table-cell>
          <table:table-cell office:value-type="float" office:value="0.6811" calcext:value-type="float">
            <text:p>0.681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305" calcext:value-type="float">
            <text:p>0.305</text:p>
          </table:table-cell>
          <table:table-cell office:value-type="float" office:value="0.2554" calcext:value-type="float">
            <text:p>0.2554</text:p>
          </table:table-cell>
          <table:table-cell office:value-type="float" office:value="-0.453" calcext:value-type="float">
            <text:p>-0.453</text:p>
          </table:table-cell>
          <table:table-cell office:value-type="float" office:value="0.6811" calcext:value-type="float">
            <text:p>0.6811</text:p>
          </table:table-cell>
          <table:table-cell office:value-type="float" office:value="10.1762" calcext:value-type="float">
            <text:p>10.1762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3652" calcext:value-type="float">
            <text:p>0.3652</text:p>
          </table:table-cell>
          <table:table-cell office:value-type="float" office:value="-0.1529" calcext:value-type="float">
            <text:p>-0.1529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8574" calcext:value-type="float">
            <text:p>0.857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3652" calcext:value-type="float">
            <text:p>0.3652</text:p>
          </table:table-cell>
          <table:table-cell office:value-type="float" office:value="-0.1529" calcext:value-type="float">
            <text:p>-0.1529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8574" calcext:value-type="float">
            <text:p>0.8574</text:p>
          </table:table-cell>
          <table:table-cell office:value-type="float" office:value="9.205" calcext:value-type="float">
            <text:p>9.205</text:p>
          </table:table-cell>
          <table:table-cell office:value-type="float" office:value="-0.795" calcext:value-type="float">
            <text:p>-0.795</text:p>
          </table:table-cell>
          <table:table-cell office:value-type="float" office:value="0.0889" calcext:value-type="float">
            <text:p>0.0889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0623" calcext:value-type="float">
            <text:p>0.062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889" calcext:value-type="float">
            <text:p>0.0889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0623" calcext:value-type="float">
            <text:p>0.0623</text:p>
          </table:table-cell>
          <table:table-cell office:value-type="float" office:value="9.334" calcext:value-type="float">
            <text:p>9.334</text:p>
          </table:table-cell>
          <table:table-cell office:value-type="float" office:value="-0.666" calcext:value-type="float">
            <text:p>-0.666</text:p>
          </table:table-cell>
          <table:table-cell office:value-type="float" office:value="-0.2229" calcext:value-type="float">
            <text:p>-0.2229</text:p>
          </table:table-cell>
          <table:table-cell office:value-type="float" office:value="-0.2084" calcext:value-type="float">
            <text:p>-0.2084</text:p>
          </table:table-cell>
          <table:table-cell office:value-type="float" office:value="0.5054" calcext:value-type="float">
            <text:p>0.5054</text:p>
          </table:table-cell>
          <table:table-cell office:value-type="float" office:value="-0.6037" calcext:value-type="float">
            <text:p>-0.603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0.2229" calcext:value-type="float">
            <text:p>-0.2229</text:p>
          </table:table-cell>
          <table:table-cell office:value-type="float" office:value="-0.2084" calcext:value-type="float">
            <text:p>-0.2084</text:p>
          </table:table-cell>
          <table:table-cell office:value-type="float" office:value="0.5054" calcext:value-type="float">
            <text:p>0.5054</text:p>
          </table:table-cell>
          <table:table-cell office:value-type="float" office:value="-0.6037" calcext:value-type="float">
            <text:p>-0.6037</text:p>
          </table:table-cell>
          <table:table-cell office:value-type="float" office:value="9.8766" calcext:value-type="float">
            <text:p>9.8766</text:p>
          </table:table-cell>
          <table:table-cell office:value-type="float" office:value="-0.1234" calcext:value-type="float">
            <text:p>-0.1234</text:p>
          </table:table-cell>
          <table:table-cell office:value-type="float" office:value="-0.2783" calcext:value-type="float">
            <text:p>-0.2783</text:p>
          </table:table-cell>
          <table:table-cell office:value-type="float" office:value="0.1143" calcext:value-type="float">
            <text:p>0.1143</text:p>
          </table:table-cell>
          <table:table-cell office:value-type="float" office:value="-0.1599" calcext:value-type="float">
            <text:p>-0.1599</text:p>
          </table:table-cell>
          <table:table-cell office:value-type="float" office:value="-0.7271" calcext:value-type="float">
            <text:p>-0.727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-0.2783" calcext:value-type="float">
            <text:p>-0.2783</text:p>
          </table:table-cell>
          <table:table-cell office:value-type="float" office:value="0.1143" calcext:value-type="float">
            <text:p>0.1143</text:p>
          </table:table-cell>
          <table:table-cell office:value-type="float" office:value="-0.1599" calcext:value-type="float">
            <text:p>-0.1599</text:p>
          </table:table-cell>
          <table:table-cell office:value-type="float" office:value="-0.7271" calcext:value-type="float">
            <text:p>-0.7271</text:p>
          </table:table-cell>
          <table:table-cell office:value-type="float" office:value="10.6122" calcext:value-type="float">
            <text:p>10.6122</text:p>
          </table:table-cell>
          <table:table-cell office:value-type="float" office:value="0.6122" calcext:value-type="float">
            <text:p>0.6122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2819" calcext:value-type="float">
            <text:p>0.2819</text:p>
          </table:table-cell>
          <table:table-cell office:value-type="float" office:value="-0.5809" calcext:value-type="float">
            <text:p>-0.5809</text:p>
          </table:table-cell>
          <table:table-cell office:value-type="float" office:value="-0.1149" calcext:value-type="float">
            <text:p>-0.114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2819" calcext:value-type="float">
            <text:p>0.2819</text:p>
          </table:table-cell>
          <table:table-cell office:value-type="float" office:value="-0.5809" calcext:value-type="float">
            <text:p>-0.5809</text:p>
          </table:table-cell>
          <table:table-cell office:value-type="float" office:value="-0.1149" calcext:value-type="float">
            <text:p>-0.1149</text:p>
          </table:table-cell>
          <table:table-cell office:value-type="float" office:value="10.5363" calcext:value-type="float">
            <text:p>10.5363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1614" calcext:value-type="float">
            <text:p>0.1614</text:p>
          </table:table-cell>
          <table:table-cell office:value-type="float" office:value="-0.4277" calcext:value-type="float">
            <text:p>-0.4277</text:p>
          </table:table-cell>
          <table:table-cell office:value-type="float" office:value="0.4214" calcext:value-type="float">
            <text:p>0.421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1614" calcext:value-type="float">
            <text:p>0.1614</text:p>
          </table:table-cell>
          <table:table-cell office:value-type="float" office:value="-0.4277" calcext:value-type="float">
            <text:p>-0.4277</text:p>
          </table:table-cell>
          <table:table-cell office:value-type="float" office:value="0.4214" calcext:value-type="float">
            <text:p>0.4214</text:p>
          </table:table-cell>
          <table:table-cell office:value-type="float" office:value="10.2479" calcext:value-type="float">
            <text:p>10.2479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149" calcext:value-type="float">
            <text:p>0.2149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6693" calcext:value-type="float">
            <text:p>0.669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2149" calcext:value-type="float">
            <text:p>0.2149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6693" calcext:value-type="float">
            <text:p>0.6693</text:p>
          </table:table-cell>
          <table:table-cell office:value-type="float" office:value="9.4373" calcext:value-type="float">
            <text:p>9.4373</text:p>
          </table:table-cell>
          <table:table-cell office:value-type="float" office:value="-0.5627" calcext:value-type="float">
            <text:p>-0.5627</text:p>
          </table:table-cell>
          <table:table-cell office:value-type="float" office:value="0.048" calcext:value-type="float">
            <text:p>0.048</text:p>
          </table:table-cell>
          <table:table-cell office:value-type="float" office:value="-0.2207" calcext:value-type="float">
            <text:p>-0.220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1066" calcext:value-type="float">
            <text:p>0.106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048" calcext:value-type="float">
            <text:p>0.048</text:p>
          </table:table-cell>
          <table:table-cell office:value-type="float" office:value="-0.2207" calcext:value-type="float">
            <text:p>-0.220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1066" calcext:value-type="float">
            <text:p>0.1066</text:p>
          </table:table-cell>
          <table:table-cell office:value-type="float" office:value="9.5075" calcext:value-type="float">
            <text:p>9.5075</text:p>
          </table:table-cell>
          <table:table-cell office:value-type="float" office:value="-0.4925" calcext:value-type="float">
            <text:p>-0.4925</text:p>
          </table:table-cell>
          <table:table-cell office:value-type="float" office:value="-0.1369" calcext:value-type="float">
            <text:p>-0.1369</text:p>
          </table:table-cell>
          <table:table-cell office:value-type="float" office:value="-0.1188" calcext:value-type="float">
            <text:p>-0.1188</text:p>
          </table:table-cell>
          <table:table-cell office:value-type="float" office:value="0.3659" calcext:value-type="float">
            <text:p>0.3659</text:p>
          </table:table-cell>
          <table:table-cell office:value-type="float" office:value="-0.3859" calcext:value-type="float">
            <text:p>-0.385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0.1369" calcext:value-type="float">
            <text:p>-0.1369</text:p>
          </table:table-cell>
          <table:table-cell office:value-type="float" office:value="-0.1188" calcext:value-type="float">
            <text:p>-0.1188</text:p>
          </table:table-cell>
          <table:table-cell office:value-type="float" office:value="0.3659" calcext:value-type="float">
            <text:p>0.3659</text:p>
          </table:table-cell>
          <table:table-cell office:value-type="float" office:value="-0.3859" calcext:value-type="float">
            <text:p>-0.3859</text:p>
          </table:table-cell>
          <table:table-cell office:value-type="float" office:value="9.8234" calcext:value-type="float">
            <text:p>9.8234</text:p>
          </table:table-cell>
          <table:table-cell office:value-type="float" office:value="-0.1766" calcext:value-type="float">
            <text:p>-0.1766</text:p>
          </table:table-cell>
          <table:table-cell office:value-type="float" office:value="-0.1609" calcext:value-type="float">
            <text:p>-0.1609</text:p>
          </table:table-cell>
          <table:table-cell office:value-type="float" office:value="0.0792" calcext:value-type="float">
            <text:p>0.0792</text:p>
          </table:table-cell>
          <table:table-cell office:value-type="float" office:value="-0.1083" calcext:value-type="float">
            <text:p>-0.1083</text:p>
          </table:table-cell>
          <table:table-cell office:value-type="float" office:value="-0.5626" calcext:value-type="float">
            <text:p>-0.562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-0.1609" calcext:value-type="float">
            <text:p>-0.1609</text:p>
          </table:table-cell>
          <table:table-cell office:value-type="float" office:value="0.0792" calcext:value-type="float">
            <text:p>0.0792</text:p>
          </table:table-cell>
          <table:table-cell office:value-type="float" office:value="-0.1083" calcext:value-type="float">
            <text:p>-0.1083</text:p>
          </table:table-cell>
          <table:table-cell office:value-type="float" office:value="-0.5626" calcext:value-type="float">
            <text:p>-0.5626</text:p>
          </table:table-cell>
          <table:table-cell office:value-type="float" office:value="10.448" calcext:value-type="float">
            <text:p>10.448</text:p>
          </table:table-cell>
          <table:table-cell office:value-type="float" office:value="0.448" calcext:value-type="float">
            <text:p>0.448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0.1686" calcext:value-type="float">
            <text:p>0.1686</text:p>
          </table:table-cell>
          <table:table-cell office:value-type="float" office:value="-0.4468" calcext:value-type="float">
            <text:p>-0.4468</text:p>
          </table:table-cell>
          <table:table-cell office:value-type="float" office:value="-0.1145" calcext:value-type="float">
            <text:p>-0.114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0.1686" calcext:value-type="float">
            <text:p>0.1686</text:p>
          </table:table-cell>
          <table:table-cell office:value-type="float" office:value="-0.4468" calcext:value-type="float">
            <text:p>-0.4468</text:p>
          </table:table-cell>
          <table:table-cell office:value-type="float" office:value="-0.1145" calcext:value-type="float">
            <text:p>-0.1145</text:p>
          </table:table-cell>
          <table:table-cell office:value-type="float" office:value="10.4053" calcext:value-type="float">
            <text:p>10.4053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0794" calcext:value-type="float">
            <text:p>0.0794</text:p>
          </table:table-cell>
          <table:table-cell office:value-type="float" office:value="-0.3587" calcext:value-type="float">
            <text:p>-0.3587</text:p>
          </table:table-cell>
          <table:table-cell office:value-type="float" office:value="0.2908" calcext:value-type="float">
            <text:p>0.290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0794" calcext:value-type="float">
            <text:p>0.0794</text:p>
          </table:table-cell>
          <table:table-cell office:value-type="float" office:value="-0.3587" calcext:value-type="float">
            <text:p>-0.3587</text:p>
          </table:table-cell>
          <table:table-cell office:value-type="float" office:value="0.2908" calcext:value-type="float">
            <text:p>0.2908</text:p>
          </table:table-cell>
          <table:table-cell office:value-type="float" office:value="10.1579" calcext:value-type="float">
            <text:p>10.157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103" calcext:value-type="float">
            <text:p>0.1103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0.011" calcext:value-type="float">
            <text:p>0.011</text:p>
          </table:table-cell>
          <table:table-cell office:value-type="float" office:value="0.4486" calcext:value-type="float">
            <text:p>0.448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1103" calcext:value-type="float">
            <text:p>0.1103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0.011" calcext:value-type="float">
            <text:p>0.011</text:p>
          </table:table-cell>
          <table:table-cell office:value-type="float" office:value="0.4486" calcext:value-type="float">
            <text:p>0.4486</text:p>
          </table:table-cell>
          <table:table-cell office:value-type="float" office:value="9.6836" calcext:value-type="float">
            <text:p>9.6836</text:p>
          </table:table-cell>
          <table:table-cell office:value-type="float" office:value="-0.3164" calcext:value-type="float">
            <text:p>-0.316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314" calcext:value-type="float">
            <text:p>-0.1314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1322" calcext:value-type="float">
            <text:p>0.132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314" calcext:value-type="float">
            <text:p>-0.1314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1322" calcext:value-type="float">
            <text:p>0.1322</text:p>
          </table:table-cell>
          <table:table-cell office:value-type="float" office:value="9.5926" calcext:value-type="float">
            <text:p>9.5926</text:p>
          </table:table-cell>
          <table:table-cell office:value-type="float" office:value="-0.4074" calcext:value-type="float">
            <text:p>-0.4074</text:p>
          </table:table-cell>
          <table:table-cell office:value-type="float" office:value="-0.0959" calcext:value-type="float">
            <text:p>-0.0959</text:p>
          </table:table-cell>
          <table:table-cell office:value-type="float" office:value="-0.0477" calcext:value-type="float">
            <text:p>-0.0477</text:p>
          </table:table-cell>
          <table:table-cell office:value-type="float" office:value="0.2299" calcext:value-type="float">
            <text:p>0.2299</text:p>
          </table:table-cell>
          <table:table-cell office:value-type="float" office:value="-0.2752" calcext:value-type="float">
            <text:p>-0.275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-0.0959" calcext:value-type="float">
            <text:p>-0.0959</text:p>
          </table:table-cell>
          <table:table-cell office:value-type="float" office:value="-0.0477" calcext:value-type="float">
            <text:p>-0.0477</text:p>
          </table:table-cell>
          <table:table-cell office:value-type="float" office:value="0.2299" calcext:value-type="float">
            <text:p>0.2299</text:p>
          </table:table-cell>
          <table:table-cell office:value-type="float" office:value="-0.2752" calcext:value-type="float">
            <text:p>-0.2752</text:p>
          </table:table-cell>
          <table:table-cell office:value-type="float" office:value="9.8662" calcext:value-type="float">
            <text:p>9.8662</text:p>
          </table:table-cell>
          <table:table-cell office:value-type="float" office:value="-0.1338" calcext:value-type="float">
            <text:p>-0.1338</text:p>
          </table:table-cell>
          <table:table-cell office:value-type="float" office:value="-0.0841" calcext:value-type="float">
            <text:p>-0.0841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1122" calcext:value-type="float">
            <text:p>-0.1122</text:p>
          </table:table-cell>
          <table:table-cell office:value-type="float" office:value="-0.409" calcext:value-type="float">
            <text:p>-0.40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-0.0841" calcext:value-type="float">
            <text:p>-0.0841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1122" calcext:value-type="float">
            <text:p>-0.1122</text:p>
          </table:table-cell>
          <table:table-cell office:value-type="float" office:value="-0.409" calcext:value-type="float">
            <text:p>-0.409</text:p>
          </table:table-cell>
          <table:table-cell office:value-type="float" office:value="10.3353" calcext:value-type="float">
            <text:p>10.3353</text:p>
          </table:table-cell>
          <table:table-cell office:value-type="float" office:value="0.3353" calcext:value-type="float">
            <text:p>0.3353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1001" calcext:value-type="float">
            <text:p>0.1001</text:p>
          </table:table-cell>
          <table:table-cell office:value-type="float" office:value="-0.3535" calcext:value-type="float">
            <text:p>-0.3535</text:p>
          </table:table-cell>
          <table:table-cell office:value-type="float" office:value="-0.0737" calcext:value-type="float">
            <text:p>-0.073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1001" calcext:value-type="float">
            <text:p>0.1001</text:p>
          </table:table-cell>
          <table:table-cell office:value-type="float" office:value="-0.3535" calcext:value-type="float">
            <text:p>-0.3535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10.3271" calcext:value-type="float">
            <text:p>10.3271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2636" calcext:value-type="float">
            <text:p>-0.2636</text:p>
          </table:table-cell>
          <table:table-cell office:value-type="float" office:value="0.2534" calcext:value-type="float">
            <text:p>0.253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2636" calcext:value-type="float">
            <text:p>-0.2636</text:p>
          </table:table-cell>
          <table:table-cell office:value-type="float" office:value="0.2534" calcext:value-type="float">
            <text:p>0.2534</text:p>
          </table:table-cell>
          <table:table-cell office:value-type="float" office:value="10.0398" calcext:value-type="float">
            <text:p>10.0398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55" calcext:value-type="float">
            <text:p>0.0455</text:p>
          </table:table-cell>
          <table:table-cell office:value-type="float" office:value="-0.0713" calcext:value-type="float">
            <text:p>-0.0713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2932" calcext:value-type="float">
            <text:p>0.293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.0455" calcext:value-type="float">
            <text:p>0.0455</text:p>
          </table:table-cell>
          <table:table-cell office:value-type="float" office:value="-0.0713" calcext:value-type="float">
            <text:p>-0.0713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2932" calcext:value-type="float">
            <text:p>0.2932</text:p>
          </table:table-cell>
          <table:table-cell office:value-type="float" office:value="9.7191" calcext:value-type="float">
            <text:p>9.7191</text:p>
          </table:table-cell>
          <table:table-cell office:value-type="float" office:value="-0.2809" calcext:value-type="float">
            <text:p>-0.2809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0123" calcext:value-type="float">
            <text:p>0.012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0123" calcext:value-type="float">
            <text:p>0.0123</text:p>
          </table:table-cell>
          <table:table-cell office:value-type="float" office:value="9.7452" calcext:value-type="float">
            <text:p>9.7452</text:p>
          </table:table-cell>
          <table:table-cell office:value-type="float" office:value="-0.2548" calcext:value-type="float">
            <text:p>-0.2548</text:p>
          </table:table-cell>
          <table:table-cell office:value-type="float" office:value="-0.0746" calcext:value-type="float">
            <text:p>-0.0746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473" calcext:value-type="float">
            <text:p>0.0473</text:p>
          </table:table-cell>
          <table:table-cell office:value-type="float" office:value="-0.2425" calcext:value-type="float">
            <text:p>-0.242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-0.0746" calcext:value-type="float">
            <text:p>-0.0746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473" calcext:value-type="float">
            <text:p>0.0473</text:p>
          </table:table-cell>
          <table:table-cell office:value-type="float" office:value="-0.2425" calcext:value-type="float">
            <text:p>-0.2425</text:p>
          </table:table-cell>
          <table:table-cell office:value-type="float" office:value="9.9702" calcext:value-type="float">
            <text:p>9.9702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0652" calcext:value-type="float">
            <text:p>0.0652</text:p>
          </table:table-cell>
          <table:table-cell office:value-type="float" office:value="-0.2102" calcext:value-type="float">
            <text:p>-0.2102</text:p>
          </table:table-cell>
          <table:table-cell office:value-type="float" office:value="-0.2724" calcext:value-type="float">
            <text:p>-0.272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0652" calcext:value-type="float">
            <text:p>0.0652</text:p>
          </table:table-cell>
          <table:table-cell office:value-type="float" office:value="-0.2102" calcext:value-type="float">
            <text:p>-0.2102</text:p>
          </table:table-cell>
          <table:table-cell office:value-type="float" office:value="-0.2724" calcext:value-type="float">
            <text:p>-0.2724</text:p>
          </table:table-cell>
          <table:table-cell office:value-type="float" office:value="10.278" calcext:value-type="float">
            <text:p>10.278</text:p>
          </table:table-cell>
          <table:table-cell office:value-type="float" office:value="0.278" calcext:value-type="float">
            <text:p>0.27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2" calcext:value-type="float">
            <text:p>0.052</text:p>
          </table:table-cell>
          <table:table-cell office:value-type="float" office:value="-0.3435" calcext:value-type="float">
            <text:p>-0.3435</text:p>
          </table:table-cell>
          <table:table-cell office:value-type="float" office:value="0.0056" calcext:value-type="float">
            <text:p>0.005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2" calcext:value-type="float">
            <text:p>0.052</text:p>
          </table:table-cell>
          <table:table-cell office:value-type="float" office:value="-0.3435" calcext:value-type="float">
            <text:p>-0.34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10.238" calcext:value-type="float">
            <text:p>10.238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-0.2189" calcext:value-type="float">
            <text:p>-0.2189</text:p>
          </table:table-cell>
          <table:table-cell office:value-type="float" office:value="0.2436" calcext:value-type="float">
            <text:p>0.243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-0.2189" calcext:value-type="float">
            <text:p>-0.2189</text:p>
          </table:table-cell>
          <table:table-cell office:value-type="float" office:value="0.2436" calcext:value-type="float">
            <text:p>0.2436</text:p>
          </table:table-cell>
          <table:table-cell office:value-type="float" office:value="9.937" calcext:value-type="float">
            <text:p>9.937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1807" calcext:value-type="float">
            <text:p>0.180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1807" calcext:value-type="float">
            <text:p>0.1807</text:p>
          </table:table-cell>
          <table:table-cell office:value-type="float" office:value="9.7577" calcext:value-type="float">
            <text:p>9.7577</text:p>
          </table:table-cell>
          <table:table-cell office:value-type="float" office:value="-0.2423" calcext:value-type="float">
            <text:p>-0.2423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0.0527" calcext:value-type="float">
            <text:p>0.0527</text:p>
          </table:table-cell>
          <table:table-cell office:value-type="float" office:value="-0.0617" calcext:value-type="float">
            <text:p>-0.061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0.0527" calcext:value-type="float">
            <text:p>0.0527</text:p>
          </table:table-cell>
          <table:table-cell office:value-type="float" office:value="-0.0617" calcext:value-type="float">
            <text:p>-0.0617</text:p>
          </table:table-cell>
          <table:table-cell office:value-type="float" office:value="9.8467" calcext:value-type="float">
            <text:p>9.8467</text:p>
          </table:table-cell>
          <table:table-cell office:value-type="float" office:value="-0.1533" calcext:value-type="float">
            <text:p>-0.1533</text:p>
          </table:table-cell>
          <table:table-cell office:value-type="float" office:value="-0.0536" calcext:value-type="float">
            <text:p>-0.0536</text:p>
          </table:table-cell>
          <table:table-cell office:value-type="float" office:value="0.0287" calcext:value-type="float">
            <text:p>0.0287</text:p>
          </table:table-cell>
          <table:table-cell office:value-type="float" office:value="-0.0856" calcext:value-type="float">
            <text:p>-0.0856</text:p>
          </table:table-cell>
          <table:table-cell office:value-type="float" office:value="-0.215" calcext:value-type="float">
            <text:p>-0.21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-0.0536" calcext:value-type="float">
            <text:p>-0.0536</text:p>
          </table:table-cell>
          <table:table-cell office:value-type="float" office:value="0.0287" calcext:value-type="float">
            <text:p>0.0287</text:p>
          </table:table-cell>
          <table:table-cell office:value-type="float" office:value="-0.0856" calcext:value-type="float">
            <text:p>-0.0856</text:p>
          </table:table-cell>
          <table:table-cell office:value-type="float" office:value="-0.215" calcext:value-type="float">
            <text:p>-0.215</text:p>
          </table:table-cell>
          <table:table-cell office:value-type="float" office:value="10.0782" calcext:value-type="float">
            <text:p>10.0782</text:p>
          </table:table-cell>
          <table:table-cell office:value-type="float" office:value="0.0782" calcext:value-type="float">
            <text:p>0.0782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528" calcext:value-type="float">
            <text:p>0.0528</text:p>
          </table:table-cell>
          <table:table-cell office:value-type="float" office:value="-0.2615" calcext:value-type="float">
            <text:p>-0.2615</text:p>
          </table:table-cell>
          <table:table-cell office:value-type="float" office:value="-0.1367" calcext:value-type="float">
            <text:p>-0.136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528" calcext:value-type="float">
            <text:p>0.0528</text:p>
          </table:table-cell>
          <table:table-cell office:value-type="float" office:value="-0.2615" calcext:value-type="float">
            <text:p>-0.2615</text:p>
          </table:table-cell>
          <table:table-cell office:value-type="float" office:value="-0.1367" calcext:value-type="float">
            <text:p>-0.1367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2774" calcext:value-type="float">
            <text:p>-0.2774</text:p>
          </table:table-cell>
          <table:table-cell office:value-type="float" office:value="0.1049" calcext:value-type="float">
            <text:p>0.104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2774" calcext:value-type="float">
            <text:p>-0.2774</text:p>
          </table:table-cell>
          <table:table-cell office:value-type="float" office:value="0.1049" calcext:value-type="float">
            <text:p>0.1049</text:p>
          </table:table-cell>
          <table:table-cell office:value-type="float" office:value="10.0931" calcext:value-type="float">
            <text:p>10.0931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-0.1259" calcext:value-type="float">
            <text:p>-0.1259</text:p>
          </table:table-cell>
          <table:table-cell office:value-type="float" office:value="0.198" calcext:value-type="float">
            <text:p>0.19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-0.1259" calcext:value-type="float">
            <text:p>-0.1259</text:p>
          </table:table-cell>
          <table:table-cell office:value-type="float" office:value="0.198" calcext:value-type="float">
            <text:p>0.198</text:p>
          </table:table-cell>
          <table:table-cell office:value-type="float" office:value="9.868" calcext:value-type="float">
            <text:p>9.868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661" calcext:value-type="float">
            <text:p>0.066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661" calcext:value-type="float">
            <text:p>0.0661</text:p>
          </table:table-cell>
          <table:table-cell office:value-type="float" office:value="9.8127" calcext:value-type="float">
            <text:p>9.8127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1213" calcext:value-type="float">
            <text:p>-0.121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1213" calcext:value-type="float">
            <text:p>-0.1213</text:p>
          </table:table-cell>
          <table:table-cell office:value-type="float" office:value="9.9518" calcext:value-type="float">
            <text:p>9.9518</text:p>
          </table:table-cell>
          <table:table-cell office:value-type="float" office:value="-0.0482" calcext:value-type="float">
            <text:p>-0.0482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0.0385" calcext:value-type="float">
            <text:p>0.0385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-0.1695" calcext:value-type="float">
            <text:p>-0.169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0.0385" calcext:value-type="float">
            <text:p>0.0385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-0.1695" calcext:value-type="float">
            <text:p>-0.1695</text:p>
          </table:table-cell>
          <table:table-cell office:value-type="float" office:value="10.1482" calcext:value-type="float">
            <text:p>10.1482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322" calcext:value-type="float">
            <text:p>0.0322</text:p>
          </table:table-cell>
          <table:table-cell office:value-type="float" office:value="-0.2622" calcext:value-type="float">
            <text:p>-0.2622</text:p>
          </table:table-cell>
          <table:table-cell office:value-type="float" office:value="-0.0213" calcext:value-type="float">
            <text:p>-0.021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322" calcext:value-type="float">
            <text:p>0.0322</text:p>
          </table:table-cell>
          <table:table-cell office:value-type="float" office:value="-0.2622" calcext:value-type="float">
            <text:p>-0.2622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10.1669" calcext:value-type="float">
            <text:p>10.1669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2" calcext:value-type="float">
            <text:p>-0.2</text:p>
          </table:table-cell>
          <table:table-cell office:value-type="float" office:value="0.1456" calcext:value-type="float">
            <text:p>0.145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2" calcext:value-type="float">
            <text:p>-0.2</text:p>
          </table:table-cell>
          <table:table-cell office:value-type="float" office:value="0.1456" calcext:value-type="float">
            <text:p>0.1456</text:p>
          </table:table-cell>
          <table:table-cell office:value-type="float" office:value="9.9887" calcext:value-type="float">
            <text:p>9.9887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6" calcext:value-type="float">
            <text:p>-0.06</text:p>
          </table:table-cell>
          <table:table-cell office:value-type="float" office:value="0.1343" calcext:value-type="float">
            <text:p>0.134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6" calcext:value-type="float">
            <text:p>-0.06</text:p>
          </table:table-cell>
          <table:table-cell office:value-type="float" office:value="0.1343" calcext:value-type="float">
            <text:p>0.1343</text:p>
          </table:table-cell>
          <table:table-cell office:value-type="float" office:value="9.8417" calcext:value-type="float">
            <text:p>9.8417</text:p>
          </table:table-cell>
          <table:table-cell office:value-type="float" office:value="-0.1583" calcext:value-type="float">
            <text:p>-0.1583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024" calcext:value-type="float">
            <text:p>-0.02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024" calcext:value-type="float">
            <text:p>-0.024</text:p>
          </table:table-cell>
          <table:table-cell office:value-type="float" office:value="9.8821" calcext:value-type="float">
            <text:p>9.8821</text:p>
          </table:table-cell>
          <table:table-cell office:value-type="float" office:value="-0.1179" calcext:value-type="float">
            <text:p>-0.1179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0878" calcext:value-type="float">
            <text:p>-0.0878</text:p>
          </table:table-cell>
          <table:table-cell office:value-type="float" office:value="-0.1419" calcext:value-type="float">
            <text:p>-0.141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0878" calcext:value-type="float">
            <text:p>-0.0878</text:p>
          </table:table-cell>
          <table:table-cell office:value-type="float" office:value="-0.1419" calcext:value-type="float">
            <text:p>-0.1419</text:p>
          </table:table-cell>
          <table:table-cell office:value-type="float" office:value="10.0396" calcext:value-type="float">
            <text:p>10.0396</text:p>
          </table:table-cell>
          <table:table-cell office:value-type="float" office:value="0.0396" calcext:value-type="float">
            <text:p>0.039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343" calcext:value-type="float">
            <text:p>0.0343</text:p>
          </table:table-cell>
          <table:table-cell office:value-type="float" office:value="-0.2099" calcext:value-type="float">
            <text:p>-0.2099</text:p>
          </table:table-cell>
          <table:table-cell office:value-type="float" office:value="-0.1023" calcext:value-type="float">
            <text:p>-0.102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343" calcext:value-type="float">
            <text:p>0.0343</text:p>
          </table:table-cell>
          <table:table-cell office:value-type="float" office:value="-0.2099" calcext:value-type="float">
            <text:p>-0.2099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10.1629" calcext:value-type="float">
            <text:p>10.1629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2307" calcext:value-type="float">
            <text:p>-0.2307</text:p>
          </table:table-cell>
          <table:table-cell office:value-type="float" office:value="0.0606" calcext:value-type="float">
            <text:p>0.060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2307" calcext:value-type="float">
            <text:p>-0.2307</text:p>
          </table:table-cell>
          <table:table-cell office:value-type="float" office:value="0.0606" calcext:value-type="float">
            <text:p>0.0606</text:p>
          </table:table-cell>
          <table:table-cell office:value-type="float" office:value="10.0736" calcext:value-type="float">
            <text:p>10.0736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-0.1333" calcext:value-type="float">
            <text:p>-0.1333</text:p>
          </table:table-cell>
          <table:table-cell office:value-type="float" office:value="0.1342" calcext:value-type="float">
            <text:p>0.134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-0.1333" calcext:value-type="float">
            <text:p>-0.1333</text:p>
          </table:table-cell>
          <table:table-cell office:value-type="float" office:value="0.1342" calcext:value-type="float">
            <text:p>0.1342</text:p>
          </table:table-cell>
          <table:table-cell office:value-type="float" office:value="9.9189" calcext:value-type="float">
            <text:p>9.9189</text:p>
          </table:table-cell>
          <table:table-cell office:value-type="float" office:value="-0.0811" calcext:value-type="float">
            <text:p>-0.0811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-0.0397" calcext:value-type="float">
            <text:p>-0.0397</text:p>
          </table:table-cell>
          <table:table-cell office:value-type="float" office:value="0.0531" calcext:value-type="float">
            <text:p>0.053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-0.0397" calcext:value-type="float">
            <text:p>-0.0397</text:p>
          </table:table-cell>
          <table:table-cell office:value-type="float" office:value="0.0531" calcext:value-type="float">
            <text:p>0.0531</text:p>
          </table:table-cell>
          <table:table-cell office:value-type="float" office:value="9.8627" calcext:value-type="float">
            <text:p>9.8627</text:p>
          </table:table-cell>
          <table:table-cell office:value-type="float" office:value="-0.1373" calcext:value-type="float">
            <text:p>-0.1373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-0.0843" calcext:value-type="float">
            <text:p>-0.084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-0.0843" calcext:value-type="float">
            <text:p>-0.0843</text:p>
          </table:table-cell>
          <table:table-cell office:value-type="float" office:value="9.9623" calcext:value-type="float">
            <text:p>9.9623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74" calcext:value-type="float">
            <text:p>0.0274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-0.122" calcext:value-type="float">
            <text:p>-0.12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74" calcext:value-type="float">
            <text:p>0.0274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-0.122" calcext:value-type="float">
            <text:p>-0.122</text:p>
          </table:table-cell>
          <table:table-cell office:value-type="float" office:value="10.1079" calcext:value-type="float">
            <text:p>10.1079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16" calcext:value-type="float">
            <text:p>0.0216</text:p>
          </table:table-cell>
          <table:table-cell office:value-type="float" office:value="-0.2265" calcext:value-type="float">
            <text:p>-0.2265</text:p>
          </table:table-cell>
          <table:table-cell office:value-type="float" office:value="-0.0141" calcext:value-type="float">
            <text:p>-0.014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16" calcext:value-type="float">
            <text:p>0.0216</text:p>
          </table:table-cell>
          <table:table-cell office:value-type="float" office:value="-0.2265" calcext:value-type="float">
            <text:p>-0.2265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10.1178" calcext:value-type="float">
            <text:p>10.1178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1817" calcext:value-type="float">
            <text:p>-0.1817</text:p>
          </table:table-cell>
          <table:table-cell office:value-type="float" office:value="0.1037" calcext:value-type="float">
            <text:p>0.103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1817" calcext:value-type="float">
            <text:p>-0.1817</text:p>
          </table:table-cell>
          <table:table-cell office:value-type="float" office:value="0.1037" calcext:value-type="float">
            <text:p>0.1037</text:p>
          </table:table-cell>
          <table:table-cell office:value-type="float" office:value="9.9892" calcext:value-type="float">
            <text:p>9.989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34" calcext:value-type="float">
            <text:p>-0.0834</text:p>
          </table:table-cell>
          <table:table-cell office:value-type="float" office:value="0.0929" calcext:value-type="float">
            <text:p>0.092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34" calcext:value-type="float">
            <text:p>-0.0834</text:p>
          </table:table-cell>
          <table:table-cell office:value-type="float" office:value="0.0929" calcext:value-type="float">
            <text:p>0.0929</text:p>
          </table:table-cell>
          <table:table-cell office:value-type="float" office:value="9.8887" calcext:value-type="float">
            <text:p>9.8887</text:p>
          </table:table-cell>
          <table:table-cell office:value-type="float" office:value="-0.1113" calcext:value-type="float">
            <text:p>-0.1113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462" calcext:value-type="float">
            <text:p>-0.0462</text:p>
          </table:table-cell>
          <table:table-cell office:value-type="float" office:value="-0.0184" calcext:value-type="float">
            <text:p>-0.0184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462" calcext:value-type="float">
            <text:p>-0.0462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9.9126" calcext:value-type="float">
            <text:p>9.9126</text:p>
          </table:table-cell>
          <table:table-cell office:value-type="float" office:value="-0.0874" calcext:value-type="float">
            <text:p>-0.0874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1083" calcext:value-type="float">
            <text:p>-0.1083</text:p>
          </table:table-cell>
          <table:table-cell office:value-type="float" office:value="-0.1058" calcext:value-type="float">
            <text:p>-0.105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1083" calcext:value-type="float">
            <text:p>-0.1083</text:p>
          </table:table-cell>
          <table:table-cell office:value-type="float" office:value="-0.1058" calcext:value-type="float">
            <text:p>-0.1058</text:p>
          </table:table-cell>
          <table:table-cell office:value-type="float" office:value="10.0352" calcext:value-type="float">
            <text:p>10.0352</text:p>
          </table:table-cell>
          <table:table-cell office:value-type="float" office:value="0.0352" calcext:value-type="float">
            <text:p>0.035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44" calcext:value-type="float">
            <text:p>0.0244</text:p>
          </table:table-cell>
          <table:table-cell office:value-type="float" office:value="-0.1965" calcext:value-type="float">
            <text:p>-0.1965</text:p>
          </table:table-cell>
          <table:table-cell office:value-type="float" office:value="-0.0706" calcext:value-type="float">
            <text:p>-0.070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44" calcext:value-type="float">
            <text:p>0.0244</text:p>
          </table:table-cell>
          <table:table-cell office:value-type="float" office:value="-0.1965" calcext:value-type="float">
            <text:p>-0.1965</text:p>
          </table:table-cell>
          <table:table-cell office:value-type="float" office:value="-0.0706" calcext:value-type="float">
            <text:p>-0.0706</text:p>
          </table:table-cell>
          <table:table-cell office:value-type="float" office:value="10.1194" calcext:value-type="float">
            <text:p>10.119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2074" calcext:value-type="float">
            <text:p>-0.2074</text:p>
          </table:table-cell>
          <table:table-cell office:value-type="float" office:value="0.0488" calcext:value-type="float">
            <text:p>0.048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2074" calcext:value-type="float">
            <text:p>-0.2074</text:p>
          </table:table-cell>
          <table:table-cell office:value-type="float" office:value="0.0488" calcext:value-type="float">
            <text:p>0.0488</text:p>
          </table:table-cell>
          <table:table-cell office:value-type="float" office:value="10.0481" calcext:value-type="float">
            <text:p>10.0481</text:p>
          </table:table-cell>
          <table:table-cell office:value-type="float" office:value="0.0481" calcext:value-type="float">
            <text:p>0.048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1345" calcext:value-type="float">
            <text:p>-0.1345</text:p>
          </table:table-cell>
          <table:table-cell office:value-type="float" office:value="0.0969" calcext:value-type="float">
            <text:p>0.096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1345" calcext:value-type="float">
            <text:p>-0.1345</text:p>
          </table:table-cell>
          <table:table-cell office:value-type="float" office:value="0.0969" calcext:value-type="float">
            <text:p>0.0969</text:p>
          </table:table-cell>
          <table:table-cell office:value-type="float" office:value="9.938" calcext:value-type="float">
            <text:p>9.938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0.0349" calcext:value-type="float">
            <text:p>0.034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9.9012" calcext:value-type="float">
            <text:p>9.9012</text:p>
          </table:table-cell>
          <table:table-cell office:value-type="float" office:value="-0.0988" calcext:value-type="float">
            <text:p>-0.0988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831" calcext:value-type="float">
            <text:p>-0.0831</text:p>
          </table:table-cell>
          <table:table-cell office:value-type="float" office:value="-0.0639" calcext:value-type="float">
            <text:p>-0.063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831" calcext:value-type="float">
            <text:p>-0.0831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9.9758" calcext:value-type="float">
            <text:p>9.9758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1591" calcext:value-type="float">
            <text:p>-0.1591</text:p>
          </table:table-cell>
          <table:table-cell office:value-type="float" office:value="-0.088" calcext:value-type="float">
            <text:p>-0.08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1591" calcext:value-type="float">
            <text:p>-0.1591</text:p>
          </table:table-cell>
          <table:table-cell office:value-type="float" office:value="-0.088" calcext:value-type="float">
            <text:p>-0.088</text:p>
          </table:table-cell>
          <table:table-cell office:value-type="float" office:value="10.0827" calcext:value-type="float">
            <text:p>10.0827</text:p>
          </table:table-cell>
          <table:table-cell office:value-type="float" office:value="0.0827" calcext:value-type="float">
            <text:p>0.082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2057" calcext:value-type="float">
            <text:p>-0.2057</text:p>
          </table:table-cell>
          <table:table-cell office:value-type="float" office:value="-0.0053" calcext:value-type="float">
            <text:p>-0.005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2057" calcext:value-type="float">
            <text:p>-0.2057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10.0831" calcext:value-type="float">
            <text:p>10.0831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1695" calcext:value-type="float">
            <text:p>-0.1695</text:p>
          </table:table-cell>
          <table:table-cell office:value-type="float" office:value="0.0777" calcext:value-type="float">
            <text:p>0.077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1695" calcext:value-type="float">
            <text:p>-0.1695</text:p>
          </table:table-cell>
          <table:table-cell office:value-type="float" office:value="0.0777" calcext:value-type="float">
            <text:p>0.0777</text:p>
          </table:table-cell>
          <table:table-cell office:value-type="float" office:value="9.9876" calcext:value-type="float">
            <text:p>9.9876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0653" calcext:value-type="float">
            <text:p>0.065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0653" calcext:value-type="float">
            <text:p>0.0653</text:p>
          </table:table-cell>
          <table:table-cell office:value-type="float" office:value="9.917" calcext:value-type="float">
            <text:p>9.917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-0.0177" calcext:value-type="float">
            <text:p>-0.017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9.9396" calcext:value-type="float">
            <text:p>9.9396</text:p>
          </table:table-cell>
          <table:table-cell office:value-type="float" office:value="-0.0604" calcext:value-type="float">
            <text:p>-0.0604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0116" calcext:value-type="float">
            <text:p>0.011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781" calcext:value-type="float">
            <text:p>-0.078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0116" calcext:value-type="float">
            <text:p>0.011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781" calcext:value-type="float">
            <text:p>-0.0781</text:p>
          </table:table-cell>
          <table:table-cell office:value-type="float" office:value="10.0304" calcext:value-type="float">
            <text:p>10.0304</text:p>
          </table:table-cell>
          <table:table-cell office:value-type="float" office:value="0.0304" calcext:value-type="float">
            <text:p>0.0304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1849" calcext:value-type="float">
            <text:p>-0.1849</text:p>
          </table:table-cell>
          <table:table-cell office:value-type="float" office:value="-0.0477" calcext:value-type="float">
            <text:p>-0.047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1849" calcext:value-type="float">
            <text:p>-0.1849</text:p>
          </table:table-cell>
          <table:table-cell office:value-type="float" office:value="-0.0477" calcext:value-type="float">
            <text:p>-0.0477</text:p>
          </table:table-cell>
          <table:table-cell office:value-type="float" office:value="10.0869" calcext:value-type="float">
            <text:p>10.0869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1891" calcext:value-type="float">
            <text:p>-0.1891</text:p>
          </table:table-cell>
          <table:table-cell office:value-type="float" office:value="0.0393" calcext:value-type="float">
            <text:p>0.039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1891" calcext:value-type="float">
            <text:p>-0.1891</text:p>
          </table:table-cell>
          <table:table-cell office:value-type="float" office:value="0.0393" calcext:value-type="float">
            <text:p>0.0393</text:p>
          </table:table-cell>
          <table:table-cell office:value-type="float" office:value="10.0305" calcext:value-type="float">
            <text:p>10.0305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1346" calcext:value-type="float">
            <text:p>-0.1346</text:p>
          </table:table-cell>
          <table:table-cell office:value-type="float" office:value="0.0697" calcext:value-type="float">
            <text:p>0.0697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1346" calcext:value-type="float">
            <text:p>-0.1346</text:p>
          </table:table-cell>
          <table:table-cell office:value-type="float" office:value="0.0697" calcext:value-type="float">
            <text:p>0.0697</text:p>
          </table:table-cell>
          <table:table-cell office:value-type="float" office:value="9.9522" calcext:value-type="float">
            <text:p>9.9522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219" calcext:value-type="float">
            <text:p>0.021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219" calcext:value-type="float">
            <text:p>0.0219</text:p>
          </table:table-cell>
          <table:table-cell office:value-type="float" office:value="9.9288" calcext:value-type="float">
            <text:p>9.9288</text:p>
          </table:table-cell>
          <table:table-cell office:value-type="float" office:value="-0.0712" calcext:value-type="float">
            <text:p>-0.0712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025" calcext:value-type="float">
            <text:p>-0.1025</text:p>
          </table:table-cell>
          <table:table-cell office:value-type="float" office:value="-0.0493" calcext:value-type="float">
            <text:p>-0.049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025" calcext:value-type="float">
            <text:p>-0.1025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9.9863" calcext:value-type="float">
            <text:p>9.9863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-0.063" calcext:value-type="float">
            <text:p>-0.06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-0.063" calcext:value-type="float">
            <text:p>-0.063</text:p>
          </table:table-cell>
          <table:table-cell office:value-type="float" office:value="10.0628" calcext:value-type="float">
            <text:p>10.0628</text:p>
          </table:table-cell>
          <table:table-cell office:value-type="float" office:value="0.0628" calcext:value-type="float">
            <text:p>0.0628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1902" calcext:value-type="float">
            <text:p>-0.1902</text:p>
          </table:table-cell>
          <table:table-cell office:value-type="float" office:value="-0.0002" calcext:value-type="float">
            <text:p>-0.000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1902" calcext:value-type="float">
            <text:p>-0.190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10.0585" calcext:value-type="float">
            <text:p>10.0585</text:p>
          </table:table-cell>
          <table:table-cell office:value-type="float" office:value="0.0585" calcext:value-type="float">
            <text:p>0.058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1612" calcext:value-type="float">
            <text:p>-0.1612</text:p>
          </table:table-cell>
          <table:table-cell office:value-type="float" office:value="0.0583" calcext:value-type="float">
            <text:p>0.058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1612" calcext:value-type="float">
            <text:p>-0.1612</text:p>
          </table:table-cell>
          <table:table-cell office:value-type="float" office:value="0.0583" calcext:value-type="float">
            <text:p>0.0583</text:p>
          </table:table-cell>
          <table:table-cell office:value-type="float" office:value="9.988" calcext:value-type="float">
            <text:p>9.988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1089" calcext:value-type="float">
            <text:p>-0.1089</text:p>
          </table:table-cell>
          <table:table-cell office:value-type="float" office:value="0.0463" calcext:value-type="float">
            <text:p>0.046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1089" calcext:value-type="float">
            <text:p>-0.1089</text:p>
          </table:table-cell>
          <table:table-cell office:value-type="float" office:value="0.0463" calcext:value-type="float">
            <text:p>0.0463</text:p>
          </table:table-cell>
          <table:table-cell office:value-type="float" office:value="9.9379" calcext:value-type="float">
            <text:p>9.9379</text:p>
          </table:table-cell>
          <table:table-cell office:value-type="float" office:value="-0.0621" calcext:value-type="float">
            <text:p>-0.0621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936" calcext:value-type="float">
            <text:p>-0.0936</text:p>
          </table:table-cell>
          <table:table-cell office:value-type="float" office:value="-0.0158" calcext:value-type="float">
            <text:p>-0.015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936" calcext:value-type="float">
            <text:p>-0.0936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9.9579" calcext:value-type="float">
            <text:p>9.9579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1305" calcext:value-type="float">
            <text:p>-0.1305</text:p>
          </table:table-cell>
          <table:table-cell office:value-type="float" office:value="-0.0579" calcext:value-type="float">
            <text:p>-0.057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1305" calcext:value-type="float">
            <text:p>-0.13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10.0251" calcext:value-type="float">
            <text:p>10.0251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27" calcext:value-type="float">
            <text:p>0.0127</text:p>
          </table:table-cell>
          <table:table-cell office:value-type="float" office:value="-0.1758" calcext:value-type="float">
            <text:p>-0.1758</text:p>
          </table:table-cell>
          <table:table-cell office:value-type="float" office:value="-0.0328" calcext:value-type="float">
            <text:p>-0.0328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27" calcext:value-type="float">
            <text:p>0.0127</text:p>
          </table:table-cell>
          <table:table-cell office:value-type="float" office:value="-0.1758" calcext:value-type="float">
            <text:p>-0.1758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10.0637" calcext:value-type="float">
            <text:p>10.0637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1767" calcext:value-type="float">
            <text:p>-0.1767</text:p>
          </table:table-cell>
          <table:table-cell office:value-type="float" office:value="0.0309" calcext:value-type="float">
            <text:p>0.030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1767" calcext:value-type="float">
            <text:p>-0.1767</text:p>
          </table:table-cell>
          <table:table-cell office:value-type="float" office:value="0.0309" calcext:value-type="float">
            <text:p>0.0309</text:p>
          </table:table-cell>
          <table:table-cell office:value-type="float" office:value="10.0204" calcext:value-type="float">
            <text:p>10.0204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356" calcext:value-type="float">
            <text:p>-0.1356</text:p>
          </table:table-cell>
          <table:table-cell office:value-type="float" office:value="0.0513" calcext:value-type="float">
            <text:p>0.0513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356" calcext:value-type="float">
            <text:p>-0.1356</text:p>
          </table:table-cell>
          <table:table-cell office:value-type="float" office:value="0.0513" calcext:value-type="float">
            <text:p>0.0513</text:p>
          </table:table-cell>
          <table:table-cell office:value-type="float" office:value="9.9626" calcext:value-type="float">
            <text:p>9.9626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0139" calcext:value-type="float">
            <text:p>0.0139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9.948" calcext:value-type="float">
            <text:p>9.948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151" calcext:value-type="float">
            <text:p>-0.1151</text:p>
          </table:table-cell>
          <table:table-cell office:value-type="float" office:value="-0.0381" calcext:value-type="float">
            <text:p>-0.038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151" calcext:value-type="float">
            <text:p>-0.1151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9.9925" calcext:value-type="float">
            <text:p>9.992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-0.0456" calcext:value-type="float">
            <text:p>-0.045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10.0476" calcext:value-type="float">
            <text:p>10.0476</text:p>
          </table:table-cell>
          <table:table-cell office:value-type="float" office:value="0.0476" calcext:value-type="float">
            <text:p>0.0476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1787" calcext:value-type="float">
            <text:p>-0.1787</text:p>
          </table:table-cell>
          <table:table-cell office:value-type="float" office:value="0.002" calcext:value-type="float">
            <text:p>0.00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1787" calcext:value-type="float">
            <text:p>-0.1787</text:p>
          </table:table-cell>
          <table:table-cell office:value-type="float" office:value="0.002" calcext:value-type="float">
            <text:p>0.002</text:p>
          </table:table-cell>
          <table:table-cell office:value-type="float" office:value="10.0416" calcext:value-type="float">
            <text:p>10.0416</text:p>
          </table:table-cell>
          <table:table-cell office:value-type="float" office:value="0.0416" calcext:value-type="float">
            <text:p>0.0416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1559" calcext:value-type="float">
            <text:p>-0.1559</text:p>
          </table:table-cell>
          <table:table-cell office:value-type="float" office:value="0.0436" calcext:value-type="float">
            <text:p>0.0436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1559" calcext:value-type="float">
            <text:p>-0.1559</text:p>
          </table:table-cell>
          <table:table-cell office:value-type="float" office:value="0.0436" calcext:value-type="float">
            <text:p>0.0436</text:p>
          </table:table-cell>
          <table:table-cell office:value-type="float" office:value="9.9895" calcext:value-type="float">
            <text:p>9.9895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0.0331" calcext:value-type="float">
            <text:p>0.0331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0.0331" calcext:value-type="float">
            <text:p>0.0331</text:p>
          </table:table-cell>
          <table:table-cell office:value-type="float" office:value="9.9534" calcext:value-type="float">
            <text:p>9.9534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1078" calcext:value-type="float">
            <text:p>-0.1078</text:p>
          </table:table-cell>
          <table:table-cell office:value-type="float" office:value="-0.0135" calcext:value-type="float">
            <text:p>-0.0135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1078" calcext:value-type="float">
            <text:p>-0.1078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9.9704" calcext:value-type="float">
            <text:p>9.9704</text:p>
          </table:table-cell>
          <table:table-cell office:value-type="float" office:value="-0.0296" calcext:value-type="float">
            <text:p>-0.0296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1361" calcext:value-type="float">
            <text:p>-0.1361</text:p>
          </table:table-cell>
          <table:table-cell office:value-type="float" office:value="-0.0432" calcext:value-type="float">
            <text:p>-0.0432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1361" calcext:value-type="float">
            <text:p>-0.1361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10.0204" calcext:value-type="float">
            <text:p>10.0204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1691" calcext:value-type="float">
            <text:p>-0.1691</text:p>
          </table:table-cell>
          <table:table-cell office:value-type="float" office:value="-0.0227" calcext:value-type="float">
            <text:p>-0.022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538" calcext:value-type="float">
            <text:p>0.6538</text:p>
          </table:table-cell>
          <table:table-cell office:value-type="float" office:value="-0.6089" calcext:value-type="float">
            <text:p>-0.6089</text:p>
          </table:table-cell>
          <table:table-cell office:value-type="float" office:value="-0.3247" calcext:value-type="float">
            <text:p>-0.3247</text:p>
          </table:table-cell>
          <table:table-cell office:value-type="float" office:value="0.5642" calcext:value-type="float">
            <text:p>0.5642</text:p>
          </table:table-cell>
          <table:table-cell office:value-type="float" office:value="10.0033" calcext:value-type="float">
            <text:p>10.0033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1691" calcext:value-type="float">
            <text:p>-0.1691</text:p>
          </table:table-cell>
          <table:table-cell office:value-type="float" office:value="-0.904" calcext:value-type="float">
            <text:p>-0.904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5675" calcext:value-type="float">
            <text:p>0.567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0.1691" calcext:value-type="float">
            <text:p>-0.1691</text:p>
          </table:table-cell>
          <table:table-cell office:value-type="float" office:value="-0.904" calcext:value-type="float">
            <text:p>-0.904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5675" calcext:value-type="float">
            <text:p>0.5675</text:p>
          </table:table-cell>
          <table:table-cell office:value-type="float" office:value="8.9375" calcext:value-type="float">
            <text:p>8.9375</text:p>
          </table:table-cell>
          <table:table-cell office:value-type="float" office:value="-1.0625" calcext:value-type="float">
            <text:p>-1.0625</text:p>
          </table:table-cell>
          <table:table-cell office:value-type="float" office:value="-0.838" calcext:value-type="float">
            <text:p>-0.838</text:p>
          </table:table-cell>
          <table:table-cell office:value-type="float" office:value="-0.3281" calcext:value-type="float">
            <text:p>-0.3281</text:p>
          </table:table-cell>
          <table:table-cell office:value-type="float" office:value="0.2773" calcext:value-type="float">
            <text:p>0.2773</text:p>
          </table:table-cell>
          <table:table-cell office:value-type="float" office:value="-0.4951" calcext:value-type="float">
            <text:p>-0.495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0.838" calcext:value-type="float">
            <text:p>-0.838</text:p>
          </table:table-cell>
          <table:table-cell office:value-type="float" office:value="-0.3281" calcext:value-type="float">
            <text:p>-0.3281</text:p>
          </table:table-cell>
          <table:table-cell office:value-type="float" office:value="0.2773" calcext:value-type="float">
            <text:p>0.2773</text:p>
          </table:table-cell>
          <table:table-cell office:value-type="float" office:value="-0.4951" calcext:value-type="float">
            <text:p>-0.4951</text:p>
          </table:table-cell>
          <table:table-cell office:value-type="float" office:value="9.4066" calcext:value-type="float">
            <text:p>9.4066</text:p>
          </table:table-cell>
          <table:table-cell office:value-type="float" office:value="-0.5934" calcext:value-type="float">
            <text:p>-0.5934</text:p>
          </table:table-cell>
          <table:table-cell office:value-type="float" office:value="-0.7213" calcext:value-type="float">
            <text:p>-0.7213</text:p>
          </table:table-cell>
          <table:table-cell office:value-type="float" office:value="0.5463" calcext:value-type="float">
            <text:p>0.5463</text:p>
          </table:table-cell>
          <table:table-cell office:value-type="float" office:value="-0.5145" calcext:value-type="float">
            <text:p>-0.5145</text:p>
          </table:table-cell>
          <table:table-cell office:value-type="float" office:value="-1.0885" calcext:value-type="float">
            <text:p>-1.088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7213" calcext:value-type="float">
            <text:p>-0.7213</text:p>
          </table:table-cell>
          <table:table-cell office:value-type="float" office:value="0.5463" calcext:value-type="float">
            <text:p>0.5463</text:p>
          </table:table-cell>
          <table:table-cell office:value-type="float" office:value="-0.5145" calcext:value-type="float">
            <text:p>-0.5145</text:p>
          </table:table-cell>
          <table:table-cell office:value-type="float" office:value="-1.0885" calcext:value-type="float">
            <text:p>-1.0885</text:p>
          </table:table-cell>
          <table:table-cell office:value-type="float" office:value="11.1302" calcext:value-type="float">
            <text:p>11.1302</text:p>
          </table:table-cell>
          <table:table-cell office:value-type="float" office:value="1.1302" calcext:value-type="float">
            <text:p>1.130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8591" calcext:value-type="float">
            <text:p>0.8591</text:p>
          </table:table-cell>
          <table:table-cell office:value-type="float" office:value="-1.0378" calcext:value-type="float">
            <text:p>-1.0378</text:p>
          </table:table-cell>
          <table:table-cell office:value-type="float" office:value="0.0417" calcext:value-type="float">
            <text:p>0.041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8591" calcext:value-type="float">
            <text:p>0.8591</text:p>
          </table:table-cell>
          <table:table-cell office:value-type="float" office:value="-1.0378" calcext:value-type="float">
            <text:p>-1.0378</text:p>
          </table:table-cell>
          <table:table-cell office:value-type="float" office:value="0.0417" calcext:value-type="float">
            <text:p>0.0417</text:p>
          </table:table-cell>
          <table:table-cell office:value-type="float" office:value="11.284" calcext:value-type="float">
            <text:p>11.284</text:p>
          </table:table-cell>
          <table:table-cell office:value-type="float" office:value="1.284" calcext:value-type="float">
            <text:p>1.284</text:p>
          </table:table-cell>
          <table:table-cell office:value-type="float" office:value="0.6996" calcext:value-type="float">
            <text:p>0.6996</text:p>
          </table:table-cell>
          <table:table-cell office:value-type="float" office:value="0.3497" calcext:value-type="float">
            <text:p>0.3497</text:p>
          </table:table-cell>
          <table:table-cell office:value-type="float" office:value="-0.3541" calcext:value-type="float">
            <text:p>-0.3541</text:p>
          </table:table-cell>
          <table:table-cell office:value-type="float" office:value="1.3257" calcext:value-type="float">
            <text:p>1.325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6996" calcext:value-type="float">
            <text:p>0.6996</text:p>
          </table:table-cell>
          <table:table-cell office:value-type="float" office:value="0.3497" calcext:value-type="float">
            <text:p>0.3497</text:p>
          </table:table-cell>
          <table:table-cell office:value-type="float" office:value="-0.3541" calcext:value-type="float">
            <text:p>-0.3541</text:p>
          </table:table-cell>
          <table:table-cell office:value-type="float" office:value="1.3257" calcext:value-type="float">
            <text:p>1.3257</text:p>
          </table:table-cell>
          <table:table-cell office:value-type="float" office:value="9.1895" calcext:value-type="float">
            <text:p>9.1895</text:p>
          </table:table-cell>
          <table:table-cell office:value-type="float" office:value="-0.8105" calcext:value-type="float">
            <text:p>-0.8105</text:p>
          </table:table-cell>
          <table:table-cell office:value-type="float" office:value="0.6662" calcext:value-type="float">
            <text:p>0.6662</text:p>
          </table:table-cell>
          <table:table-cell office:value-type="float" office:value="-0.4273" calcext:value-type="float">
            <text:p>-0.4273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152" calcext:value-type="float">
            <text:p>0.515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662" calcext:value-type="float">
            <text:p>0.6662</text:p>
          </table:table-cell>
          <table:table-cell office:value-type="float" office:value="-0.4273" calcext:value-type="float">
            <text:p>-0.4273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152" calcext:value-type="float">
            <text:p>0.5152</text:p>
          </table:table-cell>
          <table:table-cell office:value-type="float" office:value="9.669" calcext:value-type="float">
            <text:p>9.669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0297" calcext:value-type="float">
            <text:p>0.0297</text:p>
          </table:table-cell>
          <table:table-cell office:value-type="float" office:value="-0.743" calcext:value-type="float">
            <text:p>-0.743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1842" calcext:value-type="float">
            <text:p>0.184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297" calcext:value-type="float">
            <text:p>0.0297</text:p>
          </table:table-cell>
          <table:table-cell office:value-type="float" office:value="-0.743" calcext:value-type="float">
            <text:p>-0.743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1842" calcext:value-type="float">
            <text:p>0.1842</text:p>
          </table:table-cell>
          <table:table-cell office:value-type="float" office:value="8.7831" calcext:value-type="float">
            <text:p>8.7831</text:p>
          </table:table-cell>
          <table:table-cell office:value-type="float" office:value="-1.2169" calcext:value-type="float">
            <text:p>-1.2169</text:p>
          </table:table-cell>
          <table:table-cell office:value-type="float" office:value="-0.5682" calcext:value-type="float">
            <text:p>-0.5682</text:p>
          </table:table-cell>
          <table:table-cell office:value-type="float" office:value="-0.354" calcext:value-type="float">
            <text:p>-0.354</text:p>
          </table:table-cell>
          <table:table-cell office:value-type="float" office:value="0.4919" calcext:value-type="float">
            <text:p>0.4919</text:p>
          </table:table-cell>
          <table:table-cell office:value-type="float" office:value="-1.0326" calcext:value-type="float">
            <text:p>-1.032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0.5682" calcext:value-type="float">
            <text:p>-0.5682</text:p>
          </table:table-cell>
          <table:table-cell office:value-type="float" office:value="-0.354" calcext:value-type="float">
            <text:p>-0.354</text:p>
          </table:table-cell>
          <table:table-cell office:value-type="float" office:value="0.4919" calcext:value-type="float">
            <text:p>0.4919</text:p>
          </table:table-cell>
          <table:table-cell office:value-type="float" office:value="-1.0326" calcext:value-type="float">
            <text:p>-1.0326</text:p>
          </table:table-cell>
          <table:table-cell office:value-type="float" office:value="10.1625" calcext:value-type="float">
            <text:p>10.1625</text:p>
          </table:table-cell>
          <table:table-cell office:value-type="float" office:value="0.1625" calcext:value-type="float">
            <text:p>0.1625</text:p>
          </table:table-cell>
          <table:table-cell office:value-type="float" office:value="-0.5911" calcext:value-type="float">
            <text:p>-0.5911</text:p>
          </table:table-cell>
          <table:table-cell office:value-type="float" office:value="0.3243" calcext:value-type="float">
            <text:p>0.3243</text:p>
          </table:table-cell>
          <table:table-cell office:value-type="float" office:value="-0.4595" calcext:value-type="float">
            <text:p>-0.4595</text:p>
          </table:table-cell>
          <table:table-cell office:value-type="float" office:value="-0.8702" calcext:value-type="float">
            <text:p>-0.8702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-0.5911" calcext:value-type="float">
            <text:p>-0.5911</text:p>
          </table:table-cell>
          <table:table-cell office:value-type="float" office:value="0.3243" calcext:value-type="float">
            <text:p>0.3243</text:p>
          </table:table-cell>
          <table:table-cell office:value-type="float" office:value="-0.4595" calcext:value-type="float">
            <text:p>-0.4595</text:p>
          </table:table-cell>
          <table:table-cell office:value-type="float" office:value="-0.8702" calcext:value-type="float">
            <text:p>-0.8702</text:p>
          </table:table-cell>
          <table:table-cell office:value-type="float" office:value="10.8368" calcext:value-type="float">
            <text:p>10.8368</text:p>
          </table:table-cell>
          <table:table-cell office:value-type="float" office:value="0.8368" calcext:value-type="float">
            <text:p>0.836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0.6338" calcext:value-type="float">
            <text:p>0.6338</text:p>
          </table:table-cell>
          <table:table-cell office:value-type="float" office:value="-0.9113" calcext:value-type="float">
            <text:p>-0.9113</text:p>
          </table:table-cell>
          <table:table-cell office:value-type="float" office:value="-0.0333" calcext:value-type="float">
            <text:p>-0.033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0.6338" calcext:value-type="float">
            <text:p>0.6338</text:p>
          </table:table-cell>
          <table:table-cell office:value-type="float" office:value="-0.9113" calcext:value-type="float">
            <text:p>-0.9113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10.971" calcext:value-type="float">
            <text:p>10.971</text:p>
          </table:table-cell>
          <table:table-cell office:value-type="float" office:value="0.971" calcext:value-type="float">
            <text:p>0.971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3317" calcext:value-type="float">
            <text:p>0.3317</text:p>
          </table:table-cell>
          <table:table-cell office:value-type="float" office:value="-0.4591" calcext:value-type="float">
            <text:p>-0.4591</text:p>
          </table:table-cell>
          <table:table-cell office:value-type="float" office:value="0.9377" calcext:value-type="float">
            <text:p>0.937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3317" calcext:value-type="float">
            <text:p>0.3317</text:p>
          </table:table-cell>
          <table:table-cell office:value-type="float" office:value="-0.4591" calcext:value-type="float">
            <text:p>-0.4591</text:p>
          </table:table-cell>
          <table:table-cell office:value-type="float" office:value="0.9377" calcext:value-type="float">
            <text:p>0.9377</text:p>
          </table:table-cell>
          <table:table-cell office:value-type="float" office:value="9.8298" calcext:value-type="float">
            <text:p>9.829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5112" calcext:value-type="float">
            <text:p>0.5112</text:p>
          </table:table-cell>
          <table:table-cell office:value-type="float" office:value="-0.2379" calcext:value-type="float">
            <text:p>-0.2379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7675" calcext:value-type="float">
            <text:p>0.767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5112" calcext:value-type="float">
            <text:p>0.5112</text:p>
          </table:table-cell>
          <table:table-cell office:value-type="float" office:value="-0.2379" calcext:value-type="float">
            <text:p>-0.2379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7675" calcext:value-type="float">
            <text:p>0.7675</text:p>
          </table:table-cell>
          <table:table-cell office:value-type="float" office:value="9.388" calcext:value-type="float">
            <text:p>9.388</text:p>
          </table:table-cell>
          <table:table-cell office:value-type="float" office:value="-0.612" calcext:value-type="float">
            <text:p>-0.612</text:p>
          </table:table-cell>
          <table:table-cell office:value-type="float" office:value="0.0992" calcext:value-type="float">
            <text:p>0.0992</text:p>
          </table:table-cell>
          <table:table-cell office:value-type="float" office:value="-0.5249" calcext:value-type="float">
            <text:p>-0.5249</text:p>
          </table:table-cell>
          <table:table-cell office:value-type="float" office:value="0.855" calcext:value-type="float">
            <text:p>0.855</text:p>
          </table:table-cell>
          <table:table-cell office:value-type="float" office:value="0.1555" calcext:value-type="float">
            <text:p>0.155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0992" calcext:value-type="float">
            <text:p>0.0992</text:p>
          </table:table-cell>
          <table:table-cell office:value-type="float" office:value="-0.5249" calcext:value-type="float">
            <text:p>-0.5249</text:p>
          </table:table-cell>
          <table:table-cell office:value-type="float" office:value="0.855" calcext:value-type="float">
            <text:p>0.855</text:p>
          </table:table-cell>
          <table:table-cell office:value-type="float" office:value="0.1555" calcext:value-type="float">
            <text:p>0.1555</text:p>
          </table:table-cell>
          <table:table-cell office:value-type="float" office:value="9.0944" calcext:value-type="float">
            <text:p>9.0944</text:p>
          </table:table-cell>
          <table:table-cell office:value-type="float" office:value="-0.9056" calcext:value-type="float">
            <text:p>-0.9056</text:p>
          </table:table-cell>
          <table:table-cell office:value-type="float" office:value="-0.3496" calcext:value-type="float">
            <text:p>-0.3496</text:p>
          </table:table-cell>
          <table:table-cell office:value-type="float" office:value="-0.2986" calcext:value-type="float">
            <text:p>-0.2986</text:p>
          </table:table-cell>
          <table:table-cell office:value-type="float" office:value="0.5576" calcext:value-type="float">
            <text:p>0.5576</text:p>
          </table:table-cell>
          <table:table-cell office:value-type="float" office:value="-0.7501" calcext:value-type="float">
            <text:p>-0.750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0.3496" calcext:value-type="float">
            <text:p>-0.3496</text:p>
          </table:table-cell>
          <table:table-cell office:value-type="float" office:value="-0.2986" calcext:value-type="float">
            <text:p>-0.2986</text:p>
          </table:table-cell>
          <table:table-cell office:value-type="float" office:value="0.5576" calcext:value-type="float">
            <text:p>0.5576</text:p>
          </table:table-cell>
          <table:table-cell office:value-type="float" office:value="-0.7501" calcext:value-type="float">
            <text:p>-0.7501</text:p>
          </table:table-cell>
          <table:table-cell office:value-type="float" office:value="9.888" calcext:value-type="float">
            <text:p>9.888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4214" calcext:value-type="float">
            <text:p>-0.4214</text:p>
          </table:table-cell>
          <table:table-cell office:value-type="float" office:value="0.1759" calcext:value-type="float">
            <text:p>0.1759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8621" calcext:value-type="float">
            <text:p>-0.862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0.4214" calcext:value-type="float">
            <text:p>-0.4214</text:p>
          </table:table-cell>
          <table:table-cell office:value-type="float" office:value="0.1759" calcext:value-type="float">
            <text:p>0.1759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8621" calcext:value-type="float">
            <text:p>-0.8621</text:p>
          </table:table-cell>
          <table:table-cell office:value-type="float" office:value="10.7701" calcext:value-type="float">
            <text:p>10.7701</text:p>
          </table:table-cell>
          <table:table-cell office:value-type="float" office:value="0.7701" calcext:value-type="float">
            <text:p>0.7701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4284" calcext:value-type="float">
            <text:p>0.4284</text:p>
          </table:table-cell>
          <table:table-cell office:value-type="float" office:value="-0.7256" calcext:value-type="float">
            <text:p>-0.7256</text:p>
          </table:table-cell>
          <table:table-cell office:value-type="float" office:value="-0.092" calcext:value-type="float">
            <text:p>-0.09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4284" calcext:value-type="float">
            <text:p>0.4284</text:p>
          </table:table-cell>
          <table:table-cell office:value-type="float" office:value="-0.7256" calcext:value-type="float">
            <text:p>-0.7256</text:p>
          </table:table-cell>
          <table:table-cell office:value-type="float" office:value="-0.092" calcext:value-type="float">
            <text:p>-0.092</text:p>
          </table:table-cell>
          <table:table-cell office:value-type="float" office:value="10.6989" calcext:value-type="float">
            <text:p>10.6989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547" calcext:value-type="float">
            <text:p>0.2547</text:p>
          </table:table-cell>
          <table:table-cell office:value-type="float" office:value="-0.4681" calcext:value-type="float">
            <text:p>-0.4681</text:p>
          </table:table-cell>
          <table:table-cell office:value-type="float" office:value="0.6069" calcext:value-type="float">
            <text:p>0.606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547" calcext:value-type="float">
            <text:p>0.2547</text:p>
          </table:table-cell>
          <table:table-cell office:value-type="float" office:value="-0.4681" calcext:value-type="float">
            <text:p>-0.4681</text:p>
          </table:table-cell>
          <table:table-cell office:value-type="float" office:value="0.6069" calcext:value-type="float">
            <text:p>0.6069</text:p>
          </table:table-cell>
          <table:table-cell office:value-type="float" office:value="10.2397" calcext:value-type="float">
            <text:p>10.2397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3476" calcext:value-type="float">
            <text:p>0.3476</text:p>
          </table:table-cell>
          <table:table-cell office:value-type="float" office:value="-0.1299" calcext:value-type="float">
            <text:p>-0.1299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8466" calcext:value-type="float">
            <text:p>0.84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3476" calcext:value-type="float">
            <text:p>0.3476</text:p>
          </table:table-cell>
          <table:table-cell office:value-type="float" office:value="-0.1299" calcext:value-type="float">
            <text:p>-0.1299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8466" calcext:value-type="float">
            <text:p>0.8466</text:p>
          </table:table-cell>
          <table:table-cell office:value-type="float" office:value="9.2492" calcext:value-type="float">
            <text:p>9.2492</text:p>
          </table:table-cell>
          <table:table-cell office:value-type="float" office:value="-0.7508" calcext:value-type="float">
            <text:p>-0.7508</text:p>
          </table:table-cell>
          <table:table-cell office:value-type="float" office:value="0.0961" calcext:value-type="float">
            <text:p>0.0961</text:p>
          </table:table-cell>
          <table:table-cell office:value-type="float" office:value="-0.3405" calcext:value-type="float">
            <text:p>-0.3405</text:p>
          </table:table-cell>
          <table:table-cell office:value-type="float" office:value="0.7298" calcext:value-type="float">
            <text:p>0.7298</text:p>
          </table:table-cell>
          <table:table-cell office:value-type="float" office:value="0.0957" calcext:value-type="float">
            <text:p>0.095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961" calcext:value-type="float">
            <text:p>0.0961</text:p>
          </table:table-cell>
          <table:table-cell office:value-type="float" office:value="-0.3405" calcext:value-type="float">
            <text:p>-0.3405</text:p>
          </table:table-cell>
          <table:table-cell office:value-type="float" office:value="0.7298" calcext:value-type="float">
            <text:p>0.7298</text:p>
          </table:table-cell>
          <table:table-cell office:value-type="float" office:value="0.0957" calcext:value-type="float">
            <text:p>0.0957</text:p>
          </table:table-cell>
          <table:table-cell office:value-type="float" office:value="9.3583" calcext:value-type="float">
            <text:p>9.3583</text:p>
          </table:table-cell>
          <table:table-cell office:value-type="float" office:value="-0.6417" calcext:value-type="float">
            <text:p>-0.6417</text:p>
          </table:table-cell>
          <table:table-cell office:value-type="float" office:value="-0.2018" calcext:value-type="float">
            <text:p>-0.2018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5046" calcext:value-type="float">
            <text:p>0.5046</text:p>
          </table:table-cell>
          <table:table-cell office:value-type="float" office:value="-0.546" calcext:value-type="float">
            <text:p>-0.54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-0.2018" calcext:value-type="float">
            <text:p>-0.2018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5046" calcext:value-type="float">
            <text:p>0.5046</text:p>
          </table:table-cell>
          <table:table-cell office:value-type="float" office:value="-0.546" calcext:value-type="float">
            <text:p>-0.546</text:p>
          </table:table-cell>
          <table:table-cell office:value-type="float" office:value="9.8175" calcext:value-type="float">
            <text:p>9.8175</text:p>
          </table:table-cell>
          <table:table-cell office:value-type="float" office:value="-0.1825" calcext:value-type="float">
            <text:p>-0.1825</text:p>
          </table:table-cell>
          <table:table-cell office:value-type="float" office:value="-0.2644" calcext:value-type="float">
            <text:p>-0.264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0.1326" calcext:value-type="float">
            <text:p>-0.1326</text:p>
          </table:table-cell>
          <table:table-cell office:value-type="float" office:value="-0.7285" calcext:value-type="float">
            <text:p>-0.728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0.2644" calcext:value-type="float">
            <text:p>-0.264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0.1326" calcext:value-type="float">
            <text:p>-0.1326</text:p>
          </table:table-cell>
          <table:table-cell office:value-type="float" office:value="-0.7285" calcext:value-type="float">
            <text:p>-0.7285</text:p>
          </table:table-cell>
          <table:table-cell office:value-type="float" office:value="10.6" calcext:value-type="float">
            <text:p>10.6</text:p>
          </table:table-cell>
          <table:table-cell office:value-type="float" office:value="0.6" calcext:value-type="float">
            <text:p>0.6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2636" calcext:value-type="float">
            <text:p>0.2636</text:p>
          </table:table-cell>
          <table:table-cell office:value-type="float" office:value="-0.5611" calcext:value-type="float">
            <text:p>-0.5611</text:p>
          </table:table-cell>
          <table:table-cell office:value-type="float" office:value="-0.1285" calcext:value-type="float">
            <text:p>-0.128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2636" calcext:value-type="float">
            <text:p>0.2636</text:p>
          </table:table-cell>
          <table:table-cell office:value-type="float" office:value="-0.5611" calcext:value-type="float">
            <text:p>-0.5611</text:p>
          </table:table-cell>
          <table:table-cell office:value-type="float" office:value="-0.1285" calcext:value-type="float">
            <text:p>-0.1285</text:p>
          </table:table-cell>
          <table:table-cell office:value-type="float" office:value="10.5049" calcext:value-type="float">
            <text:p>10.5049</text:p>
          </table:table-cell>
          <table:table-cell office:value-type="float" office:value="0.5049" calcext:value-type="float">
            <text:p>0.5049</text:p>
          </table:table-cell>
          <table:table-cell table:number-columns-repeated="2" office:value-type="float" office:value="0.1574" calcext:value-type="float">
            <text:p>0.1574</text:p>
          </table:table-cell>
          <table:table-cell office:value-type="float" office:value="-0.4372" calcext:value-type="float">
            <text:p>-0.4372</text:p>
          </table:table-cell>
          <table:table-cell office:value-type="float" office:value="0.3764" calcext:value-type="float">
            <text:p>0.376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1574" calcext:value-type="float">
            <text:p>0.1574</text:p>
          </table:table-cell>
          <table:table-cell office:value-type="float" office:value="-0.4372" calcext:value-type="float">
            <text:p>-0.4372</text:p>
          </table:table-cell>
          <table:table-cell office:value-type="float" office:value="0.3764" calcext:value-type="float">
            <text:p>0.3764</text:p>
          </table:table-cell>
          <table:table-cell office:value-type="float" office:value="10.2668" calcext:value-type="float">
            <text:p>10.266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2013" calcext:value-type="float">
            <text:p>0.2013</text:p>
          </table:table-cell>
          <table:table-cell office:value-type="float" office:value="-0.0813" calcext:value-type="float">
            <text:p>-0.0813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6432" calcext:value-type="float">
            <text:p>0.643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2013" calcext:value-type="float">
            <text:p>0.2013</text:p>
          </table:table-cell>
          <table:table-cell office:value-type="float" office:value="-0.0813" calcext:value-type="float">
            <text:p>-0.0813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6432" calcext:value-type="float">
            <text:p>0.6432</text:p>
          </table:table-cell>
          <table:table-cell office:value-type="float" office:value="9.5011" calcext:value-type="float">
            <text:p>9.5011</text:p>
          </table:table-cell>
          <table:table-cell office:value-type="float" office:value="-0.4989" calcext:value-type="float">
            <text:p>-0.4989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2066" calcext:value-type="float">
            <text:p>-0.2066</text:p>
          </table:table-cell>
          <table:table-cell office:value-type="float" office:value="0.4664" calcext:value-type="float">
            <text:p>0.4664</text:p>
          </table:table-cell>
          <table:table-cell office:value-type="float" office:value="0.1443" calcext:value-type="float">
            <text:p>0.144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2066" calcext:value-type="float">
            <text:p>-0.2066</text:p>
          </table:table-cell>
          <table:table-cell office:value-type="float" office:value="0.4664" calcext:value-type="float">
            <text:p>0.4664</text:p>
          </table:table-cell>
          <table:table-cell office:value-type="float" office:value="0.1443" calcext:value-type="float">
            <text:p>0.1443</text:p>
          </table:table-cell>
          <table:table-cell office:value-type="float" office:value="9.5062" calcext:value-type="float">
            <text:p>9.5062</text:p>
          </table:table-cell>
          <table:table-cell office:value-type="float" office:value="-0.4938" calcext:value-type="float">
            <text:p>-0.4938</text:p>
          </table:table-cell>
          <table:table-cell office:value-type="float" office:value="-0.1263" calcext:value-type="float">
            <text:p>-0.1263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3638" calcext:value-type="float">
            <text:p>0.3638</text:p>
          </table:table-cell>
          <table:table-cell office:value-type="float" office:value="-0.3495" calcext:value-type="float">
            <text:p>-0.349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-0.1263" calcext:value-type="float">
            <text:p>-0.1263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3638" calcext:value-type="float">
            <text:p>0.3638</text:p>
          </table:table-cell>
          <table:table-cell office:value-type="float" office:value="-0.3495" calcext:value-type="float">
            <text:p>-0.3495</text:p>
          </table:table-cell>
          <table:table-cell office:value-type="float" office:value="9.7994" calcext:value-type="float">
            <text:p>9.7994</text:p>
          </table:table-cell>
          <table:table-cell office:value-type="float" office:value="-0.2006" calcext:value-type="float">
            <text:p>-0.2006</text:p>
          </table:table-cell>
          <table:table-cell office:value-type="float" office:value="-0.1514" calcext:value-type="float">
            <text:p>-0.1514</text:p>
          </table:table-cell>
          <table:table-cell office:value-type="float" office:value="0.0725" calcext:value-type="float">
            <text:p>0.0725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5501" calcext:value-type="float">
            <text:p>-0.550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-0.1514" calcext:value-type="float">
            <text:p>-0.1514</text:p>
          </table:table-cell>
          <table:table-cell office:value-type="float" office:value="0.0725" calcext:value-type="float">
            <text:p>0.0725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5501" calcext:value-type="float">
            <text:p>-0.5501</text:p>
          </table:table-cell>
          <table:table-cell office:value-type="float" office:value="10.4267" calcext:value-type="float">
            <text:p>10.4267</text:p>
          </table:table-cell>
          <table:table-cell office:value-type="float" office:value="0.4267" calcext:value-type="float">
            <text:p>0.4267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0.1588" calcext:value-type="float">
            <text:p>0.1588</text:p>
          </table:table-cell>
          <table:table-cell office:value-type="float" office:value="-0.4228" calcext:value-type="float">
            <text:p>-0.4228</text:p>
          </table:table-cell>
          <table:table-cell office:value-type="float" office:value="-0.1234" calcext:value-type="float">
            <text:p>-0.123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0.1588" calcext:value-type="float">
            <text:p>0.1588</text:p>
          </table:table-cell>
          <table:table-cell office:value-type="float" office:value="-0.4228" calcext:value-type="float">
            <text:p>-0.4228</text:p>
          </table:table-cell>
          <table:table-cell office:value-type="float" office:value="-0.1234" calcext:value-type="float">
            <text:p>-0.1234</text:p>
          </table:table-cell>
          <table:table-cell office:value-type="float" office:value="10.3921" calcext:value-type="float">
            <text:p>10.3921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756" calcext:value-type="float">
            <text:p>0.0756</text:p>
          </table:table-cell>
          <table:table-cell office:value-type="float" office:value="-0.3502" calcext:value-type="float">
            <text:p>-0.3502</text:p>
          </table:table-cell>
          <table:table-cell office:value-type="float" office:value="0.2687" calcext:value-type="float">
            <text:p>0.268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756" calcext:value-type="float">
            <text:p>0.0756</text:p>
          </table:table-cell>
          <table:table-cell office:value-type="float" office:value="-0.3502" calcext:value-type="float">
            <text:p>-0.3502</text:p>
          </table:table-cell>
          <table:table-cell office:value-type="float" office:value="0.2687" calcext:value-type="float">
            <text:p>0.2687</text:p>
          </table:table-cell>
          <table:table-cell office:value-type="float" office:value="10.1601" calcext:value-type="float">
            <text:p>10.1601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1036" calcext:value-type="float">
            <text:p>0.1036</text:p>
          </table:table-cell>
          <table:table-cell office:value-type="float" office:value="-0.0697" calcext:value-type="float">
            <text:p>-0.0697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4288" calcext:value-type="float">
            <text:p>0.428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1036" calcext:value-type="float">
            <text:p>0.1036</text:p>
          </table:table-cell>
          <table:table-cell office:value-type="float" office:value="-0.0697" calcext:value-type="float">
            <text:p>-0.0697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4288" calcext:value-type="float">
            <text:p>0.4288</text:p>
          </table:table-cell>
          <table:table-cell office:value-type="float" office:value="9.6996" calcext:value-type="float">
            <text:p>9.6996</text:p>
          </table:table-cell>
          <table:table-cell office:value-type="float" office:value="-0.3004" calcext:value-type="float">
            <text:p>-0.30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1244" calcext:value-type="float">
            <text:p>-0.1244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1285" calcext:value-type="float">
            <text:p>0.128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1244" calcext:value-type="float">
            <text:p>-0.1244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1285" calcext:value-type="float">
            <text:p>0.1285</text:p>
          </table:table-cell>
          <table:table-cell office:value-type="float" office:value="9.6126" calcext:value-type="float">
            <text:p>9.6126</text:p>
          </table:table-cell>
          <table:table-cell office:value-type="float" office:value="-0.3874" calcext:value-type="float">
            <text:p>-0.3874</text:p>
          </table:table-cell>
          <table:table-cell office:value-type="float" office:value="-0.0914" calcext:value-type="float">
            <text:p>-0.0914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0.212" calcext:value-type="float">
            <text:p>0.212</text:p>
          </table:table-cell>
          <table:table-cell office:value-type="float" office:value="-0.2589" calcext:value-type="float">
            <text:p>-0.258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-0.0914" calcext:value-type="float">
            <text:p>-0.0914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0.212" calcext:value-type="float">
            <text:p>0.212</text:p>
          </table:table-cell>
          <table:table-cell office:value-type="float" office:value="-0.2589" calcext:value-type="float">
            <text:p>-0.2589</text:p>
          </table:table-cell>
          <table:table-cell office:value-type="float" office:value="9.8601" calcext:value-type="float">
            <text:p>9.8601</text:p>
          </table:table-cell>
          <table:table-cell office:value-type="float" office:value="-0.1399" calcext:value-type="float">
            <text:p>-0.1399</text:p>
          </table:table-cell>
          <table:table-cell office:value-type="float" office:value="-0.0804" calcext:value-type="float">
            <text:p>-0.0804</text:p>
          </table:table-cell>
          <table:table-cell office:value-type="float" office:value="0.0685" calcext:value-type="float">
            <text:p>0.0685</text:p>
          </table:table-cell>
          <table:table-cell office:value-type="float" office:value="-0.1169" calcext:value-type="float">
            <text:p>-0.1169</text:p>
          </table:table-cell>
          <table:table-cell office:value-type="float" office:value="-0.3988" calcext:value-type="float">
            <text:p>-0.398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-0.0804" calcext:value-type="float">
            <text:p>-0.0804</text:p>
          </table:table-cell>
          <table:table-cell office:value-type="float" office:value="0.0685" calcext:value-type="float">
            <text:p>0.0685</text:p>
          </table:table-cell>
          <table:table-cell office:value-type="float" office:value="-0.1169" calcext:value-type="float">
            <text:p>-0.1169</text:p>
          </table:table-cell>
          <table:table-cell office:value-type="float" office:value="-0.3988" calcext:value-type="float">
            <text:p>-0.3988</text:p>
          </table:table-cell>
          <table:table-cell office:value-type="float" office:value="10.3271" calcext:value-type="float">
            <text:p>10.3271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945" calcext:value-type="float">
            <text:p>0.0945</text:p>
          </table:table-cell>
          <table:table-cell office:value-type="float" office:value="-0.3521" calcext:value-type="float">
            <text:p>-0.3521</text:p>
          </table:table-cell>
          <table:table-cell office:value-type="float" office:value="-0.0717" calcext:value-type="float">
            <text:p>-0.071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945" calcext:value-type="float">
            <text:p>0.0945</text:p>
          </table:table-cell>
          <table:table-cell office:value-type="float" office:value="-0.3521" calcext:value-type="float">
            <text:p>-0.3521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10.3171" calcext:value-type="float">
            <text:p>10.3171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2652" calcext:value-type="float">
            <text:p>-0.2652</text:p>
          </table:table-cell>
          <table:table-cell office:value-type="float" office:value="0.2454" calcext:value-type="float">
            <text:p>0.245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2652" calcext:value-type="float">
            <text:p>-0.2652</text:p>
          </table:table-cell>
          <table:table-cell office:value-type="float" office:value="0.2454" calcext:value-type="float">
            <text:p>0.2454</text:p>
          </table:table-cell>
          <table:table-cell office:value-type="float" office:value="10.0371" calcext:value-type="float">
            <text:p>10.0371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409" calcext:value-type="float">
            <text:p>0.0409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2825" calcext:value-type="float">
            <text:p>0.282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0409" calcext:value-type="float">
            <text:p>0.0409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2825" calcext:value-type="float">
            <text:p>0.2825</text:p>
          </table:table-cell>
          <table:table-cell office:value-type="float" office:value="9.7306" calcext:value-type="float">
            <text:p>9.7306</text:p>
          </table:table-cell>
          <table:table-cell office:value-type="float" office:value="-0.2694" calcext:value-type="float">
            <text:p>-0.2694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711" calcext:value-type="float">
            <text:p>-0.0711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131" calcext:value-type="float">
            <text:p>0.013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711" calcext:value-type="float">
            <text:p>-0.0711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131" calcext:value-type="float">
            <text:p>0.0131</text:p>
          </table:table-cell>
          <table:table-cell office:value-type="float" office:value="9.7552" calcext:value-type="float">
            <text:p>9.7552</text:p>
          </table:table-cell>
          <table:table-cell office:value-type="float" office:value="-0.2448" calcext:value-type="float">
            <text:p>-0.2448</text:p>
          </table:table-cell>
          <table:table-cell office:value-type="float" office:value="-0.0713" calcext:value-type="float">
            <text:p>-0.07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73" calcext:value-type="float">
            <text:p>0.0373</text:p>
          </table:table-cell>
          <table:table-cell office:value-type="float" office:value="-0.2317" calcext:value-type="float">
            <text:p>-0.231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-0.0713" calcext:value-type="float">
            <text:p>-0.07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73" calcext:value-type="float">
            <text:p>0.0373</text:p>
          </table:table-cell>
          <table:table-cell office:value-type="float" office:value="-0.2317" calcext:value-type="float">
            <text:p>-0.2317</text:p>
          </table:table-cell>
          <table:table-cell office:value-type="float" office:value="9.968" calcext:value-type="float">
            <text:p>9.968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0623" calcext:value-type="float">
            <text:p>0.0623</text:p>
          </table:table-cell>
          <table:table-cell office:value-type="float" office:value="-0.2104" calcext:value-type="float">
            <text:p>-0.2104</text:p>
          </table:table-cell>
          <table:table-cell office:value-type="float" office:value="-0.2637" calcext:value-type="float">
            <text:p>-0.263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0623" calcext:value-type="float">
            <text:p>0.0623</text:p>
          </table:table-cell>
          <table:table-cell office:value-type="float" office:value="-0.2104" calcext:value-type="float">
            <text:p>-0.2104</text:p>
          </table:table-cell>
          <table:table-cell office:value-type="float" office:value="-0.2637" calcext:value-type="float">
            <text:p>-0.2637</text:p>
          </table:table-cell>
          <table:table-cell office:value-type="float" office:value="10.2687" calcext:value-type="float">
            <text:p>10.2687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3397" calcext:value-type="float">
            <text:p>-0.3397</text:p>
          </table:table-cell>
          <table:table-cell office:value-type="float" office:value="0.005" calcext:value-type="float">
            <text:p>0.00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3397" calcext:value-type="float">
            <text:p>-0.3397</text:p>
          </table:table-cell>
          <table:table-cell office:value-type="float" office:value="0.005" calcext:value-type="float">
            <text:p>0.005</text:p>
          </table:table-cell>
          <table:table-cell office:value-type="float" office:value="10.2315" calcext:value-type="float">
            <text:p>10.2315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0367" calcext:value-type="float">
            <text:p>0.0367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2365" calcext:value-type="float">
            <text:p>0.236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0367" calcext:value-type="float">
            <text:p>0.0367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2365" calcext:value-type="float">
            <text:p>0.2365</text:p>
          </table:table-cell>
          <table:table-cell office:value-type="float" office:value="9.9372" calcext:value-type="float">
            <text:p>9.9372</text:p>
          </table:table-cell>
          <table:table-cell office:value-type="float" office:value="-0.0628" calcext:value-type="float">
            <text:p>-0.062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587" calcext:value-type="float">
            <text:p>-0.0587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1736" calcext:value-type="float">
            <text:p>0.173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587" calcext:value-type="float">
            <text:p>-0.0587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1736" calcext:value-type="float">
            <text:p>0.1736</text:p>
          </table:table-cell>
          <table:table-cell office:value-type="float" office:value="9.7655" calcext:value-type="float">
            <text:p>9.7655</text:p>
          </table:table-cell>
          <table:table-cell office:value-type="float" office:value="-0.2345" calcext:value-type="float">
            <text:p>-0.2345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0.0424" calcext:value-type="float">
            <text:p>0.0424</text:p>
          </table:table-cell>
          <table:table-cell office:value-type="float" office:value="-0.0609" calcext:value-type="float">
            <text:p>-0.060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0.0424" calcext:value-type="float">
            <text:p>0.0424</text:p>
          </table:table-cell>
          <table:table-cell office:value-type="float" office:value="-0.0609" calcext:value-type="float">
            <text:p>-0.0609</text:p>
          </table:table-cell>
          <table:table-cell office:value-type="float" office:value="9.8534" calcext:value-type="float">
            <text:p>9.8534</text:p>
          </table:table-cell>
          <table:table-cell office:value-type="float" office:value="-0.1466" calcext:value-type="float">
            <text:p>-0.1466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0294" calcext:value-type="float">
            <text:p>0.0294</text:p>
          </table:table-cell>
          <table:table-cell office:value-type="float" office:value="-0.0918" calcext:value-type="float">
            <text:p>-0.0918</text:p>
          </table:table-cell>
          <table:table-cell office:value-type="float" office:value="-0.2076" calcext:value-type="float">
            <text:p>-0.207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0294" calcext:value-type="float">
            <text:p>0.0294</text:p>
          </table:table-cell>
          <table:table-cell office:value-type="float" office:value="-0.0918" calcext:value-type="float">
            <text:p>-0.0918</text:p>
          </table:table-cell>
          <table:table-cell office:value-type="float" office:value="-0.2076" calcext:value-type="float">
            <text:p>-0.2076</text:p>
          </table:table-cell>
          <table:table-cell office:value-type="float" office:value="10.0801" calcext:value-type="float">
            <text:p>10.0801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0.0509" calcext:value-type="float">
            <text:p>0.0509</text:p>
          </table:table-cell>
          <table:table-cell office:value-type="float" office:value="-0.2593" calcext:value-type="float">
            <text:p>-0.2593</text:p>
          </table:table-cell>
          <table:table-cell office:value-type="float" office:value="-0.1274" calcext:value-type="float">
            <text:p>-0.127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0.0509" calcext:value-type="float">
            <text:p>0.0509</text:p>
          </table:table-cell>
          <table:table-cell office:value-type="float" office:value="-0.2593" calcext:value-type="float">
            <text:p>-0.2593</text:p>
          </table:table-cell>
          <table:table-cell office:value-type="float" office:value="-0.1274" calcext:value-type="float">
            <text:p>-0.1274</text:p>
          </table:table-cell>
          <table:table-cell office:value-type="float" office:value="10.2339" calcext:value-type="float">
            <text:p>10.2339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36" calcext:value-type="float">
            <text:p>0.0136</text:p>
          </table:table-cell>
          <table:table-cell office:value-type="float" office:value="-0.2698" calcext:value-type="float">
            <text:p>-0.2698</text:p>
          </table:table-cell>
          <table:table-cell office:value-type="float" office:value="0.1065" calcext:value-type="float">
            <text:p>0.106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36" calcext:value-type="float">
            <text:p>0.0136</text:p>
          </table:table-cell>
          <table:table-cell office:value-type="float" office:value="-0.2698" calcext:value-type="float">
            <text:p>-0.2698</text:p>
          </table:table-cell>
          <table:table-cell office:value-type="float" office:value="0.1065" calcext:value-type="float">
            <text:p>0.1065</text:p>
          </table:table-cell>
          <table:table-cell office:value-type="float" office:value="10.0846" calcext:value-type="float">
            <text:p>10.08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142" calcext:value-type="float">
            <text:p>0.0142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-0.1211" calcext:value-type="float">
            <text:p>-0.1211</text:p>
          </table:table-cell>
          <table:table-cell office:value-type="float" office:value="0.1911" calcext:value-type="float">
            <text:p>0.191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0.0142" calcext:value-type="float">
            <text:p>0.0142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-0.1211" calcext:value-type="float">
            <text:p>-0.1211</text:p>
          </table:table-cell>
          <table:table-cell office:value-type="float" office:value="0.1911" calcext:value-type="float">
            <text:p>0.1911</text:p>
          </table:table-cell>
          <table:table-cell office:value-type="float" office:value="9.8681" calcext:value-type="float">
            <text:p>9.8681</text:p>
          </table:table-cell>
          <table:table-cell office:value-type="float" office:value="-0.1319" calcext:value-type="float">
            <text:p>-0.1319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592" calcext:value-type="float">
            <text:p>0.059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592" calcext:value-type="float">
            <text:p>0.0592</text:p>
          </table:table-cell>
          <table:table-cell office:value-type="float" office:value="9.8187" calcext:value-type="float">
            <text:p>9.8187</text:p>
          </table:table-cell>
          <table:table-cell office:value-type="float" office:value="-0.1813" calcext:value-type="float">
            <text:p>-0.1813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-0" calcext:value-type="float">
            <text:p>0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-0.1222" calcext:value-type="float">
            <text:p>-0.122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-0" calcext:value-type="float">
            <text:p>0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-0.1222" calcext:value-type="float">
            <text:p>-0.1222</text:p>
          </table:table-cell>
          <table:table-cell office:value-type="float" office:value="9.9583" calcext:value-type="float">
            <text:p>9.9583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704" calcext:value-type="float">
            <text:p>-0.1704</text:p>
          </table:table-cell>
          <table:table-cell office:value-type="float" office:value="-0.1639" calcext:value-type="float">
            <text:p>-0.163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704" calcext:value-type="float">
            <text:p>-0.1704</text:p>
          </table:table-cell>
          <table:table-cell office:value-type="float" office:value="-0.1639" calcext:value-type="float">
            <text:p>-0.1639</text:p>
          </table:table-cell>
          <table:table-cell office:value-type="float" office:value="10.149" calcext:value-type="float">
            <text:p>10.14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303" calcext:value-type="float">
            <text:p>0.0303</text:p>
          </table:table-cell>
          <table:table-cell office:value-type="float" office:value="-0.2598" calcext:value-type="float">
            <text:p>-0.2598</text:p>
          </table:table-cell>
          <table:table-cell office:value-type="float" office:value="-0.0149" calcext:value-type="float">
            <text:p>-0.014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303" calcext:value-type="float">
            <text:p>0.0303</text:p>
          </table:table-cell>
          <table:table-cell office:value-type="float" office:value="-0.2598" calcext:value-type="float">
            <text:p>-0.2598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10.1593" calcext:value-type="float">
            <text:p>10.1593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1444" calcext:value-type="float">
            <text:p>0.144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1444" calcext:value-type="float">
            <text:p>0.1444</text:p>
          </table:table-cell>
          <table:table-cell office:value-type="float" office:value="9.9836" calcext:value-type="float">
            <text:p>9.9836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-0.0588" calcext:value-type="float">
            <text:p>-0.0588</text:p>
          </table:table-cell>
          <table:table-cell office:value-type="float" office:value="0.128" calcext:value-type="float">
            <text:p>0.12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-0.0588" calcext:value-type="float">
            <text:p>-0.0588</text:p>
          </table:table-cell>
          <table:table-cell office:value-type="float" office:value="0.128" calcext:value-type="float">
            <text:p>0.128</text:p>
          </table:table-cell>
          <table:table-cell office:value-type="float" office:value="9.8444" calcext:value-type="float">
            <text:p>9.8444</text:p>
          </table:table-cell>
          <table:table-cell office:value-type="float" office:value="-0.1556" calcext:value-type="float">
            <text:p>-0.155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275" calcext:value-type="float">
            <text:p>-0.027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9.8877" calcext:value-type="float">
            <text:p>9.8877</text:p>
          </table:table-cell>
          <table:table-cell office:value-type="float" office:value="-0.1123" calcext:value-type="float">
            <text:p>-0.1123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922" calcext:value-type="float">
            <text:p>-0.0922</text:p>
          </table:table-cell>
          <table:table-cell office:value-type="float" office:value="-0.1398" calcext:value-type="float">
            <text:p>-0.139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922" calcext:value-type="float">
            <text:p>-0.0922</text:p>
          </table:table-cell>
          <table:table-cell office:value-type="float" office:value="-0.1398" calcext:value-type="float">
            <text:p>-0.1398</text:p>
          </table:table-cell>
          <table:table-cell office:value-type="float" office:value="10.0432" calcext:value-type="float">
            <text:p>10.0432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0.0332" calcext:value-type="float">
            <text:p>0.0332</text:p>
          </table:table-cell>
          <table:table-cell office:value-type="float" office:value="-0.2104" calcext:value-type="float">
            <text:p>-0.2104</text:p>
          </table:table-cell>
          <table:table-cell office:value-type="float" office:value="-0.0966" calcext:value-type="float">
            <text:p>-0.09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0.0332" calcext:value-type="float">
            <text:p>0.0332</text:p>
          </table:table-cell>
          <table:table-cell office:value-type="float" office:value="-0.2104" calcext:value-type="float">
            <text:p>-0.2104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10.1599" calcext:value-type="float">
            <text:p>10.1599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0633" calcext:value-type="float">
            <text:p>0.063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0633" calcext:value-type="float">
            <text:p>0.0633</text:p>
          </table:table-cell>
          <table:table-cell office:value-type="float" office:value="10.067" calcext:value-type="float">
            <text:p>10.06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41" calcext:value-type="float">
            <text:p>0.0041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-0.1302" calcext:value-type="float">
            <text:p>-0.1302</text:p>
          </table:table-cell>
          <table:table-cell office:value-type="float" office:value="0.1303" calcext:value-type="float">
            <text:p>0.130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0.0041" calcext:value-type="float">
            <text:p>0.0041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-0.1302" calcext:value-type="float">
            <text:p>-0.1302</text:p>
          </table:table-cell>
          <table:table-cell office:value-type="float" office:value="0.1303" calcext:value-type="float">
            <text:p>0.1303</text:p>
          </table:table-cell>
          <table:table-cell office:value-type="float" office:value="9.9178" calcext:value-type="float">
            <text:p>9.9178</text:p>
          </table:table-cell>
          <table:table-cell office:value-type="float" office:value="-0.0822" calcext:value-type="float">
            <text:p>-0.0822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0.048" calcext:value-type="float">
            <text:p>0.04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0.048" calcext:value-type="float">
            <text:p>0.048</text:p>
          </table:table-cell>
          <table:table-cell office:value-type="float" office:value="9.8663" calcext:value-type="float">
            <text:p>9.8663</text:p>
          </table:table-cell>
          <table:table-cell office:value-type="float" office:value="-0.1337" calcext:value-type="float">
            <text:p>-0.1337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599" calcext:value-type="float">
            <text:p>-0.0599</text:p>
          </table:table-cell>
          <table:table-cell office:value-type="float" office:value="-0.0856" calcext:value-type="float">
            <text:p>-0.085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599" calcext:value-type="float">
            <text:p>-0.0599</text:p>
          </table:table-cell>
          <table:table-cell office:value-type="float" office:value="-0.0856" calcext:value-type="float">
            <text:p>-0.0856</text:p>
          </table:table-cell>
          <table:table-cell office:value-type="float" office:value="9.967" calcext:value-type="float">
            <text:p>9.96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273" calcext:value-type="float">
            <text:p>0.0273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186" calcext:value-type="float">
            <text:p>-0.118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273" calcext:value-type="float">
            <text:p>0.0273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186" calcext:value-type="float">
            <text:p>-0.1186</text:p>
          </table:table-cell>
          <table:table-cell office:value-type="float" office:value="10.1095" calcext:value-type="float">
            <text:p>10.1095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2258" calcext:value-type="float">
            <text:p>-0.2258</text:p>
          </table:table-cell>
          <table:table-cell office:value-type="float" office:value="-0.0091" calcext:value-type="float">
            <text:p>-0.009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2258" calcext:value-type="float">
            <text:p>-0.2258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10.1129" calcext:value-type="float">
            <text:p>10.1129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1784" calcext:value-type="float">
            <text:p>-0.1784</text:p>
          </table:table-cell>
          <table:table-cell office:value-type="float" office:value="0.1039" calcext:value-type="float">
            <text:p>0.103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1784" calcext:value-type="float">
            <text:p>-0.1784</text:p>
          </table:table-cell>
          <table:table-cell office:value-type="float" office:value="0.1039" calcext:value-type="float">
            <text:p>0.1039</text:p>
          </table:table-cell>
          <table:table-cell office:value-type="float" office:value="9.985" calcext:value-type="float">
            <text:p>9.98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0.0889" calcext:value-type="float">
            <text:p>0.088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0.0889" calcext:value-type="float">
            <text:p>0.0889</text:p>
          </table:table-cell>
          <table:table-cell office:value-type="float" office:value="9.8892" calcext:value-type="float">
            <text:p>9.8892</text:p>
          </table:table-cell>
          <table:table-cell office:value-type="float" office:value="-0.1108" calcext:value-type="float">
            <text:p>-0.1108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-0.0219" calcext:value-type="float">
            <text:p>-0.021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9.9171" calcext:value-type="float">
            <text:p>9.9171</text:p>
          </table:table-cell>
          <table:table-cell office:value-type="float" office:value="-0.0829" calcext:value-type="float">
            <text:p>-0.082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1048" calcext:value-type="float">
            <text:p>-0.104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1048" calcext:value-type="float">
            <text:p>-0.1048</text:p>
          </table:table-cell>
          <table:table-cell office:value-type="float" office:value="10.039" calcext:value-type="float">
            <text:p>10.039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237" calcext:value-type="float">
            <text:p>0.0237</text:p>
          </table:table-cell>
          <table:table-cell office:value-type="float" office:value="-0.1972" calcext:value-type="float">
            <text:p>-0.1972</text:p>
          </table:table-cell>
          <table:table-cell office:value-type="float" office:value="-0.0658" calcext:value-type="float">
            <text:p>-0.065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237" calcext:value-type="float">
            <text:p>0.0237</text:p>
          </table:table-cell>
          <table:table-cell office:value-type="float" office:value="-0.1972" calcext:value-type="float">
            <text:p>-0.1972</text:p>
          </table:table-cell>
          <table:table-cell office:value-type="float" office:value="-0.0658" calcext:value-type="float">
            <text:p>-0.0658</text:p>
          </table:table-cell>
          <table:table-cell office:value-type="float" office:value="10.117" calcext:value-type="float">
            <text:p>10.117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2045" calcext:value-type="float">
            <text:p>-0.2045</text:p>
          </table:table-cell>
          <table:table-cell office:value-type="float" office:value="0.0512" calcext:value-type="float">
            <text:p>0.051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2045" calcext:value-type="float">
            <text:p>-0.2045</text:p>
          </table:table-cell>
          <table:table-cell office:value-type="float" office:value="0.0512" calcext:value-type="float">
            <text:p>0.0512</text:p>
          </table:table-cell>
          <table:table-cell office:value-type="float" office:value="10.043" calcext:value-type="float">
            <text:p>10.043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1319" calcext:value-type="float">
            <text:p>-0.1319</text:p>
          </table:table-cell>
          <table:table-cell office:value-type="float" office:value="0.0942" calcext:value-type="float">
            <text:p>0.094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1319" calcext:value-type="float">
            <text:p>-0.1319</text:p>
          </table:table-cell>
          <table:table-cell office:value-type="float" office:value="0.0942" calcext:value-type="float">
            <text:p>0.0942</text:p>
          </table:table-cell>
          <table:table-cell office:value-type="float" office:value="9.9366" calcext:value-type="float">
            <text:p>9.9366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694" calcext:value-type="float">
            <text:p>-0.0694</text:p>
          </table:table-cell>
          <table:table-cell office:value-type="float" office:value="0.0308" calcext:value-type="float">
            <text:p>0.030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694" calcext:value-type="float">
            <text:p>-0.0694</text:p>
          </table:table-cell>
          <table:table-cell office:value-type="float" office:value="0.0308" calcext:value-type="float">
            <text:p>0.0308</text:p>
          </table:table-cell>
          <table:table-cell office:value-type="float" office:value="9.9042" calcext:value-type="float">
            <text:p>9.9042</text:p>
          </table:table-cell>
          <table:table-cell office:value-type="float" office:value="-0.0958" calcext:value-type="float">
            <text:p>-0.0958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065" calcext:value-type="float">
            <text:p>-0.06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065" calcext:value-type="float">
            <text:p>-0.065</text:p>
          </table:table-cell>
          <table:table-cell office:value-type="float" office:value="9.9798" calcext:value-type="float">
            <text:p>9.9798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202" calcext:value-type="float">
            <text:p>0.0202</text:p>
          </table:table-cell>
          <table:table-cell office:value-type="float" office:value="-0.1616" calcext:value-type="float">
            <text:p>-0.1616</text:p>
          </table:table-cell>
          <table:table-cell office:value-type="float" office:value="-0.0852" calcext:value-type="float">
            <text:p>-0.085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202" calcext:value-type="float">
            <text:p>0.0202</text:p>
          </table:table-cell>
          <table:table-cell office:value-type="float" office:value="-0.1616" calcext:value-type="float">
            <text:p>-0.1616</text:p>
          </table:table-cell>
          <table:table-cell office:value-type="float" office:value="-0.0852" calcext:value-type="float">
            <text:p>-0.0852</text:p>
          </table:table-cell>
          <table:table-cell office:value-type="float" office:value="10.0835" calcext:value-type="float">
            <text:p>10.0835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0017" calcext:value-type="float">
            <text:p>-0.001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0.0793" calcext:value-type="float">
            <text:p>10.0793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1671" calcext:value-type="float">
            <text:p>-0.1671</text:p>
          </table:table-cell>
          <table:table-cell office:value-type="float" office:value="0.0776" calcext:value-type="float">
            <text:p>0.077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1671" calcext:value-type="float">
            <text:p>-0.1671</text:p>
          </table:table-cell>
          <table:table-cell office:value-type="float" office:value="0.0776" calcext:value-type="float">
            <text:p>0.0776</text:p>
          </table:table-cell>
          <table:table-cell office:value-type="float" office:value="9.9848" calcext:value-type="float">
            <text:p>9.9848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971" calcext:value-type="float">
            <text:p>-0.0971</text:p>
          </table:table-cell>
          <table:table-cell office:value-type="float" office:value="0.0623" calcext:value-type="float">
            <text:p>0.062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971" calcext:value-type="float">
            <text:p>-0.0971</text:p>
          </table:table-cell>
          <table:table-cell office:value-type="float" office:value="0.0623" calcext:value-type="float">
            <text:p>0.0623</text:p>
          </table:table-cell>
          <table:table-cell office:value-type="float" office:value="9.9176" calcext:value-type="float">
            <text:p>9.9176</text:p>
          </table:table-cell>
          <table:table-cell office:value-type="float" office:value="-0.0824" calcext:value-type="float">
            <text:p>-0.0824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201" calcext:value-type="float">
            <text:p>-0.020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9.9429" calcext:value-type="float">
            <text:p>9.9429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1246" calcext:value-type="float">
            <text:p>-0.1246</text:p>
          </table:table-cell>
          <table:table-cell office:value-type="float" office:value="-0.0771" calcext:value-type="float">
            <text:p>-0.077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1246" calcext:value-type="float">
            <text:p>-0.1246</text:p>
          </table:table-cell>
          <table:table-cell office:value-type="float" office:value="-0.0771" calcext:value-type="float">
            <text:p>-0.0771</text:p>
          </table:table-cell>
          <table:table-cell office:value-type="float" office:value="10.0329" calcext:value-type="float">
            <text:p>10.0329</text:p>
          </table:table-cell>
          <table:table-cell office:value-type="float" office:value="0.0329" calcext:value-type="float">
            <text:p>0.0329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1852" calcext:value-type="float">
            <text:p>-0.1852</text:p>
          </table:table-cell>
          <table:table-cell office:value-type="float" office:value="-0.0443" calcext:value-type="float">
            <text:p>-0.044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1852" calcext:value-type="float">
            <text:p>-0.1852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10.085" calcext:value-type="float">
            <text:p>10.0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0407" calcext:value-type="float">
            <text:p>0.040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0407" calcext:value-type="float">
            <text:p>0.0407</text:p>
          </table:table-cell>
          <table:table-cell office:value-type="float" office:value="10.0273" calcext:value-type="float">
            <text:p>10.0273</text:p>
          </table:table-cell>
          <table:table-cell office:value-type="float" office:value="0.0273" calcext:value-type="float">
            <text:p>0.027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326" calcext:value-type="float">
            <text:p>-0.1326</text:p>
          </table:table-cell>
          <table:table-cell office:value-type="float" office:value="0.068" calcext:value-type="float">
            <text:p>0.06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1326" calcext:value-type="float">
            <text:p>-0.1326</text:p>
          </table:table-cell>
          <table:table-cell office:value-type="float" office:value="0.068" calcext:value-type="float">
            <text:p>0.068</text:p>
          </table:table-cell>
          <table:table-cell office:value-type="float" office:value="9.951" calcext:value-type="float">
            <text:p>9.95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211" calcext:value-type="float">
            <text:p>-0.0211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0191" calcext:value-type="float">
            <text:p>0.019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-0.0211" calcext:value-type="float">
            <text:p>-0.0211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0191" calcext:value-type="float">
            <text:p>0.0191</text:p>
          </table:table-cell>
          <table:table-cell office:value-type="float" office:value="9.9309" calcext:value-type="float">
            <text:p>9.930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1046" calcext:value-type="float">
            <text:p>-0.1046</text:p>
          </table:table-cell>
          <table:table-cell office:value-type="float" office:value="-0.05" calcext:value-type="float">
            <text:p>-0.0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1046" calcext:value-type="float">
            <text:p>-0.1046</text:p>
          </table:table-cell>
          <table:table-cell office:value-type="float" office:value="-0.05" calcext:value-type="float">
            <text:p>-0.05</text:p>
          </table:table-cell>
          <table:table-cell office:value-type="float" office:value="9.9891" calcext:value-type="float">
            <text:p>9.9891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1601" calcext:value-type="float">
            <text:p>-0.1601</text:p>
          </table:table-cell>
          <table:table-cell office:value-type="float" office:value="-0.0609" calcext:value-type="float">
            <text:p>-0.060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1601" calcext:value-type="float">
            <text:p>-0.1601</text:p>
          </table:table-cell>
          <table:table-cell office:value-type="float" office:value="-0.0609" calcext:value-type="float">
            <text:p>-0.0609</text:p>
          </table:table-cell>
          <table:table-cell office:value-type="float" office:value="10.0631" calcext:value-type="float">
            <text:p>10.0631</text:p>
          </table:table-cell>
          <table:table-cell office:value-type="float" office:value="0.0631" calcext:value-type="float">
            <text:p>0.063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1894" calcext:value-type="float">
            <text:p>-0.1894</text:p>
          </table:table-cell>
          <table:table-cell office:value-type="float" office:value="0.0022" calcext:value-type="float">
            <text:p>0.002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1894" calcext:value-type="float">
            <text:p>-0.1894</text:p>
          </table:table-cell>
          <table:table-cell office:value-type="float" office:value="0.0022" calcext:value-type="float">
            <text:p>0.0022</text:p>
          </table:table-cell>
          <table:table-cell office:value-type="float" office:value="10.0557" calcext:value-type="float">
            <text:p>10.0557</text:p>
          </table:table-cell>
          <table:table-cell office:value-type="float" office:value="0.0557" calcext:value-type="float">
            <text:p>0.0557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1594" calcext:value-type="float">
            <text:p>-0.1594</text:p>
          </table:table-cell>
          <table:table-cell office:value-type="float" office:value="0.0579" calcext:value-type="float">
            <text:p>0.0579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1594" calcext:value-type="float">
            <text:p>-0.1594</text:p>
          </table:table-cell>
          <table:table-cell office:value-type="float" office:value="0.0579" calcext:value-type="float">
            <text:p>0.0579</text:p>
          </table:table-cell>
          <table:table-cell office:value-type="float" office:value="9.9861" calcext:value-type="float">
            <text:p>9.9861</text:p>
          </table:table-cell>
          <table:table-cell table:number-columns-repeated="2" office:value-type="float" office:value="-0.0139" calcext:value-type="float">
            <text:p>-0.0139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1084" calcext:value-type="float">
            <text:p>-0.1084</text:p>
          </table:table-cell>
          <table:table-cell office:value-type="float" office:value="0.044" calcext:value-type="float">
            <text:p>0.04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1084" calcext:value-type="float">
            <text:p>-0.1084</text:p>
          </table:table-cell>
          <table:table-cell office:value-type="float" office:value="0.044" calcext:value-type="float">
            <text:p>0.044</text:p>
          </table:table-cell>
          <table:table-cell office:value-type="float" office:value="9.9385" calcext:value-type="float">
            <text:p>9.9385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952" calcext:value-type="float">
            <text:p>-0.0952</text:p>
          </table:table-cell>
          <table:table-cell office:value-type="float" office:value="-0.0175" calcext:value-type="float">
            <text:p>-0.017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952" calcext:value-type="float">
            <text:p>-0.0952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9.9604" calcext:value-type="float">
            <text:p>9.9604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1325" calcext:value-type="float">
            <text:p>-0.1325</text:p>
          </table:table-cell>
          <table:table-cell office:value-type="float" office:value="-0.0571" calcext:value-type="float">
            <text:p>-0.057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1325" calcext:value-type="float">
            <text:p>-0.1325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0.0269" calcext:value-type="float">
            <text:p>10.0269</text:p>
          </table:table-cell>
          <table:table-cell office:value-type="float" office:value="0.0269" calcext:value-type="float">
            <text:p>0.026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1761" calcext:value-type="float">
            <text:p>-0.1761</text:p>
          </table:table-cell>
          <table:table-cell office:value-type="float" office:value="-0.0302" calcext:value-type="float">
            <text:p>-0.030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1761" calcext:value-type="float">
            <text:p>-0.1761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10.0622" calcext:value-type="float">
            <text:p>10.0622</text:p>
          </table:table-cell>
          <table:table-cell office:value-type="float" office:value="0.0622" calcext:value-type="float">
            <text:p>0.062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1752" calcext:value-type="float">
            <text:p>-0.1752</text:p>
          </table:table-cell>
          <table:table-cell office:value-type="float" office:value="0.032" calcext:value-type="float">
            <text:p>0.03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1752" calcext:value-type="float">
            <text:p>-0.1752</text:p>
          </table:table-cell>
          <table:table-cell office:value-type="float" office:value="0.032" calcext:value-type="float">
            <text:p>0.032</text:p>
          </table:table-cell>
          <table:table-cell office:value-type="float" office:value="10.0181" calcext:value-type="float">
            <text:p>10.0181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341" calcext:value-type="float">
            <text:p>-0.1341</text:p>
          </table:table-cell>
          <table:table-cell office:value-type="float" office:value="0.0501" calcext:value-type="float">
            <text:p>0.0501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1341" calcext:value-type="float">
            <text:p>-0.1341</text:p>
          </table:table-cell>
          <table:table-cell office:value-type="float" office:value="0.0501" calcext:value-type="float">
            <text:p>0.0501</text:p>
          </table:table-cell>
          <table:table-cell office:value-type="float" office:value="9.9617" calcext:value-type="float">
            <text:p>9.9617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1032" calcext:value-type="float">
            <text:p>-0.1032</text:p>
          </table:table-cell>
          <table:table-cell office:value-type="float" office:value="0.0118" calcext:value-type="float">
            <text:p>0.011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1032" calcext:value-type="float">
            <text:p>-0.1032</text:p>
          </table:table-cell>
          <table:table-cell office:value-type="float" office:value="0.0118" calcext:value-type="float">
            <text:p>0.0118</text:p>
          </table:table-cell>
          <table:table-cell office:value-type="float" office:value="9.9496" calcext:value-type="float">
            <text:p>9.9496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1166" calcext:value-type="float">
            <text:p>-0.1166</text:p>
          </table:table-cell>
          <table:table-cell office:value-type="float" office:value="-0.0386" calcext:value-type="float">
            <text:p>-0.038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1166" calcext:value-type="float">
            <text:p>-0.1166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9.9946" calcext:value-type="float">
            <text:p>9.9946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79" calcext:value-type="float">
            <text:p>-0.1579</text:p>
          </table:table-cell>
          <table:table-cell office:value-type="float" office:value="-0.044" calcext:value-type="float">
            <text:p>-0.044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1579" calcext:value-type="float">
            <text:p>-0.1579</text:p>
          </table:table-cell>
          <table:table-cell office:value-type="float" office:value="-0.044" calcext:value-type="float">
            <text:p>-0.044</text:p>
          </table:table-cell>
          <table:table-cell office:value-type="float" office:value="10.0478" calcext:value-type="float">
            <text:p>10.0478</text:p>
          </table:table-cell>
          <table:table-cell office:value-type="float" office:value="0.0478" calcext:value-type="float">
            <text:p>0.0478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0037" calcext:value-type="float">
            <text:p>0.0037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0037" calcext:value-type="float">
            <text:p>0.0037</text:p>
          </table:table-cell>
          <table:table-cell office:value-type="float" office:value="10.0395" calcext:value-type="float">
            <text:p>10.0395</text:p>
          </table:table-cell>
          <table:table-cell office:value-type="float" office:value="0.0395" calcext:value-type="float">
            <text:p>0.039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1545" calcext:value-type="float">
            <text:p>-0.1545</text:p>
          </table:table-cell>
          <table:table-cell office:value-type="float" office:value="0.0432" calcext:value-type="float">
            <text:p>0.0432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1545" calcext:value-type="float">
            <text:p>-0.1545</text:p>
          </table:table-cell>
          <table:table-cell office:value-type="float" office:value="0.0432" calcext:value-type="float">
            <text:p>0.0432</text:p>
          </table:table-cell>
          <table:table-cell office:value-type="float" office:value="9.9881" calcext:value-type="float">
            <text:p>9.9881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173" calcext:value-type="float">
            <text:p>-0.1173</text:p>
          </table:table-cell>
          <table:table-cell office:value-type="float" office:value="0.0313" calcext:value-type="float">
            <text:p>0.0313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173" calcext:value-type="float">
            <text:p>-0.1173</text:p>
          </table:table-cell>
          <table:table-cell office:value-type="float" office:value="0.0313" calcext:value-type="float">
            <text:p>0.0313</text:p>
          </table:table-cell>
          <table:table-cell office:value-type="float" office:value="9.9539" calcext:value-type="float">
            <text:p>9.9539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148" calcext:value-type="float">
            <text:p>-0.0148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9.9722" calcext:value-type="float">
            <text:p>9.9722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1376" calcext:value-type="float">
            <text:p>-0.1376</text:p>
          </table:table-cell>
          <table:table-cell office:value-type="float" office:value="-0.0425" calcext:value-type="float">
            <text:p>-0.0425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1376" calcext:value-type="float">
            <text:p>-0.1376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10.0217" calcext:value-type="float">
            <text:p>10.0217</text:p>
          </table:table-cell>
          <table:table-cell office:value-type="float" office:value="0.0217" calcext:value-type="float">
            <text:p>0.0217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693" calcext:value-type="float">
            <text:p>-0.1693</text:p>
          </table:table-cell>
          <table:table-cell office:value-type="float" office:value="-0.0208" calcext:value-type="float">
            <text:p>-0.0208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2T13:59:54.395044529</dc:date>
    <meta:editing-duration>PT34M2S</meta:editing-duration>
    <meta:editing-cycles>1</meta:editing-cycles>
    <meta:document-statistic meta:table-count="1" meta:cell-count="12012" meta:object-count="0"/>
    <meta:generator>LibreOffice/24.2.7.2$Linux_X86_64 LibreOffice_project/420$Build-2</meta:generator>
  </office:meta>
</office:document-meta>
</file>